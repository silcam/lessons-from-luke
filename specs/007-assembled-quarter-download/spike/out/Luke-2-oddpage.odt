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D8000000D8D71C9DDC.png" manifest:media-type="image/png"/>
  <manifest:file-entry manifest:full-path="Pictures/100000010000061D000004B4A5884E27.tif" manifest:media-type="image/tiff"/>
  <manifest:file-entry manifest:full-path="Pictures/100000000000015F0000010245C82B1C.jpg" manifest:media-type="image/jpeg"/>
  <manifest:file-entry manifest:full-path="Pictures/100000000000015F000000FE86D3CF01.jpg" manifest:media-type="image/jpeg"/>
  <manifest:file-entry manifest:full-path="Pictures/100000000000015F000000FE82A96B21.jpg" manifest:media-type="image/jpeg"/>
  <manifest:file-entry manifest:full-path="Pictures/10000001000000D8000000D84820B298.png" manifest:media-type="image/png"/>
  <manifest:file-entry manifest:full-path="Pictures/10000000000000EC000000A4B93C8D38.jpg" manifest:media-type="image/jpeg"/>
  <manifest:file-entry manifest:full-path="Pictures/10000001000000D8000000D80960569F.png" manifest:media-type="image/png"/>
  <manifest:file-entry manifest:full-path="Pictures/1000000100000198000002587AA188E0.png" manifest:media-type="image/png"/>
  <manifest:file-entry manifest:full-path="Pictures/10000001000000D8000000D8E0316050.png" manifest:media-type="image/png"/>
  <manifest:file-entry manifest:full-path="Pictures/100000000000015F000000FE737A598E.jpg" manifest:media-type="image/jpeg"/>
  <manifest:file-entry manifest:full-path="Pictures/100000000000015F000000FE49BFEF8A.jpg" manifest:media-type="image/jpeg"/>
  <manifest:file-entry manifest:full-path="Pictures/100000000000015F000000FE48D5B260.jpg" manifest:media-type="image/jpeg"/>
  <manifest:file-entry manifest:full-path="Pictures/100000000000015F000000FE526EB3BF.jpg" manifest:media-type="image/jpeg"/>
  <manifest:file-entry manifest:full-path="Pictures/10000001000000D8000000D8B40889C5.png" manifest:media-type="image/png"/>
  <manifest:file-entry manifest:full-path="Pictures/100000010000061D000004B76A86C8F8.tif" manifest:media-type="image/tiff"/>
  <manifest:file-entry manifest:full-path="Pictures/10000000000000AF000000B06366BC3C.jpg" manifest:media-type="image/jpeg"/>
  <manifest:file-entry manifest:full-path="Pictures/100000000000015F000000FE6543CF38.jpg" manifest:media-type="image/jpeg"/>
  <manifest:file-entry manifest:full-path="Pictures/100000000000015F000000FEF7AD8A09.jpg" manifest:media-type="image/jpeg"/>
  <manifest:file-entry manifest:full-path="Pictures/10000001000000580000001F0BCB3E69.png" manifest:media-type="image/png"/>
  <manifest:file-entry manifest:full-path="Pictures/10000001000000D8000000D87BF78704.png" manifest:media-type="image/png"/>
  <manifest:file-entry manifest:full-path="Pictures/100000000000015F000000FE6000D6B4.jpg" manifest:media-type="image/jpeg"/>
  <manifest:file-entry manifest:full-path="Pictures/1000000100000B1200000A325E29EC21.tif" manifest:media-type="image/tiff"/>
  <manifest:file-entry manifest:full-path="Pictures/100000000000015F000000FEBA73A5F5.jpg" manifest:media-type="image/jpeg"/>
  <manifest:file-entry manifest:full-path="Pictures/100000000000015F000000FEB38FF3BC.jpg" manifest:media-type="image/jpeg"/>
  <manifest:file-entry manifest:full-path="Pictures/10000001000000D8000000D8782A56DD.png" manifest:media-type="image/png"/>
  <manifest:file-entry manifest:full-path="Pictures/10000000000001D800000158D59B7451.jpg" manifest:media-type="image/jpeg"/>
  <manifest:file-entry manifest:full-path="Pictures/10000000000000EC000000A747F3FB0A.jpg" manifest:media-type="image/jpeg"/>
  <manifest:file-entry manifest:full-path="Pictures/10000000000001D800000224B45A04DA.jpg" manifest:media-type="image/jpeg"/>
  <manifest:file-entry manifest:full-path="Pictures/100000010000061D00000491AB9A9E12.tif" manifest:media-type="image/tiff"/>
  <manifest:file-entry manifest:full-path="Pictures/100000000000015F000000FE6943D135.jpg" manifest:media-type="image/jpeg"/>
  <manifest:file-entry manifest:full-path="Pictures/10000000000000EC000000A78CB3664B.jpg" manifest:media-type="image/jpeg"/>
  <manifest:file-entry manifest:full-path="Pictures/10000000000001D8000001AE8D3C1369.jpg" manifest:media-type="image/jpeg"/>
  <manifest:file-entry manifest:full-path="Pictures/100000000000015F000000FE3A28DBB6.jpg" manifest:media-type="image/jpeg"/>
  <manifest:file-entry manifest:full-path="Pictures/10000000000000EC000000A7C9E2C3FC.jpg" manifest:media-type="image/jpeg"/>
  <manifest:file-entry manifest:full-path="Pictures/10000000000000EC000000A3E38FD3DF.jpg" manifest:media-type="image/jpeg"/>
  <manifest:file-entry manifest:full-path="Pictures/100000010000025D000002AA7D9544F2.tif" manifest:media-type="image/tiff"/>
  <manifest:file-entry manifest:full-path="Pictures/100000000000036C0000026BE04CD1DB.jpg" manifest:media-type="image/jpeg"/>
  <manifest:file-entry manifest:full-path="Pictures/1000000100000B1200000B12621886DF.tif" manifest:media-type="image/tiff"/>
  <manifest:file-entry manifest:full-path="Pictures/10000000000000EC000000A7415CF437.jpg" manifest:media-type="image/jpeg"/>
  <manifest:file-entry manifest:full-path="Pictures/10000000000000EC000000A7DF05098C.jpg" manifest:media-type="image/jpeg"/>
  <manifest:file-entry manifest:full-path="Pictures/10000000000000EC000000A41F1B68A2.jpg" manifest:media-type="image/jpeg"/>
  <manifest:file-entry manifest:full-path="Pictures/10000000000000EC000000A2777F7C0A.jpg" manifest:media-type="image/jpeg"/>
  <manifest:file-entry manifest:full-path="Pictures/10000001000000D8000000D8C767AAAF.png" manifest:media-type="image/png"/>
  <manifest:file-entry manifest:full-path="Pictures/10000001000000D8000000D8CAC59DFA.png" manifest:media-type="image/png"/>
  <manifest:file-entry manifest:full-path="Pictures/10000001000000D8000000D88B65D866.png" manifest:media-type="image/png"/>
  <manifest:file-entry manifest:full-path="Pictures/1000000100000B1300000B265D92404E.tif" manifest:media-type="image/tiff"/>
  <manifest:file-entry manifest:full-path="Pictures/100000000000015F000000FE4C092FF9.jpg" manifest:media-type="image/jpeg"/>
  <manifest:file-entry manifest:full-path="Pictures/100000000000015F000000FE579819F0.jpg" manifest:media-type="image/jpeg"/>
  <manifest:file-entry manifest:full-path="Pictures/100000000000015F000000FE02298944.jpg" manifest:media-type="image/jpeg"/>
  <manifest:file-entry manifest:full-path="Pictures/10000000000000EC000000A31193159C.jpg" manifest:media-type="image/jpeg"/>
  <manifest:file-entry manifest:full-path="Pictures/10000000000000EC000000A7FF339516.jpg" manifest:media-type="image/jpeg"/>
  <manifest:file-entry manifest:full-path="Pictures/100000000000015F000000FE2A9DE9E1.jpg" manifest:media-type="image/jpeg"/>
  <manifest:file-entry manifest:full-path="Pictures/10000000000000EC000000A708EC76E1.jpg" manifest:media-type="image/jpeg"/>
  <manifest:file-entry manifest:full-path="Pictures/10000000000000EC000000A4031B8558.jpg" manifest:media-type="image/jpeg"/>
  <manifest:file-entry manifest:full-path="Pictures/100000000000019C000001BCCEE92BE4.jpg" manifest:media-type="image/jpeg"/>
  <manifest:file-entry manifest:full-path="Pictures/10000000000000EC000000A721D72754.jpg" manifest:media-type="image/jpeg"/>
  <manifest:file-entry manifest:full-path="Pictures/100000000000033B000002C2F19AA661.jpg" manifest:media-type="image/jpeg"/>
  <manifest:file-entry manifest:full-path="Pictures/10000000000000EC000000A37CD7E716.jpg" manifest:media-type="image/jpeg"/>
  <manifest:file-entry manifest:full-path="Pictures/10000000000000EC000000A317665A05.jpg" manifest:media-type="image/jpeg"/>
  <manifest:file-entry manifest:full-path="Pictures/10000000000000EC000000A35B6026C9.jpg" manifest:media-type="image/jpeg"/>
  <manifest:file-entry manifest:full-path="Pictures/100000000000033B000002EC39C14883.jpg" manifest:media-type="image/jpeg"/>
  <manifest:file-entry manifest:full-path="Pictures/10000001000000D8000000D86DF4A2EC.png" manifest:media-type="image/png"/>
  <manifest:file-entry manifest:full-path="Pictures/10000001000009EC00000998E8629FAB.tif" manifest:media-type="image/tiff"/>
  <manifest:file-entry manifest:full-path="Pictures/100000000000015F000000FE56F56AD0.jpg" manifest:media-type="image/jpeg"/>
  <manifest:file-entry manifest:full-path="Pictures/10000001000000D8000000D864D7589F.png" manifest:media-type="image/png"/>
  <manifest:file-entry manifest:full-path="Pictures/10000000000000EC000000A3FCA470E3.jpg" manifest:media-type="image/jpeg"/>
  <manifest:file-entry manifest:full-path="Pictures/10000001000000EC000000EDC07F7958.png" manifest:media-type="image/png"/>
  <manifest:file-entry manifest:full-path="Pictures/100000000000015F000000FE40C83ED5.jpg" manifest:media-type="image/jpeg"/>
  <manifest:file-entry manifest:full-path="Pictures/10000001000000D8000000D879E70A4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mily-generic="roman"/>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PingFang SC" svg:font-family="'PingFang SC'" style:font-family-generic="system" style:font-pitch="variable"/>
    <style:font-face style:name="Songti SC" svg:font-family="'Songti SC'" style:font-family-generic="system" style:font-pitch="variable"/>
    <style:font-face style:name="StarSymbol"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2" style:family="table">
      <style:table-properties style:width="6.8938in" fo:margin-left="0in" fo:break-before="auto" fo:break-after="auto" table:align="left" style:may-break-between-rows="true" style:writing-mode="lr-tb"/>
    </style:style>
    <style:style style:name="Table2.A" style:family="table-column">
      <style:table-column-properties style:column-width="1.1806in"/>
    </style:style>
    <style:style style:name="Table2.B" style:family="table-column">
      <style:table-column-properties style:column-width="5.7132in"/>
    </style:style>
    <style:style style:name="Table2.A1" style:family="table-cell">
      <style:table-cell-properties fo:padding="0.0382in" fo:border="none"/>
    </style:style>
    <style:style style:name="Table2.B1" style:family="table-cell">
      <style:table-cell-properties style:vertical-align="bottom" fo:padding="0.0382in" fo:border="none"/>
    </style:style>
    <style:style style:name="Table3" style:family="table">
      <style:table-properties style:width="6.8938in" fo:margin-left="0in" fo:break-before="auto" fo:break-after="auto" table:align="left" style:may-break-between-rows="false" style:writing-mode="lr-tb"/>
    </style:style>
    <style:style style:name="Table3.A" style:family="table-column">
      <style:table-column-properties style:column-width="1.1806in"/>
    </style:style>
    <style:style style:name="Table3.B" style:family="table-column">
      <style:table-column-properties style:column-width="5.7132in"/>
    </style:style>
    <style:style style:name="Table3.1" style:family="table-row">
      <style:table-row-properties fo:keep-together="always"/>
    </style:style>
    <style:style style:name="Table3.A1" style:family="table-cell">
      <style:table-cell-properties fo:padding="0.0382in" fo:border="none"/>
    </style:style>
    <style:style style:name="Table4" style:family="table">
      <style:table-properties style:width="6.8938in" fo:margin-left="0in" fo:break-before="auto" fo:break-after="auto" table:align="left" fo:background-color="transparent" style:may-break-between-rows="false" style:writing-mode="lr-tb">
        <style:background-image/>
      </style:table-properties>
    </style:style>
    <style:style style:name="Table4.A" style:family="table-column">
      <style:table-column-properties style:column-width="1.0639in"/>
    </style:style>
    <style:style style:name="Table4.B" style:family="table-column">
      <style:table-column-properties style:column-width="5.8299in"/>
    </style:style>
    <style:style style:name="Table4.1" style:family="table-row">
      <style:table-row-properties fo:background-color="transparent" fo:keep-together="always">
        <style:background-image/>
      </style:table-row-properties>
    </style:style>
    <style:style style:name="Table4.A1" style:family="table-cell">
      <style:table-cell-properties fo:padding="0.0382in" fo:border="none"/>
    </style:style>
    <style:style style:name="Table1" style:family="table">
      <style:table-properties style:width="6.891in" fo:margin-left="0in" fo:margin-top="0in" fo:margin-bottom="0in" table:align="left" style:writing-mode="lr-tb"/>
    </style:style>
    <style:style style:name="Table1.A" style:family="table-column">
      <style:table-column-properties style:column-width="0.4347in"/>
    </style:style>
    <style:style style:name="Table1.B" style:family="table-column">
      <style:table-column-properties style:column-width="2.3549in"/>
    </style:style>
    <style:style style:name="Table1.C" style:family="table-column">
      <style:table-column-properties style:column-width="2.9549in"/>
    </style:style>
    <style:style style:name="Table1.D" style:family="table-column">
      <style:table-column-properties style:column-width="1.1465in"/>
    </style:style>
    <style:style style:name="Table1.1" style:family="table-row">
      <style:table-row-properties fo:keep-together="always"/>
    </style:style>
    <style:style style:name="Table1.A1" style:family="table-cell">
      <style:table-cell-properties fo:background-color="transparent" fo:padding="0in" fo:border="none">
        <style:background-image/>
      </style:table-cell-properties>
    </style:style>
    <style:style style:name="Table1.B1" style:family="table-cell">
      <style:table-cell-properties fo:padding="0in" fo:border="none"/>
    </style:style>
    <style:style style:name="Table1.C1" style:family="table-cell">
      <style:table-cell-properties fo:padding="0in" fo:border="none"/>
    </style:style>
    <style:style style:name="Table1.D1" style:family="table-cell">
      <style:table-cell-properties fo:padding="0in" fo:border="none"/>
    </style:style>
    <style:style style:name="Table1.A2" style:family="table-cell">
      <style:table-cell-properties style:vertical-align="" fo:background-color="transparent" fo:padding="0in" fo:border="none">
        <style:background-image/>
      </style:table-cell-properties>
    </style:style>
    <style:style style:name="Title_26_Truth" style:display-name="Title&amp;Truth" style:family="table">
      <style:table-properties style:width="6.8896in" table:align="left" style:may-break-between-rows="true" style:writing-mode="lr-tb" table:border-model="collapsing"/>
    </style:style>
    <style:style style:name="Title_26_Truth.A" style:display-name="Title&amp;Truth.A" style:family="table-column">
      <style:table-column-properties style:column-width="1.0632in"/>
    </style:style>
    <style:style style:name="Title_26_Truth.B" style:display-name="Title&amp;Truth.B" style:family="table-column">
      <style:table-column-properties style:column-width="5.8264in"/>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itle_26_Truth_5f_1" style:display-name="Title&amp;Truth_1" style:family="table">
      <style:table-properties style:width="6.8896in" table:align="left" style:may-break-between-rows="true" style:writing-mode="lr-tb" table:border-model="collapsing"/>
    </style:style>
    <style:style style:name="Title_26_Truth_5f_1.A" style:display-name="Title&amp;Truth_1.A" style:family="table-column">
      <style:table-column-properties style:column-width="1.0632in"/>
    </style:style>
    <style:style style:name="Title_26_Truth_5f_1.B" style:display-name="Title&amp;Truth_1.B" style:family="table-column">
      <style:table-column-properties style:column-width="5.8264in"/>
    </style:style>
    <style:style style:name="Title_26_Truth_5f_1.1" style:display-name="Title&amp;Truth_1.1" style:family="table-row">
      <style:table-row-properties fo:keep-together="auto"/>
    </style:style>
    <style:style style:name="Title_26_Truth_5f_1.A1" style:display-name="Title&amp;Truth_1.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itle_26_Truth_5f_1.B1" style:display-name="Title&amp;Truth_1.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6" style:family="table">
      <style:table-properties style:width="6.8896in" table:align="left" style:may-break-between-rows="true" style:writing-mode="lr-tb" table:border-model="collapsing"/>
    </style:style>
    <style:style style:name="Table6.A" style:family="table-column">
      <style:table-column-properties style:column-width="1.0632in"/>
    </style:style>
    <style:style style:name="Table6.B" style:family="table-column">
      <style:table-column-properties style:column-width="5.8264in"/>
    </style:style>
    <style:style style:name="Table6.1" style:family="table-row">
      <style:table-row-properties fo:keep-together="auto"/>
    </style:style>
    <style:style style:name="Table6.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6.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7" style:family="table">
      <style:table-properties style:width="6.8896in" table:align="left" style:writing-mode="lr-tb"/>
    </style:style>
    <style:style style:name="Table7.A" style:family="table-column">
      <style:table-column-properties style:column-width="1.0632in"/>
    </style:style>
    <style:style style:name="Table7.B" style:family="table-column">
      <style:table-column-properties style:column-width="5.8264in"/>
    </style:style>
    <style:style style:name="Table7.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able7.B1" style:family="table-cell">
      <style:table-cell-properties style:vertical-align="middle" fo:padding-left="0.0403in" fo:padding-right="0.0403in" fo:padding-top="0in" fo:padding-bottom="0.0201in" fo:border-left="none" fo:border-right="none" fo:border-top="none" fo:border-bottom="1pt solid #000000"/>
    </style:style>
    <style:style style:name="Table7.B2" style:family="table-cell">
      <style:table-cell-properties style:vertical-align="middle" fo:padding-left="0.0403in" fo:padding-right="0.0403in" fo:padding-top="0in" fo:padding-bottom="0.0201in" fo:border-left="none" fo:border-right="none" fo:border-top="none" fo:border-bottom="1pt solid #000000"/>
    </style:style>
    <style:style style:name="Table7.B3" style:family="table-cell">
      <style:table-cell-properties style:vertical-align="middle" fo:padding-left="0.0403in" fo:padding-right="0.0403in" fo:padding-top="0in" fo:padding-bottom="0.0201in" fo:border-left="none" fo:border-right="none" fo:border-top="none" fo:border-bottom="1pt solid #000000"/>
    </style:style>
    <style:style style:name="Table7.B4" style:family="table-cell">
      <style:table-cell-properties style:vertical-align="middle" fo:padding-left="0.0403in" fo:padding-right="0.0403in" fo:padding-top="0in" fo:padding-bottom="0.0201in" fo:border-left="none" fo:border-right="none" fo:border-top="none" fo:border-bottom="1pt solid #000000"/>
    </style:style>
    <style:style style:name="Table7.B5" style:family="table-cell">
      <style:table-cell-properties style:vertical-align="middle" fo:padding-left="0.0403in" fo:padding-right="0.0403in" fo:padding-top="0in" fo:padding-bottom="0.0201in" fo:border-left="none" fo:border-right="none" fo:border-top="none" fo:border-bottom="1pt solid #000000"/>
    </style:style>
    <style:style style:name="Table8" style:family="table">
      <style:table-properties style:width="6.8896in" table:align="left" style:writing-mode="lr-tb"/>
    </style:style>
    <style:style style:name="Table8.A" style:family="table-column">
      <style:table-column-properties style:column-width="1.0632in"/>
    </style:style>
    <style:style style:name="Table8.B" style:family="table-column">
      <style:table-column-properties style:column-width="5.8264in"/>
    </style:style>
    <style:style style:name="Table8.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able8.B1" style:family="table-cell">
      <style:table-cell-properties style:vertical-align="middle" fo:padding-left="0.0403in" fo:padding-right="0.0403in" fo:padding-top="0in" fo:padding-bottom="0.0201in" fo:border-left="none" fo:border-right="none" fo:border-top="none" fo:border-bottom="1pt solid #000000"/>
    </style:style>
    <style:style style:name="Table8.B2" style:family="table-cell">
      <style:table-cell-properties style:vertical-align="middle" fo:padding-left="0.0403in" fo:padding-right="0.0403in" fo:padding-top="0in" fo:padding-bottom="0.0201in" fo:border-left="none" fo:border-right="none" fo:border-top="none" fo:border-bottom="1pt solid #000000"/>
    </style:style>
    <style:style style:name="Table8.B3" style:family="table-cell">
      <style:table-cell-properties style:vertical-align="middle" fo:padding-left="0.0403in" fo:padding-right="0.0403in" fo:padding-top="0in" fo:padding-bottom="0.0201in" fo:border-left="none" fo:border-right="none" fo:border-top="none" fo:border-bottom="1pt solid #000000"/>
    </style:style>
    <style:style style:name="Table8.B4" style:family="table-cell">
      <style:table-cell-properties style:vertical-align="middle" fo:padding-left="0.0403in" fo:padding-right="0.0403in" fo:padding-top="0in" fo:padding-bottom="0.0201in" fo:border-left="none" fo:border-right="none" fo:border-top="none" fo:border-bottom="1pt solid #000000"/>
    </style:style>
    <style:style style:name="Table8.B5" style:family="table-cell">
      <style:table-cell-properties style:vertical-align="middle" fo:padding-left="0.0403in" fo:padding-right="0.0403in" fo:padding-top="0in" fo:padding-bottom="0.0201in" fo:border-left="none" fo:border-right="none" fo:border-top="none" fo:border-bottom="1pt solid #000000"/>
    </style:style>
    <style:style style:name="Table9" style:family="table">
      <style:table-properties style:width="6.8896in" table:align="left" style:may-break-between-rows="true" style:writing-mode="lr-tb" table:border-model="collapsing"/>
    </style:style>
    <style:style style:name="Table9.A" style:family="table-column">
      <style:table-column-properties style:column-width="1.0632in"/>
    </style:style>
    <style:style style:name="Table9.B" style:family="table-column">
      <style:table-column-properties style:column-width="5.8264in"/>
    </style:style>
    <style:style style:name="Table9.1" style:family="table-row">
      <style:table-row-properties fo:keep-together="auto"/>
    </style:style>
    <style:style style:name="Table9.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9.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10" style:family="table">
      <style:table-properties style:width="6.8896in" table:align="left" style:writing-mode="lr-tb"/>
    </style:style>
    <style:style style:name="Table10.A" style:family="table-column">
      <style:table-column-properties style:column-width="1.0632in"/>
    </style:style>
    <style:style style:name="Table10.B" style:family="table-column">
      <style:table-column-properties style:column-width="5.8264in"/>
    </style:style>
    <style:style style:name="Table10.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able10.B1" style:family="table-cell">
      <style:table-cell-properties style:vertical-align="middle" fo:padding-left="0.0403in" fo:padding-right="0.0403in" fo:padding-top="0in" fo:padding-bottom="0.0201in" fo:border-left="none" fo:border-right="none" fo:border-top="none" fo:border-bottom="1pt solid #000000"/>
    </style:style>
    <style:style style:name="Table10.B2" style:family="table-cell">
      <style:table-cell-properties style:vertical-align="middle" fo:padding-left="0.0403in" fo:padding-right="0.0403in" fo:padding-top="0in" fo:padding-bottom="0.0201in" fo:border-left="none" fo:border-right="none" fo:border-top="none" fo:border-bottom="1pt solid #000000"/>
    </style:style>
    <style:style style:name="Table10.B3" style:family="table-cell">
      <style:table-cell-properties style:vertical-align="middle" fo:padding-left="0.0403in" fo:padding-right="0.0403in" fo:padding-top="0in" fo:padding-bottom="0.0201in" fo:border-left="none" fo:border-right="none" fo:border-top="none" fo:border-bottom="1pt solid #000000"/>
    </style:style>
    <style:style style:name="Table10.B4" style:family="table-cell">
      <style:table-cell-properties style:vertical-align="middle" fo:padding-left="0.0403in" fo:padding-right="0.0403in" fo:padding-top="0in" fo:padding-bottom="0.0201in" fo:border-left="none" fo:border-right="none" fo:border-top="none" fo:border-bottom="1pt solid #000000"/>
    </style:style>
    <style:style style:name="Table10.B5" style:family="table-cell">
      <style:table-cell-properties style:vertical-align="middle" fo:padding-left="0.0403in" fo:padding-right="0.0403in" fo:padding-top="0in" fo:padding-bottom="0.0201in" fo:border-left="none" fo:border-right="none" fo:border-top="none" fo:border-bottom="1pt solid #000000"/>
    </style:style>
    <style:style style:name="Table11" style:family="table">
      <style:table-properties style:width="6.8896in" table:align="left" style:may-break-between-rows="true" style:writing-mode="lr-tb" table:border-model="collapsing"/>
    </style:style>
    <style:style style:name="Table11.A" style:family="table-column">
      <style:table-column-properties style:column-width="1.0632in"/>
    </style:style>
    <style:style style:name="Table11.B" style:family="table-column">
      <style:table-column-properties style:column-width="5.8264in"/>
    </style:style>
    <style:style style:name="Table11.1" style:family="table-row">
      <style:table-row-properties fo:keep-together="auto"/>
    </style:style>
    <style:style style:name="Table11.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11.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12" style:family="table">
      <style:table-properties style:width="6.8896in" table:align="left" style:may-break-between-rows="true" style:writing-mode="lr-tb" table:border-model="collapsing"/>
    </style:style>
    <style:style style:name="Table12.A" style:family="table-column">
      <style:table-column-properties style:column-width="1.0632in"/>
    </style:style>
    <style:style style:name="Table12.B" style:family="table-column">
      <style:table-column-properties style:column-width="5.8264in"/>
    </style:style>
    <style:style style:name="Table12.1" style:family="table-row">
      <style:table-row-properties fo:keep-together="auto"/>
    </style:style>
    <style:style style:name="Table12.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12.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13" style:family="table">
      <style:table-properties style:width="6.8896in" table:align="left" style:may-break-between-rows="true" style:writing-mode="lr-tb" table:border-model="collapsing"/>
    </style:style>
    <style:style style:name="Table13.A" style:family="table-column">
      <style:table-column-properties style:column-width="1.0632in"/>
    </style:style>
    <style:style style:name="Table13.B" style:family="table-column">
      <style:table-column-properties style:column-width="5.8264in"/>
    </style:style>
    <style:style style:name="Table13.1" style:family="table-row">
      <style:table-row-properties fo:keep-together="auto"/>
    </style:style>
    <style:style style:name="Table13.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Table13.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Table14" style:family="table">
      <style:table-properties style:width="6.8889in" table:align="left" style:writing-mode="lr-tb"/>
    </style:style>
    <style:style style:name="Table14.A" style:family="table-column">
      <style:table-column-properties style:column-width="1.0646in"/>
    </style:style>
    <style:style style:name="Table14.B" style:family="table-column">
      <style:table-column-properties style:column-width="5.8243in"/>
    </style:style>
    <style:style style:name="Table14.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able14.B1" style:family="table-cell">
      <style:table-cell-properties style:vertical-align="middle" fo:padding-left="0.0403in" fo:padding-right="0.0403in" fo:padding-top="0in" fo:padding-bottom="0.0201in" fo:border-left="none" fo:border-right="none" fo:border-top="none" fo:border-bottom="1pt solid #000000"/>
    </style:style>
    <style:style style:name="Table14.B2" style:family="table-cell">
      <style:table-cell-properties style:vertical-align="middle" fo:padding-left="0.0403in" fo:padding-right="0.0403in" fo:padding-top="0in" fo:padding-bottom="0.0201in" fo:border-left="none" fo:border-right="none" fo:border-top="none" fo:border-bottom="1pt solid #000000"/>
    </style:style>
    <style:style style:name="Table14.B3" style:family="table-cell">
      <style:table-cell-properties style:vertical-align="middle" fo:padding-left="0.0403in" fo:padding-right="0.0403in" fo:padding-top="0in" fo:padding-bottom="0.0201in" fo:border-left="none" fo:border-right="none" fo:border-top="none" fo:border-bottom="1pt solid #000000"/>
    </style:style>
    <style:style style:name="Table14.B4" style:family="table-cell">
      <style:table-cell-properties style:vertical-align="middle" fo:padding-left="0.0403in" fo:padding-right="0.0403in" fo:padding-top="0in" fo:padding-bottom="0.0201in" fo:border-left="none" fo:border-right="none" fo:border-top="none" fo:border-bottom="1pt solid #000000"/>
    </style:style>
    <style:style style:name="Table14.B5" style:family="table-cell">
      <style:table-cell-properties style:vertical-align="middle" fo:padding-left="0.0403in" fo:padding-right="0.0403in" fo:padding-top="0in" fo:padding-bottom="0.0201in" fo:border-left="none" fo:border-right="none" fo:border-top="none" fo:border-bottom="1pt solid #000000"/>
    </style:style>
    <style:style style:name="P1" style:family="paragraph" style:parent-style-name="Standard" style:master-page-name="Inside_20_cover">
      <style:paragraph-properties style:page-number="auto"/>
    </style:style>
    <style:style style:name="P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ent-style-name="M.T._20_Text_20_-_20_Centered">
      <style:text-properties fo:background-color="transparent"/>
    </style:style>
    <style:style style:name="P4" style:family="paragraph" style:parent-style-name="Body" style:master-page-name="Front_20_matter">
      <style:paragraph-properties style:page-number="auto" fo:break-before="auto" fo:break-after="auto"/>
      <style:text-properties officeooo:paragraph-rsid="00cdaad2"/>
    </style:style>
    <style:style style:name="P5" style:family="paragraph" style:parent-style-name="Body_20_Tight_20_lines">
      <style:text-properties officeooo:paragraph-rsid="00cdaad2"/>
    </style:style>
    <style:style style:name="P6" style:family="paragraph" style:parent-style-name="M.T._20_Text">
      <style:text-properties officeooo:paragraph-rsid="00cdaad2"/>
    </style:style>
    <style:style style:name="P7" style:family="paragraph" style:parent-style-name="Standard">
      <style:text-properties officeooo:paragraph-rsid="00cdaad2"/>
    </style:style>
    <style:style style:name="P8" style:family="paragraph" style:parent-style-name="Body">
      <style:text-properties officeooo:paragraph-rsid="00cdaad2"/>
    </style:style>
    <style:style style:name="P9" style:family="paragraph" style:parent-style-name="Body">
      <style:text-properties fo:language="en" fo:country="US" officeooo:rsid="00e14d30" officeooo:paragraph-rsid="00cdaad2" style:language-asian="en" style:country-asian="US" style:language-complex="hi" style:country-complex="IN"/>
    </style:style>
    <style:style style:name="P10" style:family="paragraph" style:parent-style-name="Body_20_Centered" style:master-page-name="">
      <style:paragraph-properties fo:text-align="start" style:justify-single-word="false" style:page-number="auto" fo:break-before="auto" fo:break-after="auto"/>
      <style:text-properties officeooo:paragraph-rsid="00cdaad2"/>
    </style:style>
    <style:style style:name="P11" style:family="paragraph" style:parent-style-name="Body_20_Centered">
      <style:paragraph-properties fo:text-align="start" style:justify-single-word="false"/>
      <style:text-properties officeooo:paragraph-rsid="00cdaad2"/>
    </style:style>
    <style:style style:name="P12" style:family="paragraph" style:parent-style-name="Body">
      <style:text-properties officeooo:paragraph-rsid="00db65af"/>
    </style:style>
    <style:style style:name="P13" style:family="paragraph" style:parent-style-name="M.T._20_Text" style:master-page-name="">
      <style:paragraph-properties style:page-number="auto" fo:break-before="auto" fo:break-after="auto"/>
      <style:text-properties officeooo:paragraph-rsid="00db65af"/>
    </style:style>
    <style:style style:name="P14" style:family="paragraph" style:parent-style-name="Body">
      <style:paragraph-properties fo:text-align="start" style:justify-single-word="false"/>
      <style:text-properties fo:language="en" fo:country="US" officeooo:paragraph-rsid="00db65af" style:language-asian="en" style:country-asian="US" style:language-complex="hi" style:country-complex="IN"/>
    </style:style>
    <style:style style:name="P15" style:family="paragraph" style:parent-style-name="Part_20_Heading" style:master-page-name="Front_20_matter">
      <style:paragraph-properties style:page-number="auto" fo:break-before="page"/>
      <style:text-properties fo:color="#ffffff" loext:opacity="100%" style:text-outline="false" style:font-name="Andika Compact" fo:font-size="18pt" fo:language="en" fo:country="US" fo:font-weight="bold" officeooo:rsid="00b6944b" officeooo:paragraph-rsid="00c68569" style:font-name-asian="ヒラギノ角ゴ Pro W3" style:font-size-asian="18pt" style:language-asian="en" style:country-asian="US" style:font-weight-asian="bold" style:font-name-complex="Times New Roman2" style:font-size-complex="18pt" style:language-complex="hi" style:country-complex="IN" style:font-weight-complex="bold"/>
    </style:style>
    <style:style style:name="P16" style:family="paragraph" style:parent-style-name="Body_20_-_20_Small_20_Spacer">
      <style:text-properties officeooo:paragraph-rsid="00b55a40"/>
    </style:style>
    <style:style style:name="P17" style:family="paragraph" style:parent-style-name="Table_20_of_20_Contents_20_-_20_Table_20_heading">
      <style:text-properties officeooo:paragraph-rsid="00c68569"/>
    </style:style>
    <style:style style:name="P18" style:family="paragraph" style:parent-style-name="Table_20_of_20_Contents_20_-_20_Table_20_heading">
      <style:text-properties fo:color="#000000" loext:opacity="100%" style:font-name="Andika New Basic1" fo:font-size="14pt" fo:language="en" fo:country="US" fo:font-style="normal" fo:font-weight="bold" officeooo:rsid="00b86376" officeooo:paragraph-rsid="00c68569" style:font-name-asian="ヒラギノ角ゴ Pro W3" style:font-size-asian="14pt" style:language-asian="en" style:country-asian="US" style:font-style-asian="normal" style:font-weight-asian="bold" style:font-name-complex="Times New Roman2" style:font-size-complex="14pt" style:language-complex="hi" style:country-complex="IN" style:font-style-complex="normal" style:font-weight-complex="bold"/>
    </style:style>
    <style:style style:name="P19" style:family="paragraph" style:parent-style-name="Table_20_of_20_Lessons_20_-_20_Numbers">
      <style:text-properties officeooo:paragraph-rsid="00c68569"/>
    </style:style>
    <style:style style:name="P20" style:family="paragraph" style:parent-style-name="English_20_Translation_20_-_20_Table_20_of_20_contents">
      <style:text-properties officeooo:paragraph-rsid="00c68569"/>
    </style:style>
    <style:style style:name="P21" style:family="paragraph" style:parent-style-name="M.T._20_Table_20_of_20_Contents">
      <style:text-properties officeooo:paragraph-rsid="00c68569"/>
    </style:style>
    <style:style style:name="P22" style:family="paragraph" style:parent-style-name="M.T._20_Table_20_of_20_Contents">
      <style:text-properties officeooo:rsid="005b8102" officeooo:paragraph-rsid="00c68569"/>
    </style:style>
    <style:style style:name="P23" style:family="paragraph" style:parent-style-name="English_20_Translation_20_-_20_Table_20_of_20_contents">
      <style:text-properties officeooo:rsid="005b8102" officeooo:paragraph-rsid="00c68569"/>
    </style:style>
    <style:style style:name="P24" style:family="paragraph" style:parent-style-name="English_20_Translation_20_-_20_Table_20_of_20_contents">
      <style:text-properties officeooo:rsid="00e9c270" officeooo:paragraph-rsid="00e9c270"/>
    </style:style>
    <style:style style:name="P25" style:family="paragraph" style:parent-style-name="M.T._20_Lesson_20_title_20_-_20_invisible" style:master-page-name="First_20_Page">
      <style:paragraph-properties style:page-number="auto" fo:break-before="page"/>
    </style:style>
    <style:style style:name="P26" style:family="paragraph" style:parent-style-name="Sub-Head_20_1_20_No_20_follow">
      <style:text-properties officeooo:paragraph-rsid="00ba31ff"/>
    </style:style>
    <style:style style:name="P27" style:family="paragraph" style:parent-style-name="Section_20_Heading">
      <style:text-properties officeooo:paragraph-rsid="00ba31ff"/>
    </style:style>
    <style:style style:name="P28" style:family="paragraph" style:parent-style-name="Sub-Head_20_1">
      <style:text-properties officeooo:paragraph-rsid="00ba31ff"/>
    </style:style>
    <style:style style:name="P29" style:family="paragraph" style:parent-style-name="Body_20_Bullet_20_-_20_Checkmark">
      <style:text-properties officeooo:paragraph-rsid="00ba31ff"/>
    </style:style>
    <style:style style:name="P30" style:family="paragraph" style:parent-style-name="M.T._20_Text_20_-_20_Checkmark_20_bullet">
      <style:text-properties officeooo:paragraph-rsid="00ba31ff"/>
    </style:style>
    <style:style style:name="P31" style:family="paragraph" style:parent-style-name="English_20_Translation_20_-_20_single_20_inset">
      <style:text-properties officeooo:paragraph-rsid="00ba31ff"/>
    </style:style>
    <style:style style:name="P32" style:family="paragraph" style:parent-style-name="Body_20_Inset">
      <style:text-properties officeooo:paragraph-rsid="00ba31ff"/>
    </style:style>
    <style:style style:name="P33" style:family="paragraph" style:parent-style-name="Body_20_Bullet_20_-_20_Checkmark_20_-_20_No_20_follow">
      <style:text-properties officeooo:paragraph-rsid="00ba31ff"/>
    </style:style>
    <style:style style:name="P34" style:family="paragraph" style:parent-style-name="M.T._20_Text_20_-_20_Diamond_20_bullet">
      <style:text-properties officeooo:paragraph-rsid="00ba31ff"/>
    </style:style>
    <style:style style:name="P35" style:family="paragraph" style:parent-style-name="English_20_Translation_20_-_20_double_20_inset">
      <style:text-properties officeooo:paragraph-rsid="00ba31ff"/>
    </style:style>
    <style:style style:name="P36" style:family="paragraph" style:parent-style-name="Body_20_Tight_20_lines">
      <style:text-properties officeooo:paragraph-rsid="00ba31ff"/>
    </style:style>
    <style:style style:name="P37" style:family="paragraph" style:parent-style-name="Table_20_Bullet_20_-_20_Checkmark">
      <style:text-properties officeooo:paragraph-rsid="00ba31ff"/>
    </style:style>
    <style:style style:name="P38" style:family="paragraph" style:parent-style-name="M.T._20_Text">
      <style:text-properties officeooo:paragraph-rsid="00ba31ff"/>
    </style:style>
    <style:style style:name="P39" style:family="paragraph" style:parent-style-name="English_20_translation">
      <style:text-properties officeooo:paragraph-rsid="00ba31ff"/>
    </style:style>
    <style:style style:name="P40" style:family="paragraph" style:parent-style-name="M.T._20_Text_20_-_20_Indented">
      <style:text-properties officeooo:paragraph-rsid="00ba31ff"/>
    </style:style>
    <style:style style:name="P41" style:family="paragraph" style:parent-style-name="English_20_Translation_20_-_20_Indented">
      <style:text-properties officeooo:paragraph-rsid="00ba31ff"/>
    </style:style>
    <style:style style:name="P42" style:family="paragraph" style:parent-style-name="M.T._20_Text_20_-_20_Bible_20_story_20_inset">
      <style:text-properties officeooo:paragraph-rsid="00ba31ff"/>
    </style:style>
    <style:style style:name="P43" style:family="paragraph" style:parent-style-name="Bible_20_Story_20_-_20_Graphic_20_Number">
      <style:text-properties officeooo:rsid="017e3f1f" officeooo:paragraph-rsid="00a1aaa5"/>
    </style:style>
    <style:style style:name="P44" style:family="paragraph" style:parent-style-name="Frame_20_contents">
      <style:paragraph-properties fo:text-align="center" style:justify-single-word="false"/>
      <style:text-properties officeooo:paragraph-rsid="017f89e8"/>
    </style:style>
    <style:style style:name="P45" style:family="paragraph" style:parent-style-name="English_20_Translation_20_-_20_Bible_20_story_20_inset">
      <style:text-properties officeooo:paragraph-rsid="00ba31ff"/>
    </style:style>
    <style:style style:name="P46" style:family="paragraph" style:parent-style-name="Sub-Head_20_2">
      <style:text-properties officeooo:paragraph-rsid="00ba31ff"/>
    </style:style>
    <style:style style:name="P47" style:family="paragraph" style:parent-style-name="M.T._20_Text_20_-_20_Numbered_20_List_20_Inset" style:list-style-name="L1">
      <style:text-properties officeooo:paragraph-rsid="00ba31ff"/>
    </style:style>
    <style:style style:name="P48" style:family="paragraph" style:parent-style-name="M.T._20_Text_20_-_20_Single_20_Inset">
      <style:text-properties officeooo:paragraph-rsid="00ba31ff"/>
    </style:style>
    <style:style style:name="P49" style:family="paragraph" style:parent-style-name="Body_20_Numbered_20_List">
      <style:text-properties officeooo:paragraph-rsid="00ba31ff"/>
    </style:style>
    <style:style style:name="P50" style:family="paragraph" style:parent-style-name="M.T._20_Text_20_-_20_Numbered_20_List_20_Inset" style:list-style-name="L2">
      <style:text-properties officeooo:paragraph-rsid="00ba31ff"/>
    </style:style>
    <style:style style:name="P51" style:family="paragraph" style:parent-style-name="Body">
      <style:text-properties officeooo:paragraph-rsid="00ba31ff"/>
    </style:style>
    <style:style style:name="P52" style:family="paragraph" style:parent-style-name="Sub-Head_20_-_20_Coloring_20_page_20_last_20_paragraph">
      <style:text-properties officeooo:paragraph-rsid="00ba31ff"/>
    </style:style>
    <style:style style:name="P53" style:family="paragraph" style:parent-style-name="Standard">
      <style:text-properties officeooo:paragraph-rsid="00ba31ff"/>
    </style:style>
    <style:style style:name="P54" style:family="paragraph" style:parent-style-name="M.T._20_Coloring_20_Page_20_-_20_Truth" style:master-page-name="Coloring_20_Page">
      <style:paragraph-properties style:page-number="auto"/>
    </style:style>
    <style:style style:name="P55" style:family="paragraph" style:parent-style-name="M.T._20_Coloring_20_Page_20_-_20_Truth">
      <style:paragraph-properties fo:break-before="column"/>
    </style:style>
    <style:style style:name="P56" style:family="paragraph" style:parent-style-name="Sub-Head_20_1_20_No_20_follow">
      <style:text-properties officeooo:paragraph-rsid="00ccf328"/>
    </style:style>
    <style:style style:name="P57" style:family="paragraph" style:parent-style-name="Section_20_Heading">
      <style:text-properties officeooo:paragraph-rsid="00ccf328"/>
    </style:style>
    <style:style style:name="P58" style:family="paragraph" style:parent-style-name="Sub-Head_20_1">
      <style:text-properties officeooo:paragraph-rsid="00ccf328"/>
    </style:style>
    <style:style style:name="P59" style:family="paragraph" style:parent-style-name="Body_20_Bullet_20_-_20_Checkmark">
      <style:text-properties officeooo:paragraph-rsid="00ccf328"/>
    </style:style>
    <style:style style:name="P60" style:family="paragraph" style:parent-style-name="Body_20_Bullet_20_-_20_Checkmark_20_-_20_No_20_follow">
      <style:text-properties officeooo:paragraph-rsid="00ccf328"/>
    </style:style>
    <style:style style:name="P61" style:family="paragraph" style:parent-style-name="M.T._20_Text_20_-_20_Single_20_Inset">
      <style:text-properties officeooo:paragraph-rsid="00ccf328"/>
    </style:style>
    <style:style style:name="P62" style:family="paragraph" style:parent-style-name="English_20_Translation_20_-_20_single_20_inset">
      <style:text-properties officeooo:paragraph-rsid="00ccf328"/>
    </style:style>
    <style:style style:name="P63" style:family="paragraph" style:parent-style-name="Body_20_Inset">
      <style:text-properties officeooo:paragraph-rsid="00ccf328"/>
    </style:style>
    <style:style style:name="P64" style:family="paragraph" style:parent-style-name="M.T._20_Text_20_-_20_Diamond_20_bullet">
      <style:text-properties officeooo:paragraph-rsid="00ccf328"/>
    </style:style>
    <style:style style:name="P65" style:family="paragraph" style:parent-style-name="English_20_Translation_20_-_20_double_20_inset">
      <style:text-properties officeooo:paragraph-rsid="00ccf328"/>
    </style:style>
    <style:style style:name="P66" style:family="paragraph" style:parent-style-name="M.T._20_Text_20_-_20_Checkmark_20_bullet">
      <style:text-properties officeooo:paragraph-rsid="00ccf328"/>
    </style:style>
    <style:style style:name="P67" style:family="paragraph" style:parent-style-name="M.T._20_Text_20_-_20_Indented">
      <style:text-properties officeooo:paragraph-rsid="00ccf328"/>
    </style:style>
    <style:style style:name="P68" style:family="paragraph" style:parent-style-name="English_20_Translation_20_-_20_Indented">
      <style:text-properties officeooo:paragraph-rsid="00ccf328"/>
    </style:style>
    <style:style style:name="P69" style:family="paragraph" style:parent-style-name="M.T._20_Text_20_-_20_Bible_20_story_20_inset">
      <style:text-properties officeooo:paragraph-rsid="00ccf328"/>
    </style:style>
    <style:style style:name="P70" style:family="paragraph" style:parent-style-name="Bible_20_Story_20_-_20_Graphic_20_Number">
      <style:text-properties officeooo:rsid="017e3f1f"/>
    </style:style>
    <style:style style:name="P71" style:family="paragraph" style:parent-style-name="Standard">
      <style:paragraph-properties fo:text-align="center" style:justify-single-word="false"/>
      <style:text-properties officeooo:paragraph-rsid="00b0d75b"/>
    </style:style>
    <style:style style:name="P72" style:family="paragraph">
      <loext:graphic-properties draw:fill="none" draw:fill-color="#729fc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73" style:family="paragraph" style:parent-style-name="English_20_Translation_20_-_20_Bible_20_story_20_inset">
      <style:text-properties officeooo:paragraph-rsid="00ccf328"/>
    </style:style>
    <style:style style:name="P74" style:family="paragraph" style:parent-style-name="Bible_20_Story_20_-_20_Graphic_20_Number">
      <style:text-properties officeooo:rsid="017e3f1f" officeooo:paragraph-rsid="00b0d75b"/>
    </style:style>
    <style:style style:name="P75" style:family="paragraph" style:parent-style-name="English_20_translation">
      <style:text-properties officeooo:paragraph-rsid="00ccf328"/>
    </style:style>
    <style:style style:name="P76" style:family="paragraph" style:parent-style-name="M.T._20_Text">
      <style:text-properties officeooo:paragraph-rsid="00ccf328"/>
    </style:style>
    <style:style style:name="P77" style:family="paragraph" style:parent-style-name="Sub-Head_20_2">
      <style:text-properties officeooo:paragraph-rsid="00ccf328"/>
    </style:style>
    <style:style style:name="P78" style:family="paragraph" style:parent-style-name="M.T._20_Text_20_-_20_Numbered_20_List_20_Inset" style:list-style-name="L3">
      <style:text-properties officeooo:paragraph-rsid="00ccf328"/>
    </style:style>
    <style:style style:name="P79" style:family="paragraph" style:parent-style-name="Body_20_Numbered_20_List">
      <style:text-properties officeooo:paragraph-rsid="00ccf328"/>
    </style:style>
    <style:style style:name="P80" style:family="paragraph" style:parent-style-name="M.T._20_Text_20_-_20_Numbered_20_List_20_Inset" style:list-style-name="L4">
      <style:text-properties officeooo:paragraph-rsid="00ccf328"/>
    </style:style>
    <style:style style:name="P81" style:family="paragraph" style:parent-style-name="Body">
      <style:text-properties officeooo:paragraph-rsid="00ccf328"/>
    </style:style>
    <style:style style:name="P82" style:family="paragraph" style:parent-style-name="Sub-Head_20_-_20_Coloring_20_page_20_last_20_paragraph">
      <style:text-properties officeooo:paragraph-rsid="00ccf328"/>
    </style:style>
    <style:style style:name="P83" style:family="paragraph" style:parent-style-name="Sub-Head_20_1_20_No_20_follow">
      <style:text-properties officeooo:paragraph-rsid="00b15a9c"/>
    </style:style>
    <style:style style:name="P84" style:family="paragraph" style:parent-style-name="Section_20_Heading">
      <style:text-properties officeooo:paragraph-rsid="00b15a9c"/>
    </style:style>
    <style:style style:name="P85" style:family="paragraph" style:parent-style-name="Sub-Head_20_1">
      <style:text-properties officeooo:paragraph-rsid="00b15a9c"/>
    </style:style>
    <style:style style:name="P86" style:family="paragraph" style:parent-style-name="Body_20_Bullet_20_-_20_Checkmark">
      <style:text-properties officeooo:paragraph-rsid="00b15a9c"/>
    </style:style>
    <style:style style:name="P87" style:family="paragraph" style:parent-style-name="M.T._20_Text_20_-_20_Single_20_Inset">
      <style:text-properties officeooo:paragraph-rsid="00b15a9c"/>
    </style:style>
    <style:style style:name="P88" style:family="paragraph" style:parent-style-name="English_20_Translation_20_-_20_single_20_inset">
      <style:text-properties officeooo:paragraph-rsid="00b15a9c"/>
    </style:style>
    <style:style style:name="P89" style:family="paragraph" style:parent-style-name="Body_20_Inset">
      <style:text-properties officeooo:paragraph-rsid="00b15a9c"/>
    </style:style>
    <style:style style:name="P90" style:family="paragraph" style:parent-style-name="Body_20_Bullet_20_-_20_Checkmark_20_-_20_No_20_follow">
      <style:text-properties officeooo:paragraph-rsid="00b15a9c"/>
    </style:style>
    <style:style style:name="P91" style:family="paragraph" style:parent-style-name="M.T._20_Text_20_-_20_Checkmark_20_bullet">
      <style:text-properties officeooo:paragraph-rsid="00b15a9c"/>
    </style:style>
    <style:style style:name="P92" style:family="paragraph" style:parent-style-name="M.T._20_Text_20_-_20_Diamond_20_bullet">
      <style:text-properties officeooo:paragraph-rsid="00b15a9c"/>
    </style:style>
    <style:style style:name="P93" style:family="paragraph" style:parent-style-name="English_20_Translation_20_-_20_double_20_inset">
      <style:text-properties officeooo:paragraph-rsid="00b15a9c"/>
    </style:style>
    <style:style style:name="P94" style:family="paragraph" style:parent-style-name="M.T._20_Text_20_-_20_Indented">
      <style:text-properties officeooo:paragraph-rsid="00b15a9c"/>
    </style:style>
    <style:style style:name="P95" style:family="paragraph" style:parent-style-name="English_20_Translation_20_-_20_Indented">
      <style:text-properties officeooo:paragraph-rsid="00b15a9c"/>
    </style:style>
    <style:style style:name="P96" style:family="paragraph" style:parent-style-name="M.T._20_Text">
      <style:text-properties officeooo:paragraph-rsid="00b15a9c"/>
    </style:style>
    <style:style style:name="P97" style:family="paragraph" style:parent-style-name="English_20_translation">
      <style:text-properties officeooo:paragraph-rsid="00b15a9c"/>
    </style:style>
    <style:style style:name="P98" style:family="paragraph" style:parent-style-name="Sub-Head_20_1">
      <style:text-properties fo:language="en" fo:country="US" officeooo:paragraph-rsid="00b15a9c" style:language-asian="en" style:country-asian="US" style:language-complex="hi" style:country-complex="IN"/>
    </style:style>
    <style:style style:name="P99" style:family="paragraph" style:parent-style-name="M.T._20_Text_20_-_20_Bible_20_story_20_inset">
      <style:text-properties officeooo:paragraph-rsid="00b15a9c"/>
    </style:style>
    <style:style style:name="P100" style:family="paragraph" style:parent-style-name="Bible_20_Story_20_-_20_Graphic_20_Number">
      <style:text-properties officeooo:rsid="017e3f1f" officeooo:paragraph-rsid="009fa191"/>
    </style:style>
    <style:style style:name="P101" style:family="paragraph" style:parent-style-name="Standard">
      <style:paragraph-properties fo:text-align="center" style:justify-single-word="false"/>
      <style:text-properties officeooo:paragraph-rsid="00a120ab"/>
    </style:style>
    <style:style style:name="P102" style:family="paragraph" style:parent-style-name="English_20_Translation_20_-_20_Bible_20_story_20_inset">
      <style:text-properties officeooo:paragraph-rsid="00b15a9c"/>
    </style:style>
    <style:style style:name="P103" style:family="paragraph" style:parent-style-name="Bible_20_Story_20_-_20_Graphic_20_Number">
      <style:text-properties officeooo:rsid="017e3f1f" officeooo:paragraph-rsid="00a120ab"/>
    </style:style>
    <style:style style:name="P104" style:family="paragraph" style:parent-style-name="Bible_20_Story_20_-_20_Graphic_20_Number">
      <style:text-properties officeooo:paragraph-rsid="00a120ab"/>
    </style:style>
    <style:style style:name="P105" style:family="paragraph" style:parent-style-name="Sub-Head_20_2">
      <style:text-properties officeooo:paragraph-rsid="00b15a9c"/>
    </style:style>
    <style:style style:name="P106" style:family="paragraph" style:parent-style-name="M.T._20_Text_20_-_20_Numbered_20_List_20_Inset" style:list-style-name="L5">
      <style:text-properties officeooo:paragraph-rsid="00b15a9c"/>
    </style:style>
    <style:style style:name="P107" style:family="paragraph" style:parent-style-name="Body_20_Numbered_20_List">
      <style:text-properties officeooo:paragraph-rsid="00b15a9c"/>
    </style:style>
    <style:style style:name="P108" style:family="paragraph" style:parent-style-name="M.T._20_Text_20_-_20_Numbered_20_List_20_Inset" style:list-style-name="L6">
      <style:text-properties officeooo:paragraph-rsid="00b15a9c"/>
    </style:style>
    <style:style style:name="P109" style:family="paragraph" style:parent-style-name="Body">
      <style:text-properties officeooo:paragraph-rsid="00b15a9c"/>
    </style:style>
    <style:style style:name="P110" style:family="paragraph" style:parent-style-name="Sub-Head_20_-_20_Coloring_20_page_20_last_20_paragraph">
      <style:text-properties officeooo:paragraph-rsid="00b15a9c"/>
    </style:style>
    <style:style style:name="P111" style:family="paragraph" style:parent-style-name="Sub-Head_20_1_20_No_20_follow">
      <style:text-properties officeooo:paragraph-rsid="009fcaf2"/>
    </style:style>
    <style:style style:name="P112" style:family="paragraph" style:parent-style-name="Section_20_Heading">
      <style:text-properties officeooo:paragraph-rsid="009fcaf2"/>
    </style:style>
    <style:style style:name="P113" style:family="paragraph" style:parent-style-name="Sub-Head_20_1">
      <style:text-properties officeooo:paragraph-rsid="009fcaf2"/>
    </style:style>
    <style:style style:name="P114" style:family="paragraph" style:parent-style-name="Body_20_Bullet_20_-_20_Checkmark">
      <style:text-properties officeooo:paragraph-rsid="009fcaf2"/>
    </style:style>
    <style:style style:name="P115" style:family="paragraph" style:parent-style-name="M.T._20_Text_20_-_20_Single_20_Inset">
      <style:text-properties officeooo:paragraph-rsid="009fcaf2"/>
    </style:style>
    <style:style style:name="P116" style:family="paragraph" style:parent-style-name="English_20_Translation_20_-_20_single_20_inset">
      <style:text-properties officeooo:paragraph-rsid="009fcaf2"/>
    </style:style>
    <style:style style:name="P117" style:family="paragraph" style:parent-style-name="Body_20_Inset">
      <style:text-properties officeooo:paragraph-rsid="009fcaf2"/>
    </style:style>
    <style:style style:name="P118" style:family="paragraph" style:parent-style-name="Body_20_Bullet_20_-_20_Checkmark_20_-_20_No_20_follow">
      <style:text-properties officeooo:paragraph-rsid="009fcaf2"/>
    </style:style>
    <style:style style:name="P119" style:family="paragraph" style:parent-style-name="M.T._20_Text_20_-_20_Checkmark_20_bullet">
      <style:text-properties officeooo:paragraph-rsid="009fcaf2"/>
    </style:style>
    <style:style style:name="P120" style:family="paragraph" style:parent-style-name="M.T._20_Text_20_-_20_Diamond_20_bullet">
      <style:text-properties officeooo:paragraph-rsid="009fcaf2"/>
    </style:style>
    <style:style style:name="P121" style:family="paragraph" style:parent-style-name="English_20_Translation_20_-_20_double_20_inset">
      <style:text-properties officeooo:paragraph-rsid="009fcaf2"/>
    </style:style>
    <style:style style:name="P122" style:family="paragraph" style:parent-style-name="M.T._20_Text_20_-_20_Indented">
      <style:text-properties officeooo:paragraph-rsid="009fcaf2"/>
    </style:style>
    <style:style style:name="P123" style:family="paragraph" style:parent-style-name="English_20_Translation_20_-_20_Indented">
      <style:text-properties officeooo:paragraph-rsid="009fcaf2"/>
    </style:style>
    <style:style style:name="P124" style:family="paragraph" style:parent-style-name="M.T._20_Text">
      <style:text-properties officeooo:paragraph-rsid="009fcaf2"/>
    </style:style>
    <style:style style:name="P125" style:family="paragraph" style:parent-style-name="English_20_translation">
      <style:text-properties officeooo:paragraph-rsid="009fcaf2"/>
    </style:style>
    <style:style style:name="P126" style:family="paragraph" style:parent-style-name="Sub-Head_20_1">
      <style:text-properties fo:language="en" fo:country="US" officeooo:paragraph-rsid="009fcaf2" style:language-asian="en" style:country-asian="US" style:language-complex="hi" style:country-complex="IN"/>
    </style:style>
    <style:style style:name="P127" style:family="paragraph" style:parent-style-name="M.T._20_Text_20_-_20_Bible_20_story_20_inset">
      <style:text-properties officeooo:paragraph-rsid="009fcaf2"/>
    </style:style>
    <style:style style:name="P128" style:family="paragraph" style:parent-style-name="Bible_20_Story_20_-_20_Graphic_20_Number">
      <style:text-properties officeooo:rsid="017e3f1f" officeooo:paragraph-rsid="008d8327"/>
    </style:style>
    <style:style style:name="P129" style:family="paragraph" style:parent-style-name="Standard">
      <style:paragraph-properties fo:text-align="center" style:justify-single-word="false"/>
      <style:text-properties officeooo:paragraph-rsid="008d8327"/>
    </style:style>
    <style:style style:name="P130" style:family="paragraph" style:parent-style-name="English_20_Translation_20_-_20_Bible_20_story_20_inset">
      <style:text-properties officeooo:paragraph-rsid="009fcaf2"/>
    </style:style>
    <style:style style:name="P131" style:family="paragraph" style:parent-style-name="Sub-Head_20_2">
      <style:text-properties officeooo:paragraph-rsid="009fcaf2"/>
    </style:style>
    <style:style style:name="P132" style:family="paragraph" style:parent-style-name="M.T._20_Text_20_-_20_Numbered_20_List_20_Inset" style:list-style-name="L7">
      <style:text-properties officeooo:paragraph-rsid="009fcaf2"/>
    </style:style>
    <style:style style:name="P133" style:family="paragraph" style:parent-style-name="Body_20_Numbered_20_List">
      <style:text-properties officeooo:paragraph-rsid="009fcaf2"/>
    </style:style>
    <style:style style:name="P134" style:family="paragraph" style:parent-style-name="M.T._20_Text_20_-_20_Numbered_20_List_20_Inset" style:list-style-name="L8">
      <style:text-properties officeooo:paragraph-rsid="009fcaf2"/>
    </style:style>
    <style:style style:name="P135" style:family="paragraph" style:parent-style-name="Body">
      <style:text-properties officeooo:paragraph-rsid="009fcaf2"/>
    </style:style>
    <style:style style:name="P136" style:family="paragraph" style:parent-style-name="Standard">
      <style:text-properties officeooo:paragraph-rsid="009fcaf2"/>
    </style:style>
    <style:style style:name="P137" style:family="paragraph" style:parent-style-name="Sub-Head_20_1_20_No_20_follow">
      <style:text-properties officeooo:paragraph-rsid="00a593e8"/>
    </style:style>
    <style:style style:name="P138" style:family="paragraph" style:parent-style-name="Section_20_Heading">
      <style:text-properties officeooo:paragraph-rsid="00a593e8"/>
    </style:style>
    <style:style style:name="P139" style:family="paragraph" style:parent-style-name="Sub-Head_20_1">
      <style:text-properties officeooo:paragraph-rsid="00a593e8"/>
    </style:style>
    <style:style style:name="P140" style:family="paragraph" style:parent-style-name="Body_20_Bullet_20_-_20_Checkmark">
      <style:text-properties officeooo:paragraph-rsid="00a593e8"/>
    </style:style>
    <style:style style:name="P141" style:family="paragraph" style:parent-style-name="M.T._20_Text_20_-_20_Single_20_Inset">
      <style:text-properties officeooo:paragraph-rsid="00a593e8"/>
    </style:style>
    <style:style style:name="P142" style:family="paragraph" style:parent-style-name="English_20_Translation_20_-_20_single_20_inset">
      <style:text-properties officeooo:paragraph-rsid="00a593e8"/>
    </style:style>
    <style:style style:name="P143" style:family="paragraph" style:parent-style-name="Body_20_Inset">
      <style:text-properties officeooo:paragraph-rsid="00a593e8"/>
    </style:style>
    <style:style style:name="P144" style:family="paragraph" style:parent-style-name="M.T._20_Text_20_-_20_Checkmark_20_bullet">
      <style:text-properties officeooo:paragraph-rsid="00a593e8"/>
    </style:style>
    <style:style style:name="P145" style:family="paragraph" style:parent-style-name="M.T._20_Text_20_-_20_Diamond_20_bullet">
      <style:text-properties officeooo:paragraph-rsid="00a593e8"/>
    </style:style>
    <style:style style:name="P146" style:family="paragraph" style:parent-style-name="English_20_Translation_20_-_20_double_20_inset">
      <style:text-properties officeooo:paragraph-rsid="00a593e8"/>
    </style:style>
    <style:style style:name="P147" style:family="paragraph" style:parent-style-name="English_20_Translation_20_-_20_double_20_inset">
      <style:text-properties officeooo:rsid="00a8ff0c" officeooo:paragraph-rsid="00a8ff0c"/>
    </style:style>
    <style:style style:name="P148" style:family="paragraph" style:parent-style-name="Body">
      <style:text-properties officeooo:paragraph-rsid="00a593e8"/>
    </style:style>
    <style:style style:name="P149" style:family="paragraph" style:parent-style-name="M.T._20_Text">
      <style:text-properties officeooo:paragraph-rsid="00a593e8"/>
    </style:style>
    <style:style style:name="P150" style:family="paragraph" style:parent-style-name="English_20_translation">
      <style:text-properties officeooo:paragraph-rsid="00a593e8"/>
    </style:style>
    <style:style style:name="P151" style:family="paragraph" style:parent-style-name="M.T._20_Text_20_-_20_Indented">
      <style:text-properties officeooo:paragraph-rsid="00a593e8"/>
    </style:style>
    <style:style style:name="P152" style:family="paragraph" style:parent-style-name="English_20_Translation_20_-_20_Indented">
      <style:text-properties officeooo:paragraph-rsid="00a593e8"/>
    </style:style>
    <style:style style:name="P153" style:family="paragraph" style:parent-style-name="M.T._20_Text_20_-_20_Bible_20_story_20_inset">
      <style:text-properties officeooo:paragraph-rsid="00a593e8"/>
    </style:style>
    <style:style style:name="P154" style:family="paragraph" style:parent-style-name="Bible_20_Story_20_-_20_Graphic_20_Number">
      <style:text-properties officeooo:rsid="017e3f1f" officeooo:paragraph-rsid="0092215f"/>
    </style:style>
    <style:style style:name="P155" style:family="paragraph" style:parent-style-name="Bible_20_Story_20_-_20_Graphic_20_Number">
      <style:text-properties officeooo:paragraph-rsid="0092215f"/>
    </style:style>
    <style:style style:name="P156" style:family="paragraph" style:parent-style-name="English_20_Translation_20_-_20_Bible_20_story_20_inset">
      <style:text-properties officeooo:paragraph-rsid="00a593e8"/>
    </style:style>
    <style:style style:name="P157" style:family="paragraph" style:parent-style-name="Bible_20_Story_20_-_20_Graphic_20_Number">
      <style:paragraph-properties fo:text-align="center" style:justify-single-word="false"/>
      <style:text-properties officeooo:paragraph-rsid="0092215f"/>
    </style:style>
    <style:style style:name="P158" style:family="paragraph" style:parent-style-name="Sub-Head_20_2">
      <style:text-properties officeooo:paragraph-rsid="00a593e8"/>
    </style:style>
    <style:style style:name="P159" style:family="paragraph" style:parent-style-name="Body_20_Bullet_20_-_20_Checkmark_20_-_20_No_20_follow">
      <style:text-properties officeooo:paragraph-rsid="00a593e8"/>
    </style:style>
    <style:style style:name="P160" style:family="paragraph" style:parent-style-name="M.T._20_Text_20_-_20_Numbered_20_List_20_Inset" style:list-style-name="L9">
      <style:text-properties officeooo:paragraph-rsid="00a593e8"/>
    </style:style>
    <style:style style:name="P161" style:family="paragraph" style:parent-style-name="Body_20_Numbered_20_List">
      <style:text-properties officeooo:paragraph-rsid="00a593e8"/>
    </style:style>
    <style:style style:name="P162" style:family="paragraph" style:parent-style-name="M.T._20_Text_20_-_20_Numbered_20_List_20_Inset" style:list-style-name="L10">
      <style:text-properties officeooo:paragraph-rsid="00a593e8"/>
    </style:style>
    <style:style style:name="P163" style:family="paragraph" style:parent-style-name="English_20_translation" style:list-style-name="L11">
      <style:text-properties officeooo:paragraph-rsid="00a593e8"/>
    </style:style>
    <style:style style:name="P164" style:family="paragraph" style:parent-style-name="M.T._20_Text_20_-_20_Numbered_20_List_20_Inset" style:list-style-name="L12">
      <style:text-properties officeooo:paragraph-rsid="00a593e8"/>
    </style:style>
    <style:style style:name="P165" style:family="paragraph" style:parent-style-name="Sub-Head_20_-_20_Coloring_20_page_20_last_20_paragraph">
      <style:text-properties officeooo:paragraph-rsid="00a593e8"/>
    </style:style>
    <style:style style:name="P166" style:family="paragraph" style:parent-style-name="M.T._20_Text">
      <style:text-properties fo:background-color="transparent"/>
    </style:style>
    <style:style style:name="P167" style:family="paragraph" style:parent-style-name="Bible_20_Story_20_-_20_Graphic_20_Number">
      <style:text-properties officeooo:paragraph-rsid="008fe9c9"/>
    </style:style>
    <style:style style:name="P168" style:family="paragraph" style:parent-style-name="Bible_20_Story_20_-_20_Graphic_20_Number">
      <style:text-properties officeooo:rsid="017e3f1f" officeooo:paragraph-rsid="008fe9c9"/>
    </style:style>
    <style:style style:name="P169" style:family="paragraph" style:parent-style-name="M.T._20_Text_20_-_20_Indented">
      <style:text-properties fo:background-color="transparent"/>
    </style:style>
    <style:style style:name="P170" style:family="paragraph" style:parent-style-name="M.T._20_Text_20_-_20_Numbered_20_List_20_Inset" style:list-style-name="L13"/>
    <style:style style:name="P171" style:family="paragraph" style:parent-style-name="M.T._20_Text_20_-_20_Numbered_20_List_20_Inset" style:list-style-name="L14"/>
    <style:style style:name="P172" style:family="paragraph" style:parent-style-name="M.T._20_Text_20_-_20_Single_20_Inset">
      <style:text-properties fo:background-color="transparent"/>
    </style:style>
    <style:style style:name="P173" style:family="paragraph" style:parent-style-name="Sub-Head_20_1_20_No_20_follow">
      <style:text-properties officeooo:paragraph-rsid="014d37c8"/>
    </style:style>
    <style:style style:name="P174" style:family="paragraph" style:parent-style-name="Section_20_Heading">
      <style:text-properties officeooo:paragraph-rsid="014d37c8"/>
    </style:style>
    <style:style style:name="P175" style:family="paragraph" style:parent-style-name="Sub-Head_20_1">
      <style:text-properties officeooo:paragraph-rsid="014d37c8"/>
    </style:style>
    <style:style style:name="P176" style:family="paragraph" style:parent-style-name="Body_20_Bullet_20_-_20_Checkmark">
      <style:text-properties officeooo:paragraph-rsid="014d37c8"/>
    </style:style>
    <style:style style:name="P177" style:family="paragraph" style:parent-style-name="M.T._20_Text_20_-_20_Single_20_Inset">
      <style:text-properties officeooo:paragraph-rsid="014d37c8"/>
    </style:style>
    <style:style style:name="P178" style:family="paragraph" style:parent-style-name="English_20_Translation_20_-_20_single_20_inset">
      <style:text-properties officeooo:paragraph-rsid="014d37c8"/>
    </style:style>
    <style:style style:name="P179" style:family="paragraph" style:parent-style-name="English_20_Translation_20_-_20_single_20_inset" style:list-style-name="Bullet_20_-_20_Check_20_mark">
      <style:text-properties officeooo:paragraph-rsid="014d37c8"/>
    </style:style>
    <style:style style:name="P180" style:family="paragraph" style:parent-style-name="English_20_translation_20_-_20_Indent">
      <style:text-properties officeooo:paragraph-rsid="014d37c8"/>
    </style:style>
    <style:style style:name="P181" style:family="paragraph" style:parent-style-name="Body_20_Inset">
      <style:text-properties officeooo:paragraph-rsid="014d37c8"/>
    </style:style>
    <style:style style:name="P182" style:family="paragraph" style:parent-style-name="Body_20_Bullet_20_-_20_Checkmark_20_-_20_No_20_follow">
      <style:text-properties officeooo:paragraph-rsid="014d37c8"/>
    </style:style>
    <style:style style:name="P183" style:family="paragraph" style:parent-style-name="M.T._20_Text">
      <style:text-properties officeooo:paragraph-rsid="014d37c8"/>
    </style:style>
    <style:style style:name="P184" style:family="paragraph" style:parent-style-name="English_20_translation">
      <style:text-properties officeooo:paragraph-rsid="014d37c8"/>
    </style:style>
    <style:style style:name="P185" style:family="paragraph" style:parent-style-name="Sub-Head_20_2">
      <style:text-properties officeooo:paragraph-rsid="014d37c8"/>
    </style:style>
    <style:style style:name="P186" style:family="paragraph" style:parent-style-name="Body_20_-_20_Small_20_Spacer">
      <style:text-properties officeooo:paragraph-rsid="014d37c8"/>
    </style:style>
    <style:style style:name="P187" style:family="paragraph" style:parent-style-name="Standard">
      <style:text-properties officeooo:paragraph-rsid="014d37c8"/>
    </style:style>
    <style:style style:name="P188" style:family="paragraph" style:parent-style-name="M.T._20_Text_20_-_20_Indented">
      <style:text-properties officeooo:paragraph-rsid="014d37c8"/>
    </style:style>
    <style:style style:name="P189" style:family="paragraph" style:parent-style-name="English_20_Translation_20_-_20_Indented">
      <style:text-properties officeooo:paragraph-rsid="014d37c8"/>
    </style:style>
    <style:style style:name="P190" style:family="paragraph" style:parent-style-name="M.T._20_Text_20_-_20_Numbered_20_List_20_Inset" style:list-style-name="L15">
      <style:text-properties officeooo:paragraph-rsid="014d37c8"/>
    </style:style>
    <style:style style:name="P191" style:family="paragraph" style:parent-style-name="M.T._20_Text_20_-_20_Numbered_20_List_20_Inset" style:list-style-name="L16">
      <style:text-properties officeooo:paragraph-rsid="014d37c8"/>
    </style:style>
    <style:style style:name="P192" style:family="paragraph" style:parent-style-name="M.T._20_Text_20_-_20_Numbered_20_List_20_Inset" style:list-style-name="L17">
      <style:text-properties officeooo:paragraph-rsid="014d37c8"/>
    </style:style>
    <style:style style:name="P193" style:family="paragraph" style:parent-style-name="M.T._20_Text_20_-_20_Numbered_20_List_20_Inset" style:list-style-name="L18">
      <style:text-properties officeooo:paragraph-rsid="014d37c8"/>
    </style:style>
    <style:style style:name="P194" style:family="paragraph" style:parent-style-name="M.T._20_Text_20_-_20_Numbered_20_List_20_Inset" style:list-style-name="L19">
      <style:text-properties officeooo:paragraph-rsid="014d37c8"/>
    </style:style>
    <style:style style:name="P195" style:family="paragraph" style:parent-style-name="M.T._20_Text_20_-_20_Numbered_20_List_20_Inset" style:list-style-name="L20">
      <style:text-properties officeooo:paragraph-rsid="014d37c8"/>
    </style:style>
    <style:style style:name="P196" style:family="paragraph" style:parent-style-name="Standard" style:list-style-name="Bullet_20_-_20_Check_20_mark">
      <style:text-properties officeooo:paragraph-rsid="014d37c8"/>
    </style:style>
    <style:style style:name="P197" style:family="paragraph" style:parent-style-name="Body_20_Tight_20_lines">
      <style:text-properties officeooo:paragraph-rsid="014d37c8"/>
    </style:style>
    <style:style style:name="P198" style:family="paragraph" style:parent-style-name="Table_20_Bullet_20_-_20_Checkmark" style:list-style-name="Table_20_Bullet_20_-_20_checkmark">
      <style:text-properties officeooo:rsid="01301848" officeooo:paragraph-rsid="00950dbd"/>
    </style:style>
    <style:style style:name="P199" style:family="paragraph" style:parent-style-name="Table_20_Bullet_20_-_20_Checkmark" style:list-style-name="Table_20_Bullet_20_-_20_checkmark">
      <style:text-properties officeooo:paragraph-rsid="00950dbd"/>
    </style:style>
    <style:style style:name="P200" style:family="paragraph" style:parent-style-name="M.T._20_Text">
      <style:text-properties officeooo:paragraph-rsid="008be6af"/>
    </style:style>
    <style:style style:name="P201" style:family="paragraph" style:parent-style-name="English_20_translation">
      <style:text-properties officeooo:paragraph-rsid="008be6af"/>
    </style:style>
    <style:style style:name="P202" style:family="paragraph" style:parent-style-name="Sub-Head_20_1_20_No_20_follow">
      <style:text-properties officeooo:paragraph-rsid="00b14bd3"/>
    </style:style>
    <style:style style:name="P203" style:family="paragraph" style:parent-style-name="Section_20_Heading">
      <style:text-properties officeooo:paragraph-rsid="00b14bd3"/>
    </style:style>
    <style:style style:name="P204" style:family="paragraph" style:parent-style-name="Sub-Head_20_1">
      <style:text-properties officeooo:paragraph-rsid="00b14bd3"/>
    </style:style>
    <style:style style:name="P205" style:family="paragraph" style:parent-style-name="Body_20_Bullet_20_-_20_Checkmark">
      <style:text-properties officeooo:paragraph-rsid="00b14bd3"/>
    </style:style>
    <style:style style:name="P206" style:family="paragraph" style:parent-style-name="M.T._20_Text_20_-_20_Checkmark_20_bullet">
      <style:text-properties officeooo:paragraph-rsid="00b14bd3"/>
    </style:style>
    <style:style style:name="P207" style:family="paragraph" style:parent-style-name="English_20_Translation_20_-_20_single_20_inset">
      <style:text-properties officeooo:paragraph-rsid="00b14bd3"/>
    </style:style>
    <style:style style:name="P208" style:family="paragraph" style:parent-style-name="Body_20_Inset">
      <style:text-properties officeooo:paragraph-rsid="00b14bd3"/>
    </style:style>
    <style:style style:name="P209" style:family="paragraph" style:parent-style-name="Body_20_Bullet_20_-_20_Checkmark_20_-_20_No_20_follow">
      <style:text-properties officeooo:paragraph-rsid="00b14bd3"/>
    </style:style>
    <style:style style:name="P210" style:family="paragraph" style:parent-style-name="M.T._20_Text_20_-_20_Diamond_20_bullet">
      <style:text-properties officeooo:paragraph-rsid="00b14bd3"/>
    </style:style>
    <style:style style:name="P211" style:family="paragraph" style:parent-style-name="English_20_Translation_20_-_20_double_20_inset">
      <style:text-properties officeooo:paragraph-rsid="00b14bd3"/>
    </style:style>
    <style:style style:name="P212" style:family="paragraph" style:parent-style-name="M.T._20_Text_20_-_20_Indented">
      <style:text-properties officeooo:paragraph-rsid="00b14bd3"/>
    </style:style>
    <style:style style:name="P213" style:family="paragraph" style:parent-style-name="English_20_Translation_20_-_20_Indented">
      <style:text-properties officeooo:paragraph-rsid="00b14bd3"/>
    </style:style>
    <style:style style:name="P214" style:family="paragraph" style:parent-style-name="M.T._20_Text">
      <style:text-properties officeooo:paragraph-rsid="00b14bd3"/>
    </style:style>
    <style:style style:name="P215" style:family="paragraph" style:parent-style-name="English_20_translation">
      <style:text-properties officeooo:paragraph-rsid="00b14bd3"/>
    </style:style>
    <style:style style:name="P216" style:family="paragraph" style:parent-style-name="Sub-Head_20_1" style:master-page-name="">
      <style:paragraph-properties style:page-number="auto"/>
      <style:text-properties fo:language="en" fo:country="US" officeooo:paragraph-rsid="00b14bd3" style:language-asian="en" style:country-asian="US" style:language-complex="hi" style:country-complex="IN"/>
    </style:style>
    <style:style style:name="P217" style:family="paragraph" style:parent-style-name="M.T._20_Text_20_-_20_Bible_20_story_20_inset">
      <style:text-properties officeooo:paragraph-rsid="00b14bd3"/>
    </style:style>
    <style:style style:name="P218" style:family="paragraph" style:parent-style-name="Bible_20_Story_20_-_20_Graphic_20_Number">
      <style:text-properties officeooo:rsid="017e3f1f" officeooo:paragraph-rsid="009948d9"/>
    </style:style>
    <style:style style:name="P219" style:family="paragraph" style:parent-style-name="Bible_20_Story_20_-_20_Graphic_20_Number">
      <style:text-properties officeooo:paragraph-rsid="009948d9"/>
    </style:style>
    <style:style style:name="P220" style:family="paragraph" style:parent-style-name="English_20_Translation_20_-_20_Bible_20_story_20_inset">
      <style:text-properties officeooo:paragraph-rsid="00b14bd3"/>
    </style:style>
    <style:style style:name="P221" style:family="paragraph" style:parent-style-name="Sub-Head_20_2">
      <style:text-properties officeooo:paragraph-rsid="00b14bd3"/>
    </style:style>
    <style:style style:name="P222" style:family="paragraph" style:parent-style-name="M.T._20_Text_20_-_20_Numbered_20_List_20_Inset" style:list-style-name="L21">
      <style:text-properties officeooo:paragraph-rsid="00b14bd3"/>
    </style:style>
    <style:style style:name="P223" style:family="paragraph" style:parent-style-name="M.T._20_Text_20_-_20_Single_20_Inset">
      <style:text-properties officeooo:paragraph-rsid="00b14bd3"/>
    </style:style>
    <style:style style:name="P224" style:family="paragraph" style:parent-style-name="Body_20_Numbered_20_List">
      <style:text-properties officeooo:paragraph-rsid="00b14bd3"/>
    </style:style>
    <style:style style:name="P225" style:family="paragraph" style:parent-style-name="M.T._20_Text_20_-_20_Numbered_20_List_20_Inset" style:list-style-name="L22">
      <style:text-properties officeooo:paragraph-rsid="00b14bd3"/>
    </style:style>
    <style:style style:name="P226" style:family="paragraph" style:parent-style-name="Body_20_Bullet_20_-_20_Checkmark" style:master-page-name="">
      <style:paragraph-properties style:page-number="auto" fo:keep-with-next="always"/>
      <style:text-properties officeooo:paragraph-rsid="00b14bd3"/>
    </style:style>
    <style:style style:name="P227" style:family="paragraph" style:parent-style-name="Body">
      <style:text-properties officeooo:paragraph-rsid="00b14bd3"/>
    </style:style>
    <style:style style:name="P228" style:family="paragraph" style:parent-style-name="Sub-Head_20_-_20_Coloring_20_page_20_last_20_paragraph">
      <style:text-properties officeooo:paragraph-rsid="00b14bd3"/>
    </style:style>
    <style:style style:name="P229" style:family="paragraph" style:parent-style-name="Sub-Head_20_1_20_No_20_follow">
      <style:text-properties officeooo:paragraph-rsid="008cb4bb"/>
    </style:style>
    <style:style style:name="P230" style:family="paragraph" style:parent-style-name="Section_20_Heading">
      <style:text-properties officeooo:paragraph-rsid="008cb4bb"/>
    </style:style>
    <style:style style:name="P231" style:family="paragraph" style:parent-style-name="Sub-Head_20_1">
      <style:text-properties officeooo:paragraph-rsid="008cb4bb"/>
    </style:style>
    <style:style style:name="P232" style:family="paragraph" style:parent-style-name="Body_20_Bullet_20_-_20_Checkmark">
      <style:text-properties officeooo:paragraph-rsid="008cb4bb"/>
    </style:style>
    <style:style style:name="P233" style:family="paragraph" style:parent-style-name="Body_20_Bullet_20_-_20_Checkmark" style:master-page-name="">
      <style:paragraph-properties style:page-number="auto" fo:keep-with-next="always"/>
      <style:text-properties officeooo:paragraph-rsid="008cb4bb"/>
    </style:style>
    <style:style style:name="P234" style:family="paragraph" style:parent-style-name="M.T._20_Text_20_-_20_Single_20_Inset">
      <style:text-properties officeooo:paragraph-rsid="008cb4bb"/>
    </style:style>
    <style:style style:name="P235" style:family="paragraph" style:parent-style-name="English_20_Translation_20_-_20_single_20_inset">
      <style:text-properties officeooo:paragraph-rsid="008cb4bb"/>
    </style:style>
    <style:style style:name="P236" style:family="paragraph" style:parent-style-name="M.T._20_Text_20_-_20_Single_20_Inset">
      <style:text-properties officeooo:rsid="00715c8c" officeooo:paragraph-rsid="008cb4bb"/>
    </style:style>
    <style:style style:name="P237" style:family="paragraph" style:parent-style-name="Body_20_Bullet_20_-_20_Checkmark_20_-_20_No_20_follow">
      <style:text-properties officeooo:paragraph-rsid="008cb4bb"/>
    </style:style>
    <style:style style:name="P238" style:family="paragraph" style:parent-style-name="M.T._20_Text_20_-_20_Checkmark_20_bullet">
      <style:text-properties officeooo:paragraph-rsid="008cb4bb"/>
    </style:style>
    <style:style style:name="P239" style:family="paragraph" style:parent-style-name="M.T._20_Text_20_-_20_Diamond_20_bullet">
      <style:text-properties officeooo:paragraph-rsid="008cb4bb"/>
    </style:style>
    <style:style style:name="P240" style:family="paragraph" style:parent-style-name="English_20_Translation_20_-_20_double_20_inset">
      <style:text-properties officeooo:paragraph-rsid="008cb4bb"/>
    </style:style>
    <style:style style:name="P241" style:family="paragraph" style:parent-style-name="M.T._20_Text_20_-_20_Indented">
      <style:text-properties officeooo:paragraph-rsid="008cb4bb"/>
    </style:style>
    <style:style style:name="P242" style:family="paragraph" style:parent-style-name="English_20_Translation_20_-_20_Indented">
      <style:text-properties officeooo:paragraph-rsid="008cb4bb"/>
    </style:style>
    <style:style style:name="P243" style:family="paragraph" style:parent-style-name="M.T._20_Text">
      <style:text-properties officeooo:paragraph-rsid="008cb4bb"/>
    </style:style>
    <style:style style:name="P244" style:family="paragraph" style:parent-style-name="English_20_translation">
      <style:text-properties officeooo:paragraph-rsid="008cb4bb"/>
    </style:style>
    <style:style style:name="P245" style:family="paragraph" style:parent-style-name="Sub-Head_20_1">
      <style:text-properties fo:language="en" fo:country="US" officeooo:paragraph-rsid="008cb4bb" style:language-asian="en" style:country-asian="US" style:language-complex="hi" style:country-complex="IN"/>
    </style:style>
    <style:style style:name="P246" style:family="paragraph" style:parent-style-name="Body">
      <style:text-properties officeooo:paragraph-rsid="008cb4bb"/>
    </style:style>
    <style:style style:name="P247" style:family="paragraph" style:parent-style-name="M.T._20_Text_20_-_20_Bible_20_story_20_inset">
      <style:text-properties officeooo:paragraph-rsid="008cb4bb"/>
    </style:style>
    <style:style style:name="P248" style:family="paragraph" style:parent-style-name="Bible_20_Story_20_-_20_Graphic_20_Number">
      <style:text-properties officeooo:rsid="017e3f1f" officeooo:paragraph-rsid="007c31d2"/>
    </style:style>
    <style:style style:name="P249" style:family="paragraph" style:parent-style-name="Bible_20_Story_20_-_20_Graphic_20_Number">
      <style:text-properties officeooo:paragraph-rsid="007c31d2"/>
    </style:style>
    <style:style style:name="P250" style:family="paragraph" style:parent-style-name="English_20_Translation_20_-_20_Bible_20_story_20_inset">
      <style:text-properties officeooo:paragraph-rsid="008cb4bb"/>
    </style:style>
    <style:style style:name="P251" style:family="paragraph" style:parent-style-name="Bible_20_Story_20_Column_20_Heading">
      <style:text-properties officeooo:paragraph-rsid="007c31d2"/>
    </style:style>
    <style:style style:name="P252" style:family="paragraph" style:parent-style-name="Sub-Head_20_2">
      <style:text-properties officeooo:paragraph-rsid="008cb4bb"/>
    </style:style>
    <style:style style:name="P253" style:family="paragraph" style:parent-style-name="M.T._20_Text_20_-_20_Indented">
      <style:text-properties officeooo:rsid="00724ec1" officeooo:paragraph-rsid="008cb4bb"/>
    </style:style>
    <style:style style:name="P254" style:family="paragraph" style:parent-style-name="Sub-Head_20_1" style:master-page-name="">
      <style:paragraph-properties style:page-number="auto" fo:keep-with-next="always"/>
      <style:text-properties officeooo:paragraph-rsid="008cb4bb"/>
    </style:style>
    <style:style style:name="P255" style:family="paragraph" style:parent-style-name="M.T._20_Text_20_-_20_Numbered_20_List_20_Inset" style:list-style-name="L23">
      <style:text-properties officeooo:paragraph-rsid="008cb4bb"/>
    </style:style>
    <style:style style:name="P256" style:family="paragraph" style:parent-style-name="Body_20_Numbered_20_List">
      <style:text-properties officeooo:paragraph-rsid="008cb4bb"/>
    </style:style>
    <style:style style:name="P257" style:family="paragraph" style:parent-style-name="M.T._20_Text_20_-_20_Numbered_20_List_20_Inset" style:list-style-name="L24">
      <style:text-properties officeooo:paragraph-rsid="008cb4bb"/>
    </style:style>
    <style:style style:name="P258" style:family="paragraph" style:parent-style-name="Sub-Head_20_-_20_Coloring_20_page_20_last_20_paragraph">
      <style:text-properties officeooo:paragraph-rsid="008cb4bb"/>
    </style:style>
    <style:style style:name="P259" style:family="paragraph" style:parent-style-name="Sub-Head_20_1_20_No_20_follow">
      <style:text-properties officeooo:paragraph-rsid="008aa1dc"/>
    </style:style>
    <style:style style:name="P260" style:family="paragraph" style:parent-style-name="Section_20_Heading">
      <style:text-properties officeooo:paragraph-rsid="008aa1dc"/>
    </style:style>
    <style:style style:name="P261" style:family="paragraph" style:parent-style-name="Sub-Head_20_1" style:master-page-name="">
      <style:paragraph-properties style:page-number="auto" fo:keep-with-next="always"/>
      <style:text-properties officeooo:paragraph-rsid="008aa1dc"/>
    </style:style>
    <style:style style:name="P262" style:family="paragraph" style:parent-style-name="Body_20_Bullet_20_-_20_Checkmark">
      <style:text-properties officeooo:paragraph-rsid="008aa1dc"/>
    </style:style>
    <style:style style:name="P263" style:family="paragraph" style:parent-style-name="Body_20_Bullet_20_-_20_Checkmark_20_-_20_No_20_follow">
      <style:text-properties officeooo:paragraph-rsid="008aa1dc"/>
    </style:style>
    <style:style style:name="P264" style:family="paragraph" style:parent-style-name="Sub-Head_20_1">
      <style:text-properties officeooo:paragraph-rsid="008aa1dc"/>
    </style:style>
    <style:style style:name="P265" style:family="paragraph" style:parent-style-name="M.T._20_Text_20_-_20_Single_20_Inset">
      <style:text-properties officeooo:paragraph-rsid="008aa1dc"/>
    </style:style>
    <style:style style:name="P266" style:family="paragraph" style:parent-style-name="English_20_Translation_20_-_20_single_20_inset">
      <style:text-properties officeooo:paragraph-rsid="008aa1dc"/>
    </style:style>
    <style:style style:name="P267" style:family="paragraph" style:parent-style-name="Body_20_Inset">
      <style:text-properties officeooo:paragraph-rsid="008aa1dc"/>
    </style:style>
    <style:style style:name="P268" style:family="paragraph" style:parent-style-name="M.T._20_Text_20_-_20_Checkmark_20_bullet">
      <style:text-properties officeooo:paragraph-rsid="008aa1dc"/>
    </style:style>
    <style:style style:name="P269" style:family="paragraph" style:parent-style-name="M.T._20_Text_20_-_20_Diamond_20_bullet">
      <style:text-properties officeooo:paragraph-rsid="008aa1dc"/>
    </style:style>
    <style:style style:name="P270" style:family="paragraph" style:parent-style-name="English_20_Translation_20_-_20_double_20_inset">
      <style:text-properties officeooo:paragraph-rsid="008aa1dc"/>
    </style:style>
    <style:style style:name="P271" style:family="paragraph" style:parent-style-name="M.T._20_Text_20_-_20_Indented">
      <style:text-properties officeooo:paragraph-rsid="008aa1dc"/>
    </style:style>
    <style:style style:name="P272" style:family="paragraph" style:parent-style-name="English_20_Translation_20_-_20_Indented">
      <style:text-properties officeooo:paragraph-rsid="008aa1dc"/>
    </style:style>
    <style:style style:name="P273" style:family="paragraph" style:parent-style-name="M.T._20_Text">
      <style:text-properties officeooo:paragraph-rsid="008aa1dc"/>
    </style:style>
    <style:style style:name="P274" style:family="paragraph" style:parent-style-name="English_20_translation">
      <style:text-properties officeooo:paragraph-rsid="008aa1dc"/>
    </style:style>
    <style:style style:name="P275" style:family="paragraph" style:parent-style-name="Sub-Head_20_1">
      <style:text-properties fo:language="en" fo:country="US" officeooo:paragraph-rsid="008aa1dc" style:language-asian="en" style:country-asian="US" style:language-complex="hi" style:country-complex="IN"/>
    </style:style>
    <style:style style:name="P276" style:family="paragraph" style:parent-style-name="Body_20_Tight_20_lines">
      <style:text-properties officeooo:paragraph-rsid="008aa1dc"/>
    </style:style>
    <style:style style:name="P277" style:family="paragraph" style:parent-style-name="Body_20_Numbered_20_List">
      <style:text-properties officeooo:paragraph-rsid="008aa1dc"/>
    </style:style>
    <style:style style:name="P278" style:family="paragraph" style:parent-style-name="Sub-Head_20_2">
      <style:text-properties officeooo:paragraph-rsid="008aa1dc"/>
    </style:style>
    <style:style style:name="P279" style:family="paragraph" style:parent-style-name="M.T._20_Text_20_-_20_Numbered_20_List_20_Inset" style:list-style-name="L25">
      <style:text-properties officeooo:paragraph-rsid="008aa1dc"/>
    </style:style>
    <style:style style:name="P280" style:family="paragraph" style:parent-style-name="M.T._20_Text">
      <style:text-properties fo:color="#000000" loext:opacity="100%" style:font-name="Andika New Basic2" fo:font-size="10pt" fo:language="en" fo:country="GB" fo:font-style="normal" fo:font-weight="normal" officeooo:rsid="006ff48d" officeooo:paragraph-rsid="008aa1dc"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P281" style:family="paragraph" style:parent-style-name="M.T._20_Text_20_-_20_Numbered_20_List_20_Inset" style:list-style-name="L26">
      <style:text-properties officeooo:paragraph-rsid="008aa1dc"/>
    </style:style>
    <style:style style:name="P282" style:family="paragraph" style:parent-style-name="Body_20_Bullet_20_-_20_Checkmark" style:master-page-name="">
      <style:paragraph-properties style:page-number="auto" fo:keep-with-next="always"/>
      <style:text-properties officeooo:paragraph-rsid="008aa1dc"/>
    </style:style>
    <style:style style:name="P283" style:family="paragraph" style:parent-style-name="Standard" style:list-style-name="L27">
      <style:text-properties officeooo:paragraph-rsid="008aa1dc"/>
    </style:style>
    <style:style style:name="P284" style:family="paragraph" style:parent-style-name="Body">
      <style:text-properties officeooo:paragraph-rsid="008aa1dc"/>
    </style:style>
    <style:style style:name="P285" style:family="paragraph" style:parent-style-name="Sub-Head_20_-_20_Coloring_20_page_20_last_20_paragraph">
      <style:text-properties officeooo:paragraph-rsid="008aa1dc"/>
    </style:style>
    <style:style style:name="P286" style:family="paragraph" style:parent-style-name="Sub-Head_20_1_20_No_20_follow">
      <style:text-properties officeooo:paragraph-rsid="00a7adc2"/>
    </style:style>
    <style:style style:name="P287" style:family="paragraph" style:parent-style-name="Section_20_Heading">
      <style:text-properties officeooo:paragraph-rsid="00a7adc2"/>
    </style:style>
    <style:style style:name="P288" style:family="paragraph" style:parent-style-name="Sub-Head_20_1">
      <style:text-properties officeooo:paragraph-rsid="00a7adc2"/>
    </style:style>
    <style:style style:name="P289" style:family="paragraph" style:parent-style-name="Body_20_Bullet_20_-_20_Checkmark">
      <style:text-properties officeooo:paragraph-rsid="00a7adc2"/>
    </style:style>
    <style:style style:name="P290" style:family="paragraph" style:parent-style-name="M.T._20_Text_20_-_20_Single_20_Inset">
      <style:text-properties officeooo:paragraph-rsid="00a7adc2"/>
    </style:style>
    <style:style style:name="P291" style:family="paragraph" style:parent-style-name="English_20_Translation_20_-_20_single_20_inset">
      <style:text-properties officeooo:paragraph-rsid="00a7adc2"/>
    </style:style>
    <style:style style:name="P292" style:family="paragraph" style:parent-style-name="Body_20_Bullet_20_-_20_Checkmark">
      <style:text-properties fo:color="#000000" loext:opacity="100%" style:font-name="Andika New Basic2" fo:font-size="10pt" fo:language="en" fo:country="US" fo:font-style="normal" fo:font-weight="normal" officeooo:rsid="008b5e76" officeooo:paragraph-rsid="00a7adc2"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P293" style:family="paragraph" style:parent-style-name="Body_20_Inset">
      <style:text-properties officeooo:paragraph-rsid="00a7adc2"/>
    </style:style>
    <style:style style:name="P294" style:family="paragraph" style:parent-style-name="Body_20_Bullet_20_-_20_Checkmark_20_-_20_No_20_follow">
      <style:text-properties officeooo:paragraph-rsid="00a7adc2"/>
    </style:style>
    <style:style style:name="P295" style:family="paragraph" style:parent-style-name="M.T._20_Text_20_-_20_Checkmark_20_bullet">
      <style:text-properties officeooo:paragraph-rsid="00a7adc2"/>
    </style:style>
    <style:style style:name="P296" style:family="paragraph" style:parent-style-name="M.T._20_Text_20_-_20_Diamond_20_bullet">
      <style:text-properties officeooo:paragraph-rsid="00a7adc2"/>
    </style:style>
    <style:style style:name="P297" style:family="paragraph" style:parent-style-name="English_20_Translation_20_-_20_double_20_inset">
      <style:text-properties officeooo:paragraph-rsid="00a7adc2"/>
    </style:style>
    <style:style style:name="P298" style:family="paragraph" style:parent-style-name="Sub-Head_20_1" style:master-page-name="">
      <style:paragraph-properties style:page-number="auto" fo:keep-with-next="auto"/>
      <style:text-properties officeooo:paragraph-rsid="00a7adc2"/>
    </style:style>
    <style:style style:name="P299" style:family="paragraph" style:parent-style-name="M.T._20_Text_20_-_20_Indented">
      <style:text-properties officeooo:paragraph-rsid="00a7adc2"/>
    </style:style>
    <style:style style:name="P300" style:family="paragraph" style:parent-style-name="English_20_Translation_20_-_20_Indented">
      <style:text-properties officeooo:paragraph-rsid="00a7adc2"/>
    </style:style>
    <style:style style:name="P301" style:family="paragraph" style:parent-style-name="M.T._20_Text">
      <style:text-properties officeooo:paragraph-rsid="00a7adc2"/>
    </style:style>
    <style:style style:name="P302" style:family="paragraph" style:parent-style-name="English_20_translation">
      <style:text-properties officeooo:paragraph-rsid="00a7adc2"/>
    </style:style>
    <style:style style:name="P303" style:family="paragraph" style:parent-style-name="Sub-Head_20_1">
      <style:text-properties fo:language="en" fo:country="US" officeooo:paragraph-rsid="00a7adc2" style:language-asian="en" style:country-asian="US" style:language-complex="hi" style:country-complex="IN"/>
    </style:style>
    <style:style style:name="P304" style:family="paragraph" style:parent-style-name="M.T._20_Text_20_-_20_Bible_20_story_20_inset">
      <style:text-properties officeooo:paragraph-rsid="00a7adc2"/>
    </style:style>
    <style:style style:name="P305" style:family="paragraph" style:parent-style-name="Bible_20_Story_20_-_20_Graphic_20_Number">
      <style:text-properties officeooo:paragraph-rsid="0093be13"/>
    </style:style>
    <style:style style:name="P306" style:family="paragraph" style:parent-style-name="English_20_Translation_20_-_20_Bible_20_story_20_inset">
      <style:text-properties officeooo:paragraph-rsid="00a7adc2"/>
    </style:style>
    <style:style style:name="P307" style:family="paragraph" style:parent-style-name="Bible_20_Story_20_-_20_Graphic_20_Number">
      <style:text-properties officeooo:rsid="017e3f1f" officeooo:paragraph-rsid="0093be13"/>
    </style:style>
    <style:style style:name="P308" style:family="paragraph" style:parent-style-name="Sub-Head_20_2">
      <style:text-properties fo:color="#000000" loext:opacity="100%" style:text-outline="false" style:font-name="Andika New Basic1" fo:font-size="12pt" fo:language="en" fo:country="US" fo:font-style="italic" fo:font-weight="bold" officeooo:rsid="008b5e76" officeooo:paragraph-rsid="00a7adc2" style:font-name-asian="ヒラギノ角ゴ Pro W3" style:font-size-asian="16pt" style:language-asian="en" style:country-asian="US" style:font-weight-asian="bold" style:font-name-complex="Times New Roman2" style:font-size-complex="16pt" style:language-complex="hi" style:country-complex="IN" style:font-weight-complex="bold"/>
    </style:style>
    <style:style style:name="P309" style:family="paragraph" style:parent-style-name="Sub-Head_20_1">
      <style:paragraph-properties fo:keep-with-next="always"/>
      <style:text-properties officeooo:paragraph-rsid="00a7adc2"/>
    </style:style>
    <style:style style:name="P310" style:family="paragraph" style:parent-style-name="Sub-Head_20_2">
      <style:text-properties officeooo:paragraph-rsid="00a97fd4"/>
    </style:style>
    <style:style style:name="P311" style:family="paragraph" style:parent-style-name="Body_20_Bullet_20_-_20_Checkmark">
      <style:text-properties officeooo:paragraph-rsid="00a97fd4"/>
    </style:style>
    <style:style style:name="P312" style:family="paragraph" style:parent-style-name="Body_20_Bullet_20_-_20_Checkmark_20_-_20_No_20_follow">
      <style:text-properties officeooo:paragraph-rsid="00a97fd4"/>
    </style:style>
    <style:style style:name="P313" style:family="paragraph" style:parent-style-name="Sub-Head_20_2">
      <style:text-properties officeooo:paragraph-rsid="00a7adc2"/>
    </style:style>
    <style:style style:name="P314" style:family="paragraph" style:parent-style-name="M.T._20_Text_20_-_20_Numbered_20_List_20_Inset" style:list-style-name="L28">
      <style:text-properties officeooo:paragraph-rsid="00a7adc2"/>
    </style:style>
    <style:style style:name="P315" style:family="paragraph" style:parent-style-name="M.T._20_Text">
      <style:text-properties officeooo:rsid="01301848" officeooo:paragraph-rsid="00a7adc2"/>
    </style:style>
    <style:style style:name="P316" style:family="paragraph" style:parent-style-name="Body_20_Numbered_20_List">
      <style:text-properties officeooo:paragraph-rsid="00a7adc2"/>
    </style:style>
    <style:style style:name="P317" style:family="paragraph" style:parent-style-name="M.T._20_Text_20_-_20_Numbered_20_List_20_Inset" style:list-style-name="L29">
      <style:text-properties officeooo:paragraph-rsid="00a7adc2"/>
    </style:style>
    <style:style style:name="P318" style:family="paragraph" style:parent-style-name="Body">
      <style:text-properties officeooo:paragraph-rsid="00a7adc2"/>
    </style:style>
    <style:style style:name="P319" style:family="paragraph" style:parent-style-name="Sub-Head_20_-_20_Coloring_20_page_20_last_20_paragraph">
      <style:text-properties officeooo:paragraph-rsid="00a7adc2"/>
    </style:style>
    <style:style style:name="P320" style:family="paragraph" style:parent-style-name="M.T._20_Text">
      <style:text-properties officeooo:paragraph-rsid="0085a92f"/>
    </style:style>
    <style:style style:name="P321" style:family="paragraph" style:parent-style-name="Table_20_Bullet_20_-_20_Checkmark" style:list-style-name="Table_20_Bullet_20_-_20_checkmark">
      <style:text-properties officeooo:rsid="01301848" officeooo:paragraph-rsid="00a7ff8c"/>
    </style:style>
    <style:style style:name="P322" style:family="paragraph" style:parent-style-name="Table_20_Bullet_20_-_20_Checkmark" style:list-style-name="Table_20_Bullet_20_-_20_checkmark">
      <style:text-properties officeooo:paragraph-rsid="00a7ff8c"/>
    </style:style>
    <style:style style:name="P323" style:family="paragraph" style:parent-style-name="M.T._20_Text">
      <style:text-properties officeooo:paragraph-rsid="00945bd5"/>
    </style:style>
    <style:style style:name="P324" style:family="paragraph" style:parent-style-name="Sub-Head_20_1_20_No_20_follow">
      <style:text-properties officeooo:paragraph-rsid="00c5b440"/>
    </style:style>
    <style:style style:name="P325" style:family="paragraph" style:parent-style-name="Section_20_Heading">
      <style:text-properties officeooo:paragraph-rsid="00c5b440"/>
    </style:style>
    <style:style style:name="P326" style:family="paragraph" style:parent-style-name="Sub-Head_20_1">
      <style:text-properties officeooo:paragraph-rsid="00c5b440"/>
    </style:style>
    <style:style style:name="P327" style:family="paragraph" style:parent-style-name="Body_20_Bullet_20_-_20_Checkmark">
      <style:text-properties officeooo:paragraph-rsid="00c5b440"/>
    </style:style>
    <style:style style:name="P328" style:family="paragraph" style:parent-style-name="M.T._20_Text_20_-_20_Single_20_Inset">
      <style:text-properties officeooo:paragraph-rsid="00c5b440"/>
    </style:style>
    <style:style style:name="P329" style:family="paragraph" style:parent-style-name="English_20_Translation_20_-_20_single_20_inset">
      <style:text-properties officeooo:paragraph-rsid="00c5b440"/>
    </style:style>
    <style:style style:name="P330" style:family="paragraph" style:parent-style-name="Body_20_Bullet_20_-_20_Checkmark" style:master-page-name="">
      <style:paragraph-properties style:page-number="auto" fo:keep-with-next="always"/>
      <style:text-properties officeooo:paragraph-rsid="00c5b440"/>
    </style:style>
    <style:style style:name="P331" style:family="paragraph" style:parent-style-name="Body_20_Inset">
      <style:text-properties officeooo:paragraph-rsid="00c5b440"/>
    </style:style>
    <style:style style:name="P332" style:family="paragraph" style:parent-style-name="Body_20_Bullet_20_-_20_Checkmark_20_-_20_No_20_follow">
      <style:text-properties officeooo:paragraph-rsid="00c5b440"/>
    </style:style>
    <style:style style:name="P333" style:family="paragraph" style:parent-style-name="M.T._20_Text_20_-_20_Checkmark_20_bullet">
      <style:text-properties officeooo:paragraph-rsid="00c5b440"/>
    </style:style>
    <style:style style:name="P334" style:family="paragraph" style:parent-style-name="M.T._20_Text_20_-_20_Diamond_20_bullet">
      <style:text-properties officeooo:paragraph-rsid="00c5b440"/>
    </style:style>
    <style:style style:name="P335" style:family="paragraph" style:parent-style-name="English_20_Translation_20_-_20_double_20_inset">
      <style:text-properties officeooo:paragraph-rsid="00c5b440"/>
    </style:style>
    <style:style style:name="P336" style:family="paragraph" style:parent-style-name="M.T._20_Text">
      <style:text-properties officeooo:paragraph-rsid="00c5b440"/>
    </style:style>
    <style:style style:name="P337" style:family="paragraph" style:parent-style-name="English_20_translation">
      <style:text-properties officeooo:paragraph-rsid="00c5b440"/>
    </style:style>
    <style:style style:name="P338" style:family="paragraph" style:parent-style-name="Sub-Head_20_1">
      <style:text-properties fo:language="en" fo:country="US" officeooo:paragraph-rsid="00c5b440" style:language-asian="en" style:country-asian="US" style:language-complex="hi" style:country-complex="IN"/>
    </style:style>
    <style:style style:name="P339" style:family="paragraph" style:parent-style-name="M.T._20_Text_20_-_20_Indented">
      <style:text-properties officeooo:paragraph-rsid="00c5b440"/>
    </style:style>
    <style:style style:name="P340" style:family="paragraph" style:parent-style-name="English_20_Translation_20_-_20_Indented">
      <style:text-properties officeooo:paragraph-rsid="00c5b440"/>
    </style:style>
    <style:style style:name="P341" style:family="paragraph" style:parent-style-name="M.T._20_Text_20_-_20_Bible_20_story_20_inset">
      <style:text-properties officeooo:paragraph-rsid="00c5b440"/>
    </style:style>
    <style:style style:name="P342" style:family="paragraph" style:parent-style-name="Bible_20_Story_20_-_20_Graphic_20_Number">
      <style:text-properties officeooo:rsid="017e3f1f" officeooo:paragraph-rsid="00b262ca"/>
    </style:style>
    <style:style style:name="P343" style:family="paragraph" style:parent-style-name="Bible_20_Story_20_-_20_Graphic_20_Number">
      <style:text-properties officeooo:paragraph-rsid="00b262ca"/>
    </style:style>
    <style:style style:name="P344" style:family="paragraph" style:parent-style-name="English_20_Translation_20_-_20_Bible_20_story_20_inset">
      <style:text-properties officeooo:paragraph-rsid="00c5b440"/>
    </style:style>
    <style:style style:name="P345" style:family="paragraph" style:parent-style-name="Bible_20_Story_20_-_20_Graphic_20_Number">
      <style:text-properties officeooo:rsid="017e3f1f" officeooo:paragraph-rsid="00b379e1"/>
    </style:style>
    <style:style style:name="P346" style:family="paragraph" style:parent-style-name="Bible_20_Story_20_-_20_Graphic_20_Number">
      <style:text-properties officeooo:paragraph-rsid="00b379e1"/>
    </style:style>
    <style:style style:name="P347" style:family="paragraph" style:parent-style-name="Sub-Head_20_1">
      <style:paragraph-properties fo:keep-with-next="always"/>
      <style:text-properties officeooo:paragraph-rsid="00c5b440"/>
    </style:style>
    <style:style style:name="P348" style:family="paragraph" style:parent-style-name="Sub-Head_20_2">
      <style:text-properties officeooo:paragraph-rsid="00c5b440"/>
    </style:style>
    <style:style style:name="P349" style:family="paragraph" style:parent-style-name="M.T._20_Text_20_-_20_Numbered_20_List_20_Inset" style:list-style-name="L30">
      <style:text-properties officeooo:paragraph-rsid="00c5b440"/>
    </style:style>
    <style:style style:name="P350" style:family="paragraph" style:parent-style-name="Body_20_Numbered_20_List">
      <style:text-properties officeooo:paragraph-rsid="00c5b440"/>
    </style:style>
    <style:style style:name="P351" style:family="paragraph" style:parent-style-name="M.T._20_Text_20_-_20_Numbered_20_List_20_Inset" style:list-style-name="L31">
      <style:text-properties officeooo:paragraph-rsid="00c5b440"/>
    </style:style>
    <style:style style:name="P352" style:family="paragraph" style:parent-style-name="Body">
      <style:text-properties officeooo:paragraph-rsid="00c5b440"/>
    </style:style>
    <style:style style:name="P353" style:family="paragraph" style:parent-style-name="Sub-Head_20_-_20_Coloring_20_page_20_last_20_paragraph">
      <style:text-properties officeooo:paragraph-rsid="00c5b440"/>
    </style:style>
    <style:style style:name="P354" style:family="paragraph" style:parent-style-name="English_20_Translation_20_-_20_Lesson_20_title">
      <style:text-properties officeooo:paragraph-rsid="015df54f"/>
    </style:style>
    <style:style style:name="P355" style:family="paragraph" style:parent-style-name="Body_20_Tight_20_lines">
      <style:text-properties officeooo:paragraph-rsid="01585958"/>
    </style:style>
    <style:style style:name="P356" style:family="paragraph" style:parent-style-name="Table_20_Bullet_20_-_20_Checkmark" style:list-style-name="Bullet_20_-_20_checkmark">
      <style:text-properties officeooo:rsid="01301848" officeooo:paragraph-rsid="015cef98"/>
    </style:style>
    <style:style style:name="P357" style:family="paragraph" style:parent-style-name="Section_20_Heading">
      <style:text-properties officeooo:paragraph-rsid="0174fbef"/>
    </style:style>
    <style:style style:name="P358" style:family="paragraph" style:parent-style-name="Sub-Head_20_1">
      <style:text-properties officeooo:paragraph-rsid="0174fbef"/>
    </style:style>
    <style:style style:name="P359" style:family="paragraph" style:parent-style-name="Body_20_Bullet_20_-_20_Checkmark">
      <style:text-properties officeooo:paragraph-rsid="0174fbef"/>
    </style:style>
    <style:style style:name="P360" style:family="paragraph" style:parent-style-name="M.T._20_Text_20_-_20_Single_20_Inset">
      <style:text-properties officeooo:paragraph-rsid="0174fbef"/>
    </style:style>
    <style:style style:name="P361" style:family="paragraph" style:parent-style-name="English_20_Translation_20_-_20_single_20_inset">
      <style:text-properties officeooo:paragraph-rsid="0174fbef"/>
    </style:style>
    <style:style style:name="P362" style:family="paragraph" style:parent-style-name="Body_20_Inset">
      <style:text-properties officeooo:paragraph-rsid="0174fbef"/>
    </style:style>
    <style:style style:name="P363" style:family="paragraph" style:parent-style-name="Sub-Head_20_1_20_No_20_follow">
      <style:text-properties officeooo:paragraph-rsid="0174fbef"/>
    </style:style>
    <style:style style:name="P364" style:family="paragraph" style:parent-style-name="M.T._20_Text_20_-_20_Indented">
      <style:text-properties officeooo:paragraph-rsid="0174fbef"/>
    </style:style>
    <style:style style:name="P365" style:family="paragraph" style:parent-style-name="English_20_Translation_20_-_20_Indented">
      <style:text-properties officeooo:paragraph-rsid="0174fbef"/>
    </style:style>
    <style:style style:name="P366" style:family="paragraph" style:parent-style-name="Sub-Head_20_2">
      <style:text-properties officeooo:paragraph-rsid="0174fbef"/>
    </style:style>
    <style:style style:name="P367" style:family="paragraph" style:parent-style-name="Body_20_Bullet_20_-_20_Checkmark" style:list-style-name="Bullet_20_-_20_checkmark">
      <style:text-properties officeooo:paragraph-rsid="0174fbef"/>
    </style:style>
    <style:style style:name="P368" style:family="paragraph" style:parent-style-name="Body_20_Bullet_20_-_20_Checkmark_20_-_20_No_20_follow">
      <style:text-properties officeooo:paragraph-rsid="0174fbef"/>
    </style:style>
    <style:style style:name="P369" style:family="paragraph" style:parent-style-name="Body_20_Bullet_20_-_20_Checkmark_20_-_20_No_20_follow" style:list-style-name="Bullet_20_-_20_checkmark">
      <style:text-properties officeooo:paragraph-rsid="0174fbef"/>
    </style:style>
    <style:style style:name="P370" style:family="paragraph" style:parent-style-name="Body_20_-_20_Small_20_spacer">
      <style:text-properties officeooo:paragraph-rsid="0174fbef"/>
    </style:style>
    <style:style style:name="P371" style:family="paragraph" style:parent-style-name="Standard">
      <style:text-properties officeooo:paragraph-rsid="0174fbef"/>
    </style:style>
    <style:style style:name="P372" style:family="paragraph" style:parent-style-name="Sub-Head_20_1" style:master-page-name="">
      <style:paragraph-properties style:page-number="auto" fo:keep-with-next="always"/>
      <style:text-properties officeooo:paragraph-rsid="0174fbef"/>
    </style:style>
    <style:style style:name="P373" style:family="paragraph" style:parent-style-name="M.T._20_Text">
      <style:text-properties officeooo:paragraph-rsid="0174fbef"/>
    </style:style>
    <style:style style:name="P374" style:family="paragraph" style:parent-style-name="English_20_translation">
      <style:text-properties officeooo:paragraph-rsid="0174fbef"/>
    </style:style>
    <style:style style:name="P375" style:family="paragraph" style:parent-style-name="M.T._20_Text_20_-_20_Numbered_20_List_20_Inset" style:list-style-name="L32">
      <style:text-properties officeooo:paragraph-rsid="0174fbef"/>
    </style:style>
    <style:style style:name="P376" style:family="paragraph" style:parent-style-name="M.T._20_Text_20_-_20_Numbered_20_List_20_Inset" style:list-style-name="L33">
      <style:text-properties officeooo:paragraph-rsid="0174fbef"/>
    </style:style>
    <style:style style:name="P377" style:family="paragraph" style:parent-style-name="M.T._20_Text_20_-_20_Numbered_20_List_20_Inset" style:list-style-name="L34">
      <style:text-properties officeooo:paragraph-rsid="0174fbef"/>
    </style:style>
    <style:style style:name="P378" style:family="paragraph" style:parent-style-name="M.T._20_Text_20_-_20_Numbered_20_List_20_Inset" style:list-style-name="L35">
      <style:text-properties officeooo:paragraph-rsid="0174fbef"/>
    </style:style>
    <style:style style:name="P379" style:family="paragraph" style:parent-style-name="English_20_translation">
      <style:text-properties fo:language="en" fo:country="GB" officeooo:paragraph-rsid="0174fbef"/>
    </style:style>
    <style:style style:name="P380" style:family="paragraph" style:parent-style-name="M.T._20_Text_20_-_20_Numbered_20_List_20_Inset" style:list-style-name="L36">
      <style:text-properties officeooo:paragraph-rsid="0174fbef"/>
    </style:style>
    <style:style style:name="P381" style:family="paragraph" style:parent-style-name="M.T._20_Text">
      <style:text-properties fo:language="en" fo:country="GB" officeooo:paragraph-rsid="0174fbef"/>
    </style:style>
    <style:style style:name="P382" style:family="paragraph" style:parent-style-name="M.T._20_Text_20_-_20_Numbered_20_List_20_Inset" style:list-style-name="L37">
      <style:text-properties officeooo:paragraph-rsid="0174fbef"/>
    </style:style>
    <style:style style:name="P383" style:family="paragraph" style:parent-style-name="English_20_Translation_20_-_20_single_20_inset">
      <style:text-properties fo:language="en" fo:country="GB" officeooo:paragraph-rsid="0174fbef"/>
    </style:style>
    <style:style style:name="P384" style:family="paragraph" style:parent-style-name="Body_20_Tight_20_lines">
      <style:text-properties officeooo:paragraph-rsid="0174fbef"/>
    </style:style>
    <style:style style:name="T1" style:family="text">
      <style:text-properties fo:language="en" fo:country="US" style:language-asian="en" style:country-asian="US" style:language-complex="hi" style:country-complex="IN"/>
    </style:style>
    <style:style style:name="T2" style:family="text">
      <style:text-properties officeooo:rsid="0052f8e8"/>
    </style:style>
    <style:style style:name="T3" style:family="text">
      <style:text-properties officeooo:rsid="005b8102"/>
    </style:style>
    <style:style style:name="T4" style:family="text">
      <style:text-properties officeooo:rsid="005c5b85"/>
    </style:style>
    <style:style style:name="T5" style:family="text">
      <style:text-properties officeooo:rsid="002c255b"/>
    </style:style>
    <style:style style:name="T6" style:family="text">
      <style:text-properties officeooo:rsid="017e3f1f"/>
    </style:style>
    <style:style style:name="T7" style:family="text">
      <style:text-properties officeooo:rsid="0082a2ed"/>
    </style:style>
    <style:style style:name="T8" style:family="text">
      <style:text-properties fo:language="en" fo:country="GB" style:language-asian="en" style:country-asian="US" style:language-complex="hi" style:country-complex="IN"/>
    </style:style>
    <style:style style:name="T9" style:family="text">
      <style:text-properties officeooo:rsid="001dbf9a"/>
    </style:style>
    <style:style style:name="T10" style:family="text">
      <style:text-properties officeooo:rsid="00913602"/>
    </style:style>
    <style:style style:name="T11" style:family="text">
      <style:text-properties officeooo:rsid="00a53627"/>
    </style:style>
    <style:style style:name="T12" style:family="text">
      <style:text-properties officeooo:rsid="0094c047"/>
    </style:style>
    <style:style style:name="T13" style:family="text">
      <style:text-properties officeooo:rsid="008e6630"/>
    </style:style>
    <style:style style:name="T14" style:family="text">
      <style:text-properties fo:language="en" fo:country="US" officeooo:rsid="008f5c58" style:language-asian="en" style:country-asian="US" style:language-complex="hi" style:country-complex="IN"/>
    </style:style>
    <style:style style:name="T15" style:family="text">
      <style:text-properties officeooo:rsid="00742a0c"/>
    </style:style>
    <style:style style:name="T16" style:family="text">
      <style:text-properties officeooo:rsid="007e3368"/>
    </style:style>
    <style:style style:name="T17" style:family="text">
      <style:text-properties fo:color="#000000" loext:opacity="100%" style:font-name="Andika New Basic2" fo:font-size="10pt" fo:language="en" fo:country="US" fo:font-style="normal" fo:font-weight="normal" officeooo:rsid="008f5c58"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18" style:family="text">
      <style:text-properties officeooo:rsid="00724ec1"/>
    </style:style>
    <style:style style:name="T19" style:family="text">
      <style:text-properties officeooo:rsid="006ff48d"/>
    </style:style>
    <style:style style:name="T20" style:family="text">
      <style:text-properties officeooo:rsid="006fa21d"/>
    </style:style>
    <style:style style:name="T21" style:family="text">
      <style:text-properties fo:color="#000000" loext:opacity="100%" style:font-name="Andika New Basic2" fo:font-size="10pt" fo:language="en" fo:country="GB" fo:font-style="normal" fo:font-weight="normal" officeooo:rsid="006ff48d"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22" style:family="text">
      <style:text-properties fo:color="#000000" loext:opacity="100%" style:font-name="Andika New Basic2" fo:font-size="10pt" fo:language="en" fo:country="US" fo:font-style="normal" fo:font-weight="normal" officeooo:rsid="00a97fd4"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23" style:family="text">
      <style:text-properties officeooo:rsid="008b5e76"/>
    </style:style>
    <style:style style:name="T24" style:family="text">
      <style:text-properties officeooo:rsid="009118da"/>
    </style:style>
    <style:style style:name="T25" style:family="text">
      <style:text-properties officeooo:rsid="00963e20"/>
    </style:style>
    <style:style style:name="T26" style:family="text">
      <style:text-properties officeooo:rsid="00a00296"/>
    </style:style>
    <style:style style:name="fr1" style:family="graphic" style:parent-style-name="Front_20_matter_20_frames">
      <style:graphic-properties style:vertical-pos="middle" style:vertical-rel="page-content" loext:rel-width-rel="paragraph"/>
    </style:style>
    <style:style style:name="fr2" style:family="graphic" style:parent-style-name="CC_20_Logo">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Number_20_Graphic">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Bible_5f_Story_5f_Box">
      <style:graphic-properties style:vertical-pos="from-top" style:vertical-rel="paragraph" style:horizontal-pos="from-left" style:horizontal-rel="paragraph" draw:opacity="50%"/>
    </style:style>
    <style:style style:name="fr5" style:family="graphic" style:parent-style-name="Bible_5f_Story_5f_Picture">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Bible_5f_Story_5f_Box">
      <style:graphic-properties style:wrap="right" style:number-wrapped-paragraphs="no-limit" style:vertical-pos="from-top" style:vertical-rel="paragraph" style:horizontal-pos="from-left" style:horizontal-rel="paragraph" draw:opacity="50%"/>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Bible_5f_Story_5f_Picture">
      <style:graphic-properties style:mirror="none" fo:clip="rect(0in, 0in, 0in, 0in)" draw:luminance="0%" draw:contrast="0%" draw:red="0%" draw:green="0%" draw:blue="0%" draw:gamma="100%" draw:color-inversion="false" draw:image-opacity="100%" draw:color-mode="standard"/>
    </style:style>
    <style:style style:name="fr11" style:family="graphic" style:parent-style-name="Tic-Tac-Toe_20_graphic">
      <style:graphic-properties style:vertical-pos="from-top" style:vertic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Bullseye_20_graphic">
      <style:graphic-properties style:vertical-pos="from-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enctype="application/text"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ext:p text:style-name="P1"><draw:frame draw:style-name="fr1" draw:name="Frame1" text:anchor-type="char" svg:width="6.8902in" style:rel-width="100%" draw:z-index="21"><draw:text-box fo:min-height="0.1965in"><text:p text:style-name="M.T._20_Front_20_matter_20_Title">Lessons from Luke</text:p><text:p text:style-name="M.T._20_Front_20_matter_20_subtitle">Teacher’s Guide <text:s/>– <text:s/>Quarter <text:s/>2</text:p><text:p text:style-name="Body_20_Centered">Based on “Lessons from Luke,” 2nd edition, 2022 </text:p><text:p text:style-name="Body_20_Centered">Chris and Karen Jackson, editors</text:p><text:p text:style-name="Body_20_-_20_Small_20_Spacer"/><text:p text:style-name="Bible_20_Story_20_-_20_Graphic_20_Number"><draw:frame text:anchor-type="as-char" draw:z-index="38" draw:name="Shape1" draw:style-name="gr1" draw:text-style-name="P2" svg:width="5.426in" svg:height="5.8571in"><draw:image xlink:href="Pictures/100000000000019C000001BCCEE92BE4.jpg" xlink:type="simple" xlink:show="embed" xlink:actuate="onLoad" draw:mime-type="image/jpeg"><text:p/></draw:image></draw:frame></text:p><text:p text:style-name="Body_20_-_20_Small_20_Spacer"/><text:p text:style-name="P3">Publisher</text:p><text:p text:style-name="P3">Publisher address</text:p><text:p text:style-name="P3">City, Region</text:p><text:p text:style-name="P3">Country</text:p><text:p text:style-name="Body_20_Centered"/><text:p text:style-name="P3">Year of publication</text:p></draw:text-box></draw:frame><text:soft-page-break/></text:p>
      <text:p text:style-name="P4"/>
      <table:table table:name="Table2" table:style-name="Table2">
        <table:table-column table:style-name="Table2.A"/>
        <table:table-column table:style-name="Table2.B"/>
        <table:table-row>
          <table:table-cell table:style-name="Table2.A1" office:value-type="string">
            <text:p text:style-name="P5">Language:</text:p>
          </table:table-cell>
          <table:table-cell table:style-name="Table2.B1" office:value-type="string">
            <text:p text:style-name="P6">Name of language</text:p>
          </table:table-cell>
        </table:table-row>
        <table:table-row>
          <table:table-cell table:style-name="Table2.A1" office:value-type="string">
            <text:p text:style-name="P5">Spoken in:</text:p>
          </table:table-cell>
          <table:table-cell table:style-name="Table2.B1" office:value-type="string">
            <text:p text:style-name="P6">insert division, region, country information. </text:p>
          </table:table-cell>
        </table:table-row>
        <table:table-row>
          <table:table-cell table:style-name="Table2.A1" office:value-type="string">
            <text:p text:style-name="P5">ISO 639-3 language code:</text:p>
          </table:table-cell>
          <table:table-cell table:style-name="Table2.B1" office:value-type="string">
            <text:p text:style-name="P6">Insert language code</text:p>
          </table:table-cell>
        </table:table-row>
        <table:table-row>
          <table:table-cell table:style-name="Table2.A1" office:value-type="string">
            <text:p text:style-name="P5">Title in English:</text:p>
          </table:table-cell>
          <table:table-cell table:style-name="Table2.B1" office:value-type="string">
            <text:p text:style-name="P6">Lessons from Luke Teacher’s Guide – Quarter 2</text:p>
          </table:table-cell>
        </table:table-row>
        <table:table-row>
          <table:table-cell table:style-name="Table2.A1" office:value-type="string">
            <text:p text:style-name="P5">Translated by: </text:p>
          </table:table-cell>
          <table:table-cell table:style-name="Table2.B1" office:value-type="string">
            <text:p text:style-name="P6">Insert names of translators</text:p>
          </table:table-cell>
        </table:table-row>
      </table:table>
      <text:p text:style-name="P7"/>
      <text:p text:style-name="P7">Adapted from the original work, “Lessons from Luke, 2nd Edition,” copyright Chris Jackson, licensed under a Creative Commons Attribution-NonCommercial-ShareAlike 4.0 International License (CC-BY-NC-SA). </text:p>
      <text:p text:style-name="P8"/>
      <text:p text:style-name="P8"/>
      <table:table table:name="Table3" table:style-name="Table3">
        <table:table-column table:style-name="Table3.A"/>
        <table:table-column table:style-name="Table3.B"/>
        <table:table-row table:style-name="Table3.1">
          <table:table-cell table:style-name="Table3.A1" office:value-type="string">
            <text:p text:style-name="P9">Scripture text:</text:p>
          </table:table-cell>
          <table:table-cell table:style-name="Table3.A1" office:value-type="string">
            <text:p text:style-name="P6">Title of New Testament, or Gospel of Luke in translated language </text:p>
            <text:p text:style-name="P6">© <text:s text:c="2"/>Scripture copyright year <text:s/>Scripture copyright holder.</text:p>
            <text:p text:style-name="P8">All rights reserved.</text:p>
          </table:table-cell>
        </table:table-row>
      </table:table>
      <text:p text:style-name="P8"/>
      <text:p text:style-name="P8">English Scripture text: <text:s/><text:span text:style-name="T1">the NET Bible® http://netbible.com copyright ©1996, 2019 used with permission from Biblical Studies Press, L.L.C. All rights reserved</text:span></text:p>
      <text:p text:style-name="P8"/>
      <text:p text:style-name="P8"/>
      <text:p text:style-name="P8">Bible illustrations by Jim Padgett, courtesy of Sweet Publishing, Fr. Worth (Texas); licensed for use under the Creative Commons BY-SA. https://creativecommons.org/licenses/by-sa/3.0/ </text:p>
      <text:p text:style-name="P8"/>
      <text:p text:style-name="P8">The following illustrations were produced by Marx Tawe, Bamenda, North West Region, Cameroon: <text:s/>Covers, 9-2, 9-3; 10-2; 15-1 to 15-5; 16-1 to 16-4; 17-1 to 17-5; 18-1 to 18-2; 24-1 to 24-3; 31-1 to 31-3; 33-1 to 33-4; 36-1 to 36-3 and the coloring pages. </text:p>
      <text:p text:style-name="P8">(for copyright questions concerning illustrations, contact Chris Jackson: chris_jackson@sil.org.) </text:p>
      <text:p text:style-name="P10"/>
      <text:p text:style-name="P11"/>
      <text:p text:style-name="P11"/>
      <table:table table:name="Table4" table:style-name="Table4">
        <table:table-column table:style-name="Table4.A"/>
        <table:table-column table:style-name="Table4.B"/>
        <table:table-row table:style-name="Table4.1">
          <table:table-cell table:style-name="Table4.A1" office:value-type="string">
            <text:p text:style-name="P12"><draw:frame draw:style-name="fr2" draw:name="Image2" text:anchor-type="as-char" svg:width="0.9362in" svg:height="0.3299in" draw:z-index="146"><draw:image xlink:href="Pictures/10000001000000580000001F0BCB3E69.png" xlink:type="simple" xlink:show="embed" xlink:actuate="onLoad" draw:mime-type="image/png"/></draw:frame></text:p>
          </table:table-cell>
          <table:table-cell table:style-name="Table4.A1" office:value-type="string">
            <text:p text:style-name="P13">Year of publication <text:s/>Publisher</text:p>
            <text:p text:style-name="P14">This work is licensed under the Creative Commons Attribution-NonCommercial-ShareAlike 4.0 International License. To view a copy of this license, visit http://creativecommons.org/licenses/by-nc-sa/4.0/deed.en_US.</text:p>
          </table:table-cell>
        </table:table-row>
      </table:table>
      <text:p text:style-name="P14"/>
      <text:p text:style-name="P15">Quarter <text:s/>2 <text:s/>Table of Conten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No.</text:p>
          </table:table-cell>
          <table:table-cell table:style-name="Table1.B1" office:value-type="string">
            <text:p text:style-name="P17">Title</text:p>
          </table:table-cell>
          <table:table-cell table:style-name="Table1.C1" office:value-type="string">
            <text:p text:style-name="P17">Truth</text:p>
          </table:table-cell>
          <table:table-cell table:style-name="Table1.D1" office:value-type="string">
            <text:p text:style-name="P18">Story</text:p>
          </table:table-cell>
        </table:table-row>
        <table:table-row table:style-name="Table1.1">
          <table:table-cell table:style-name="Table1.A2" office:value-type="string">
            <text:p text:style-name="P19">14</text:p>
          </table:table-cell>
          <table:table-cell table:style-name="Table1.A2" office:value-type="string">
            <text:p text:style-name="M.T._20_Table_20_of_20_Contents">The Twelve Apostles</text:p>
            <text:p text:style-name="P20">The Twelve Apostles</text:p>
          </table:table-cell>
          <table:table-cell table:style-name="Table1.A2" office:value-type="string">
            <text:p text:style-name="P21">A true disciple of Jesus follows him and his teachings.</text:p>
            <text:p text:style-name="P20">A true disciple of Jesus follows him and his teachings.</text:p>
          </table:table-cell>
          <table:table-cell table:style-name="Table1.A2" office:value-type="string">
            <text:p text:style-name="M.T._20_Table_20_of_20_Contents">Luke <text:s/>6:12-16</text:p>
          </table:table-cell>
        </table:table-row>
        <table:table-row table:style-name="Table1.1">
          <table:table-cell table:style-name="Table1.A2" office:value-type="string">
            <text:p text:style-name="P19">15</text:p>
          </table:table-cell>
          <table:table-cell table:style-name="Table1.A2" office:value-type="string">
            <text:p text:style-name="P21"><text:span text:style-name="T2">True Disciples of Jesus Love Their Enemies</text:span> </text:p>
            <text:p text:style-name="P20">True Disciples of Jesus Love Their Enemies</text:p>
          </table:table-cell>
          <table:table-cell table:style-name="Table1.A2" office:value-type="string">
            <text:p text:style-name="P21"><text:span text:style-name="T2">True disciples of Jesus love their enemies.</text:span> </text:p>
            <text:p text:style-name="P20">True disciples of Jesus love their enemies.</text:p>
          </table:table-cell>
          <table:table-cell table:style-name="Table1.A2" office:value-type="string">
            <text:p text:style-name="M.T._20_Table_20_of_20_Contents">Luke <text:s/>6:27-38 </text:p>
          </table:table-cell>
        </table:table-row>
        <table:table-row table:style-name="Table1.1">
          <table:table-cell table:style-name="Table1.A2" office:value-type="string">
            <text:p text:style-name="P19">16</text:p>
          </table:table-cell>
          <table:table-cell table:style-name="Table1.A2" office:value-type="string">
            <text:p text:style-name="P21"><text:span text:style-name="T3">A True Disciple of Jesus is Generous</text:span> </text:p>
            <text:p text:style-name="P20">A True Disciple of Jesus is Generous</text:p>
          </table:table-cell>
          <table:table-cell table:style-name="Table1.A2" office:value-type="string">
            <text:p text:style-name="P21"><text:span text:style-name="T3">A true disciple of Jesus is generous.</text:span> </text:p>
            <text:p text:style-name="P20">A true disciple of Jesus is generous.</text:p>
          </table:table-cell>
          <table:table-cell table:style-name="Table1.A2" office:value-type="string">
            <text:p text:style-name="M.T._20_Table_20_of_20_Contents">Luke <text:s/>6:30-31 </text:p>
          </table:table-cell>
        </table:table-row>
        <table:table-row table:style-name="Table1.1">
          <table:table-cell table:style-name="Table1.A2" office:value-type="string">
            <text:p text:style-name="P19">17</text:p>
          </table:table-cell>
          <table:table-cell table:style-name="Table1.A2" office:value-type="string">
            <text:p text:style-name="P22">A True Disciple of Jesus Bears Good Fruit </text:p>
            <text:p text:style-name="P20">A True Disciple of Jesus Bears Good Fruit</text:p>
          </table:table-cell>
          <table:table-cell table:style-name="Table1.A2" office:value-type="string">
            <text:p text:style-name="P21"><text:span text:style-name="T3">A true disciple of Jesus bears good fruit.</text:span><text:span text:style-name="T2"> </text:span></text:p>
            <text:p text:style-name="P20">A true disciple of Jesus bears good fruit.</text:p>
          </table:table-cell>
          <table:table-cell table:style-name="Table1.A2" office:value-type="string">
            <text:p text:style-name="M.T._20_Table_20_of_20_Contents">Luke <text:s/>6:43-44 </text:p>
          </table:table-cell>
        </table:table-row>
        <table:table-row table:style-name="Table1.1">
          <table:table-cell table:style-name="Table1.A2" office:value-type="string">
            <text:p text:style-name="P19">18</text:p>
          </table:table-cell>
          <table:table-cell table:style-name="Table1.A2" office:value-type="string">
            <text:p text:style-name="P21">The Wise Man and the Foolish Man</text:p>
            <text:p text:style-name="P20">The Wise Man and the Foolish Man</text:p>
          </table:table-cell>
          <table:table-cell table:style-name="Table1.A2" office:value-type="string">
            <text:p text:style-name="P21"><text:span text:style-name="T3">A true disciple of Jesus does what the Bible teaches.</text:span> </text:p>
            <text:p text:style-name="P20">A true disciple of Jesus does what the Bible teaches.</text:p>
          </table:table-cell>
          <table:table-cell table:style-name="Table1.A2" office:value-type="string">
            <text:p text:style-name="M.T._20_Table_20_of_20_Contents">Luke <text:s/>6:46-49 </text:p>
          </table:table-cell>
        </table:table-row>
        <table:table-row table:style-name="Table1.1">
          <table:table-cell table:style-name="Table1.A2" office:value-type="string">
            <text:p text:style-name="P19">19</text:p>
          </table:table-cell>
          <table:table-cell table:style-name="Table1.A2" office:value-type="string">
            <text:p text:style-name="P22">Jesus Heals the Centurion's Servant</text:p>
            <text:p text:style-name="P23">Jesus Heals the Centurion's Servant</text:p>
          </table:table-cell>
          <table:table-cell table:style-name="Table1.A2" office:value-type="string">
            <text:p text:style-name="P21"><text:span text:style-name="T4">A true disciple of Jesus has faith in him.</text:span> </text:p>
            <text:p text:style-name="P20">A true disciple of Jesus has faith in him.</text:p>
          </table:table-cell>
          <table:table-cell table:style-name="Table1.A2" office:value-type="string">
            <text:p text:style-name="M.T._20_Table_20_of_20_Contents">Luke <text:s/>7:1-10 </text:p>
          </table:table-cell>
        </table:table-row>
        <table:table-row table:style-name="Table1.1">
          <table:table-cell table:style-name="Table1.A2" office:value-type="string">
            <text:p text:style-name="P19">20</text:p>
          </table:table-cell>
          <table:table-cell table:style-name="Table1.A2" office:value-type="string">
            <text:p text:style-name="P21">Review Lesson </text:p>
            <text:p text:style-name="P20">Review Lesson</text:p>
          </table:table-cell>
          <table:table-cell table:style-name="Table1.A2" office:value-type="string">
            <text:p text:style-name="P21">Review <text:s/><text:span text:style-name="T5">Lessons 14-19</text:span></text:p>
            <text:p text:style-name="P20">Review <text:s/>Lessons 14-19</text:p>
          </table:table-cell>
          <table:table-cell table:style-name="Table1.A2" office:value-type="string">
            <text:p text:style-name="M.T._20_Table_20_of_20_Contents"/>
          </table:table-cell>
        </table:table-row>
        <table:table-row table:style-name="Table1.1">
          <table:table-cell table:style-name="Table1.A2" office:value-type="string">
            <text:p text:style-name="P19">21</text:p>
          </table:table-cell>
          <table:table-cell table:style-name="Table1.A2" office:value-type="string">
            <text:p text:style-name="P21">A Woman Wipes Jesus' Feet</text:p>
            <text:p text:style-name="P20">A Woman Wipes Jesus' Feet</text:p>
          </table:table-cell>
          <table:table-cell table:style-name="Table1.A2" office:value-type="string">
            <text:p text:style-name="P21">Jesus forgives our sins.</text:p>
            <text:p text:style-name="P20">Jesus forgives our sins.</text:p>
          </table:table-cell>
          <table:table-cell table:style-name="Table1.A2" office:value-type="string">
            <text:p text:style-name="M.T._20_Table_20_of_20_Contents">Luke <text:s/>7:36-50 </text:p>
          </table:table-cell>
        </table:table-row>
        <table:table-row table:style-name="Table1.1">
          <table:table-cell table:style-name="Table1.A2" office:value-type="string">
            <text:p text:style-name="P19">22</text:p>
          </table:table-cell>
          <table:table-cell table:style-name="Table1.A2" office:value-type="string">
            <text:p text:style-name="P21">The Seed and the Sower</text:p>
            <text:p text:style-name="P20">The Seed and the Sower</text:p>
          </table:table-cell>
          <table:table-cell table:style-name="Table1.A2" office:value-type="string">
            <text:p text:style-name="P21">Follow Jesus no matter the cost.</text:p>
            <text:p text:style-name="P20">Follow Jesus no matter the cost.</text:p>
          </table:table-cell>
          <table:table-cell table:style-name="Table1.A2" office:value-type="string">
            <text:p text:style-name="M.T._20_Table_20_of_20_Contents">Luke <text:s/>8:4-15 </text:p>
          </table:table-cell>
        </table:table-row>
        <table:table-row table:style-name="Table1.1">
          <table:table-cell table:style-name="Table1.A2" office:value-type="string">
            <text:p text:style-name="P19">23</text:p>
          </table:table-cell>
          <table:table-cell table:style-name="Table1.A2" office:value-type="string">
            <text:p text:style-name="P21">The Lamp on a Stand</text:p>
            <text:p text:style-name="P20">The Lamp on a Stand</text:p>
          </table:table-cell>
          <table:table-cell table:style-name="Table1.A2" office:value-type="string">
            <text:p text:style-name="P21">Jesus shines through us.</text:p>
            <text:p text:style-name="P20">Jesus shines through us.</text:p>
          </table:table-cell>
          <table:table-cell table:style-name="Table1.A2" office:value-type="string">
            <text:p text:style-name="M.T._20_Table_20_of_20_Contents">Luke <text:s/>8:16-18 </text:p>
          </table:table-cell>
        </table:table-row>
        <table:table-row table:style-name="Table1.1">
          <table:table-cell table:style-name="Table1.A2" office:value-type="string">
            <text:p text:style-name="P19">24</text:p>
          </table:table-cell>
          <table:table-cell table:style-name="Table1.A2" office:value-type="string">
            <text:p text:style-name="P21">Jesus Calms a Storm </text:p>
            <text:p text:style-name="P20">Jesus Calms a Storm</text:p>
          </table:table-cell>
          <table:table-cell table:style-name="Table1.A2" office:value-type="string">
            <text:p text:style-name="P21">Jesus has true power over nature. </text:p>
            <text:p text:style-name="P20">Jesus has true power over nature.</text:p>
          </table:table-cell>
          <table:table-cell table:style-name="Table1.A2" office:value-type="string">
            <text:p text:style-name="M.T._20_Table_20_of_20_Contents">Luke <text:s/>8:22-25 </text:p>
          </table:table-cell>
        </table:table-row>
        <table:table-row table:style-name="Table1.1">
          <table:table-cell table:style-name="Table1.A2" office:value-type="string">
            <text:p text:style-name="P19">25</text:p>
          </table:table-cell>
          <table:table-cell table:style-name="Table1.A2" office:value-type="string">
            <text:p text:style-name="P21">Jesus Casts out Demons into Pigs</text:p>
            <text:p text:style-name="P20">Jesus Casts out Demons into Pigs</text:p>
          </table:table-cell>
          <table:table-cell table:style-name="Table1.A2" office:value-type="string">
            <text:p text:style-name="P21">Jesus has power over evil spirits.</text:p>
            <text:p text:style-name="P20">Jesus has power over evil spirits.</text:p>
          </table:table-cell>
          <table:table-cell table:style-name="Table1.A2" office:value-type="string">
            <text:p text:style-name="M.T._20_Table_20_of_20_Contents">Luke <text:s/>8:26-39 </text:p>
          </table:table-cell>
        </table:table-row>
        <table:table-row table:style-name="Table1.1">
          <table:table-cell table:style-name="Table1.A2" office:value-type="string">
            <text:p text:style-name="P19">26</text:p>
          </table:table-cell>
          <table:table-cell table:style-name="Table1.A2" office:value-type="string">
            <text:p text:style-name="P21">Review Lesson </text:p>
            <text:p text:style-name="P24">Review Lesson</text:p>
          </table:table-cell>
          <table:table-cell table:style-name="Table1.A2" office:value-type="string">
            <text:p text:style-name="P21">Review <text:s/><text:span text:style-name="T5">Lessons 21-25</text:span></text:p>
            <text:p text:style-name="P20">Review <text:s/>Lessons 21-25</text:p>
          </table:table-cell>
          <table:table-cell table:style-name="Table1.A2" office:value-type="string">
            <text:p text:style-name="M.T._20_Table_20_of_20_Contents"/>
          </table:table-cell>
        </table:table-row>
      </table:table>
      <text:p text:style-name="Standard"/>
      <text:h text:style-name="P25" text:outline-level="1"><draw:frame draw:style-name="fr3" draw:name="Image3" text:anchor-type="char" svg:x="0in" svg:y="0.0161in" svg:width="1.0752in" svg:height="1.0752in" draw:z-index="45"><draw:image xlink:href="Pictures/10000001000000D8000000D864D7589F.png" xlink:type="simple" xlink:show="embed" xlink:actuate="onLoad" draw:mime-type="image/png"/></draw:frame>The Twelve Apostles</text:h>
      <text:p text:style-name="M.T._20_Lesson_20_Title">The Twelve Apostles</text:p>
      <text:p text:style-name="English_20_Translation_20_-_20_Lesson_20_title">The Twelve Apostles</text:p>
      <text:p text:style-name="M.T._20_Text_20_-_20_Lesson_20_Title_20_Scrip_20_Reference">Luke <text:s/>6:12-16</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A true disciple of Jesus follows him and his teachings.</text:p>
            <text:p text:style-name="English_20_translation">A true disciple of Jesus follows him and his teachings.</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text:span> <text:s/>The children will learn how to be a true follower of Jesus.</text:p>
            <text:p text:style-name="Body_20_Tight_20_lines"><text:span text:style-name="Body_20_Emphasized_20_-_20_Small">DO:</text:span> <text:s/>The children will show that they are true disciples of Jesus.</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xml:id="list1328641280"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6:13 When morning came, he called his disciples to him and chose twelve of them, whom he also designated apostles.</text:p>
            <text:p text:style-name="English_20_translation">Luke 6:13 When morning came, he called his disciples to him and chose twelve of them, whom he also designated apostles.</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What can you do this week to show that you are a disciple of Jesus?</text:p>
            <text:p text:style-name="English_20_translation">What can you do this week to show that you are a disciple of Jesus?</text:p>
          </table:table-cell>
        </table:table-row>
      </table:table>
      <text:p text:style-name="Body_20_-_20_Small_20_Spacer"/>
      <text:p text:style-name="Part_20_Heading">Detailed Lesson Plan</text:p>
      <text:section text:style-name="Sect1" text:name="L-14 Detail Plan">
        <text:p text:style-name="P26">Song</text:p>
        <text:p text:style-name="P27">Opening</text:p>
        <text:p text:style-name="P28">Welcome</text:p>
        <text:list text:style-name="Bullet_20_-_20_checkmark">
          <text:list-item>
            <text:p text:style-name="P29">Be sure the children know you are happy to see them!</text:p>
          </text:list-item>
          <text:list-item>
            <text:p text:style-name="P29">Introduce yourself and your helpers.</text:p>
          </text:list-item>
        </text:list>
        <text:p text:style-name="P28">Sharing Time</text:p>
        <text:list text:continue-numbering="true" text:style-name="Bullet_20_-_20_checkmark">
          <text:list-item>
            <text:p text:style-name="P30">Do you remember any truths from the last lessons?</text:p>
          </text:list-item>
        </text:list>
        <text:p text:style-name="P31">Do you remember any truths from the last lessons?</text:p>
        <text:p text:style-name="P32">(Give children time to share.)</text:p>
        <text:list text:continue-numbering="true" text:style-name="Bullet_20_-_20_checkmark">
          <text:list-item>
            <text:p text:style-name="P30">What truth have you continued to do even though it is not homework?</text:p>
          </text:list-item>
        </text:list>
        <text:p text:style-name="P31">What truth have you continued to do even though it is not homework?</text:p>
        <text:p text:style-name="P32">(Give children time to share.)</text:p>
        <text:list text:continue-numbering="true" text:style-name="Bullet_20_-_20_checkmark">
          <text:list-item>
            <text:p text:style-name="P30">It is important to follow these truths, even if they are not homework. All of the truths are the way we should be living.</text:p>
          </text:list-item>
        </text:list>
        <text:p text:style-name="P31">It is important to follow these truths, even if they are not homework. All of the truths are the way we should be living.</text:p>
        <text:p text:style-name="P28">Prayer</text:p>
        <text:list text:continue-numbering="true" text:style-name="Bullet_20_-_20_checkmark">
          <text:list-item>
            <text:p text:style-name="P29">Let the children share praises and prayer requests.</text:p>
          </text:list-item>
          <text:list-item>
            <text:p text:style-name="P33">Keep a record of what the children are sharing so you can remember to thank God together for answered prayers.</text:p>
          </text:list-item>
          <text:list-item>
            <text:p text:style-name="P33">Spend time praying together. <text:s/>Let children pray out loud if they volunteer. <text:s/>Do not force anyone to pray out loud.</text:p>
          </text:list-item>
        </text:list>
        <text:p text:style-name="P26">Song</text:p>
        <text:p text:style-name="P27"><text:soft-page-break/>Words to Discuss</text:p>
        <text:list xml:id="list92018022739243" text:continue-numbering="true" text:style-name="Bullet_20_-_20_checkmark">
          <text:list-item>
            <text:p text:style-name="P29">On the blackboard, write the “Words to Discuss” from the list below.</text:p>
          </text:list-item>
          <text:list-item>
            <text:p text:style-name="P30">Let's discuss some words to help us better understand the Bible story for today.</text:p>
          </text:list-item>
        </text:list>
        <text:p text:style-name="P31">Let's discuss some words to help us better understand the Bible story for today.</text:p>
        <text:list text:style-name="Bullet_20_-_20_Diamond">
          <text:list-item>
            <text:p text:style-name="P34"><text:span text:style-name="Body_20_Emphasized_20_-_20_Small">Disciple:</text:span> <text:s/>Someone who follows Jesus and lives by His teachings.</text:p>
          </text:list-item>
        </text:list>
        <text:p text:style-name="P35">Disciple: <text:s/>Someone who follows Jesus and lives by His teachings.</text:p>
        <text:list text:continue-numbering="true" text:style-name="Bullet_20_-_20_Diamond">
          <text:list-item>
            <text:p text:style-name="P34"><text:span text:style-name="Body_20_Emphasized_20_-_20_Small">Mountainside:</text:span> <text:s/>The part of the mountain that begins to slope up.</text:p>
          </text:list-item>
        </text:list>
        <text:p text:style-name="P35">Mountainside: <text:s/>The part of the mountain that begins to slope up.</text:p>
        <text:list text:continue-numbering="true" text:style-name="Bullet_20_-_20_Diamond">
          <text:list-item>
            <text:p text:style-name="P34"><text:span text:style-name="Body_20_Emphasized_20_-_20_Small">Apostles:</text:span> <text:s/>Twelve men who were chosen by Jesus to be his chief disciples to carry his teachings to others.</text:p>
          </text:list-item>
        </text:list>
        <text:p text:style-name="P35">Apostles: <text:s/>Twelve men who were chosen by Jesus to be his chief disciples to carry his teachings to others.</text:p>
        <text:list xml:id="list92018742558845" text:continue-numbering="true" text:style-name="Bullet_20_-_20_Diamond">
          <text:list-item>
            <text:p text:style-name="P34"><text:span text:style-name="Body_20_Emphasized_20_-_20_Small">Traitor:</text:span> <text:s/>Someone who gives up a friend to the enemy because they want some benefit from it.</text:p>
          </text:list-item>
        </text:list>
        <text:p text:style-name="P35">Traitor: <text:s/>Someone who gives up a friend to the enemy because they want some benefit from it.</text:p>
        <text:p text:style-name="P26">Song</text:p>
        <text:p text:style-name="P27">Bible Story / Lesson</text:p>
        <text:p text:style-name="P36"><text:span text:style-name="Body_20_Emphasized_20_-_20_Small">Game:</text:span> <text:s/>Follow Me</text:p>
        <text:list xml:id="list92017917107435" text:continue-list="list1328641280" text:style-name="Table_20_Bullet_20_-_20_checkmark">
          <text:list-item>
            <text:p text:style-name="P37">Ask children to stand up and copy your movements. Start out simple. Raise your right hand, raise your left hand, etc.</text:p>
          </text:list-item>
          <text:list-item>
            <text:p text:style-name="P37">Add more and more difficult maneuvers using facial expressions and sounds. Enjoy the confusion as it becomes harder and harder to copy your actions. (The point is not to trick the children into making mistakes, but to make it humorous and difficult to follow.)</text:p>
          </text:list-item>
        </text:list>
        <text:list text:continue-list="list92018022739243" text:style-name="Bullet_20_-_20_checkmark">
          <text:list-item>
            <text:p text:style-name="P30">Was it easy or hard to imitate the teacher?</text:p>
          </text:list-item>
        </text:list>
        <text:p text:style-name="P31">Was it easy or hard to imitate the teacher?</text:p>
        <text:list text:continue-numbering="true" text:style-name="Bullet_20_-_20_checkmark">
          <text:list-item>
            <text:p text:style-name="P30">What made it easier?</text:p>
          </text:list-item>
        </text:list>
        <text:p text:style-name="P31">What made it easier?</text:p>
        <text:list text:continue-numbering="true" text:style-name="Bullet_20_-_20_checkmark">
          <text:list-item>
            <text:p text:style-name="P30">What made it more difficult?</text:p>
          </text:list-item>
        </text:list>
        <text:p text:style-name="P31">What made it more difficult?</text:p>
        <text:list text:continue-numbering="true" text:style-name="Bullet_20_-_20_checkmark">
          <text:list-item>
            <text:p text:style-name="P30">Today we will be learning that we are true disciples of Jesus if we follow him and his teachings.</text:p>
          </text:list-item>
        </text:list>
        <text:p text:style-name="P31">Today we will be learning that we are true disciples of Jesus if we follow him and his teachings.</text:p>
        <text:p text:style-name="P28">Introduce Truth</text:p>
        <text:p text:style-name="P38">Our truth for today is: <text:s/>A true disciple of Jesus follows him and his teachings.</text:p>
        <text:p text:style-name="P39">Our truth for today is: <text:s/>A true disciple of Jesus follows him and his teachings.</text:p>
        <text:p text:style-name="P38">This reminds me of a true story from the Bible.</text:p>
        <text:p text:style-name="P39">This reminds me of a true story from the Bible.</text:p>
        <text:p text:style-name="P28">Bible Story: <text:s/>Luke <text:s/>6:12-16</text:p>
        <text:p text:style-name="P40">[ <text:s/>As Jesus went around preaching, the people who followed him and lived by his teachings were called “disciples.” <text:s/>]</text:p>
        <text:p text:style-name="P41">[ <text:s/>As Jesus went around preaching, the people who followed him and lived by his teachings were called “disciples.” <text:s/>]</text:p>
        <text:p text:style-name="P42"><draw:frame draw:style-name="fr4" draw:name="Frame2" text:anchor-type="paragraph" svg:x="-0.0516in" svg:y="0.0083in" svg:width="1.378in" draw:z-index="39"><draw:text-box fo:min-height="1.2055in"><text:p text:style-name="P43">Picture <text:s/>14–1</text:p><text:p text:style-name="P44"><draw:frame draw:style-name="fr5" draw:name="Image1" text:anchor-type="as-char" svg:width="1.2917in" svg:height="0.9366in" draw:z-index="41"><draw:image xlink:href="Pictures/100000000000015F000000FE56F56AD0.jpg" xlink:type="simple" xlink:show="embed" xlink:actuate="onLoad" draw:mime-type="image/jpeg"/></draw:frame></text:p></draw:text-box></draw:frame>Luke 6:12 One day, Jesus left the group of people that were following him and he went up the mountainside to pray. He spent the whole night praying because he was about to make a very important decision.</text:p>
        <text:p text:style-name="English_20_Translation_20_-_20_Bible_20_story_20_inset">Luke 6:12 One day, Jesus left the group of people that were following him and he went up the mountainside to pray. He spent the whole night praying because he was about to make a very important decision.</text:p>
        <text:p text:style-name="P42"><draw:frame draw:style-name="fr4" draw:name="Frame11" text:anchor-type="paragraph" svg:x="-0.0516in" svg:y="0.0083in" svg:width="1.378in" draw:z-index="47"><draw:text-box fo:min-height="1.2055in"><text:p text:style-name="P43">Picture <text:s/>14–2</text:p><text:p text:style-name="P44"><draw:frame draw:style-name="fr5" draw:name="Image7" text:anchor-type="as-char" svg:width="1.2917in" svg:height="0.9366in" draw:z-index="42"><draw:image xlink:href="Pictures/100000000000015F000000FE6943D135.jpg" xlink:type="simple" xlink:show="embed" xlink:actuate="onLoad" draw:mime-type="image/jpeg"/></draw:frame></text:p></draw:text-box></draw:frame>Luke 6:13-16 When morning came, he called his disciples to him and chose twelve of them, whom he also designated apostles: Simon (whom he named Peter), his brother Andrew, James, John, Philip, Bartholomew, Matthew, Thomas, James son of Alphaeus, Simon who was called the Zealot, Judas son of James, and Judas Iscariot, who became a traitor. </text:p>
        <text:p text:style-name="P42">[ <text:s/>These twelve men were the closest to Jesus and went everywhere with him. Two of them men wrote about their time spent with Jesus. They are in the books of the Bible called “Matthew” and “John”. Later on, Peter wrote two letters to the new followers of <text:soft-page-break/>Jesus in two books of the Bible called First and Second Peter. All of these men abandoned Jesus at one time, or another because they were afraid. <text:s/>]</text:p>
        <text:p text:style-name="P45">Luke 6:13-16 When morning came, he called his disciples to him and chose twelve of them, whom he also designated apostles: Simon (whom he named Peter), his brother Andrew, James, John, Philip, Bartholomew, Matthew, Thomas, James son of Alphaeus, Simon who was called the Zealot, Judas son of James, and Judas Iscariot, who became a traitor.</text:p>
        <text:p text:style-name="P45">[ <text:s/>These twelve men were the closest to Jesus and went everywhere with him. Two of them men wrote about their time spent with Jesus. They are in the books of the Bible called “Matthew” and “John”. Later on, Peter wrote two letters to the new followers of Jesus in two books of the Bible called First and Second Peter. All of these men abandoned Jesus at one time, or another because they were afraid. <text:s/>]</text:p>
        <text:p text:style-name="P42"><draw:frame draw:style-name="fr6" draw:name="Frame3" text:anchor-type="paragraph" svg:x="-0.0516in" svg:y="0.0075in" svg:width="1.378in" draw:z-index="19"><draw:text-box fo:min-height="1.2055in"><text:p text:style-name="P43">Picture <text:s/>14–3</text:p><text:p text:style-name="P44"><draw:frame draw:style-name="fr5" draw:name="Image9" text:anchor-type="as-char" svg:width="1.2917in" svg:height="0.9366in" draw:z-index="37"><draw:image xlink:href="Pictures/100000000000015F000000FE40C83ED5.jpg" xlink:type="simple" xlink:show="embed" xlink:actuate="onLoad" draw:mime-type="image/jpeg"/></draw:frame></text:p></draw:text-box></draw:frame>[ <text:s/>In the end, most of these men returned to follow Jesus. Some even ended up being killed because they chose to follow Jesus. <text:s/>]</text:p>
        <text:p text:style-name="P45">[ <text:s/>In the end, most of these men returned to follow Jesus. Some even ended up being killed because they chose to follow Jesus. <text:s/>]</text:p>
        <text:p text:style-name="P45"/>
        <text:p text:style-name="P45"/>
        <text:p text:style-name="P45"/>
        <text:p text:style-name="P42"><draw:frame draw:style-name="fr4" draw:name="Frame4" text:anchor-type="paragraph" svg:x="-0.0516in" svg:y="0.0083in" svg:width="1.378in" draw:z-index="43"><draw:text-box fo:min-height="1.2055in"><text:p text:style-name="P43">Picture <text:s/>14–4</text:p><text:p text:style-name="P44"><draw:frame draw:style-name="fr5" draw:name="Image4" text:anchor-type="as-char" svg:width="1.2917in" svg:height="0.9366in" draw:z-index="46"><draw:image xlink:href="Pictures/100000000000015F000000FE2A9DE9E1.jpg" xlink:type="simple" xlink:show="embed" xlink:actuate="onLoad" draw:mime-type="image/jpeg"/></draw:frame></text:p></draw:text-box></draw:frame>[ <text:s/>We can learn how to be disciples, or followers of Jesus by obeying his teachings, imitating him, and learning about how his disciples learned to follow Jesus. <text:s/>]</text:p>
        <text:p text:style-name="P45">[ <text:s/>We can learn how to be disciples, or followers of Jesus by obeying his teachings, imitating him, and learning about how his disciples learned to follow Jesus. <text:s/>]</text:p>
        <text:p text:style-name="P45"/>
        <text:p text:style-name="P45"/>
        <text:p text:style-name="P45"/>
        <text:p text:style-name="P28">Application</text:p>
        <text:p text:style-name="P40">We can all be disciples for Jesus. One thing that we need to remember is that it will not be easy. To be a disciple for Christ we need to remember to resist Satan, and the temptation that he brings. We need to always remember to obey Jesus' teachings, and live the way that He lived. Jesus lived a life for others, he always showed love and compassion to everyone, even to those who were his enemies.</text:p>
        <text:p text:style-name="P39">We can all be disciples for Jesus. One thing that we need to remember is that it will not be easy. To be a disciple for Christ we need to remember to resist Satan, and the temptation that he brings. We need to always remember to obey Jesus' teachings, and live the way that He lived. Jesus lived a life for others, he always showed love and compassion to everyone, even to those who were his enemies.</text:p>
        <text:p text:style-name="P40">A true disciple of Jesus follows him and his teachings.</text:p>
        <text:p text:style-name="P41">A true disciple of Jesus follows him and his teachings.</text:p>
        <text:p text:style-name="P46">Homework</text:p>
        <text:p text:style-name="P40">What can you do this week to show that you are a disciple of Jesus?</text:p>
        <text:p text:style-name="P41">What can you do this week to show that you are a disciple of Jesus?</text:p>
        <text:p text:style-name="P26">Prayer / Song</text:p>
        <text:p text:style-name="P27">Review Game</text:p>
        <text:p text:style-name="P28">Spaghetti Game</text:p>
        <text:p text:style-name="P46">Materials</text:p>
        <text:list text:continue-numbering="true" text:style-name="Bullet_20_-_20_checkmark">
          <text:list-item>
            <text:p text:style-name="P29">Cooking pot with a lid</text:p>
          </text:list-item>
          <text:list-item>
            <text:p text:style-name="P33">Rope, string, or yarn cut into 10 pieces that are all different sizes</text:p>
          </text:list-item>
        </text:list>
        <text:p text:style-name="P46">How to Play</text:p>
        <text:list xml:id="list92018518328805" text:continue-numbering="true" text:style-name="Bullet_20_-_20_checkmark">
          <text:list-item>
            <text:p text:style-name="P29">Put the rope, string, or yarn in the pot with some of it hanging out. <text:s/>Put the lid on the pot over the ropes.</text:p>
          </text:list-item>
          <text:list-item>
            <text:p text:style-name="P33">Divide the children into two teams.</text:p>
          </text:list-item>
          <text:list-item>
            <text:p text:style-name="P33">When someone on the team answers the question correctly, they come to the front and choose one of the ropes. (They never know if they will get a long or short rope.)</text:p>
          </text:list-item>
          <text:list-item>
            <text:p text:style-name="P33">The ropes that each team gets are tied together into one long rope.</text:p>
          </text:list-item>
          <text:list-item>
            <text:p text:style-name="P33">At the end, measure the ropes from the two teams side by side.</text:p>
          </text:list-item>
          <text:list-item>
            <text:p text:style-name="P33">The teams with the longest rope wins.</text:p>
          </text:list-item>
        </text:list>
        <text:p text:style-name="P46">Questions for Review Game</text:p>
        <text:list text:style-name="L1">
          <text:list-item>
            <text:p text:style-name="P47">What are disciples? (People that follow Jesus and live by his teachings)</text:p>
          </text:list-item>
        </text:list>
        <text:p text:style-name="P31">What are disciples? (People that follow Jesus and live by his teachings)</text:p>
        <text:list text:continue-numbering="true" text:style-name="L1">
          <text:list-item>
            <text:p text:style-name="P47">What did Jesus do on the mountainside? (Prayed)</text:p>
          </text:list-item>
        </text:list>
        <text:p text:style-name="P31">What did Jesus do on the mountainside? (Prayed)</text:p>
        <text:list text:continue-numbering="true" text:style-name="L1">
          <text:list-item>
            <text:p text:style-name="P47"><text:soft-page-break/>How long did Jesus stay on the mountainside? (A whole night)</text:p>
          </text:list-item>
        </text:list>
        <text:p text:style-name="P31">How long did Jesus stay on the mountainside? (A whole night)</text:p>
        <text:list text:continue-numbering="true" text:style-name="L1">
          <text:list-item>
            <text:p text:style-name="P47">Why was Jesus praying? (He had an important decision to make)</text:p>
          </text:list-item>
        </text:list>
        <text:p text:style-name="P31">Why was Jesus praying? (He had an important decision to make)</text:p>
        <text:list text:continue-numbering="true" text:style-name="L1">
          <text:list-item>
            <text:p text:style-name="P47">What was the important decision he was making? (Choosing 12 men to be his chief disciples)</text:p>
          </text:list-item>
        </text:list>
        <text:p text:style-name="P31">What was the important decision he was making? (Choosing 12 men to be his chief disciples)</text:p>
        <text:list text:continue-numbering="true" text:style-name="L1">
          <text:list-item>
            <text:p text:style-name="P47">What did Jesus call those twelve men? (Jesus called the twelve men his apostles.)</text:p>
          </text:list-item>
        </text:list>
        <text:p text:style-name="P31">What did Jesus call those twelve men? (Jesus called the twelve men his apostles.)</text:p>
        <text:list text:continue-numbering="true" text:style-name="L1">
          <text:list-item>
            <text:p text:style-name="P47">What was the Apostles' job? (Carry the teachings of Jesus to others)</text:p>
          </text:list-item>
        </text:list>
        <text:p text:style-name="P31">What was the Apostles' job? (Carry the teachings of Jesus to others)</text:p>
        <text:list text:continue-numbering="true" text:style-name="L1">
          <text:list-item>
            <text:p text:style-name="P47">What is the new name that Jesus gave Simon? (Jesus gave Simon the name Peter.)</text:p>
          </text:list-item>
        </text:list>
        <text:p text:style-name="P31">What is the new name that Jesus gave Simon? (Jesus gave Simon the name Peter.)<text:tab/></text:p>
        <text:list text:continue-numbering="true" text:style-name="L1">
          <text:list-item>
            <text:p text:style-name="P47">How can we be disciples of Jesus? (By following his teachings, and by trying to imitate him in the way we live.)</text:p>
          </text:list-item>
        </text:list>
        <text:p text:style-name="P31">How can we be disciples of Jesus? (By following his teachings, and by trying to imitate him in the way we live.)</text:p>
        <text:list text:continue-numbering="true" text:style-name="L1">
          <text:list-item>
            <text:p text:style-name="P47">What happened to many of the apostles? (Many of the apostles were killed for being followers of Jesus.)</text:p>
          </text:list-item>
        </text:list>
        <text:p text:style-name="P31">What happened to many of the apostles? (Many of the apostles were killed for being followers of Jesus.)</text:p>
        <text:p text:style-name="P26">Song</text:p>
        <text:p text:style-name="P27">Memory Verse</text:p>
        <text:p text:style-name="P46">Materials and Preparations</text:p>
        <text:list xml:id="list92017662766636" text:continue-list="list92018518328805" text:style-name="Bullet_20_-_20_checkmark">
          <text:list-item>
            <text:p text:style-name="P29">Put a bookmark in <text:s/>Luke 6:13</text:p>
          </text:list-item>
          <text:list-item>
            <text:p text:style-name="P29">Write memory verse on the blackboard.</text:p>
          </text:list-item>
        </text:list>
        <text:p text:style-name="P48">Luke 6:13 When morning came, he called his disciples to him and chose twelve of them, whom he also designated apostles.</text:p>
        <text:p text:style-name="P31">Luke 6:13 When morning came, he called his disciples to him and chose twelve of them, whom he also designated apostles.</text:p>
        <text:p text:style-name="P28">Teach and Explain</text:p>
        <text:p text:style-name="P40">Our memory verse is in the Gospel of Luke. <text:s/>That is in the New Testament, a part of the Bible.</text:p>
        <text:p text:style-name="P41">Our memory verse is in the Gospel of Luke. <text:s/>That is in the New Testament, a part of the Bible.</text:p>
        <text:list xml:id="list811946557" text:style-name="WWNum1">
          <text:list-item text:start-value="1">
            <text:p text:style-name="P49">Read the verse from your Bible.</text:p>
          </text:list-item>
          <text:list-item>
            <text:p text:style-name="P49">Read the verse by yourself as you point to the words.</text:p>
          </text:list-item>
          <text:list-item>
            <text:p text:style-name="P49">Read the verse with the children as you point to the words.</text:p>
          </text:list-item>
          <text:list-item>
            <text:p text:style-name="P49">Explain the verse:</text:p>
          </text:list-item>
        </text:list>
        <text:p text:style-name="P48">Our memory verse comes from today’s Bible story.</text:p>
        <text:p text:style-name="P31">Our memory verse comes from today’s Bible story.</text:p>
        <text:list xml:id="list92017876261048" text:continue-list="list92017662766636" text:style-name="Bullet_20_-_20_checkmark">
          <text:list-item>
            <text:p text:style-name="P29">As you read the verse, circle the words shown below. <text:s/>Explain each of these words.</text:p>
          </text:list-item>
        </text:list>
        <text:list text:continue-list="list92018742558845" text:style-name="Bullet_20_-_20_Diamond">
          <text:list-item>
            <text:p text:style-name="P34"><text:span text:style-name="Body_20_Emphasized_20_-_20_Small">Morning:</text:span> <text:s/>Jesus had been praying all night because he had a very important decision to make. He had the decision in the morning.</text:p>
          </text:list-item>
        </text:list>
        <text:p text:style-name="P35">Morning: <text:s/>Jesus had been praying all night because he had a very important decision to make. He had the decision in the morning.</text:p>
        <text:list text:continue-numbering="true" text:style-name="Bullet_20_-_20_Diamond">
          <text:list-item>
            <text:p text:style-name="P34"><text:span text:style-name="Body_20_Emphasized_20_-_20_Small">Disciple:</text:span> <text:s/>Jesus had many disciples following him wherever he went. A disciple is someone who follows the teachings of Jesus.</text:p>
          </text:list-item>
        </text:list>
        <text:p text:style-name="P35">Disciple: <text:s/>Jesus had many disciples following him wherever he went. A disciple is someone who follows the teachings of Jesus.</text:p>
        <text:list text:continue-numbering="true" text:style-name="Bullet_20_-_20_Diamond">
          <text:list-item>
            <text:p text:style-name="P34"><text:span text:style-name="Body_20_Emphasized_20_-_20_Small">Twelve:</text:span> <text:s/>Jesus chose twelve men to be his chief disciples. Let's count to twelve together.</text:p>
          </text:list-item>
        </text:list>
        <text:p text:style-name="P35">Twelve: <text:s/>Jesus chose twelve men to be his chief disciples. Let's count to twelve together.</text:p>
        <text:list xml:id="list92018411905498" text:continue-numbering="true" text:style-name="Bullet_20_-_20_Diamond">
          <text:list-item>
            <text:p text:style-name="P34"><text:span text:style-name="Body_20_Emphasized_20_-_20_Small">Apostles:</text:span> <text:s/>Jesus called the special twelve men he chose apostles. They are special because they followed the teachings of Jesus and took His teachings to others.</text:p>
          </text:list-item>
        </text:list>
        <text:p text:style-name="P35">Apostles: <text:s/>Jesus called the special twelve men he chose apostles. They are special because they followed the teachings of Jesus and took His teachings to others.</text:p>
        <text:list xml:id="list92017578799905" text:continue-list="list811946557" text:style-name="WWNum1">
          <text:list-item>
            <text:p text:style-name="P49">Read the verse again by yourself as you point to the words.</text:p>
          </text:list-item>
          <text:list-item>
            <text:p text:style-name="P49">Read the verse again with the children as you point to the words.</text:p>
          </text:list-item>
        </text:list>
        <text:p text:style-name="P38">Remember our truth for the day? <text:s/>Let’s all say it together:</text:p>
        <text:p text:style-name="P39">Remember our truth for the day? <text:s/>Let’s all say it together:</text:p>
        <text:p text:style-name="P38"><text:soft-page-break/>A true disciple of Jesus follows him and his teachings.</text:p>
        <text:p text:style-name="P39">A true disciple of Jesus follows him and his teachings.</text:p>
        <text:p text:style-name="P27">Memory Verse Review</text:p>
        <text:p text:style-name="P28">Children Repeat the Verse by Using Movements</text:p>
        <text:list xml:id="list92018622629081" text:continue-list="list92017876261048" text:style-name="Bullet_20_-_20_checkmark">
          <text:list-item>
            <text:p text:style-name="P29">Talk about different movements with our bodies: Your hands on your head, standing on one foot, jumping up and down, touching your toes....</text:p>
          </text:list-item>
          <text:list-item>
            <text:p text:style-name="P33">Ask the children the first question.</text:p>
          </text:list-item>
          <text:list-item>
            <text:p text:style-name="P33">When a question is answered correctly, that child chooses one of the movements listed above or chooses their own movement.</text:p>
          </text:list-item>
          <text:list-item>
            <text:p text:style-name="P33">The verse is said out loud together while doing the movement.</text:p>
          </text:list-item>
          <text:list-item>
            <text:p text:style-name="P33">Then the next question is asked.</text:p>
          </text:list-item>
          <text:list-item>
            <text:p text:style-name="P33">When that question is answered correctly, another child chooses one of the movements.</text:p>
          </text:list-item>
          <text:list-item>
            <text:p text:style-name="P33">The verse is said aloud again while doing the movement.</text:p>
          </text:list-item>
          <text:list-item>
            <text:p text:style-name="P33">Do this until all the questions are asked.</text:p>
          </text:list-item>
        </text:list>
        <text:p text:style-name="P46">Questions for Memory Verse</text:p>
        <text:list text:style-name="L2">
          <text:list-item text:start-value="1">
            <text:p text:style-name="P50">Where is today's memory verse found? <text:s/>( <text:s/>Luke 6:13 <text:s/>)</text:p>
          </text:list-item>
        </text:list>
        <text:p text:style-name="P31">Where is today's memory verse found? <text:s/>( <text:s/>Luke 6:13 <text:s/>)</text:p>
        <text:list text:continue-numbering="true" text:style-name="L2">
          <text:list-item>
            <text:p text:style-name="P50">What had Jesus been doing all night before he made his big decision? (Praying)</text:p>
          </text:list-item>
        </text:list>
        <text:p text:style-name="P31">What had Jesus been doing all night before he made his big decision? (Praying)</text:p>
        <text:list text:continue-numbering="true" text:style-name="L2">
          <text:list-item>
            <text:p text:style-name="P50">What is a disciple? (Someone who follows the teachings of Jesus)</text:p>
          </text:list-item>
        </text:list>
        <text:p text:style-name="P31">What is a disciple? (Someone who follows the teachings of Jesus)</text:p>
        <text:list text:continue-numbering="true" text:style-name="L2">
          <text:list-item>
            <text:p text:style-name="P50">How many men did Jesus choose? (12)</text:p>
          </text:list-item>
        </text:list>
        <text:p text:style-name="P31">How many men did Jesus choose? (12)</text:p>
        <text:list text:continue-numbering="true" text:style-name="L2">
          <text:list-item>
            <text:p text:style-name="P50">Who can count to twelve? (Have them count to twelve.)</text:p>
          </text:list-item>
        </text:list>
        <text:p text:style-name="P31"><text:s/>Who can count to twelve? (Have them count to twelve.)</text:p>
        <text:list text:continue-numbering="true" text:style-name="L2">
          <text:list-item>
            <text:p text:style-name="P50">What is an apostle? (A special disciple that Jesus chose to take his teachings to others)</text:p>
          </text:list-item>
        </text:list>
        <text:p text:style-name="P31">What is an apostle? (A special disciple that Jesus chose to take his teachings to others)</text:p>
        <text:p text:style-name="P26">Song</text:p>
        <text:p text:style-name="P27">Closing and Homework</text:p>
        <text:list text:continue-list="list92018622629081" text:style-name="Bullet_20_-_20_checkmark">
          <text:list-item>
            <text:p text:style-name="P29">Say the truth together:</text:p>
          </text:list-item>
        </text:list>
        <text:p text:style-name="P48">A true disciple of Jesus follows him and his teachings.<text:tab/></text:p>
        <text:p text:style-name="P31">A true disciple of Jesus follows him and his teachings.</text:p>
        <text:list text:continue-numbering="true" text:style-name="Bullet_20_-_20_checkmark">
          <text:list-item>
            <text:p text:style-name="P29">Say the memory verse together:</text:p>
          </text:list-item>
        </text:list>
        <text:p text:style-name="P48">Luke 6:13 When morning came, he called his disciples to him and chose twelve of them, whom he also designated apostles.</text:p>
        <text:p text:style-name="P31">Luke 6:13 When morning came, he called his disciples to him and chose twelve of them, whom he also designated apostles.</text:p>
        <text:list text:continue-numbering="true" text:style-name="Bullet_20_-_20_checkmark">
          <text:list-item>
            <text:p text:style-name="P29">Review the homework:</text:p>
          </text:list-item>
        </text:list>
        <text:p text:style-name="P48">What can you do this week to show that you are a disciple of Jesus?</text:p>
        <text:p text:style-name="P31">What can you do this week to show that you are a disciple of Jesus?</text:p>
        <text:list xml:id="list92017923693039" text:continue-numbering="true" text:style-name="Bullet_20_-_20_checkmark">
          <text:list-item>
            <text:p text:style-name="P29">Give any needed announcements.</text:p>
          </text:list-item>
        </text:list>
        <text:p text:style-name="P28">Closing Prayer</text:p>
        <text:p text:style-name="P51"><text:span text:style-name="Body_20_Emphasized_20_-_20_Small">Thank God</text:span> <text:s/>that we are called to be disciples of Jesus.</text:p>
        <text:p text:style-name="P51"><text:span text:style-name="Body_20_Emphasized_20_-_20_Small">Ask God</text:span> <text:s/>that the children will remember to think of a way to show that they are a disciple of Jesus.</text:p>
        <text:p text:style-name="P52">Colouring page to colour and take home!</text:p>
        <text:p text:style-name="P53"/>
      </text:section>
      <text:p text:style-name="Body"/>
      <text:p text:style-name="P54">A true disciple of Jesus follows him and his teachings.</text:p>
      <text:p text:style-name="Bible_20_Story_20_-_20_Graphic_20_Number"><draw:frame draw:style-name="fr7" draw:name="Image5" text:anchor-type="as-char" svg:width="5.2563in" svg:height="4.4866in" draw:z-index="48"><draw:image xlink:href="Pictures/100000000000033B000002C2F19AA661.jpg" xlink:type="simple" xlink:show="embed" xlink:actuate="onLoad" draw:mime-type="image/jpeg"/></draw:frame></text:p>
      <text:p text:style-name="Bible_20_Story_20_-_20_Graphic_20_Number"/>
      <text:p text:style-name="M.T._20_Coloring_20_Page_20_-_20_Memory_20_Verse">Luke 6:13 When morning came, he called his disciples to him and chose twelve of them, whom he also designated apostles.</text:p>
      <text:p text:style-name="Standard"/>
      <text:p text:style-name="P55">A true disciple of Jesus follows him and his teachings.</text:p>
      <text:p text:style-name="Bible_20_Story_20_-_20_Graphic_20_Number"><draw:frame draw:style-name="fr7" draw:name="Image6" text:anchor-type="as-char" svg:width="5.2563in" svg:height="4.4866in" draw:z-index="49"><draw:image xlink:href="Pictures/100000000000033B000002C2F19AA661.jpg" xlink:type="simple" xlink:show="embed" xlink:actuate="onLoad" draw:mime-type="image/jpeg"/></draw:frame></text:p>
      <text:p text:style-name="Bible_20_Story_20_-_20_Graphic_20_Number"/>
      <text:p text:style-name="Bible_20_Story_20_-_20_Graphic_20_Number">Luke 6:13 When morning came, he called his disciples to him and chose twelve of them, whom he also designated apostles.</text:p>
      <text:h text:style-name="P25" text:outline-level="1"><draw:frame draw:style-name="fr3" draw:name="Image10" text:anchor-type="char" svg:x="0in" svg:y="0.0161in" svg:width="1.0752in" svg:height="1.0752in" draw:z-index="55"><draw:image xlink:href="Pictures/10000001000000D8000000D879E70A48.png" xlink:type="simple" xlink:show="embed" xlink:actuate="onLoad" draw:mime-type="image/png"/></draw:frame>True Disciples of Jesus Love Their Enemies</text:h>
      <text:p text:style-name="M.T._20_Lesson_20_Title">True Disciples of Jesus Love Their Enemies</text:p>
      <text:p text:style-name="English_20_Translation_20_-_20_Lesson_20_title">True Disciples of Jesus Love Their Enemies</text:p>
      <text:p text:style-name="M.T._20_Text_20_-_20_Lesson_20_Title_20_Scrip_20_Reference">Luke <text:s/>6:27-38</text:p>
      <text:p text:style-name="Part_20_Heading">Lesson Overview</text:p>
      <table:table table:name="Title&amp;Truth_1" table:style-name="Title_26_Truth_5f_1" table:template-name="Lesson Overview">
        <table:table-column table:style-name="Title_26_Truth_5f_1.A"/>
        <table:table-column table:style-name="Title_26_Truth_5f_1.B"/>
        <table:table-row table:style-name="Title_26_Truth_5f_1.1">
          <table:table-cell table:style-name="Title_26_Truth_5f_1.A1" office:value-type="string">
            <text:p text:style-name="Table_20_Left_20_headings">Today’s Truth</text:p>
          </table:table-cell>
          <table:table-cell table:style-name="Title_26_Truth_5f_1.B1" office:value-type="string">
            <text:p text:style-name="M.T._20_Text">True disciples of Jesus love their enemies.</text:p>
            <text:p text:style-name="English_20_translation">True disciples of Jesus love their enemies.</text:p>
          </table:table-cell>
        </table:table-row>
        <table:table-row table:style-name="Title_26_Truth_5f_1.1">
          <table:table-cell table:style-name="Title_26_Truth_5f_1.A1" office:value-type="string">
            <text:p text:style-name="Table_20_Left_20_headings">Objective</text:p>
          </table:table-cell>
          <table:table-cell table:style-name="Title_26_Truth_5f_1.B1" office:value-type="string">
            <text:p text:style-name="Body_20_Tight_20_lines"><text:span text:style-name="Body_20_Emphasized_20_-_20_Small">KNOW: <text:s/></text:span>We are to love all, even if they are our enemies.</text:p>
            <text:p text:style-name="Body_20_Tight_20_lines"><text:span text:style-name="Body_20_Emphasized_20_-_20_Small">DO:</text:span> <text:s/>The children will show you how they can too love one of their enemies.</text:p>
          </table:table-cell>
        </table:table-row>
        <table:table-row table:style-name="Title_26_Truth_5f_1.1">
          <table:table-cell table:style-name="Title_26_Truth_5f_1.A1" office:value-type="string">
            <text:p text:style-name="Table_20_Left_20_headings">Materials</text:p>
          </table:table-cell>
          <table:table-cell table:style-name="Title_26_Truth_5f_1.B1" office:value-type="string">
            <text:list xml:id="list92018752394429" text:continue-list="list92017917107435"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style-name="Title_26_Truth_5f_1.1">
          <table:table-cell table:style-name="Title_26_Truth_5f_1.A1" office:value-type="string">
            <text:p text:style-name="Table_20_Left_20_headings">Memory Verse</text:p>
          </table:table-cell>
          <table:table-cell table:style-name="Title_26_Truth_5f_1.B1" office:value-type="string">
            <text:p text:style-name="M.T._20_Text">Luke 6:27-28 But I tell you who hear me: Love your enemies, do good to those who hate you, bless those who curse you, pray for those who mistreat you.</text:p>
            <text:p text:style-name="English_20_translation">Luke 6:27-28 But I tell you who hear me: Love your enemies, do good to those who hate you, bless those who curse you, pray for those who mistreat you.</text:p>
          </table:table-cell>
        </table:table-row>
        <table:table-row table:style-name="Title_26_Truth_5f_1.1">
          <table:table-cell table:style-name="Title_26_Truth_5f_1.A1" office:value-type="string">
            <text:p text:style-name="Table_20_Left_20_headings">Homework</text:p>
          </table:table-cell>
          <table:table-cell table:style-name="Title_26_Truth_5f_1.B1" office:value-type="string">
            <text:p text:style-name="M.T._20_Text">This week show love to someone who you do not get along with.</text:p>
            <text:p text:style-name="English_20_translation">This week show love to someone who you do not get along with.</text:p>
          </table:table-cell>
        </table:table-row>
      </table:table>
      <text:p text:style-name="Body_20_-_20_Small_20_Spacer"/>
      <text:p text:style-name="Part_20_Heading">Detailed Lesson Plan</text:p>
      <text:section text:style-name="Sect1" text:name="L-15 Detail Plan">
        <text:p text:style-name="P56">Song</text:p>
        <text:p text:style-name="P57">Opening</text:p>
        <text:p text:style-name="P58">Welcome</text:p>
        <text:list text:continue-list="list92017923693039" text:style-name="Bullet_20_-_20_checkmark">
          <text:list-item>
            <text:p text:style-name="P59">Be sure the children know you are happy to see them!</text:p>
          </text:list-item>
          <text:list-item>
            <text:p text:style-name="P60">Introduce yourself and your helpers.</text:p>
          </text:list-item>
        </text:list>
        <text:p text:style-name="P58">Sharing Time</text:p>
        <text:list text:continue-numbering="true" text:style-name="Bullet_20_-_20_checkmark">
          <text:list-item>
            <text:p text:style-name="P59">Say the truth from the previous lesson together:</text:p>
          </text:list-item>
        </text:list>
        <text:p text:style-name="P61">A true disciple of Jesus follows him and his teachings.</text:p>
        <text:p text:style-name="P62">A true disciple of Jesus follows him and his teachings.</text:p>
        <text:list text:continue-numbering="true" text:style-name="Bullet_20_-_20_checkmark">
          <text:list-item>
            <text:p text:style-name="P59">Say the memory verse from the previous lesson together:</text:p>
          </text:list-item>
        </text:list>
        <text:p text:style-name="P61">Luke 6:13 When morning came, he called his disciples to him and chose twelve of them, whom he also designated apostles.</text:p>
        <text:p text:style-name="P62">Luke 6:13 When morning came, he called his disciples to him and chose twelve of them, whom he also designated apostles.</text:p>
        <text:list text:continue-numbering="true" text:style-name="Bullet_20_-_20_checkmark">
          <text:list-item>
            <text:p text:style-name="P59">Review the homework from the previous lesson:</text:p>
          </text:list-item>
        </text:list>
        <text:p text:style-name="P61">Last week you were to show that you are a disciple of Jesus. What did you do to show that you are a disciple of Jesus?</text:p>
        <text:p text:style-name="P62">Last week you were to show that you are a disciple of Jesus. What did you do to show that you are a disciple of Jesus?</text:p>
        <text:p text:style-name="P63">(Give children time to share.)</text:p>
        <text:p text:style-name="P58">Prayer</text:p>
        <text:list text:continue-numbering="true" text:style-name="Bullet_20_-_20_checkmark">
          <text:list-item>
            <text:p text:style-name="P59">Let the children share praises and prayer requests.</text:p>
          </text:list-item>
          <text:list-item>
            <text:p text:style-name="P60">Keep a record of what the children are sharing so you can remember to thank God together for answered prayers.</text:p>
          </text:list-item>
          <text:list-item>
            <text:p text:style-name="P60"><text:soft-page-break/>Spend time praying together. <text:s/>Let children pray out loud if they volunteer. <text:s/>Do not force anyone to pray out loud.</text:p>
          </text:list-item>
        </text:list>
        <text:p text:style-name="P56">Song</text:p>
        <text:p text:style-name="P57">Words to Discuss</text:p>
        <text:list xml:id="list92018457160628" text:continue-numbering="true" text:style-name="Bullet_20_-_20_checkmark">
          <text:list-item>
            <text:p text:style-name="P59">On the blackboard, write the “Words to Discuss” from the list below.</text:p>
          </text:list-item>
        </text:list>
        <text:p text:style-name="M.T._20_Text_20_-_20_Single_20_Inset">Let's discuss some words to help us better understand the Bible story for today.</text:p>
        <text:p text:style-name="P62">Let's discuss some words to help us better understand the Bible story for today.</text:p>
        <text:list text:continue-list="list92018411905498" text:style-name="Bullet_20_-_20_Diamond">
          <text:list-item>
            <text:p text:style-name="P64"><text:span text:style-name="Body_20_Emphasized_20_-_20_Small">Disciple: <text:s/></text:span>Someone who follows Jesus and lives by His teachings.</text:p>
          </text:list-item>
        </text:list>
        <text:p text:style-name="P65">Disciple: <text:s/>Someone who follows Jesus and lives by His teachings.</text:p>
        <text:list text:continue-numbering="true" text:style-name="Bullet_20_-_20_Diamond">
          <text:list-item>
            <text:p text:style-name="P64"><text:span text:style-name="Body_20_Emphasized_20_-_20_Small">Love: <text:s/></text:span>Not just affection, but something that is shown through action.</text:p>
          </text:list-item>
        </text:list>
        <text:p text:style-name="P65">Love: <text:s/>Not just affection, but something that is shown through action.</text:p>
        <text:list xml:id="list92019203794765" text:continue-numbering="true" text:style-name="Bullet_20_-_20_Diamond">
          <text:list-item>
            <text:p text:style-name="P64"><text:span text:style-name="Body_20_Emphasized_20_-_20_Small">Enemy: <text:s/></text:span>Someone who is opposed to you and/or hostile toward you.</text:p>
          </text:list-item>
        </text:list>
        <text:p text:style-name="P65">Enemy: <text:s/>Someone who is opposed to you and/or hostile toward you.</text:p>
        <text:p text:style-name="P56">Song</text:p>
        <text:p text:style-name="P57">Bible Story / Lesson</text:p>
        <text:list text:continue-list="list92018457160628" text:style-name="Bullet_20_-_20_checkmark">
          <text:list-item>
            <text:p text:style-name="P66">Has there ever been someone who treated you badly?</text:p>
          </text:list-item>
        </text:list>
        <text:p text:style-name="P62">Has there ever been someone who treated you badly?</text:p>
        <text:list text:continue-numbering="true" text:style-name="Bullet_20_-_20_checkmark">
          <text:list-item>
            <text:p text:style-name="P66">How did you treat them?</text:p>
          </text:list-item>
        </text:list>
        <text:p text:style-name="P62">How did you treat them?</text:p>
        <text:list text:continue-numbering="true" text:style-name="Bullet_20_-_20_checkmark">
          <text:list-item>
            <text:p text:style-name="P66">God tells us that we are to love everyone. Even those who are mean to us.</text:p>
          </text:list-item>
        </text:list>
        <text:p text:style-name="P62">God tells us that we are to love everyone. Even those who are mean to us.</text:p>
        <text:list text:continue-numbering="true" text:style-name="Bullet_20_-_20_checkmark">
          <text:list-item>
            <text:p text:style-name="P66">Today we will be learning that a true disciple of Jesus loves their enemies.</text:p>
          </text:list-item>
        </text:list>
        <text:p text:style-name="P62">Today we will be learning that a true disciple of Jesus loves their enemies.</text:p>
        <text:p text:style-name="P58">Introduce Truth</text:p>
        <text:p text:style-name="P67">Our truth for today is: <text:s/>True disciples of Jesus love their enemies.</text:p>
        <text:p text:style-name="P68">Our truth for today is: <text:s/>True disciples of Jesus love their enemies.</text:p>
        <text:p text:style-name="P67">This reminds me of a story from the village.</text:p>
        <text:p text:style-name="P68">This reminds me of a story from the village.</text:p>
        <text:p text:style-name="P67">Jesus taught about the difference between people who were his true followers, and those who were not. Jesus taught the people that his true followers love everyone, including their enemies. Here is a story from the village that can help us better understand Jesus' teachings that say we should love our enemies. This is not a story from the Bible; it is a story from the village.</text:p>
        <text:p text:style-name="P68">Jesus taught about the difference between people who were his true followers, and those who were not. Jesus taught the people that his true followers love everyone, including their enemies. Here is a story from the village that can help us better understand Jesus' teachings that say we should love our enemies. This is not a story from the Bible; it is a story from the village.</text:p>
        <text:p text:style-name="P58">Bible Story: <text:s/>A story from a village</text:p>
        <text:p text:style-name="P67">There were two families who lived not too far from each other in the same village. They were the Ngwa family, and the Mbeng family. Both of the families went to the same church, their children went to the same schools, and they saw each other almost every day. Everyone in the Ngwa family was happy. You could often hear them singing in their compound, or when they were going to their farm. For some unknown reason, the Mbeng family hated the Ngwa family. </text:p>
        <text:p text:style-name="P68">There were two families who lived not too far from each other in the same village. They were the Ngwa family, and the Mbeng family. Both of the families went to the same church, their children went to the same schools, and they saw each other almost every day. Everyone in the Ngwa family was happy. You could often hear them singing in their compound, or when they were going to their farm. For some unknown reason, the Mbeng family hated the Ngwa family.</text:p>
        <text:p text:style-name="P69"><draw:frame draw:style-name="fr4" draw:name="Frame21" text:anchor-type="paragraph" svg:x="-0.0181in" svg:y="0.0035in" svg:width="1.378in" draw:z-index="54"><draw:text-box fo:min-height="1.2055in"><text:p text:style-name="P70">Picture <text:s/>15–1</text:p><text:p text:style-name="P71"><draw:frame text:anchor-type="as-char" draw:z-index="16" draw:name="Shape1_0" draw:style-name="gr2" draw:text-style-name="P72" svg:width="1.2921in" svg:height="0.9961in"><draw:image xlink:href="Pictures/10000000000000EC000000A35B6026C9.jpg" xlink:type="simple" xlink:show="embed" xlink:actuate="onLoad" draw:mime-type="image/jpeg"><text:p/></draw:image></draw:frame></text:p></draw:text-box></draw:frame>At the time of the year when everyone was preparing their farms, both the Mbeng and the Ngwa families had gone out to open new farms. The Mbeng family saw the Ngwa family working a plot along side their own. The Mbeng family did not want to share a boundary of their farm with the Ngwa family, so they became angry and drove the Ngwa family away with stones and chased them with their cutlasses.</text:p>
        <text:p text:style-name="P73">At the time of the year when everyone was preparing their farms, both the Mbeng and the Ngwa families had gone out to open new farms. The Mbeng family saw the Ngwa family working a plot along side their own. <text:soft-page-break/>The Mbeng family did not want to share a boundary of their farm with the Ngwa family, so they became angry and drove the Ngwa family away with stones and chased them with their cutlasses.</text:p>
        <text:p text:style-name="P69"><draw:frame draw:style-name="fr4" draw:name="Frame12" text:anchor-type="paragraph" svg:x="-0.0181in" svg:y="0.0035in" svg:width="1.378in" draw:z-index="53"><draw:text-box fo:min-height="1.2055in"><text:p text:style-name="P74">Picture <text:s/>15–2</text:p><text:p text:style-name="P71"><draw:frame text:anchor-type="as-char" draw:z-index="44" draw:name="Shape2_0" draw:style-name="gr2" draw:text-style-name="P72" svg:width="1.2921in" svg:height="0.8941in"><draw:image xlink:href="Pictures/10000000000000EC000000A317665A05.jpg" xlink:type="simple" xlink:show="embed" xlink:actuate="onLoad" draw:mime-type="image/jpeg"><text:p/></draw:image></draw:frame></text:p></draw:text-box></draw:frame>Later on, the Ngwa family returned to their plot. They were able to prepare their farm in time for planting. They prepared the ground and the ridges so that they could plant their crops before the rains would come.</text:p>
        <text:p text:style-name="P73">Later on, the Ngwa family returned to their plot. They were able to prepare their farm in time for planting. They prepared the ground and the ridges so that they could plant their crops before the rains would come.</text:p>
        <text:p text:style-name="P69"><draw:frame draw:style-name="fr4" draw:name="Frame31" text:anchor-type="paragraph" svg:x="-0.0181in" svg:y="0.0035in" svg:width="1.378in" draw:z-index="52"><draw:text-box fo:min-height="1.2055in"><text:p text:style-name="P74">Picture <text:s/>15–3</text:p><text:p text:style-name="P71"><draw:frame text:anchor-type="as-char" draw:z-index="36" draw:name="Shape3_0" draw:style-name="gr2" draw:text-style-name="P72" svg:width="1.2921in" svg:height="0.8941in"><draw:image xlink:href="Pictures/10000000000000EC000000A31193159C.jpg" xlink:type="simple" xlink:show="embed" xlink:actuate="onLoad" draw:mime-type="image/jpeg"><text:p/></draw:image></draw:frame></text:p></draw:text-box></draw:frame>A few days after this, the Mbeng family returned to work their own farm. They saw that the Ngwa family had prepared their own farm. This made them angry again. They entered the Ngwa farm and scattered all of the ridges making it so the farm would not be ready for planting.</text:p>
        <text:p text:style-name="P73">A few days after this, the Mbeng family returned to work their own farm. They saw that the Ngwa family had prepared their own farm. This made them angry again. They entered the Ngwa farm and scattered all of the ridges making it so the farm would not be ready for planting.</text:p>
        <text:p text:style-name="P69"><draw:frame draw:style-name="fr4" draw:name="Frame41" text:anchor-type="paragraph" svg:x="-0.0181in" svg:y="0.0035in" svg:width="1.378in" draw:z-index="51"><draw:text-box fo:min-height="1.2055in"><text:p text:style-name="P74">Picture <text:s/>15–4</text:p><text:p text:style-name="P71"><draw:frame text:anchor-type="as-char" draw:z-index="35" draw:name="Shape4_0" draw:style-name="gr2" draw:text-style-name="P72" svg:width="1.2921in" svg:height="0.8941in"><draw:image xlink:href="Pictures/10000000000000EC000000A37CD7E716.jpg" xlink:type="simple" xlink:show="embed" xlink:actuate="onLoad" draw:mime-type="image/jpeg"><text:p/></draw:image></draw:frame></text:p></draw:text-box></draw:frame>The Ngwa family did not return to their farm until it was time to plant. When they came to their farm to plant, they discovered that it had been scattered and that they could not plant. They had much work to do before they would be able to plant their crops.</text:p>
        <text:p text:style-name="P69">The children complained bitterly saying, “We know who did this; we should scatter the Mbeng family farm!” Their father said to them, “No, we will not do that! Jesus said that his true followers do not do harm to their enemies.” So, they returned to their farm, worked hard to prepare everything again, and planted their crops.</text:p>
        <text:p text:style-name="P73">The Ngwa family did not return to their farm until it was time to plant. When they came to their farm to plant, they discovered that it had been scattered and that they could not plant. They had much work to do before they would be able to plant their crops.</text:p>
        <text:p text:style-name="P73">The children complained bitterly saying, “We know who did this; we should scatter the Mbeng family farm!” Their father said to them, “No, we will not do that! Jesus said that his true followers do not do harm to their enemies.” So, they returned to their farm, worked hard to prepare everything again, and planted their crops.</text:p>
        <text:p text:style-name="P69"><draw:frame draw:style-name="fr4" draw:name="Frame6" text:anchor-type="paragraph" svg:x="-0.0181in" svg:y="0.0035in" svg:width="1.378in" draw:z-index="50"><draw:text-box fo:min-height="1.2055in"><text:p text:style-name="P70">Picture <text:s/>15–5</text:p><text:p text:style-name="Bible_20_Story_20_-_20_Graphic_20_Number"><draw:frame text:anchor-type="as-char" draw:z-index="40" draw:name="Shape5" draw:style-name="gr2" draw:text-style-name="P72" svg:width="1.2921in" svg:height="0.9335in"><draw:image xlink:href="Pictures/10000000000000EC000000A3FCA470E3.jpg" xlink:type="simple" xlink:show="embed" xlink:actuate="onLoad" draw:mime-type="image/jpeg"><text:p/></draw:image></draw:frame></text:p></draw:text-box></draw:frame>Later on, during the weeding season, the Ngwa family were working in their farm. While they were weeding, they heard a scream come from inside the Mbeng family farm.</text:p>
        <text:p text:style-name="P69">Pa Ngwa rushed there and found one of the Mbeng boys on the ground crying and holding his leg. A snake had attacked him! None of his family were with him; he had come alone to finish the weeding.</text:p>
        <text:p text:style-name="P69">The oldest Ngwa boy, Bertrand, said, “Leave him. He's our enemy! This is God's judgment on the Mbeng's for all the evil they have done to us.”</text:p>
        <text:p text:style-name="P69">Pa Ngwa bent over to carry the boy and quietly said, “No, Jesus said that his true followers love even their enemies. We will take him to the hospital and care for him.”</text:p>
        <text:p text:style-name="P69">Pa Ngwa showed that he was a true follower of Jesus by loving everyone, even an enemy of his family.</text:p>
        <text:p text:style-name="P73">Later on, during the weeding season, the Ngwa family were working in their farm. While they were weeding, they heard a scream come from inside the Mbeng family farm.</text:p>
        <text:p text:style-name="P73">Pa Ngwa rushed there and found one of the Mbeng boys on the ground crying and holding his leg. A snake had attacked him! None of his family were with him; he had come alone to finish the weeding.</text:p>
        <text:p text:style-name="P73">The oldest Ngwa boy, Bertrand, said, “Leave him. He's our enemy! This is God's judgment on the Mbeng's for all the evil they have done to us.”</text:p>
        <text:p text:style-name="P73">Pa Ngwa bent over to carry the boy and quietly said, “No, Jesus said that his true followers love even their enemies. We will take him to the hospital and care for him.”</text:p>
        <text:p text:style-name="P73">Pa Ngwa showed that he was a true follower of Jesus by loving everyone, even an enemy of his family.</text:p>
        <text:p text:style-name="P58">Application</text:p>
        <text:p text:style-name="P67">Jesus said we are to love our enemies. In the story, the Ngwa family loved their enemies. Even though the Mbeng family over and over again caused problems and showed nothing but hate, the Ngwa family never returned the hatred. Next time you are around someone you do not like, or someone who is mean to you, pray and ask God to help you show love to them. Many times someone may hate you or be mean to you because they have a problem. Pray and ask God to show you how you can show love to that person.</text:p>
        <text:p text:style-name="P75">Jesus said we are to love our enemies. In the story, the Ngwa family loved their enemies. Even though the Mbeng family over and over again caused problems and showed nothing but hate, the Ngwa family never returned the hatred. Next time you are around someone you do not like, or someone who is mean to you, pray and ask God to help you show love to them. Many times someone may hate you or be mean to you because they have a problem. Pray and ask God to show you how you can show love to that person.</text:p>
        <text:p text:style-name="P76">True disciples of Jesus love their enemies.</text:p>
        <text:p text:style-name="P75">True disciples of Jesus love their enemies.</text:p>
        <text:p text:style-name="P77">Homework</text:p>
        <text:p text:style-name="P76">This week show love to someone who you do not get along with.</text:p>
        <text:p text:style-name="P75"><text:soft-page-break/>This week show love to someone who you do not get along with.</text:p>
        <text:p text:style-name="P56">Prayer / Song</text:p>
        <text:p text:style-name="P57">Review Game</text:p>
        <text:p text:style-name="P58">Throw Bottle Caps into Containers</text:p>
        <text:p text:style-name="P77">Materials</text:p>
        <text:list text:continue-numbering="true" text:style-name="Bullet_20_-_20_checkmark">
          <text:list-item>
            <text:p text:style-name="P59">Draw a line for the children to stand behind.</text:p>
          </text:list-item>
          <text:list-item>
            <text:p text:style-name="P60">Arrange 5-10 different sized containers or cups (you can also use shoes or hats/caps) into a group a distance from the line.</text:p>
          </text:list-item>
          <text:list-item>
            <text:p text:style-name="P60">Put one small paper with points written on it inside each container.</text:p>
          </text:list-item>
          <text:list-item>
            <text:p text:style-name="P60">Collect 2 bottle caps, stones, or other small things to throw and set them on the line that you drew for the children to stand behind.</text:p>
          </text:list-item>
        </text:list>
        <text:p text:style-name="P77">How to Play</text:p>
        <text:list xml:id="list92017728349116" text:continue-numbering="true" text:style-name="Bullet_20_-_20_checkmark">
          <text:list-item>
            <text:p text:style-name="P59">Divide the class into 2 teams.</text:p>
          </text:list-item>
          <text:list-item>
            <text:p text:style-name="P60">The first team tries to answer the first question. <text:s/>The teacher can use this time to explain what the children do not seem to understand.</text:p>
          </text:list-item>
          <text:list-item>
            <text:p text:style-name="P60">The child on the team that answers the question correctly comes to the front and stands behind the line. <text:s/>If the child only gets part of the question right, the teacher can fill in the rest.</text:p>
          </text:list-item>
          <text:list-item>
            <text:p text:style-name="P60">The child then tries to throw the bottle cap into the group of containers. <text:s/>Wherever the bottle cap enters, the points on the paper inside that container are what the team has.</text:p>
          </text:list-item>
          <text:list-item>
            <text:p text:style-name="P60">Record the points. <text:s/><text:span text:style-name="T1">The team with the most points wins.</text:span></text:p>
          </text:list-item>
          <text:list-item>
            <text:p text:style-name="P60">Be sure to clap for both sides. <text:s/>No name-calling. <text:s/>Encourage good sportsmanship.</text:p>
          </text:list-item>
        </text:list>
        <text:p text:style-name="P77">Questions for Review Game</text:p>
        <text:list text:style-name="L3">
          <text:list-item>
            <text:p text:style-name="P78">What are disciples? (People who follow Jesus and live by his teachings)</text:p>
          </text:list-item>
        </text:list>
        <text:p text:style-name="P62">What are disciples? (People who follow Jesus and live by his teachings)</text:p>
        <text:list text:continue-numbering="true" text:style-name="L3">
          <text:list-item>
            <text:p text:style-name="P78">Who did Jesus say a true disciple of his loves? (Everyone, even their enemies)</text:p>
          </text:list-item>
        </text:list>
        <text:p text:style-name="P62">Who did Jesus say a true disciple of his loves? (Everyone, even their enemies)</text:p>
        <text:list text:continue-numbering="true" text:style-name="L3">
          <text:list-item>
            <text:p text:style-name="P78">From where did the story today come? (The story today came from a village somewhere. It is not from the Bible. The story is an example to help us understand the truth from the Bible, <text:s/>True disciples of Jesus love their enemies. <text:s/>)</text:p>
          </text:list-item>
        </text:list>
        <text:p text:style-name="P62">From where did the story today come? (The story today came from a village somewhere. It is not from the Bible. The story is an example to help us understand the truth from the Bible, <text:s/>True disciples of Jesus love their enemies. <text:s/>)</text:p>
        <text:list text:continue-numbering="true" text:style-name="L3">
          <text:list-item>
            <text:p text:style-name="P78">What was the first thing the Mbeng family did to the Ngwa family? (Drove them away from the farm with stones, and chased them with cutlasses.)</text:p>
          </text:list-item>
        </text:list>
        <text:p text:style-name="P62">What was the first thing the Mbeng family did to the Ngwa family? (Drove them away from the farm with stones, and chased them with cutlasses.)</text:p>
        <text:list text:continue-numbering="true" text:style-name="L3">
          <text:list-item>
            <text:p text:style-name="P78">What else did the Mbeng family do to the Ngwa family? (Scattered the Ngwa's family farm.)</text:p>
          </text:list-item>
        </text:list>
        <text:p text:style-name="P62">What else did the Mbeng family do to the Ngwa family? (Scattered the Ngwa's family farm.)</text:p>
        <text:list text:continue-numbering="true" text:style-name="L3">
          <text:list-item>
            <text:p text:style-name="P78">What did the Ngwa children want to do to the Mbeng family? (Scatter the Mbeng's farm, just like the Mbeng family had scattered their farm.)</text:p>
          </text:list-item>
        </text:list>
        <text:p text:style-name="P62">What did the Ngwa children want to do to the Mbeng family? (Scatter the Mbeng's farm, just like the Mbeng family had scattered their farm.)</text:p>
        <text:list text:continue-numbering="true" text:style-name="L3">
          <text:list-item>
            <text:p text:style-name="P78">What did the Ngwa's father say? (“No.” They would not scatter the Mbeng's farm because Jesus said that a true follower of Him will love their enemies.)</text:p>
          </text:list-item>
        </text:list>
        <text:p text:style-name="P62">What did the Ngwa's father say? (“No.” They would not scatter the Mbeng's farm because Jesus said that a true follower of Him will love their enemies.)</text:p>
        <text:list text:continue-numbering="true" text:style-name="L3">
          <text:list-item>
            <text:p text:style-name="P78">What happened to one of the Mbeng boys during weeding season? (A snake bit one of the Mbeng boys.)</text:p>
          </text:list-item>
        </text:list>
        <text:p text:style-name="P62">What happened to one of the Mbeng boys during weeding season? (A snake bit one of the Mbeng boys.)<text:tab/></text:p>
        <text:list text:continue-numbering="true" text:style-name="L3">
          <text:list-item>
            <text:p text:style-name="P78">What did the oldest Ngwa boy say about the boy being bit by the snake? (It was God's judgment on the boy, and that they should leave him in the farm to die.)</text:p>
          </text:list-item>
        </text:list>
        <text:p text:style-name="P62">What did the oldest Ngwa boy say about the boy being bit by the snake? (It was God's judgment on the boy, and that they should leave him in the farm to die.)</text:p>
        <text:list text:continue-numbering="true" text:style-name="L3">
          <text:list-item>
            <text:p text:style-name="P78"><text:soft-page-break/>What was the father's response to the oldest Ngwa boy? (A true disciple of Jesus loves his enemies, and that they would take the boy to the hospital and care for him.)</text:p>
          </text:list-item>
        </text:list>
        <text:p text:style-name="P62">What was the father's response to the oldest Ngwa boy? (A true disciple of Jesus loves his enemies, and that they would take the boy to the hospital and care for him.)</text:p>
        <text:list text:continue-numbering="true" text:style-name="L3">
          <text:list-item>
            <text:p text:style-name="P78">Who showed they were a true follower of Jesus? (The father, Pa Ngwa)</text:p>
          </text:list-item>
        </text:list>
        <text:p text:style-name="P62">Who showed they were a true follower of Jesus? (The father, Pa Ngwa)</text:p>
        <text:list text:continue-numbering="true" text:style-name="L3">
          <text:list-item>
            <text:p text:style-name="P78">How can you tell that Pa Ngwa was a true follower of Jesus? (He showed love to his enemy.)</text:p>
          </text:list-item>
        </text:list>
        <text:p text:style-name="P62">How can you tell that Pa Ngwa was a true follower of Jesus? (He showed love to his enemy.)</text:p>
        <text:p text:style-name="P56">Song</text:p>
        <text:p text:style-name="P57">Memory Verse</text:p>
        <text:p text:style-name="P77">Materials and Preparations</text:p>
        <text:list xml:id="list92018955017186" text:continue-list="list92017728349116" text:style-name="Bullet_20_-_20_checkmark">
          <text:list-item>
            <text:p text:style-name="P59">Put a bookmark in <text:s/>Luke 6:27-28</text:p>
          </text:list-item>
          <text:list-item>
            <text:p text:style-name="P59">Write memory verse on the blackboard.</text:p>
          </text:list-item>
        </text:list>
        <text:p text:style-name="P61">Luke 6:27-28 But I tell you who hear me: Love your enemies, do good to those who hate you, bless those who curse you, pray for those who mistreat you.</text:p>
        <text:p text:style-name="P62">Luke 6:27-28 But I tell you who hear me: Love your enemies, do good to those who hate you, bless those who curse you, pray for those who mistreat you.</text:p>
        <text:p text:style-name="P58">Teach and Explain</text:p>
        <text:p text:style-name="P67">Our memory verse is in the Gospel of Luke. <text:s/>That is in the New Testament, a part of the Bible.</text:p>
        <text:p text:style-name="English_20_Translation_20_-_20_Indented">Our memory verse is in the Gospel of Luke. <text:s/>That is in the New Testament, a part of the Bible.</text:p>
        <text:list xml:id="list92018496057192" text:continue-list="list92017578799905" text:style-name="WWNum1">
          <text:list-item text:start-value="1">
            <text:p text:style-name="P79">Read the verse from your Bible.</text:p>
          </text:list-item>
          <text:list-item>
            <text:p text:style-name="P79">Read the verse by yourself as you point to the words.</text:p>
          </text:list-item>
          <text:list-item>
            <text:p text:style-name="P79">Read the verse with the children as you point to the words.</text:p>
          </text:list-item>
          <text:list-item>
            <text:p text:style-name="P79">Explain the verse:</text:p>
          </text:list-item>
        </text:list>
        <text:list text:continue-list="list92018955017186" text:style-name="Bullet_20_-_20_checkmark">
          <text:list-item>
            <text:p text:style-name="P66">Our memory verse comes from today’s Bible story.</text:p>
          </text:list-item>
        </text:list>
        <text:p text:style-name="P62">Our memory verse comes from today’s Bible story.</text:p>
        <text:list xml:id="list92019475184524" text:continue-numbering="true" text:style-name="Bullet_20_-_20_checkmark">
          <text:list-item>
            <text:p text:style-name="P59">As you read the verse, circle the words shown below. <text:s/>Explain each of these words.</text:p>
          </text:list-item>
        </text:list>
        <text:list text:continue-list="list92019203794765" text:style-name="Bullet_20_-_20_Diamond">
          <text:list-item>
            <text:p text:style-name="P64"><text:span text:style-name="Body_20_Emphasized_20_-_20_Small">Hear: <text:s/></text:span>Jesus was getting ready to teach those who really wanted to learn from him.</text:p>
          </text:list-item>
        </text:list>
        <text:p text:style-name="P65">Hear: <text:s/>Jesus was getting ready to teach those who really wanted to learn from him.</text:p>
        <text:list text:continue-numbering="true" text:style-name="Bullet_20_-_20_Diamond">
          <text:list-item>
            <text:p text:style-name="P64"><text:span text:style-name="Body_20_Emphasized_20_-_20_Small">Love: <text:s/></text:span>Jesus teaches us that we are to love everyone, even our enemies. Jesus was not talking about having affection for enemies; he was talking about a conscious effort.</text:p>
          </text:list-item>
        </text:list>
        <text:p text:style-name="P65">Love: <text:s/>Jesus teaches us that we are to love everyone, even our enemies. Jesus was not talking about having affection for enemies; he was talking about a conscious effort.</text:p>
        <text:list text:continue-numbering="true" text:style-name="Bullet_20_-_20_Diamond">
          <text:list-item>
            <text:p text:style-name="P64"><text:span text:style-name="Body_20_Emphasized_20_-_20_Small">Do good: <text:s/></text:span>One way to show love to our enemies is to think of ways to help them.</text:p>
          </text:list-item>
        </text:list>
        <text:p text:style-name="P65">Do good: <text:s/>One way to show love to our enemies is to think of ways to help them.</text:p>
        <text:list text:continue-numbering="true" text:style-name="Bullet_20_-_20_Diamond">
          <text:list-item>
            <text:p text:style-name="P64"><text:span text:style-name="Body_20_Emphasized_20_-_20_Small">Bless: <text:s/></text:span>When someone speaks badly about us, or to us, we often want to argue or say something bad back to that person. Jesus said however, that we are to use words of blessing instead.</text:p>
          </text:list-item>
        </text:list>
        <text:p text:style-name="P65">Bless: <text:s/>When someone speaks badly about us, or to us, we often want to argue or say something bad back to that person. Jesus said however, that we are to use words of blessing instead.</text:p>
        <text:list xml:id="list92019125707263" text:continue-numbering="true" text:style-name="Bullet_20_-_20_Diamond">
          <text:list-item>
            <text:p text:style-name="P64"><text:span text:style-name="Body_20_Emphasized_20_-_20_Small">Pray: <text:s/></text:span>Instead of thinking of ways to get back at someone who treats us poorly, we are to pray for them.</text:p>
          </text:list-item>
        </text:list>
        <text:p text:style-name="P65">Pray: <text:s/>Instead of thinking of ways to get back at someone who treats us poorly, we are to pray for them.</text:p>
        <text:list xml:id="list92018126683404" text:continue-list="list92018496057192" text:style-name="WWNum1">
          <text:list-item>
            <text:p text:style-name="P79">Read the verse again by yourself as you point to the words.</text:p>
          </text:list-item>
          <text:list-item>
            <text:p text:style-name="P79">Read the verse again with the children as you point to the words.</text:p>
          </text:list-item>
        </text:list>
        <text:p text:style-name="P76">Remember our truth for the day? <text:s/>Let’s all say it together:</text:p>
        <text:p text:style-name="P75">Remember our truth for the day? <text:s/>Let’s all say it together:</text:p>
        <text:p text:style-name="P76">True disciples of Jesus love their enemies.</text:p>
        <text:p text:style-name="P75">True disciples of Jesus love their enemies.</text:p>
        <text:p text:style-name="P57"><text:soft-page-break/>Memory Verse Review</text:p>
        <text:p text:style-name="P58">Children Repeat the Verse by Using Movements</text:p>
        <text:list xml:id="list92018847022302" text:continue-list="list92019475184524" text:style-name="Bullet_20_-_20_checkmark">
          <text:list-item>
            <text:p text:style-name="P59">Talk about different movements with our bodies: Your hands on your head, standing on one foot, jumping up and down, touching your toes....</text:p>
          </text:list-item>
          <text:list-item>
            <text:p text:style-name="P60">Ask the children the first question.</text:p>
          </text:list-item>
          <text:list-item>
            <text:p text:style-name="P60">When a question is answered correctly, that child chooses one of the movements listed above or chooses their own movement.</text:p>
          </text:list-item>
          <text:list-item>
            <text:p text:style-name="P60">The verse is said out loud together while doing the movement.</text:p>
          </text:list-item>
          <text:list-item>
            <text:p text:style-name="P60">Then the next question is asked.</text:p>
          </text:list-item>
          <text:list-item>
            <text:p text:style-name="P60">When that question is answered correctly, another child chooses one of the movements.</text:p>
          </text:list-item>
          <text:list-item>
            <text:p text:style-name="P60">The verse is said aloud again while doing the movement.</text:p>
          </text:list-item>
          <text:list-item>
            <text:p text:style-name="P60">Do this until all the questions are asked.</text:p>
          </text:list-item>
        </text:list>
        <text:p text:style-name="P77">Questions for Memory Verse</text:p>
        <text:list text:style-name="L4">
          <text:list-item text:start-value="1">
            <text:p text:style-name="P80">Where is today's memory verse found? <text:s/>( <text:s/>Luke 6:27-28 <text:s/>)</text:p>
          </text:list-item>
        </text:list>
        <text:p text:style-name="P62">Where is today's memory verse found? <text:s/>( <text:s/>Luke 6:27-28 <text:s/>)</text:p>
        <text:list text:continue-numbering="true" text:style-name="L4">
          <text:list-item>
            <text:p text:style-name="P80">Should we hate our enemies because they deserve it? (No)</text:p>
          </text:list-item>
        </text:list>
        <text:p text:style-name="P62">Should we hate our enemies because they deserve it? (No)</text:p>
        <text:list text:continue-numbering="true" text:style-name="L4">
          <text:list-item>
            <text:p text:style-name="P80">What did Jesus say we should do to our enemies? (Love our enemies)</text:p>
          </text:list-item>
        </text:list>
        <text:p text:style-name="P62">What did Jesus say we should do to our enemies? (Love our enemies)</text:p>
        <text:list text:continue-numbering="true" text:style-name="L4">
          <text:list-item>
            <text:p text:style-name="P80">What should we do to those who hate us? (Do good to those who hate us)</text:p>
          </text:list-item>
        </text:list>
        <text:p text:style-name="P62">What should we do to those who hate us? (Do good to those who hate us)</text:p>
        <text:list text:continue-numbering="true" text:style-name="L4">
          <text:list-item>
            <text:p text:style-name="P80">What should we do when someone curses us? (Bless them)</text:p>
          </text:list-item>
        </text:list>
        <text:p text:style-name="P62">What should we do when someone curses us? (Bless them)</text:p>
        <text:p text:style-name="P56">Song</text:p>
        <text:p text:style-name="P57">Closing and Homework</text:p>
        <text:list text:continue-list="list92018847022302" text:style-name="Bullet_20_-_20_checkmark">
          <text:list-item>
            <text:p text:style-name="P59">Say the truth together:</text:p>
          </text:list-item>
        </text:list>
        <text:p text:style-name="P61">True disciples of Jesus love their enemies.</text:p>
        <text:p text:style-name="P62">True disciples of Jesus love their enemies.</text:p>
        <text:list text:continue-numbering="true" text:style-name="Bullet_20_-_20_checkmark">
          <text:list-item>
            <text:p text:style-name="P59">Say the memory verse together:</text:p>
          </text:list-item>
        </text:list>
        <text:p text:style-name="P61">Luke 6:27-28 But I tell you who hear me: Love your enemies, do good to those who hate you, bless those who curse you, pray for those who mistreat you.</text:p>
        <text:p text:style-name="P62">Luke 6:27-28 But I tell you who hear me: Love your enemies, do good to those who hate you, bless those who curse you, pray for those who mistreat you.</text:p>
        <text:list text:continue-numbering="true" text:style-name="Bullet_20_-_20_checkmark">
          <text:list-item>
            <text:p text:style-name="P59">Review the homework:</text:p>
          </text:list-item>
        </text:list>
        <text:p text:style-name="P61">This week show love to someone who you do not get along with.</text:p>
        <text:p text:style-name="P62">This week show love to someone who you do not get along with.</text:p>
        <text:list xml:id="list92019702044052" text:continue-numbering="true" text:style-name="Bullet_20_-_20_checkmark">
          <text:list-item>
            <text:p text:style-name="P59">Give any needed announcements.</text:p>
          </text:list-item>
        </text:list>
        <text:p text:style-name="P58">Closing Prayer</text:p>
        <text:p text:style-name="P81"><text:span text:style-name="Body_20_Emphasized_20_-_20_Small">Thank God <text:s/></text:span>that He is a forgiving God, and that He is always there for us.</text:p>
        <text:p text:style-name="P81"><text:span text:style-name="Body_20_Emphasized_20_-_20_Small">Ask God <text:s/></text:span>that the children will remember to show love to someone who they do not get along with.</text:p>
        <text:p text:style-name="P82">Colouring page to colour and take home!</text:p>
      </text:section>
      <text:p text:style-name="Body"/>
      <text:p text:style-name="P54">True disciples of Jesus love their enemies.</text:p>
      <text:p text:style-name="Bible_20_Story_20_-_20_Graphic_20_Number"><draw:frame draw:style-name="fr8" draw:name="Image11" text:anchor-type="as-char" svg:width="4.9752in" svg:height="4.9492in" draw:z-index="56"><draw:image xlink:href="Pictures/1000000100000B1300000B265D92404E.tif" xlink:type="simple" xlink:show="embed" xlink:actuate="onLoad" draw:mime-type="image/tiff"/></draw:frame></text:p>
      <text:p text:style-name="M.T._20_Coloring_20_Page_20_-_20_Memory_20_Verse">Luke 6:27-28 But I tell you who hear me: Love your enemies, do good to those who hate you, bless those who curse you, pray for those who mistreat you.</text:p>
      <text:p text:style-name="P55">True disciples of Jesus love their enemies.</text:p>
      <text:p text:style-name="Bible_20_Story_20_-_20_Graphic_20_Number"><draw:frame draw:style-name="fr8" draw:name="Image12" text:anchor-type="as-char" svg:width="4.9752in" svg:height="4.9492in" draw:z-index="57"><draw:image xlink:href="Pictures/1000000100000B1300000B265D92404E.tif" xlink:type="simple" xlink:show="embed" xlink:actuate="onLoad" draw:mime-type="image/tiff"/></draw:frame></text:p>
      <text:p text:style-name="Bible_20_Story_20_-_20_Graphic_20_Number">Luke 6:27-28 But I tell you who hear me: Love your enemies, do good to those who hate you, bless those who curse you, pray for those who mistreat you.</text:p>
      <text:h text:style-name="P25" text:outline-level="1"><draw:frame draw:style-name="fr3" draw:name="Image13" text:anchor-type="char" svg:x="0in" svg:y="0.0161in" svg:width="1.0752in" svg:height="1.0752in" draw:z-index="62"><draw:image xlink:href="Pictures/10000001000000D8000000D88B65D866.png" xlink:type="simple" xlink:show="embed" xlink:actuate="onLoad" draw:mime-type="image/png"/></draw:frame>A True Disciple of Jesus is Generous</text:h>
      <text:p text:style-name="M.T._20_Lesson_20_Title">A True Disciple of Jesus is Generous</text:p>
      <text:p text:style-name="English_20_Translation_20_-_20_Lesson_20_title">A True Disciple of Jesus is Generous</text:p>
      <text:p text:style-name="M.T._20_Text_20_-_20_Lesson_20_Title_20_Scrip_20_Reference">Luke <text:s/>6:30-31</text:p>
      <text:p text:style-name="Part_20_Heading">Lesson Overview</text:p>
      <table:table table:name="Table6" table:style-name="Table6" table:template-name="Lesson Overview">
        <table:table-column table:style-name="Table6.A"/>
        <table:table-column table:style-name="Table6.B"/>
        <table:table-row table:style-name="Table6.1">
          <table:table-cell table:style-name="Table6.A1" office:value-type="string">
            <text:p text:style-name="Table_20_Left_20_headings">Today’s Truth</text:p>
          </table:table-cell>
          <table:table-cell table:style-name="Table6.B1" office:value-type="string">
            <text:p text:style-name="M.T._20_Text">A true disciple of Jesus is generous.</text:p>
            <text:p text:style-name="English_20_translation">A true disciple of Jesus is generous.</text:p>
          </table:table-cell>
        </table:table-row>
        <table:table-row table:style-name="Table6.1">
          <table:table-cell table:style-name="Table6.A1" office:value-type="string">
            <text:p text:style-name="Table_20_Left_20_headings">Objective</text:p>
          </table:table-cell>
          <table:table-cell table:style-name="Table6.B1" office:value-type="string">
            <text:p text:style-name="Body_20_Tight_20_lines"><text:span text:style-name="Body_20_Emphasized_20_-_20_Small">KNOW: <text:s/></text:span>The children will learn about how to be generous.</text:p>
            <text:p text:style-name="Body_20_Tight_20_lines"><text:span text:style-name="Body_20_Emphasized_20_-_20_Small">DO:</text:span> <text:s/>The children this week will be kind and patient with others.</text:p>
          </table:table-cell>
        </table:table-row>
        <table:table-row table:style-name="Table6.1">
          <table:table-cell table:style-name="Table6.A1" office:value-type="string">
            <text:p text:style-name="Table_20_Left_20_headings">Materials</text:p>
          </table:table-cell>
          <table:table-cell table:style-name="Table6.B1" office:value-type="string">
            <text:list xml:id="list92018528982369" text:continue-list="list92018752394429"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style-name="Table6.1">
          <table:table-cell table:style-name="Table6.A1" office:value-type="string">
            <text:p text:style-name="Table_20_Left_20_headings">Memory Verse</text:p>
          </table:table-cell>
          <table:table-cell table:style-name="Table6.B1" office:value-type="string">
            <text:p text:style-name="M.T._20_Text">Luke 6:30-31 Give to everyone who asks you, and do not ask for your possessions back from the person who takes them away. Treat others in the same way that you would want them to treat you.</text:p>
            <text:p text:style-name="English_20_translation">Luke 6:30-31 Give to everyone who asks you, and do not ask for your possessions back from the person who takes them away. Treat others in the same way that you would want them to treat you.</text:p>
          </table:table-cell>
        </table:table-row>
        <table:table-row table:style-name="Table6.1">
          <table:table-cell table:style-name="Table6.A1" office:value-type="string">
            <text:p text:style-name="Table_20_Left_20_headings">Homework</text:p>
          </table:table-cell>
          <table:table-cell table:style-name="Table6.B1" office:value-type="string">
            <text:p text:style-name="M.T._20_Text">Who can you be generous to this week? Who can you treat with kindness? Who in your family, friends, and schoolmates can you show patience to? Think of these people, then pray and ask God to help you.</text:p>
            <text:p text:style-name="English_20_translation">Who can you be generous to this week? Who can you treat with kindness? Who in your family, friends, and schoolmates can you show patience to? Think of these people, then pray and ask God to help you.</text:p>
          </table:table-cell>
        </table:table-row>
      </table:table>
      <text:p text:style-name="Body_20_-_20_Small_20_Spacer"/>
      <text:p text:style-name="Part_20_Heading">Detailed Lesson Plan</text:p>
      <text:section text:style-name="Sect1" text:name="L-16 Detail Plan">
        <text:p text:style-name="P83">Song</text:p>
        <text:p text:style-name="P84">Opening</text:p>
        <text:p text:style-name="P85">Welcome</text:p>
        <text:list text:continue-list="list92019702044052" text:style-name="Bullet_20_-_20_checkmark">
          <text:list-item>
            <text:p text:style-name="P86">Be sure the children know you are happy to see them!</text:p>
          </text:list-item>
          <text:list-item>
            <text:p text:style-name="P86">Introduce yourself and your helpers.</text:p>
          </text:list-item>
        </text:list>
        <text:p text:style-name="P85">Sharing Time</text:p>
        <text:list text:continue-numbering="true" text:style-name="Bullet_20_-_20_checkmark">
          <text:list-item>
            <text:p text:style-name="P86">Say the truth from the previous lesson together:</text:p>
          </text:list-item>
        </text:list>
        <text:p text:style-name="P87">True disciples of Jesus love their enemies.</text:p>
        <text:p text:style-name="P88">True disciples of Jesus love their enemies.</text:p>
        <text:list text:continue-numbering="true" text:style-name="Bullet_20_-_20_checkmark">
          <text:list-item>
            <text:p text:style-name="P86">Say the memory verse from the previous lesson together:</text:p>
          </text:list-item>
        </text:list>
        <text:p text:style-name="P87">Luke 6:27-28 But I tell you who hear me: Love your enemies, do good to those who hate you, bless those who curse you, pray for those who mistreat you.</text:p>
        <text:p text:style-name="P88">Luke 6:27-28 But I tell you who hear me: Love your enemies, do good to those who hate you, bless those who curse you, pray for those who mistreat you.</text:p>
        <text:list text:continue-numbering="true" text:style-name="Bullet_20_-_20_checkmark">
          <text:list-item>
            <text:p text:style-name="P86">Review the homework from the previous lesson:</text:p>
          </text:list-item>
        </text:list>
        <text:p text:style-name="P87">You were to show love to someone who you do not get along with. Did you say something kind to them? Did you do something for that person? What did you do?</text:p>
        <text:p text:style-name="P88">You were to show love to someone who you do not get along with. Did you say something kind to them? Did you do something for that person? What did you do?</text:p>
        <text:p text:style-name="P89">(Give children time to share.)</text:p>
        <text:p text:style-name="P85"><text:soft-page-break/>Prayer</text:p>
        <text:list text:continue-numbering="true" text:style-name="Bullet_20_-_20_checkmark">
          <text:list-item>
            <text:p text:style-name="P86">Let the children share praises and prayer requests.</text:p>
          </text:list-item>
          <text:list-item>
            <text:p text:style-name="P90">Keep a record of what the children are sharing so you can remember to thank God together for answered prayers.</text:p>
          </text:list-item>
          <text:list-item>
            <text:p text:style-name="P90">Spend time praying together. <text:s/>Let children pray out loud if they volunteer. <text:s/>Do not force anyone to pray out loud.</text:p>
          </text:list-item>
        </text:list>
        <text:p text:style-name="P83">Song</text:p>
        <text:p text:style-name="P84">Words to Discuss</text:p>
        <text:list xml:id="list92019615457124" text:continue-numbering="true" text:style-name="Bullet_20_-_20_checkmark">
          <text:list-item>
            <text:p text:style-name="P86">On the blackboard, write the “Words to Discuss” from the list below.</text:p>
          </text:list-item>
          <text:list-item>
            <text:p text:style-name="P91">Let's discuss some words to help us better understand the Bible story for today.</text:p>
          </text:list-item>
        </text:list>
        <text:p text:style-name="P88">Let's discuss some words to help us better understand the Bible story for today.</text:p>
        <text:list text:continue-list="list92019125707263" text:style-name="Bullet_20_-_20_Diamond">
          <text:list-item>
            <text:p text:style-name="P92"><text:span text:style-name="Body_20_Emphasized_20_-_20_Small">Disciple: <text:s/></text:span>Someone who follows Jesus and lives by His teachings.</text:p>
          </text:list-item>
        </text:list>
        <text:p text:style-name="P93">Disciple: <text:s/>Someone who follows Jesus and lives by His teachings.</text:p>
        <text:list text:continue-numbering="true" text:style-name="Bullet_20_-_20_Diamond">
          <text:list-item>
            <text:p text:style-name="P92"><text:span text:style-name="Body_20_Emphasized_20_-_20_Small">Generous: <text:s/></text:span>Willing to give or to serve.</text:p>
          </text:list-item>
        </text:list>
        <text:p text:style-name="P93">Generous: <text:s/>Willing to give or to serve.</text:p>
        <text:list xml:id="list92018985323968" text:continue-numbering="true" text:style-name="Bullet_20_-_20_Diamond">
          <text:list-item>
            <text:p text:style-name="P92"><text:span text:style-name="Body_20_Emphasized_20_-_20_Small">Demand: <text:s/></text:span>To urgently insist.</text:p>
          </text:list-item>
        </text:list>
        <text:p text:style-name="P93">Demand: <text:s/>To urgently insist.</text:p>
        <text:p text:style-name="P83">Song</text:p>
        <text:p text:style-name="P84">Bible Story / Lesson</text:p>
        <text:p text:style-name="P94">Today we will be learning that a true disciple of Jesus is generous.</text:p>
        <text:p text:style-name="P95">Today we will be learning that a true disciple of Jesus is generous.</text:p>
        <text:p text:style-name="P85">Introduce Truth</text:p>
        <text:p text:style-name="P94">In our last lesson, we learned that a true follower of Jesus loves everyone, even his enemies. This week, we will learn another truth about those who are true followers of Jesus.</text:p>
        <text:p text:style-name="P95">In our last lesson, we learned that a true follower of Jesus loves everyone, even his enemies. This week, we will learn another truth about those who are true followers of Jesus.</text:p>
        <text:p text:style-name="P96">Our truth for today is: <text:s/>A true disciple of Jesus is generous.</text:p>
        <text:p text:style-name="P97">Our truth for today is: <text:s/>A true disciple of Jesus is generous.</text:p>
        <text:p text:style-name="P96">This reminds me of a story from the village.</text:p>
        <text:p text:style-name="P97">This reminds me of a story from the village.</text:p>
        <text:p text:style-name="P98">Bible Story: <text:s/>A story from a village</text:p>
        <text:p text:style-name="P94">In one village not too far from here, I heard a story about some people who showed us what it means to be generous. The time of the year to prepare for planting had come. Everyone had spent all the money they had to buy seed, so they could plant their crops and have enough food for the next year.</text:p>
        <text:p text:style-name="P95">In one village not too far from here, I heard a story about some people who showed us what it means to be generous. The time of the year to prepare for planting had come. Everyone had spent all the money they had to buy seed, so they could plant their crops and have enough food for the next year.</text:p>
        <text:p text:style-name="P99"><draw:frame draw:style-name="fr4" draw:name="Frame22" text:anchor-type="paragraph" svg:x="-0.0181in" svg:y="0.0035in" svg:width="1.378in" draw:z-index="61"><draw:text-box fo:min-height="1.2055in"><text:p text:style-name="P100">Picture <text:s/>16–1</text:p><text:p text:style-name="P101"><draw:frame text:anchor-type="as-char" draw:z-index="27" draw:name="Shape1_0" draw:style-name="gr2" draw:text-style-name="P72" svg:width="1.2921in" svg:height="0.9134in"><draw:image xlink:href="Pictures/10000000000000EC000000A78CB3664B.jpg" xlink:type="simple" xlink:show="embed" xlink:actuate="onLoad" draw:mime-type="image/jpeg"><text:p/></draw:image></draw:frame></text:p></draw:text-box></draw:frame>One day, a very bad thing happened to the Nfor family. Their cookhouse caught fire while they were away from the compound. The whole cookhouse and barn burned down, including all of their seed that they bought to plant.</text:p>
        <text:p text:style-name="P99">Ma Nfor was crying and asked her husband, “What will we do? We have no seed to plant. We have no money to buy more seed. We will not have food next year! We will starve! What can we do?”</text:p>
        <text:p text:style-name="P99">Pa Nfor told his wife not to worry, he would go to see Elder Mbe, who was elder of their church. Elder Mbe would know what to do. They were fellow Christians, and went to church together. Certainly Pa Mbe would know how to solve their problem.</text:p>
        <text:p text:style-name="P102">One day, a very bad thing happened to the Nfor family. Their cookhouse caught fire while they were away from the compound. The whole cookhouse and barn burned down, including all of their seed that they bought to plant.</text:p>
        <text:p text:style-name="P102">Ma Nfor was crying and asked her husband, “What will we do? We have no seed to plant. We have no money to buy more seed. We will not have food next year! We will starve! What can we do?”</text:p>
        <text:p text:style-name="P102"><text:soft-page-break/>Pa Nfor told his wife not to worry, he would go to see Elder Mbe, who was elder of their church. Elder Mbe would know what to do. They were fellow Christians, and went to church together. Certainly Pa Mbe would know how to solve their problem.</text:p>
        <text:p text:style-name="P99"><draw:frame draw:style-name="fr4" draw:name="Frame13" text:anchor-type="paragraph" svg:x="-0.0181in" svg:y="0.0035in" svg:width="1.378in" draw:z-index="60"><draw:text-box fo:min-height="1.2055in"><text:p text:style-name="P103">Picture <text:s/>16–2</text:p><text:p text:style-name="P104"><draw:frame text:anchor-type="as-char" draw:z-index="22" draw:name="Shape2_0" draw:style-name="gr2" draw:text-style-name="P72" svg:width="1.2921in" svg:height="0.9134in"><draw:image xlink:href="Pictures/10000000000000EC000000A747F3FB0A.jpg" xlink:type="simple" xlink:show="embed" xlink:actuate="onLoad" draw:mime-type="image/jpeg"><text:p/></draw:image></draw:frame></text:p></draw:text-box></draw:frame>Pa went to see Elder Mbe and told him of his family's situation and his need. Elder Mbe said, “We will pray for you, my brother. You too should remember to pray. You should have faith, God will help you. As for me, I can do nothing. I only have enough seed for my family's needs.”</text:p>
        <text:p text:style-name="P102">Pa went to see Elder Mbe and told him of his family's situation and his need. Elder Mbe said, “We will pray for you, my brother. You too should remember to pray. You should have faith, God will help you. As for me, I can do nothing. I only have enough seed for my family's needs.”</text:p>
        <text:p text:style-name="P99"><draw:frame draw:style-name="fr4" draw:name="Frame32" text:anchor-type="paragraph" svg:x="-0.0181in" svg:y="0.0035in" svg:width="1.378in" draw:z-index="59"><draw:text-box fo:min-height="1.2055in"><text:p text:style-name="P103">Picture <text:s/>16–3</text:p><text:p text:style-name="P104"><draw:frame text:anchor-type="as-char" draw:z-index="26" draw:name="Shape3_0" draw:style-name="gr2" draw:text-style-name="P72" svg:width="1.2921in" svg:height="0.9134in"><draw:image xlink:href="Pictures/10000000000000EC000000A721D72754.jpg" xlink:type="simple" xlink:show="embed" xlink:actuate="onLoad" draw:mime-type="image/jpeg"><text:p/></draw:image></draw:frame></text:p></draw:text-box></draw:frame>Pa Nfor went away sad and discouraged. He thought that of anyone he knew, Elder Mbe would understand his situation and help him. He wondered what he would do. He asked God, “What will happen to me and my family?”</text:p>
        <text:p text:style-name="P102">Pa Nfor went away sad and discouraged. He thought that of anyone he knew, Elder Mbe would understand his situation and help him. He wondered what he would do. He asked God, “What will happen to me and my family?”</text:p>
        <text:p text:style-name="P99"><draw:frame draw:style-name="fr4" draw:name="Frame42" text:anchor-type="paragraph" svg:x="-0.0181in" svg:y="0.0035in" svg:width="1.378in" draw:z-index="58"><draw:text-box fo:min-height="1.2055in"><text:p text:style-name="P103">Picture <text:s/>16–4</text:p><text:p text:style-name="P104"><draw:frame text:anchor-type="as-char" draw:z-index="33" draw:name="Shape4_0" draw:style-name="gr2" draw:text-style-name="P72" svg:width="1.2921in" svg:height="0.9134in"><draw:image xlink:href="Pictures/10000000000000EC000000A7C9E2C3FC.jpg" xlink:type="simple" xlink:show="embed" xlink:actuate="onLoad" draw:mime-type="image/jpeg"><text:p/></draw:image></draw:frame></text:p></draw:text-box></draw:frame>Upon reaching his compound, he met Pa Akem waiting for him to return. He had also brought a bag of seed corn with him. Pa Akem said, “I heard about your loss. I know that you lost all of your seed, and you don't have any more money to buy seed. Jesus said that his true followers are generous, so I knew that I must come to help you.”</text:p>
        <text:p text:style-name="P99">Pa Nfor said, “I don't understand, how can you give me a bag of your seed when you only have enough to feed your family? Your family will not have enough.”</text:p>
        <text:p text:style-name="P99">Pa Aken said, “True followers of Jesus treat others as they want to be treated. If I were in need, I would hope others would come to help me too. I believe that with God's help, we will all have enough to eat next year.”</text:p>
        <text:p text:style-name="P99">The two families joined together singing, dancing, and praising God.</text:p>
        <text:p text:style-name="P102">Upon reaching his compound, he met Pa Akem waiting for him to return. He had also brought a bag of seed corn with him. Pa Akem said, “I heard about your loss. I know that you lost all of your seed, and you don't have any more money to buy seed. Jesus said that his true followers are generous, so I knew that I must come to help you.”</text:p>
        <text:p text:style-name="P102">Pa Nfor said, “I don't understand, how can you give me a bag of your seed when you only have enough to feed your family? Your family will not have enough.”</text:p>
        <text:p text:style-name="P102">Pa Aken said, “True followers of Jesus treat others as they want to be treated. If I were in need, I would hope others would come to help me too. I believe that with God's help, we will all have enough to eat next year.”</text:p>
        <text:p text:style-name="P102">The two families joined together singing, dancing, and praising God.</text:p>
        <text:p text:style-name="P85">Application</text:p>
        <text:p text:style-name="P94">Jesus tells us that we should be generous and share with those in need around us. Just like in the story, the Nfor family were going to have no food because of the fire. The Akem family saw that there was a family in need, so they helped them out. This is a good example as to how we are to be. Jesus tells us to treat others the way we want to be treated. Being generous, kind, and patient with others is how we can show that we are true followers of Jesus. <text:s text:c="3"/></text:p>
        <text:p text:style-name="P95">Jesus tells us that we should be generous and share with those in need around us. Just like in the story, the Nfor family were going to have no food because of the fire. The Akem family saw that there was a family in need, so they helped them out. This is a good example as to how we are to be. Jesus tells us to treat others the way we want to be treated. Being generous, kind, and patient with others is how we can show that we are true followers of Jesus.</text:p>
        <text:p text:style-name="P96">A true disciple of Jesus is generous.</text:p>
        <text:p text:style-name="P97">A true disciple of Jesus is generous.</text:p>
        <text:p text:style-name="P105">Homework</text:p>
        <text:p text:style-name="P94">Who can you be generous to this week? Who can you treat with kindness? Who in your family, friends, and schoolmates can you show patience to? Think of these people, then pray and ask God to help you.</text:p>
        <text:p text:style-name="P95">Who can you be generous to this week? Who can you treat with kindness? Who in your family, friends, and schoolmates can you show patience to? Think of these people, then pray and ask God to help you.</text:p>
        <text:p text:style-name="P83">Prayer / Song</text:p>
        <text:p text:style-name="P84"><text:soft-page-break/>Review Game</text:p>
        <text:p text:style-name="P85">Spaghetti Game</text:p>
        <text:p text:style-name="P105">Materials</text:p>
        <text:list text:continue-list="list92019615457124" text:style-name="Bullet_20_-_20_checkmark">
          <text:list-item>
            <text:p text:style-name="P86">Cooking pot with a lid</text:p>
          </text:list-item>
          <text:list-item>
            <text:p text:style-name="P90">Rope, string, or yarn cut into 10 pieces that are all different sizes</text:p>
          </text:list-item>
        </text:list>
        <text:p text:style-name="P105">How to Play</text:p>
        <text:list xml:id="list92017876595327" text:continue-numbering="true" text:style-name="Bullet_20_-_20_checkmark">
          <text:list-item>
            <text:p text:style-name="P86">Put the rope, string, or yarn in the pot with some of it hanging out. <text:s/>Put the lid on the pot over the ropes.</text:p>
          </text:list-item>
          <text:list-item>
            <text:p text:style-name="P90">Divide the children into two teams.</text:p>
          </text:list-item>
          <text:list-item>
            <text:p text:style-name="P90">When someone on the team answers the question correctly, they come to the front and choose one of the ropes. (They never know if they will get a long or short rope.)</text:p>
          </text:list-item>
          <text:list-item>
            <text:p text:style-name="P90">The ropes that each team gets are tied together into one long rope.</text:p>
          </text:list-item>
          <text:list-item>
            <text:p text:style-name="P90">At the end, measure the ropes from the two teams side by side.</text:p>
          </text:list-item>
          <text:list-item>
            <text:p text:style-name="P90">The teams with the longest rope wins.</text:p>
          </text:list-item>
        </text:list>
        <text:p text:style-name="P105">Questions for Review Game</text:p>
        <text:list text:style-name="L5">
          <text:list-item>
            <text:p text:style-name="P106">Is the story we had today from the Bible? (No, it is from a village.)</text:p>
          </text:list-item>
        </text:list>
        <text:p text:style-name="P88">Is the story we had today from the Bible? (No, it is from a village.)</text:p>
        <text:list text:continue-numbering="true" text:style-name="L5">
          <text:list-item>
            <text:p text:style-name="P106">What did Jesus say his true followers will do when people ask for help? (They are generous and give to those who ask.)</text:p>
          </text:list-item>
        </text:list>
        <text:p text:style-name="P88">What did Jesus say his true followers will do when people ask for help? (They are generous and give to those who ask.)</text:p>
        <text:list text:continue-numbering="true" text:style-name="L5">
          <text:list-item>
            <text:p text:style-name="P106">How does Jesus want his true followers to treat other people? (In the same way that they want to be treated.)</text:p>
          </text:list-item>
        </text:list>
        <text:p text:style-name="P88">How does Jesus want his true followers to treat other people? (In the same way that they want to be treated.)</text:p>
        <text:list text:continue-numbering="true" text:style-name="L5">
          <text:list-item>
            <text:p text:style-name="P106">What do you think it means to treat others like we want to be treated? (Give the children time to give examples. Be sure to mention being honest, patient, helpful, and kind.)</text:p>
          </text:list-item>
        </text:list>
        <text:p text:style-name="P88">What do you think it means to treat others like we want to be treated? (Give the children time to give examples. Be sure to mention being honest, patient, helpful, and kind.)</text:p>
        <text:list text:continue-numbering="true" text:style-name="L5">
          <text:list-item>
            <text:p text:style-name="P106">What happened to the Nfor family? (Their cookhouse burned down with all of their seed for planting inside.)</text:p>
          </text:list-item>
        </text:list>
        <text:p text:style-name="P88">What happened to the Nfor family? (Their cookhouse burned down with all of their seed for planting inside.)</text:p>
        <text:list text:continue-numbering="true" text:style-name="L5">
          <text:list-item>
            <text:p text:style-name="P106">Why was Ma Nfor crying and afraid? (They had no money to buy more seed, so they would not have food to harvest and feed themselves.)</text:p>
          </text:list-item>
        </text:list>
        <text:p text:style-name="P88">Why was Ma Nfor crying and afraid? (They had no money to buy more seed, so they would not have food to harvest and feed themselves.)</text:p>
        <text:list text:continue-numbering="true" text:style-name="L5">
          <text:list-item>
            <text:p text:style-name="P106">Who did Pa Nfor go to for help first? (Elder Mbe from the church)</text:p>
          </text:list-item>
        </text:list>
        <text:p text:style-name="P88">Who did Pa Nfor go to for help first? (Elder Mbe from the church)</text:p>
        <text:list text:continue-numbering="true" text:style-name="L5">
          <text:list-item>
            <text:p text:style-name="P106">Did Elder Mbe help the Nfor family? (It is good that Elder Mbe promised to pray for the Nfor family, but he did not try to think of how he could help them with their physical needs.)</text:p>
          </text:list-item>
        </text:list>
        <text:p text:style-name="P88">Did Elder Mbe help the Nfor family? (It is good that Elder Mbe promised to pray for the Nfor family, but he did not try to think of how he could help them with their physical needs.)</text:p>
        <text:list text:continue-numbering="true" text:style-name="L5">
          <text:list-item>
            <text:p text:style-name="P106">Who did Pa Nfor meet at his compound? (Pa Akem)</text:p>
          </text:list-item>
        </text:list>
        <text:p text:style-name="P88">Who did Pa Nfor meet at his compound? (Pa Akem)</text:p>
        <text:list text:continue-numbering="true" text:style-name="L5">
          <text:list-item>
            <text:p text:style-name="P106">What did Pa Akem have to give to Pa Nfor? (A bag of his family's seed)</text:p>
          </text:list-item>
        </text:list>
        <text:p text:style-name="P88">What did Pa Akem have to give to Pa Nfor? (A bag of his family's seed)</text:p>
        <text:list text:continue-numbering="true" text:style-name="L5">
          <text:list-item>
            <text:p text:style-name="P106">Was Pa Akem sacrificing to help the Nfor family? (Yes, Pa Akem was giving from his own family's seed they would use for planting. Pa Akem's family might not have enough food from their harvest.)</text:p>
          </text:list-item>
        </text:list>
        <text:p text:style-name="P88">Was Pa Akem sacrificing to help the Nfor family? (Yes, Pa Akem was giving from his own family's seed they would use for planting. Pa Akem's family might not have enough food from their harvest.)</text:p>
        <text:list text:continue-numbering="true" text:style-name="L5">
          <text:list-item>
            <text:p text:style-name="P106">Why did Pa Akem give Pa Nfor a bag of his seed? (Pa Akem knew that Jesus wants his true followers to be generous and treat others like they want to be treated. If Pa Akem knew they had the same problem, he would want people to help him so his family would not be hungry.)</text:p>
          </text:list-item>
        </text:list>
        <text:p text:style-name="P88">Why did Pa Akem give Pa Nfor a bag of his seed? (Pa Akem knew that Jesus wants his true followers to be generous and treat others like they want to be treated. If Pa Akem knew they had the same problem, he would want people to help him so his family would not be hungry.)</text:p>
        <text:p text:style-name="P83">Song</text:p>
        <text:p text:style-name="P84"><text:soft-page-break/>Memory Verse</text:p>
        <text:p text:style-name="P105">Materials and Preparations</text:p>
        <text:list xml:id="list92018705868572" text:continue-list="list92017876595327" text:style-name="Bullet_20_-_20_checkmark">
          <text:list-item>
            <text:p text:style-name="P86">Put a bookmark in <text:s/>Luke 6:30-31</text:p>
          </text:list-item>
          <text:list-item>
            <text:p text:style-name="P86">Write memory verse on the blackboard.</text:p>
          </text:list-item>
        </text:list>
        <text:p text:style-name="P87">Luke 6:30-31 Give to everyone who asks you, and do not ask for your possessions back from the person who takes them away. Treat others in the same way that you would want them to treat you.</text:p>
        <text:p text:style-name="P88">Luke 6:30-31 Give to everyone who asks you, and do not ask for your possessions back from the person who takes them away. Treat others in the same way that you would want them to treat you.</text:p>
        <text:p text:style-name="P85">Teach and Explain</text:p>
        <text:p text:style-name="P94">Our memory verse is in the Gospel of Luke. <text:s/>That is in the New Testament, a part of the Bible.</text:p>
        <text:p text:style-name="P95">Our memory verse is in the Gospel of Luke. <text:s/>That is in the New Testament, a part of the Bible.</text:p>
        <text:list xml:id="list92017737495939" text:continue-list="list92018126683404" text:style-name="WWNum1">
          <text:list-item text:start-value="1">
            <text:p text:style-name="P107">Read the verse from your Bible.</text:p>
          </text:list-item>
          <text:list-item>
            <text:p text:style-name="P107">Read the verse by yourself as you point to the words.</text:p>
          </text:list-item>
          <text:list-item>
            <text:p text:style-name="P107">Read the verse with the children as you point to the words.</text:p>
          </text:list-item>
          <text:list-item>
            <text:p text:style-name="P107">Explain the verse:</text:p>
          </text:list-item>
        </text:list>
        <text:list text:continue-list="list92018705868572" text:style-name="Bullet_20_-_20_checkmark">
          <text:list-item>
            <text:p text:style-name="P91">Our memory verse comes from today’s Bible story.</text:p>
          </text:list-item>
        </text:list>
        <text:p text:style-name="P88">Our memory verse comes from today’s Bible story.</text:p>
        <text:list xml:id="list92018994514984" text:continue-numbering="true" text:style-name="Bullet_20_-_20_checkmark">
          <text:list-item>
            <text:p text:style-name="P86">As you read the verse, circle the words shown below. <text:s/>Explain each of these words.</text:p>
          </text:list-item>
        </text:list>
        <text:list text:continue-list="list92018985323968" text:style-name="Bullet_20_-_20_Diamond">
          <text:list-item>
            <text:p text:style-name="P92"><text:span text:style-name="Body_20_Emphasized_20_-_20_Small">Everyone: <text:s/></text:span>Jesus wants us to be generous with people. If someone asks us for something, Jesus wants us to give it to them whether they are friends, family, or strangers.</text:p>
          </text:list-item>
        </text:list>
        <text:p text:style-name="P93">Everyone: <text:s/>Jesus wants us to be generous with people. If someone asks us for something, Jesus wants us to give it to them whether they are friends, family, or strangers.</text:p>
        <text:list text:continue-numbering="true" text:style-name="Bullet_20_-_20_Diamond">
          <text:list-item>
            <text:p text:style-name="P92"><text:span text:style-name="Body_20_Emphasized_20_-_20_Small">Takes: <text:s/></text:span>Jesus is talking about people who take things from us without our permission.</text:p>
          </text:list-item>
        </text:list>
        <text:p text:style-name="P93">Takes: <text:s/>Jesus is talking about people who take things from us without our permission.</text:p>
        <text:list text:continue-numbering="true" text:style-name="Bullet_20_-_20_Diamond">
          <text:list-item>
            <text:p text:style-name="P92"><text:span text:style-name="Body_20_Emphasized_20_-_20_Small">Demand: <text:s/></text:span>To demand something to be returned to you means that you will not forgive someone unless they give back what was taken from you. Jesus wants us to forgive people who wrong us, whether they ever give back what they took, or not.</text:p>
          </text:list-item>
        </text:list>
        <text:p text:style-name="P93">Demand: <text:s/>To demand something to be returned to you means that you will not forgive someone unless they give back what was taken from you. Jesus wants us to forgive people who wrong us, whether they ever give back what they took, or not.</text:p>
        <text:list xml:id="list92017881986922" text:continue-numbering="true" text:style-name="Bullet_20_-_20_Diamond">
          <text:list-item>
            <text:p text:style-name="P92"><text:span text:style-name="Body_20_Emphasized_20_-_20_Small">Others: <text:s/></text:span>This means ALL people: strangers, family, friends, neighbors-anyone! Jesus is telling us how to treat ALL the people around us. Whether we like them or not.</text:p>
          </text:list-item>
        </text:list>
        <text:p text:style-name="P93">Others: <text:s/>This means ALL people: strangers, family, friends, neighbors-anyone! Jesus is telling us how to treat ALL the people around us. Whether we like them or not.</text:p>
        <text:list xml:id="list92018265894502" text:continue-list="list92017737495939" text:style-name="WWNum1">
          <text:list-item>
            <text:p text:style-name="P107">Read the verse again by yourself as you point to the words.</text:p>
          </text:list-item>
          <text:list-item>
            <text:p text:style-name="P107">Read the verse again with the children as you point to the words.</text:p>
          </text:list-item>
        </text:list>
        <text:p text:style-name="P94">Jesus tells us to think about how we want to be treated by other people. This is how we are to treat others. Do you want to be treated nicely, or badly? I am sure you want people to be nice to you. Jesus says that is how you should treat all other people.</text:p>
        <text:p text:style-name="P95">Jesus tells us to think about how we want to be treated by other people. This is how we are to treat others. Do you want to be treated nicely, or badly? I am sure you want people to be nice to you. Jesus says that is how you should treat all other people.</text:p>
        <text:p text:style-name="P96">Remember our truth for the day? <text:s/>Let’s all say it together:</text:p>
        <text:p text:style-name="P97">Remember our truth for the day? <text:s/>Let’s all say it together:</text:p>
        <text:p text:style-name="P96">A true disciple of Jesus is generous.</text:p>
        <text:p text:style-name="P97">A true disciple of Jesus is generous.</text:p>
        <text:p text:style-name="P84">Memory Verse Review</text:p>
        <text:p text:style-name="P85">Children Repeat the Verse by Using Movements</text:p>
        <text:list xml:id="list92019741087059" text:continue-list="list92018994514984" text:style-name="Bullet_20_-_20_checkmark">
          <text:list-item>
            <text:p text:style-name="P86">Talk about different movements with our bodies: Your hands on your head, standing on one foot, jumping up and down, touching your toes....</text:p>
          </text:list-item>
          <text:list-item>
            <text:p text:style-name="P90">Ask the children the first question.</text:p>
          </text:list-item>
          <text:list-item>
            <text:p text:style-name="P90">When a question is answered correctly, that child chooses one of the movements listed above or chooses their own movement.</text:p>
          </text:list-item>
          <text:list-item>
            <text:p text:style-name="P90">The verse is said out loud together while doing the movement.</text:p>
          </text:list-item>
          <text:list-item>
            <text:p text:style-name="P90">Then the next question is asked.</text:p>
          </text:list-item>
          <text:list-item>
            <text:p text:style-name="P90"><text:soft-page-break/>When that question is answered correctly, another child chooses one of the movements.</text:p>
          </text:list-item>
          <text:list-item>
            <text:p text:style-name="P90">The verse is said aloud again while doing the movement.</text:p>
          </text:list-item>
          <text:list-item>
            <text:p text:style-name="P90">Do this until all the questions are asked.</text:p>
          </text:list-item>
        </text:list>
        <text:p text:style-name="P105">Questions for Memory Verse</text:p>
        <text:list text:style-name="L6">
          <text:list-item text:start-value="1">
            <text:p text:style-name="P108">Where is today's memory verse found? <text:s/>( <text:s/>Luke 6:30-31 <text:s/>)</text:p>
          </text:list-item>
        </text:list>
        <text:p text:style-name="P88">Where is today's memory verse found? <text:s/>( <text:s/>Luke 6:30-31 <text:s/>)</text:p>
        <text:list text:continue-numbering="true" text:style-name="L6">
          <text:list-item>
            <text:p text:style-name="P108">How does Jesus want us to treat others? (In the same way we want to be treated)</text:p>
          </text:list-item>
        </text:list>
        <text:p text:style-name="P88">How does Jesus want us to treat others? (In the same way we want to be treated)</text:p>
        <text:list text:continue-numbering="true" text:style-name="L6">
          <text:list-item>
            <text:p text:style-name="P108">If someone takes something from us, what does Jesus tell us NOT to do? (Demand things taken from us to be given back)</text:p>
          </text:list-item>
        </text:list>
        <text:p text:style-name="P88">If someone takes something from us, what does Jesus tell us NOT to do? (Demand things taken from us to be given back)</text:p>
        <text:list text:continue-numbering="true" text:style-name="L6">
          <text:list-item>
            <text:p text:style-name="P108">What does Jesus want us to to do when people ask for something from us? (We should give it to them.)</text:p>
          </text:list-item>
        </text:list>
        <text:p text:style-name="P88">What does Jesus want us to to do when people ask for something from us? (We should give it to them.)</text:p>
        <text:list text:continue-numbering="true" text:style-name="L6">
          <text:list-item>
            <text:p text:style-name="P108">If we like it when people help us, should we help others? (Yes)</text:p>
          </text:list-item>
        </text:list>
        <text:p text:style-name="P88">If we like it when people help us, should we help others? (Yes)</text:p>
        <text:list text:continue-numbering="true" text:style-name="L6">
          <text:list-item>
            <text:p text:style-name="P108">If we like it when people are honest with us, should we be honest with them? (Yes)</text:p>
          </text:list-item>
        </text:list>
        <text:p text:style-name="P88">If we like it when people are honest with us, should we be honest with them? (Yes)</text:p>
        <text:list text:continue-numbering="true" text:style-name="L6">
          <text:list-item>
            <text:p text:style-name="P108">Should we be kind to only people we like? (No. Jesus tells us to treat ALL people with kindness, whether we like them or not.)</text:p>
          </text:list-item>
        </text:list>
        <text:p text:style-name="P88">Should we be kind to only people we like? (No. Jesus tells us to treat ALL people with kindness, whether we like them or not.)</text:p>
        <text:list text:continue-numbering="true" text:style-name="L6">
          <text:list-item>
            <text:p text:style-name="P108">What should we do to people who do wrong against us and then ask for forgiveness? (We should forgive those who do wrong against us because, that is how we want to be treated.)</text:p>
          </text:list-item>
        </text:list>
        <text:p text:style-name="P88">What should we do to people who do wrong against us and then ask for forgiveness? (We should forgive those who do wrong against us because, that is how we want to be treated.)</text:p>
        <text:p text:style-name="P83">Song</text:p>
        <text:p text:style-name="P84">Closing and Homework</text:p>
        <text:list text:continue-list="list92019741087059" text:style-name="Bullet_20_-_20_checkmark">
          <text:list-item>
            <text:p text:style-name="P86">Say the truth together:</text:p>
          </text:list-item>
        </text:list>
        <text:p text:style-name="P87">A true disciple of Jesus is generous.</text:p>
        <text:p text:style-name="P88">A true disciple of Jesus is generous.</text:p>
        <text:list text:continue-numbering="true" text:style-name="Bullet_20_-_20_checkmark">
          <text:list-item>
            <text:p text:style-name="P86">Say the memory verse together:</text:p>
          </text:list-item>
        </text:list>
        <text:p text:style-name="P87">Luke 6:30-31 Give to everyone who asks you, and do not ask for your possessions back from the person who takes them away. Treat others in the same way that you would want them to treat you.</text:p>
        <text:p text:style-name="P88">Luke 6:30-31 Give to everyone who asks you, and do not ask for your possessions back from the person who takes them away. Treat others in the same way that you would want them to treat you.</text:p>
        <text:list text:continue-numbering="true" text:style-name="Bullet_20_-_20_checkmark">
          <text:list-item>
            <text:p text:style-name="P86">Review the homework:</text:p>
          </text:list-item>
        </text:list>
        <text:p text:style-name="P87">Who can you be generous to this week? Who can you treat with kindness? Who in your family, friends, and schoolmates can you show patience to? Think of these people, then pray and ask God to help you.</text:p>
        <text:p text:style-name="P88">Who can you be generous to this week? Who can you treat with kindness? Who in your family, friends, and schoolmates can you show patience to? Think of these people, then pray and ask God to help you.</text:p>
        <text:list xml:id="list92019521985462" text:continue-numbering="true" text:style-name="Bullet_20_-_20_checkmark">
          <text:list-item>
            <text:p text:style-name="P86">Give any needed announcements.</text:p>
          </text:list-item>
        </text:list>
        <text:p text:style-name="P85">Closing Prayer</text:p>
        <text:p text:style-name="P109"><text:span text:style-name="Body_20_Emphasized_20_-_20_Small">Thank God <text:s/></text:span>that we are children of God, and that we can go to Him if we come to any troubles.</text:p>
        <text:p text:style-name="P109"><text:span text:style-name="Body_20_Emphasized_20_-_20_Small">Ask God <text:s/></text:span>that the children will remember to treat others with kindness and generosity.</text:p>
        <text:p text:style-name="P110">Colouring page to colour and take home!</text:p>
        <text:p text:style-name="Body"/>
      </text:section>
      <text:p text:style-name="P54">A true disciple of Jesus is generous.</text:p>
      <text:p text:style-name="Bible_20_Story_20_-_20_Graphic_20_Number"><draw:frame draw:style-name="fr9" draw:name="Image15" text:anchor-type="as-char" svg:width="5.2563in" svg:height="4.7543in" draw:z-index="63"><draw:image xlink:href="Pictures/100000000000033B000002EC39C14883.jpg" xlink:type="simple" xlink:show="embed" xlink:actuate="onLoad" draw:mime-type="image/jpeg"/></draw:frame></text:p>
      <text:p text:style-name="M.T._20_Coloring_20_Page_20_-_20_Memory_20_Verse">Luke 6:30-31 Give to everyone who asks you, and do not ask for your possessions back from the person who takes them away. Treat others in the same way that you would want them to treat you.</text:p>
      <text:p text:style-name="P55">A true disciple of Jesus is generous.</text:p>
      <text:p text:style-name="Bible_20_Story_20_-_20_Graphic_20_Number"><draw:frame draw:style-name="fr9" draw:name="Image14" text:anchor-type="as-char" svg:width="5.2563in" svg:height="4.7543in" draw:z-index="64"><draw:image xlink:href="Pictures/100000000000033B000002EC39C14883.jpg" xlink:type="simple" xlink:show="embed" xlink:actuate="onLoad" draw:mime-type="image/jpeg"/></draw:frame></text:p>
      <text:p text:style-name="Bible_20_Story_20_-_20_Graphic_20_Number">Luke 6:30-31 Give to everyone who asks you, and do not ask for your possessions back from the person who takes them away. Treat others in the same way that you would want them to treat you.</text:p>
      <text:h text:style-name="P25" text:outline-level="1"><draw:frame draw:style-name="fr3" draw:name="Image17" text:anchor-type="char" svg:x="0in" svg:y="0.0161in" svg:width="1.0752in" svg:height="1.0752in" draw:z-index="70"><draw:image xlink:href="Pictures/10000001000000D8000000D8C767AAAF.png" xlink:type="simple" xlink:show="embed" xlink:actuate="onLoad" draw:mime-type="image/png"/></draw:frame>A True Disciple of Jesus Bears Good Fruit</text:h>
      <text:p text:style-name="M.T._20_Lesson_20_Title">A True Disciple of Jesus Bears Good Fruit</text:p>
      <text:p text:style-name="English_20_Translation_20_-_20_Lesson_20_title">A True Disciple of Jesus Bears Good Fruit</text:p>
      <text:p text:style-name="M.T._20_Text_20_-_20_Lesson_20_Title_20_Scrip_20_Reference">Luke <text:s/>6:43-44</text:p>
      <text:p text:style-name="Part_20_Heading">Lesson Overview</text:p>
      <table:table table:name="Table7" table:style-name="Table7">
        <table:table-column table:style-name="Table7.A"/>
        <table:table-column table:style-name="Table7.B"/>
        <table:table-row>
          <table:table-cell table:style-name="Table7.A1" office:value-type="string">
            <text:p text:style-name="Table_20_Left_20_headings">Today’s Truth</text:p>
          </table:table-cell>
          <table:table-cell table:style-name="Table7.B1" office:value-type="string">
            <text:p text:style-name="M.T._20_Text">A true disciple of Jesus bears good fruit.</text:p>
            <text:p text:style-name="English_20_translation">A true disciple of Jesus bears good fruit.</text:p>
          </table:table-cell>
        </table:table-row>
        <table:table-row>
          <table:table-cell table:style-name="Table7.A1" office:value-type="string">
            <text:p text:style-name="Table_20_Left_20_headings">Objective</text:p>
          </table:table-cell>
          <table:table-cell table:style-name="Table7.B2" office:value-type="string">
            <text:p text:style-name="Body_20_Tight_20_lines"><text:span text:style-name="Body_20_Emphasized_20_-_20_Small">KNOW: <text:s/></text:span>The children will know how to bear good fruit.</text:p>
            <text:p text:style-name="Body_20_Tight_20_lines"><text:span text:style-name="Body_20_Emphasized_20_-_20_Small">DO:</text:span> <text:s/>The children will pray and ask God to help them make good choices, so that they could bear good fruit.</text:p>
          </table:table-cell>
        </table:table-row>
        <table:table-row>
          <table:table-cell table:style-name="Table7.A1" office:value-type="string">
            <text:p text:style-name="Table_20_Left_20_headings">Materials</text:p>
          </table:table-cell>
          <table:table-cell table:style-name="Table7.B3" office:value-type="string">
            <text:list xml:id="list92019109675386" text:continue-list="list92018528982369"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table-cell table:style-name="Table7.A1" office:value-type="string">
            <text:p text:style-name="Table_20_Left_20_headings">Memory Verse</text:p>
          </table:table-cell>
          <table:table-cell table:style-name="Table7.B3" office:value-type="string">
            <text:p text:style-name="M.T._20_Text">Luke 6:43 No good tree bears bad fruit, nor does a bad tree bear good fruit.</text:p>
            <text:p text:style-name="English_20_translation">Luke 6:43 No good tree bears bad fruit, nor does a bad tree bear good fruit.</text:p>
          </table:table-cell>
        </table:table-row>
        <table:table-row>
          <table:table-cell table:style-name="Table7.A1" office:value-type="string">
            <text:p text:style-name="Table_20_Left_20_headings">Homework</text:p>
          </table:table-cell>
          <table:table-cell table:style-name="Table7.B3" office:value-type="string">
            <text:p text:style-name="M.T._20_Text">This week, pray every day and ask Jesus to help you make good choices. That will help you grow into a good tree that bears good fruit.</text:p>
            <text:p text:style-name="English_20_translation">This week, pray every day and ask Jesus to help you make good choices. That will help you grow into a good tree that bears good fruit.</text:p>
          </table:table-cell>
        </table:table-row>
      </table:table>
      <text:p text:style-name="Body_20_-_20_Small_20_Spacer"/>
      <text:p text:style-name="Part_20_Heading">Detailed Lesson Plan</text:p>
      <text:section text:style-name="Sect1" text:name="L-17 Detail Plan">
        <text:p text:style-name="P111">Song</text:p>
        <text:p text:style-name="P112">Opening</text:p>
        <text:p text:style-name="P113">Welcome</text:p>
        <text:list text:continue-list="list92019521985462" text:style-name="Bullet_20_-_20_checkmark">
          <text:list-item>
            <text:p text:style-name="P114">Be sure the children know you are happy to see them!</text:p>
          </text:list-item>
          <text:list-item>
            <text:p text:style-name="P114">Introduce yourself and your helpers.</text:p>
          </text:list-item>
        </text:list>
        <text:p text:style-name="P113">Sharing Time</text:p>
        <text:list text:continue-numbering="true" text:style-name="Bullet_20_-_20_checkmark">
          <text:list-item>
            <text:p text:style-name="P114">Say the truth from the previous lesson together:</text:p>
          </text:list-item>
        </text:list>
        <text:p text:style-name="P115">A true disciple of Jesus is generous.</text:p>
        <text:p text:style-name="P116">A true disciple of Jesus is generous.</text:p>
        <text:list text:continue-numbering="true" text:style-name="Bullet_20_-_20_checkmark">
          <text:list-item>
            <text:p text:style-name="P114">Say the memory verse from the previous lesson together:</text:p>
          </text:list-item>
        </text:list>
        <text:p text:style-name="P115">Luke 6:30-31 Give to everyone who asks you, and do not ask for your possessions back from the person who takes them away. Treat others in the same way that you would want them to treat you.</text:p>
        <text:p text:style-name="P116">Luke 6:30-31 Give to everyone who asks you, and do not ask for your possessions back from the person who takes them away. Treat others in the same way that you would want them to treat you.</text:p>
        <text:list text:continue-numbering="true" text:style-name="Bullet_20_-_20_checkmark">
          <text:list-item>
            <text:p text:style-name="P114">Review the homework from the previous lesson:</text:p>
          </text:list-item>
        </text:list>
        <text:p text:style-name="P115">The homework was to be generous to someone in your family, in your group of friends, or a schoolmate. Did you ask God to help you to be kind to them? Who was it? What did you do or say to them?</text:p>
        <text:p text:style-name="P116">The homework was to be generous to someone in your family, in your group of friends, or a schoolmate. Did you ask God to help you to be kind to them? Who was it? What did you do or say to them?</text:p>
        <text:p text:style-name="P117">(Give children time to share.)</text:p>
        <text:p text:style-name="P113">Prayer</text:p>
        <text:list text:continue-numbering="true" text:style-name="Bullet_20_-_20_checkmark">
          <text:list-item>
            <text:p text:style-name="P114">Let the children share praises and prayer requests.</text:p>
          </text:list-item>
          <text:list-item>
            <text:p text:style-name="P118">Keep a record of what the children are sharing so you can remember to thank God together for answered prayers.</text:p>
          </text:list-item>
          <text:list-item>
            <text:p text:style-name="P118"><text:soft-page-break/>Spend time praying together. <text:s/>Let children pray out loud if they volunteer. <text:s/>Do not force anyone to pray out loud.</text:p>
          </text:list-item>
        </text:list>
        <text:p text:style-name="P111">Song</text:p>
        <text:p text:style-name="P112">Words to Discuss</text:p>
        <text:list xml:id="list92018771579799" text:continue-numbering="true" text:style-name="Bullet_20_-_20_checkmark">
          <text:list-item>
            <text:p text:style-name="P114">On the blackboard, write the “Words to Discuss” from the list below.</text:p>
          </text:list-item>
          <text:list-item>
            <text:p text:style-name="P119">Let's discuss some words to help us better understand the Bible story for today.</text:p>
          </text:list-item>
        </text:list>
        <text:p text:style-name="P116">Let's discuss some words to help us better understand the Bible story for today.</text:p>
        <text:list text:continue-list="list92017881986922" text:style-name="Bullet_20_-_20_Diamond">
          <text:list-item>
            <text:p text:style-name="P120"><text:span text:style-name="Body_20_Emphasized_20_-_20_Small">Good Fruit: <text:s/></text:span>You make good fruit by doing good actions: being honest, being kind, being generous and helpful.</text:p>
          </text:list-item>
        </text:list>
        <text:p text:style-name="P121">Good Fruit: <text:s/>You make good fruit by doing good actions: being honest, being kind, being generous and helpful.</text:p>
        <text:list text:continue-numbering="true" text:style-name="Bullet_20_-_20_Diamond">
          <text:list-item>
            <text:p text:style-name="P120"><text:span text:style-name="Body_20_Emphasized_20_-_20_Small">Bad Fruit: <text:s/></text:span>Anything that goes against what God stands for, actions and things we do that are bad.</text:p>
          </text:list-item>
        </text:list>
        <text:p text:style-name="P121">Bad Fruit: <text:s/>Anything that goes against what God stands for, actions and things we do that are bad.</text:p>
        <text:list xml:id="list92018560813274" text:continue-numbering="true" text:style-name="Bullet_20_-_20_Diamond">
          <text:list-item>
            <text:p text:style-name="P120"><text:span text:style-name="Body_20_Emphasized_20_-_20_Small">Recognized: <text:s/></text:span>To notice or bring attention to.</text:p>
          </text:list-item>
        </text:list>
        <text:p text:style-name="P121">Recognized: <text:s/>To notice or bring attention to.</text:p>
        <text:p text:style-name="P111">Song</text:p>
        <text:p text:style-name="P112">Bible Story / Lesson</text:p>
        <text:p text:style-name="P122">Today we will be learning about how a true disciple of Jesus bears good fruit.</text:p>
        <text:p text:style-name="P123">Today we will be learning about how a true disciple of Jesus bears good fruit.</text:p>
        <text:p text:style-name="P113">Introduce Truth</text:p>
        <text:p text:style-name="P124">Our truth for today is: <text:s/>A true disciple of Jesus bears good fruit.</text:p>
        <text:p text:style-name="P125">Our truth for today is: <text:s/>A true disciple of Jesus bears good fruit.</text:p>
        <text:p text:style-name="P122">We've been learning what Jesus taught about how his true followers would live. We learned that they love all people, even their enemies. We also learned that a true follower of Jesus is generous and shares with others. This week, Jesus teaches us that his true followers bear good fruit. What do you think it means to “bear good fruit”? Let me tell you a story that will help us understand.</text:p>
        <text:p text:style-name="P123">We've been learning what Jesus taught about how his true followers would live. We learned that they love all people, even their enemies. We also learned that a true follower of Jesus is generous and shares with others. This week, Jesus teaches us that his true followers bear good fruit. What do you think it means to “bear good fruit”? Let me tell you a story that will help us understand.</text:p>
        <text:p text:style-name="P126">Bible Story: <text:s/>A story from a village</text:p>
        <text:p text:style-name="P122">I want to tell you about two brothers, Ngum and Tata. Ngum was nine years old; Tata was eight years old. One day, their mother sent them to carry firewood.</text:p>
        <text:p text:style-name="P123">I want to tell you about two brothers, Ngum and Tata. Ngum was nine years old; Tata was eight years old. One day, their mother sent them to carry firewood.</text:p>
        <text:p text:style-name="P127"><draw:frame draw:style-name="fr4" draw:name="Frame23" text:anchor-type="paragraph" svg:x="-0.0181in" svg:y="0.0043in" svg:width="1.378in" draw:z-index="69"><draw:text-box fo:min-height="1.2055in"><text:p text:style-name="P128">Picture <text:s/>17–1</text:p><text:p text:style-name="P129"><draw:frame text:anchor-type="as-char" draw:z-index="23" draw:name="Shape1_0" draw:style-name="gr2" draw:text-style-name="P72" svg:width="1.2921in" svg:height="1.0043in"><draw:image xlink:href="Pictures/10000000000000EC000000A708EC76E1.jpg" xlink:type="simple" xlink:show="embed" xlink:actuate="onLoad" draw:mime-type="image/jpeg"><text:p/></draw:image></draw:frame></text:p></draw:text-box></draw:frame>On their way back, they saw their friends rushing to Ma Nungu's compound. They decided to follow. Ma Nungu was holding her weekly Bible Club. The boys decided to stay and see what it was like. They left their firewood outside the compound door.</text:p>
        <text:p text:style-name="P127">Ma Nungu led the club. They sang songs, played a game, and then they listened to a story about bearing good and bad fruit. At the end, Ma Nungu asked if those who were bearing bad fruit wanted to have their sins forgiven so that they could have eternal life, and start to bear good fruit. Both Ngum and Tata put up their hands and prayed with Ma.</text:p>
        <text:p text:style-name="P130">On their way back, they saw their friends rushing to Ma Nungu's compound. They decided to follow. Ma Nungu was holding her weekly Bible Club. The boys decided to stay and see what it was like. They left their firewood outside the compound door.</text:p>
        <text:p text:style-name="P130">Ma Nungu led the club. They sang songs, played a game, and then they listened to a story about bearing good and bad fruit. At the end, Ma Nungu asked if those who were bearing bad fruit wanted to have their sins forgiven so that they could have eternal life, and start to bear good fruit. Both Ngum and Tata put up their hands and prayed with Ma.</text:p>
        <text:p text:style-name="P127"><draw:frame draw:style-name="fr4" draw:name="Frame14" text:anchor-type="paragraph" svg:x="-0.0181in" svg:y="0.0035in" svg:width="1.378in" draw:z-index="68"><draw:text-box fo:min-height="1.2055in"><text:p text:style-name="P128">Picture <text:s/>17–2</text:p><text:p text:style-name="P129"><draw:frame text:anchor-type="as-char" draw:z-index="14" draw:name="Shape2_0" draw:style-name="gr2" draw:text-style-name="P72" svg:width="1.2921in" svg:height="0.9453in"><draw:image xlink:href="Pictures/10000000000000EC000000A7DF05098C.jpg" xlink:type="simple" xlink:show="embed" xlink:actuate="onLoad" draw:mime-type="image/jpeg"><text:p/></draw:image></draw:frame></text:p></draw:text-box></draw:frame>It was getting late, so Ngum and Tata needed to rush home. They left Ma Nungu's compound, but found that their firewood had been taken! It was too late to find more, so they just had to go home.</text:p>
        <text:p text:style-name="P127">Once they reached the house, their mother was angry. She asked, “Where have you been? Where is your firewood?” Ngum spoke first, he said, “Big boys met us on the way <text:soft-page-break/>and took our firewood. There was nothing we could do!” Tata said, “That is not true! We stopped at Ma Nungu's compound. She was having a Bible Club for children. It was great, and we prayed to have our sins forgiven!” Ngum looked angrily at Tata.</text:p>
        <text:p text:style-name="P130">It was getting late, so Ngum and Tata needed to rush home. They left Ma Nungu's compound, but found that their firewood had been taken! It was too late to find more, so they just had to go home.</text:p>
        <text:p text:style-name="P130">Once they reached the house, their mother was angry. She asked, “Where have you been? Where is your firewood?” Ngum spoke first, he said, “Big boys met us on the way and took our firewood. There was nothing we could do!” Tata said, “That is not true! We stopped at Ma Nungu's compound. She was having a Bible Club for children. It was great, and we prayed to have our sins forgiven!” Ngum looked angrily at Tata.</text:p>
        <text:p text:style-name="P127"><draw:frame draw:style-name="fr4" draw:name="Frame33" text:anchor-type="paragraph" svg:x="-0.0181in" svg:y="0.0035in" svg:width="1.378in" draw:z-index="67"><draw:text-box fo:min-height="1.2055in"><text:p text:style-name="P128">Picture <text:s/>17–3</text:p><text:p text:style-name="P129"><draw:frame text:anchor-type="as-char" draw:z-index="20" draw:name="Shape3_0" draw:style-name="gr2" draw:text-style-name="P72" svg:width="1.2921in" svg:height="0.9134in"><draw:image xlink:href="Pictures/10000000000000EC000000A7415CF437.jpg" xlink:type="simple" xlink:show="embed" xlink:actuate="onLoad" draw:mime-type="image/jpeg"><text:p/></draw:image></draw:frame></text:p></draw:text-box></draw:frame>The next day, Ngum was still angry. His mother was not happy with him. She told him that he would have to go collect the firewood alone for having lied to her. Tata went along with Ngum to help. Even though he had told the truth, he still knew he was also to blame for the firewood not reaching the house. Ngum ran ahead, not wanting to walk with Tata. Along the way, Ngum met his small sister. He was so angry, he decided to beat her. Tata saw this, and ran to protect his sister from Ngum. Tata started shouting for someone to come help them. Ngum ran off. Tata comforted his small sister, and shared some groundnuts that he had in his pocket.</text:p>
        <text:p text:style-name="P130">The next day, Ngum was still angry. His mother was not happy with him. She told him that he would have to go collect the firewood alone for having lied to her. Tata went along with Ngum to help. Even though he had told the truth, he still knew he was also to blame for the firewood not reaching the house. Ngum ran ahead, not wanting to walk with Tata. Along the way, Ngum met his small sister. He was so angry, he decided to beat her. Tata saw this, and ran to protect his sister from Ngum. Tata started shouting for someone to come help them. Ngum ran off. Tata comforted his small sister, and shared some groundnuts that he had in his pocket. </text:p>
        <text:p text:style-name="P127"><draw:frame draw:style-name="fr4" draw:name="Frame43" text:anchor-type="paragraph" svg:x="-0.0181in" svg:y="0.0035in" svg:width="1.378in" draw:z-index="66"><draw:text-box fo:min-height="1.2055in"><text:p text:style-name="P128">Picture <text:s/>17–4</text:p><text:p text:style-name="P129"><draw:frame text:anchor-type="as-char" draw:z-index="25" draw:name="Shape4_0" draw:style-name="gr2" draw:text-style-name="P72" svg:width="1.2921in" svg:height="0.9134in"><draw:image xlink:href="Pictures/100000000000036C0000026BE04CD1DB.jpg" xlink:type="simple" xlink:show="embed" xlink:actuate="onLoad" draw:mime-type="image/jpeg"><text:p/></draw:image></draw:frame></text:p></draw:text-box></draw:frame>A week later, things had calmed down. Ngum and Tata were now playing together again. Ngum was no longer angry. As they were working around the house, they found their mother's handbag on the ground, money had fallen out of it. Ngum said, “Look, let's take the money. I really want to buy some sweets. Mama said I couldn't, but now I can!” Tata said, “No, it is not right for us to take that money, that is stealing. Don't you remember that we prayed to have our sins forgiven?” Ngum just looked at Tata, snatched up the money, and ran off. <text:s text:c="3"/></text:p>
        <text:p text:style-name="P130">A week later, things had calmed down. Ngum and Tata were now playing together again. Ngum was no longer angry. As they were working around the house, they found their mother's handbag on the ground, money had fallen out of it. Ngum said, “Look, let's take the money. I really want to buy some sweets. Mama said I couldn't, but now I can!” Tata said, “No, it is not right for us to take that money, that is stealing. Don't you remember that we prayed to have our sins forgiven?” Ngum just looked at Tata, snatched up the money, and ran off.</text:p>
        <text:p text:style-name="P127">Ngum went to buy the sweets with his mother's money. On the way home, some other boys saw him enjoying his sweets and asked him to share. He said, “No, they are mine! I don't want to share, and I don't have to share!” The boys said he was selfish. Ngum became angry and started fighting with them.</text:p>
        <text:p text:style-name="P127">Once Ngum reached the house, his mother saw how his clothes were torn and he was covered in dirt. She asked him, “What happened?” He told her, “The boys in the village attacked me!” “Why?” She asked. Ngum said he didn't know. His mother then said, “Tata told me you took money from my handbag, and went to buy sweets. Did the boys try to take the sweets you bought?” Ngum's head sank, and he said, “Yes Mama, I took your money and bought sweets. The boys asked me to share, but I didn't want to. So, the boys said that I was selfish. That made me angry, so I attacked them.”</text:p>
        <text:p text:style-name="P130">Ngum went to buy the sweets with his mother's money. On the way home, some other boys saw him enjoying his sweets and asked him to share. He said, “No, they are mine! I don't want to share, and I don't have to share!” The boys said he was selfish. Ngum became angry and started fighting with them.</text:p>
        <text:p text:style-name="P130">Once Ngum reached the house, his mother saw how his clothes were torn and he was covered in dirt. She asked him, “What happened?” He told her, “The boys in the village attacked me!” “Why?” She asked. Ngum said he didn't know. His mother then said, “Tata told me you took money from my handbag, and went to buy sweets. Did the boys try to take the sweets you bought?” Ngum's head sank, and he said, “Yes Mama, I took your money and bought sweets. The boys asked me to share, but I didn't want to. So, the boys said that I was selfish. That made me angry, so I attacked them.”</text:p>
        <text:p text:style-name="P127"><draw:frame draw:style-name="fr4" draw:name="Frame61" text:anchor-type="paragraph" svg:x="-0.0181in" svg:y="0.0035in" svg:width="1.378in" draw:z-index="65"><draw:text-box fo:min-height="1.2055in"><text:p text:style-name="P128">Picture <text:s/>17–5</text:p><text:p text:style-name="P129"><draw:frame text:anchor-type="as-char" draw:z-index="31" draw:name="Shape5_0" draw:style-name="gr2" draw:text-style-name="P72" svg:width="1.2921in" svg:height="0.9134in"><draw:image xlink:href="Pictures/10000000000000EC000000A7FF339516.jpg" xlink:type="simple" xlink:show="embed" xlink:actuate="onLoad" draw:mime-type="image/jpeg"><text:p/></draw:image></draw:frame></text:p></draw:text-box></draw:frame>That night as Ngum and Tata were getting ready to sleep, Ngum started to cry. “Why do I keep doing all these wrong things? I prayed the same prayer you prayed that day at Ma Nungu's compound. You are different, but I keep getting into trouble!” Tata replied that when he prayed to have Jesus forgive his sins and to live in his life, he was not just saying some special words. He prayed and believed with his whole heart, then he asked <text:soft-page-break/>Jesus every day to help him do what is right. Tata and Ngum prayed together. This time, Ngum prayed and believed with his whole heart.</text:p>
        <text:p text:style-name="P130">That night as Ngum and Tata were getting ready to sleep, Ngum started to cry. “Why do I keep doing all these wrong things? I prayed the same prayer you prayed that day at Ma Nungu's compound. You are different, but I keep getting into trouble!” Tata replied that when he prayed to have Jesus forgive his sins and to live in his life, he was not just saying some special words. He prayed and believed with his whole heart, then he asked Jesus every day to help him do what is right. Tata and Ngum prayed together. This time, Ngum prayed and believed with his whole heart. </text:p>
        <text:p text:style-name="P113">Application</text:p>
        <text:p text:style-name="P122">Even though you may have already asked Jesus into your heart, are you really following him? To be a true disciple of Jesus, you believe with all of your heart. If you believe with all of your heart, and you are reading your Bible, it will show in your life. Stealing, lying, are things that Jesus does not want us to do. If we truly follow Jesus, we will want to do what is right, we will want to live like Jesus. Did Jesus steal, fight, and hurt others? No, he lived by the Spirit, which is to show love to everyone. We are to live like Jesus.</text:p>
        <text:p text:style-name="P123">Even though you may have already asked Jesus into your heart, are you really following him? To be a true disciple of Jesus, you believe with all of your heart. If you believe with all of your heart, and you are reading your Bible, it will show in your life. Stealing, lying, are things that Jesus does not want us to do. If we truly follow Jesus, we will want to do what is right, we will want to live like Jesus. Did Jesus steal, fight, and hurt others? No, he lived by the Spirit, which is to show love to everyone. We are to live like Jesus.</text:p>
        <text:p text:style-name="P124">A true disciple of Jesus bears good fruit.</text:p>
        <text:p text:style-name="P125">A true disciple of Jesus bears good fruit.</text:p>
        <text:p text:style-name="P131">Homework</text:p>
        <text:p text:style-name="P122">This week, pray every day and ask Jesus to help you make good choices. That will help you grow into a good tree that bears good fruit.</text:p>
        <text:p text:style-name="P123">This week, pray every day and ask Jesus to help you make good choices. That will help you grow into a good tree that bears good fruit.</text:p>
        <text:p text:style-name="P111">Prayer / Song</text:p>
        <text:p text:style-name="P112">Review Game</text:p>
        <text:p text:style-name="P113">Throw Bottle Caps into Containers</text:p>
        <text:p text:style-name="P131">Materials</text:p>
        <text:list text:continue-list="list92018771579799" text:style-name="Bullet_20_-_20_checkmark">
          <text:list-item>
            <text:p text:style-name="P114">Draw a line for the children to stand behind.</text:p>
          </text:list-item>
          <text:list-item>
            <text:p text:style-name="P118">Arrange 5-10 different sized containers or cups (you can also use shoes or hats/caps) into a group a distance from the line.</text:p>
          </text:list-item>
          <text:list-item>
            <text:p text:style-name="P118">Put one small paper with points written on it inside each container.</text:p>
          </text:list-item>
          <text:list-item>
            <text:p text:style-name="P118">Collect 2 bottle caps, stones, or other small things to throw and set them on the line that you drew for the children to stand behind.</text:p>
          </text:list-item>
        </text:list>
        <text:p text:style-name="P131">How to Play</text:p>
        <text:list xml:id="list92018618526743" text:continue-numbering="true" text:style-name="Bullet_20_-_20_checkmark">
          <text:list-item>
            <text:p text:style-name="P114">Divide the class into 2 teams.</text:p>
          </text:list-item>
          <text:list-item>
            <text:p text:style-name="P118">The first team tries to answer the first question. <text:s/>The teacher can use this time to explain what the children do not seem to understand.</text:p>
          </text:list-item>
          <text:list-item>
            <text:p text:style-name="P118">The child on the team that answers the question correctly comes to the front and stands behind the line. <text:s/>If the child only gets part of the question right, the teacher can fill in the rest.</text:p>
          </text:list-item>
          <text:list-item>
            <text:p text:style-name="P118">The child then tries to throw the bottle cap into the group of containers. <text:s/>Wherever the bottle cap enters, the points on the paper inside that container are what the team has.</text:p>
          </text:list-item>
          <text:list-item>
            <text:p text:style-name="P118">Record the points. <text:s/><text:span text:style-name="T1">The team with the most points wins.</text:span></text:p>
          </text:list-item>
          <text:list-item>
            <text:p text:style-name="P118">Be sure to clap for both sides. <text:s/>No name-calling. <text:s/>Encourage good sportsmanship.</text:p>
          </text:list-item>
        </text:list>
        <text:p text:style-name="P131">Questions for Review Game</text:p>
        <text:list text:style-name="L7">
          <text:list-item>
            <text:p text:style-name="P132">What is one way we have learned how a true follower of Jesus lives? <text:s/>( <text:s/>True disciples of Jesus love their enemies. <text:s/>)</text:p>
          </text:list-item>
        </text:list>
        <text:p text:style-name="P116">What is one way we have learned how a true follower of Jesus lives? <text:s/>( <text:s/>True disciples of Jesus love their enemies. <text:s/>)</text:p>
        <text:list text:continue-numbering="true" text:style-name="L7">
          <text:list-item>
            <text:p text:style-name="P132">What is another way we have learned how a true follower of Jesus lives? <text:s/>( <text:s/>A true disciple of Jesus is generous. <text:s/>)</text:p>
          </text:list-item>
        </text:list>
        <text:p text:style-name="P116">What is another way we have learned how a true follower of Jesus lives? <text:s/>( <text:s/>A true disciple of Jesus is generous. <text:s/>)</text:p>
        <text:list text:continue-numbering="true" text:style-name="L7">
          <text:list-item>
            <text:p text:style-name="P132">What did we learn today how a true follower of Jesus lives? <text:s/>( <text:s/>A true disciple of Jesus bears good fruit. <text:s/>)</text:p>
          </text:list-item>
        </text:list>
        <text:p text:style-name="P116">What did we learn today how a true follower of Jesus lives? <text:s/>( <text:s/>A true disciple of Jesus bears good fruit. <text:s/>)</text:p>
        <text:list text:continue-numbering="true" text:style-name="L7">
          <text:list-item>
            <text:p text:style-name="P132"><text:soft-page-break/>What does it mean to bear good fruit? (Do good things)</text:p>
          </text:list-item>
        </text:list>
        <text:p text:style-name="P116">What does it mean to bear good fruit? (Do good things)</text:p>
        <text:list text:continue-numbering="true" text:style-name="L7">
          <text:list-item>
            <text:p text:style-name="P132">Who in the story today bore good fruit? (Tata)</text:p>
          </text:list-item>
        </text:list>
        <text:p text:style-name="P116">Who in the story today bore good fruit? (Tata)</text:p>
        <text:list text:continue-numbering="true" text:style-name="L7">
          <text:list-item>
            <text:p text:style-name="P132">What were some of the good actions that Tata did to show he was a follower of Jesus? (Tata told the truth, even though it was hard.)</text:p>
          </text:list-item>
        </text:list>
        <text:p text:style-name="P116">What were some of the good actions that Tata did to show he was a follower of Jesus? (Tata told the truth, even though it was hard.)</text:p>
        <text:list text:continue-numbering="true" text:style-name="L7">
          <text:list-item>
            <text:p text:style-name="P132">What is another action that Tata did to show he was a true follower of Jesus? (Tata also helped his brother.)</text:p>
          </text:list-item>
        </text:list>
        <text:p text:style-name="P116">What is another action that Tata did to show he was a true follower of Jesus? (Tata also helped his brother.)</text:p>
        <text:list text:continue-numbering="true" text:style-name="L7">
          <text:list-item>
            <text:p text:style-name="P132">What is another good action that Tata did to show that he was a follower of Jesus? (Another action that Tata did to show he was a true follower of Jesus, was he protected his younger sister.)</text:p>
          </text:list-item>
        </text:list>
        <text:p text:style-name="P116">What is another good action that Tata did to show that he was a follower of Jesus? (Another action that Tata did to show he was a true follower of Jesus, was he protected his younger sister.)<text:tab/></text:p>
        <text:list text:continue-numbering="true" text:style-name="L7">
          <text:list-item>
            <text:p text:style-name="P132">What is another good action that Tata did to show he was a follower of Jesus? (He did not steal from his mother's purse.)</text:p>
          </text:list-item>
        </text:list>
        <text:p text:style-name="P116">What is another good action that Tata did to show he was a follower of Jesus? (He did not steal from his mother's purse.)</text:p>
        <text:list text:continue-numbering="true" text:style-name="L7">
          <text:list-item>
            <text:p text:style-name="P132">Why was it hard for Ngum to do good things? (He did not pray with his whole heart to have Jesus in his life. He did not ask Jesus every day to help him make good decisions.)</text:p>
          </text:list-item>
        </text:list>
        <text:p text:style-name="P116">Why was it hard for Ngum to do good things? (He did not pray with his whole heart to have Jesus in his life. He did not ask Jesus every day to help him make good decisions.)</text:p>
        <text:p text:style-name="P111">Song</text:p>
        <text:p text:style-name="P112">Memory Verse</text:p>
        <text:p text:style-name="P131">Materials and Preparations</text:p>
        <text:list xml:id="list92018219072007" text:continue-list="list92018618526743" text:style-name="Bullet_20_-_20_checkmark">
          <text:list-item>
            <text:p text:style-name="P114">Put a bookmark in <text:s/>Luke 6:43</text:p>
          </text:list-item>
          <text:list-item>
            <text:p text:style-name="P114">Write memory verse on the blackboard.</text:p>
          </text:list-item>
        </text:list>
        <text:p text:style-name="P115">Luke 6:43 No good tree bears bad fruit, nor does a bad tree bear good fruit.</text:p>
        <text:p text:style-name="P116">Luke 6:43 No good tree bears bad fruit, nor does a bad tree bear good fruit.</text:p>
        <text:p text:style-name="P113">Teach and Explain</text:p>
        <text:p text:style-name="P124">Our memory verse is in the Gospel of Luke. <text:s/>That is in the New Testament, a part of the Bible.</text:p>
        <text:p text:style-name="P125">Our memory verse is in the Gospel of Luke. <text:s/>That is in the New Testament, a part of the Bible.</text:p>
        <text:list xml:id="list92018833936587" text:continue-list="list92018265894502" text:style-name="WWNum1">
          <text:list-item text:start-value="1">
            <text:p text:style-name="P133">Read the verse from your Bible.</text:p>
          </text:list-item>
          <text:list-item>
            <text:p text:style-name="P133">Read the verse by yourself as you point to the words.</text:p>
          </text:list-item>
          <text:list-item>
            <text:p text:style-name="P133">Read the verse with the children as you point to the words.</text:p>
          </text:list-item>
          <text:list-item>
            <text:p text:style-name="P133">Explain the verse:</text:p>
          </text:list-item>
        </text:list>
        <text:list text:continue-list="list92018219072007" text:style-name="Bullet_20_-_20_checkmark">
          <text:list-item>
            <text:p text:style-name="P119">Our memory verse comes from today’s Bible story.</text:p>
          </text:list-item>
        </text:list>
        <text:p text:style-name="P116">Our memory verse comes from today’s Bible story.</text:p>
        <text:list xml:id="list92018134675106" text:continue-numbering="true" text:style-name="Bullet_20_-_20_checkmark">
          <text:list-item>
            <text:p text:style-name="P114">As you read the verse, circle the words shown below. <text:s/>Explain each of these words.</text:p>
          </text:list-item>
        </text:list>
        <text:list text:continue-list="list92018560813274" text:style-name="Bullet_20_-_20_Diamond">
          <text:list-item>
            <text:p text:style-name="P120"><text:span text:style-name="Body_20_Emphasized_20_-_20_Small">Bad Fruit: <text:s/></text:span>What kind of fruit would you expect from a good mango tree? You would expect good mangoes, right? Of course! You wouldn't expect to get bad fruit from that tree.</text:p>
          </text:list-item>
        </text:list>
        <text:p text:style-name="P121">Bad Fruit: <text:s/>What kind of fruit would you expect from a good mango tree? You would expect good mangoes, right? Of course! You wouldn't expect to get bad fruit from that tree.</text:p>
        <text:list text:continue-numbering="true" text:style-name="Bullet_20_-_20_Diamond">
          <text:list-item>
            <text:p text:style-name="P120"><text:span text:style-name="Body_20_Emphasized_20_-_20_Small">Good Fruit: <text:s/></text:span>If you had a bad mango tree, you would be surprised to harvest a good fruit from that tree. Wouldn't you?</text:p>
          </text:list-item>
        </text:list>
        <text:p text:style-name="P121">Good Fruit: <text:s/>If you had a bad mango tree, you would be surprised to harvest a good fruit from that tree. Wouldn't you?</text:p>
        <text:list xml:id="list92019857081755" text:continue-numbering="true" text:style-name="Bullet_20_-_20_Diamond">
          <text:list-item>
            <text:p text:style-name="P120"><text:span text:style-name="Body_20_Emphasized_20_-_20_Small">Fruit: <text:s/></text:span>We can tell what a tree is by its fruit. Mango trees give mangoes for fruit. Guava trees give guavas. We can also tell if a tree is good or bad by its quality of fruit we harvest from it. If a tree only gives bad fruit, it is not a good tree.</text:p>
          </text:list-item>
        </text:list>
        <text:p text:style-name="P121">Fruit: <text:s/>We can tell what a tree is by its fruit. Mango trees give mangoes for fruit. Guava trees give guavas. We can also tell if a tree is good or bad by its quality of fruit we harvest from it. If a tree only gives bad fruit, it is not a good tree.</text:p>
        <text:list xml:id="list92018203891398" text:continue-list="list92018833936587" text:style-name="WWNum1">
          <text:list-item>
            <text:p text:style-name="P133">Read the verse again by yourself as you point to the words.</text:p>
          </text:list-item>
          <text:list-item>
            <text:p text:style-name="P133">Read the verse again with the children as you point to the words.</text:p>
          </text:list-item>
        </text:list>
        <text:p text:style-name="P122"><text:soft-page-break/>In the same way, people will know that we are followers of Jesus by our good fruit. This means that people will know us by our good actions: being honest, being kind, being generous and helpful. Jesus reminds us that our speech and our actions show our true beliefs.</text:p>
        <text:p text:style-name="P123">In the same way, people will know that we are followers of Jesus by our good fruit. This means that people will know us by our good actions: being honest, being kind, being generous and helpful. Jesus reminds us that our speech and our actions show our true beliefs.</text:p>
        <text:p text:style-name="P124">Remember our truth for the day? <text:s/>Let’s all say it together:</text:p>
        <text:p text:style-name="P125">Remember our truth for the day? <text:s/>Let’s all say it together:</text:p>
        <text:p text:style-name="P124">A true disciple of Jesus bears good fruit.</text:p>
        <text:p text:style-name="P125">A true disciple of Jesus bears good fruit.</text:p>
        <text:p text:style-name="P112">Memory Verse Review</text:p>
        <text:p text:style-name="P113">Children Repeat the Verse by Using Movements</text:p>
        <text:list xml:id="list92019784215470" text:continue-list="list92018134675106" text:style-name="Bullet_20_-_20_checkmark">
          <text:list-item>
            <text:p text:style-name="P114">Talk about different movements with our bodies: Your hands on your head, standing on one foot, jumping up and down, touching your toes....</text:p>
          </text:list-item>
          <text:list-item>
            <text:p text:style-name="P118">Ask the children the first question.</text:p>
          </text:list-item>
          <text:list-item>
            <text:p text:style-name="P118">When a question is answered correctly, that child chooses one of the movements listed above or chooses their own movement.</text:p>
          </text:list-item>
          <text:list-item>
            <text:p text:style-name="P118">The verse is said out loud together while doing the movement.</text:p>
          </text:list-item>
          <text:list-item>
            <text:p text:style-name="P118">Then the next question is asked.</text:p>
          </text:list-item>
          <text:list-item>
            <text:p text:style-name="P118">When that question is answered correctly, another child chooses one of the movements.</text:p>
          </text:list-item>
          <text:list-item>
            <text:p text:style-name="P118">The verse is said aloud again while doing the movement.</text:p>
          </text:list-item>
          <text:list-item>
            <text:p text:style-name="P118">Do this until all the questions are asked.</text:p>
          </text:list-item>
        </text:list>
        <text:p text:style-name="P131">Questions for Memory Verse</text:p>
        <text:list text:style-name="L8">
          <text:list-item text:start-value="1">
            <text:p text:style-name="P134">What kind of fruit will a good tree produce? (Good fruit)</text:p>
          </text:list-item>
        </text:list>
        <text:p text:style-name="P116">What kind of fruit will a good tree produce? (Good fruit)</text:p>
        <text:list text:continue-numbering="true" text:style-name="L8">
          <text:list-item>
            <text:p text:style-name="P134">What is another way we have learned how a true follower of Jesus lives? <text:s/>( <text:s/>A true disciple of Jesus is generous. <text:s/>)</text:p>
          </text:list-item>
        </text:list>
        <text:p text:style-name="P116">What is another way we have learned how a true follower of Jesus lives? <text:s/>( <text:s/>A true disciple of Jesus is generous. <text:s/>)</text:p>
        <text:list text:continue-numbering="true" text:style-name="L8">
          <text:list-item>
            <text:p text:style-name="P134">What did we learn today how a true follower of Jesus lives? <text:s/>( <text:s/>A true disciple of Jesus bears good fruit. <text:s/>)</text:p>
          </text:list-item>
        </text:list>
        <text:p text:style-name="P116">What did we learn today how a true follower of Jesus lives? <text:s/>( <text:s/>A true disciple of Jesus bears good fruit. <text:s/>)</text:p>
        <text:list text:continue-numbering="true" text:style-name="L8">
          <text:list-item>
            <text:p text:style-name="P134">What does it mean to bear good fruit? (Do good things)</text:p>
          </text:list-item>
        </text:list>
        <text:p text:style-name="P116">What does it mean to bear good fruit? (Do good things)</text:p>
        <text:list text:continue-numbering="true" text:style-name="L8">
          <text:list-item>
            <text:p text:style-name="P134">What does good fruit look like in the life of a follower of Jesus? (Give examples of being honest, helpful, generous, kind, praying, and studying the Bible to know how God wants us to live, etc.)</text:p>
          </text:list-item>
        </text:list>
        <text:p text:style-name="P116">What does good fruit look like in the life of a follower of Jesus? (Give examples of being honest, helpful, generous, kind, praying, and studying the Bible to know how God wants us to live, etc.)</text:p>
        <text:p text:style-name="P111">Song</text:p>
        <text:p text:style-name="P112">Closing and Homework</text:p>
        <text:list text:continue-list="list92019784215470" text:style-name="Bullet_20_-_20_checkmark">
          <text:list-item>
            <text:p text:style-name="P114">Say the truth together:</text:p>
          </text:list-item>
        </text:list>
        <text:p text:style-name="P115">A true disciple of Jesus bears good fruit.</text:p>
        <text:p text:style-name="P116">A true disciple of Jesus bears good fruit.</text:p>
        <text:list text:continue-numbering="true" text:style-name="Bullet_20_-_20_checkmark">
          <text:list-item>
            <text:p text:style-name="P114">Say the memory verse together:</text:p>
          </text:list-item>
        </text:list>
        <text:p text:style-name="P115">Luke 6:43 No good tree bears bad fruit, nor does a bad tree bear good fruit.</text:p>
        <text:p text:style-name="P116">Luke 6:43 No good tree bears bad fruit, nor does a bad tree bear good fruit.</text:p>
        <text:list text:continue-numbering="true" text:style-name="Bullet_20_-_20_checkmark">
          <text:list-item>
            <text:p text:style-name="P114">Review the homework:</text:p>
          </text:list-item>
        </text:list>
        <text:p text:style-name="P115">This week, pray every day and ask Jesus to help you make good choices. That will help you grow into a good tree that bears good fruit.</text:p>
        <text:p text:style-name="P116">This week, pray every day and ask Jesus to help you make good choices. That will help you grow into a good tree that bears good fruit.</text:p>
        <text:list xml:id="list92017906564969" text:continue-numbering="true" text:style-name="Bullet_20_-_20_checkmark">
          <text:list-item>
            <text:p text:style-name="P114"><text:soft-page-break/>Give any needed announcements.</text:p>
          </text:list-item>
        </text:list>
        <text:p text:style-name="P113">Closing Prayer</text:p>
        <text:p text:style-name="P135"><text:span text:style-name="Body_20_Emphasized_20_-_20_Small">Thank God <text:s/></text:span>that we are able to bear good fruit.</text:p>
        <text:p text:style-name="P135"><text:span text:style-name="Body_20_Emphasized_20_-_20_Small">Ask God <text:s/></text:span>that the children will be in prayer every day this week, and ask God to help them bear good fruit.</text:p>
        <text:p text:style-name="P111">Colouring page to colour and take home!</text:p>
        <text:p text:style-name="P136"/>
      </text:section>
      <text:p text:style-name="P54">A true disciple of Jesus bears good fruit.</text:p>
      <text:p text:style-name="Bible_20_Story_20_-_20_Graphic_20_Number"><draw:frame text:anchor-type="as-char" draw:z-index="17" draw:name="Shape6" draw:style-name="gr2" draw:text-style-name="P2" svg:width="4.3543in" svg:height="4.9087in"><draw:image xlink:href="Pictures/100000010000025D000002AA7D9544F2.tif" xlink:type="simple" xlink:show="embed" xlink:actuate="onLoad" draw:mime-type="image/tiff"><text:p/></draw:image></draw:frame></text:p>
      <text:p text:style-name="M.T._20_Coloring_20_Page_20_-_20_Memory_20_Verse">Luke 6:43 No good tree bears bad fruit, nor does a bad tree bear good fruit.</text:p>
      <text:p text:style-name="Standard"/>
      <text:p text:style-name="P55">A true disciple of Jesus bears good fruit.</text:p>
      <text:p text:style-name="Bible_20_Story_20_-_20_Graphic_20_Number"><draw:frame text:anchor-type="as-char" draw:z-index="29" draw:name="Shape7" draw:style-name="gr2" draw:text-style-name="P2" svg:width="4.3543in" svg:height="4.9087in"><draw:image xlink:href="Pictures/100000010000025D000002AA7D9544F2.tif" xlink:type="simple" xlink:show="embed" xlink:actuate="onLoad" draw:mime-type="image/tiff"><text:p/></draw:image></draw:frame></text:p>
      <text:p text:style-name="Bible_20_Story_20_-_20_Graphic_20_Number">Luke 6:43 No good tree bears bad fruit, nor does a bad tree bear good fruit.</text:p>
      <text:h text:style-name="P25" text:outline-level="1"><draw:frame draw:style-name="fr3" draw:name="Image18" text:anchor-type="char" svg:x="0in" svg:y="0.0161in" svg:width="1.0752in" svg:height="1.0752in" draw:z-index="76"><draw:image xlink:href="Pictures/10000001000000D8000000D86DF4A2EC.png" xlink:type="simple" xlink:show="embed" xlink:actuate="onLoad" draw:mime-type="image/png"/></draw:frame>The Wise Man and the Foolish Man</text:h>
      <text:p text:style-name="M.T._20_Lesson_20_Title">The Wise Man and the Foolish Man</text:p>
      <text:p text:style-name="English_20_Translation_20_-_20_Lesson_20_title">The Wise Man and the Foolish Man</text:p>
      <text:p text:style-name="M.T._20_Text_20_-_20_Lesson_20_Title_20_Scrip_20_Reference">Luke <text:s/>6:46-49</text:p>
      <text:p text:style-name="Part_20_Heading">Lesson Overview</text:p>
      <table:table table:name="Table8" table:style-name="Table8">
        <table:table-column table:style-name="Table8.A"/>
        <table:table-column table:style-name="Table8.B"/>
        <table:table-row>
          <table:table-cell table:style-name="Table8.A1" office:value-type="string">
            <text:p text:style-name="Table_20_Left_20_headings">Today’s Truth</text:p>
          </table:table-cell>
          <table:table-cell table:style-name="Table8.B1" office:value-type="string">
            <text:p text:style-name="M.T._20_Text">A true disciple of Jesus does what the Bible teaches.</text:p>
            <text:p text:style-name="English_20_translation">A true disciple of Jesus does what the Bible teaches.</text:p>
          </table:table-cell>
        </table:table-row>
        <table:table-row>
          <table:table-cell table:style-name="Table8.A1" office:value-type="string">
            <text:p text:style-name="Table_20_Left_20_headings">Objective</text:p>
          </table:table-cell>
          <table:table-cell table:style-name="Table8.B2" office:value-type="string">
            <text:p text:style-name="Body_20_Tight_20_lines"><text:span text:style-name="Body_20_Emphasized_20_-_20_Small">KNOW: <text:s/></text:span>The children will know that to be a true disciple, we must follow what the Bible teaches.</text:p>
            <text:p text:style-name="Body_20_Tight_20_lines"><text:span text:style-name="Body_20_Emphasized_20_-_20_Small">DO:</text:span> <text:s/>This week, the children will take time every day to read, or listen to God's Word every day, and then do what it says you should do.</text:p>
          </table:table-cell>
        </table:table-row>
        <table:table-row>
          <table:table-cell table:style-name="Table8.A1" office:value-type="string">
            <text:p text:style-name="Table_20_Left_20_headings">Materials</text:p>
          </table:table-cell>
          <table:table-cell table:style-name="Table8.B3" office:value-type="string">
            <text:list xml:id="list92018873573244" text:continue-list="list92019109675386"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A small bucket of sand and a large rock</text:p>
              </text:list-item>
              <text:list-item>
                <text:p text:style-name="Table_20_Bullet_20_-_20_Checkmark">Cooking pot with a lid</text:p>
              </text:list-item>
              <text:list-item>
                <text:p text:style-name="Table_20_Bullet_20_-_20_Checkmark">Rope, string, or yarn cut into 10 pieces that are all different sizes</text:p>
              </text:list-item>
            </text:list>
          </table:table-cell>
        </table:table-row>
        <table:table-row>
          <table:table-cell table:style-name="Table8.A1" office:value-type="string">
            <text:p text:style-name="Table_20_Left_20_headings">Memory Verse</text:p>
          </table:table-cell>
          <table:table-cell table:style-name="Table8.B3" office:value-type="string">
            <text:p text:style-name="M.T._20_Tex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English_20_translation">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able:table-cell>
        </table:table-row>
        <table:table-row>
          <table:table-cell table:style-name="Table8.A1" office:value-type="string">
            <text:p text:style-name="Table_20_Left_20_headings">Homework</text:p>
          </table:table-cell>
          <table:table-cell table:style-name="Table8.B3" office:value-type="string">
            <text:p text:style-name="M.T._20_Text">This week, make sure you take time to read, or listen to God's Word every day, and then do what it says you should do.</text:p>
            <text:p text:style-name="English_20_translation">This week, make sure you take time to read, or listen to God's Word every day, and then do what it says you should do.</text:p>
          </table:table-cell>
        </table:table-row>
      </table:table>
      <text:p text:style-name="Body_20_-_20_Small_20_Spacer"/>
      <text:p text:style-name="Part_20_Heading">Detailed Lesson Plan</text:p>
      <text:section text:style-name="Sect1" text:name="L-18 Detail Plan">
        <text:p text:style-name="P137">Song</text:p>
        <text:p text:style-name="P138">Opening</text:p>
        <text:p text:style-name="P139">Welcome</text:p>
        <text:list text:continue-list="list92017906564969" text:style-name="Bullet_20_-_20_checkmark">
          <text:list-item>
            <text:p text:style-name="P140">Be sure the children know you are happy to see them!</text:p>
          </text:list-item>
          <text:list-item>
            <text:p text:style-name="P140">Introduce yourself and your helpers.</text:p>
          </text:list-item>
        </text:list>
        <text:p text:style-name="P139">Sharing Time</text:p>
        <text:list text:continue-numbering="true" text:style-name="Bullet_20_-_20_checkmark">
          <text:list-item>
            <text:p text:style-name="P140">Say the truth from the previous lesson together:</text:p>
          </text:list-item>
        </text:list>
        <text:p text:style-name="P141">A true disciple of Jesus bears good fruit.</text:p>
        <text:p text:style-name="P142">A true disciple of Jesus bears good fruit.</text:p>
        <text:list text:continue-numbering="true" text:style-name="Bullet_20_-_20_checkmark">
          <text:list-item>
            <text:p text:style-name="P140">Say the memory verse from the previous lesson together:</text:p>
          </text:list-item>
        </text:list>
        <text:p text:style-name="P141">Luke 6:43 No good tree bears bad fruit, nor does a bad tree bear good fruit.</text:p>
        <text:p text:style-name="P142">Luke 6:43 No good tree bears bad fruit, nor does a bad tree bear good fruit.</text:p>
        <text:list text:continue-numbering="true" text:style-name="Bullet_20_-_20_checkmark">
          <text:list-item>
            <text:p text:style-name="P140">Review the homework from the previous lesson:</text:p>
          </text:list-item>
        </text:list>
        <text:p text:style-name="P141">For homework you were to make good decisions so that you could bear good fruit. Did you make good choices?</text:p>
        <text:p text:style-name="P142">For homework you were to make good decisions so that you could bear good fruit. Did you make good choices?</text:p>
        <text:p text:style-name="P143">(Give children time to share.)</text:p>
        <text:p text:style-name="P139"><text:soft-page-break/>Prayer</text:p>
        <text:list text:continue-numbering="true" text:style-name="Bullet_20_-_20_checkmark">
          <text:list-item>
            <text:p text:style-name="P140">Let the children share praises and prayer requests.</text:p>
          </text:list-item>
          <text:list-item>
            <text:p text:style-name="P140">Keep a record of what the children are sharing so you can remember to thank God together for answered prayers.</text:p>
          </text:list-item>
          <text:list-item>
            <text:p text:style-name="P140">Spend time praying together. <text:s/>Let children pray out loud if they volunteer. <text:s/>Do not force anyone to pray out loud.</text:p>
          </text:list-item>
        </text:list>
        <text:p text:style-name="P139">Song</text:p>
        <text:p text:style-name="P138">Words to Discuss</text:p>
        <text:list xml:id="list92018535520551" text:continue-numbering="true" text:style-name="Bullet_20_-_20_checkmark">
          <text:list-item>
            <text:p text:style-name="P140">On the blackboard, write the “Words to Discuss” from the list below.</text:p>
          </text:list-item>
          <text:list-item>
            <text:p text:style-name="P144">Let's discuss some words to help us better understand the Bible story for today.</text:p>
          </text:list-item>
        </text:list>
        <text:p text:style-name="P142">Let's discuss some words to help us better understand the Bible story for today.</text:p>
        <text:list text:continue-list="list92019857081755" text:style-name="Bullet_20_-_20_Diamond">
          <text:list-item>
            <text:p text:style-name="P145"><text:span text:style-name="Body_20_Emphasized_20_-_20_Small">Foolish: <text:s/></text:span>Not having good sense or good judgment.</text:p>
          </text:list-item>
        </text:list>
        <text:p text:style-name="P146">Foolish: <text:s/>Not having good sense or good judgment.</text:p>
        <text:list text:continue-numbering="true" text:style-name="Bullet_20_-_20_Diamond">
          <text:list-item>
            <text:p text:style-name="P145"><text:span text:style-name="Body_20_Emphasized_20_-_20_Small">Wise: <text:s/></text:span>Showing common knowledge.</text:p>
          </text:list-item>
        </text:list>
        <text:p text:style-name="P147">Wise: <text:s/>Showing common knowledge.</text:p>
        <text:list text:continue-numbering="true" text:style-name="Bullet_20_-_20_Diamond">
          <text:list-item>
            <text:p text:style-name="P145"><text:span text:style-name="Body_20_Emphasized_20_-_20_Small">Rock: <text:s/></text:span>Material forming the surface of the earth.</text:p>
          </text:list-item>
        </text:list>
        <text:p text:style-name="P146">Rock: <text:s/>Material forming the surface of the earth.</text:p>
        <text:list text:continue-numbering="true" text:style-name="Bullet_20_-_20_Diamond">
          <text:list-item>
            <text:p text:style-name="P145"><text:span text:style-name="Body_20_Emphasized_20_-_20_Small">Sand: <text:s/></text:span>Loose material, usually formed from rocks and other materials.</text:p>
          </text:list-item>
        </text:list>
        <text:p text:style-name="P146">Sand: <text:s/>Loose material, usually formed from rocks and other materials.</text:p>
        <text:list xml:id="list92019336434247" text:continue-numbering="true" text:style-name="Bullet_20_-_20_Diamond">
          <text:list-item>
            <text:p text:style-name="P145"><text:span text:style-name="Body_20_Emphasized_20_-_20_Small">Flood: <text:s/></text:span>An overflow of water onto a land that is normally dry.</text:p>
          </text:list-item>
        </text:list>
        <text:p text:style-name="P146">Flood: <text:s/>An overflow of water onto a land that is normally dry.</text:p>
        <text:p text:style-name="P139">Song</text:p>
        <text:p text:style-name="P138">Bible Story / Lesson</text:p>
        <text:p text:style-name="P148"><text:span text:style-name="Body_20_Emphasized_20_-_20_Small">Materials: <text:s/></text:span><text:span text:style-name="T1">A small bucket of sand and a large rock</text:span></text:p>
        <text:list text:continue-list="list92018535520551" text:style-name="Bullet_20_-_20_checkmark">
          <text:list-item>
            <text:p text:style-name="P140">Have the children put their fist in the sand. What happens? (The sand moves around and a hole is left where the person's fist when in.)</text:p>
          </text:list-item>
          <text:list-item>
            <text:p text:style-name="P140">Now have the children put their fist into the rock. What happens? (It hurts if you hit the rock hard because the rock doesn't shift. The rock stays hard.)</text:p>
          </text:list-item>
        </text:list>
        <text:p text:style-name="P139">Introduce Truth</text:p>
        <text:p text:style-name="P149">Our truth for today is: <text:s/>A true disciple of Jesus does what the Bible teaches.</text:p>
        <text:p text:style-name="P150">Our truth for today is: <text:s/>A true disciple of Jesus does what the Bible teaches.</text:p>
        <text:p text:style-name="P149">This reminds me of a true story from the Bible.</text:p>
        <text:p text:style-name="P150">This reminds me of a true story from the Bible.</text:p>
        <text:p text:style-name="P139">Bible Story: <text:s/>Luke <text:s/>6:46-49</text:p>
        <text:p text:style-name="P151">[ <text:s/>One day, Jesus was teaching to a large crowd of people from all around. <text:s/>]</text:p>
        <text:p text:style-name="P151">Luke 6:46-47 “Why do you call me, ‘Lord, Lord,’ and do not do what I say? I will show you what he is like who comes to me and hears my words and puts them into practice.</text:p>
        <text:p text:style-name="P152">[ <text:s/>One day, Jesus was teaching to a large crowd of people from all around. <text:s/>]</text:p>
        <text:p text:style-name="P152">Luke 6:46-47 “Why do you call me, ‘Lord, Lord,’ and do not do what I say? I will show you what he is like who comes to me and hears my words and puts them into practice.</text:p>
        <text:p text:style-name="P153"><draw:frame draw:style-name="fr4" draw:name="Frame24" text:anchor-type="paragraph" svg:x="-0.0181in" svg:y="0.1209in" svg:width="1.378in" draw:z-index="75"><draw:text-box fo:min-height="1.2055in"><text:p text:style-name="P154">Picture <text:s/>18–1</text:p><text:p text:style-name="P155"><draw:frame text:anchor-type="as-char" draw:z-index="28" draw:name="Shape1_0" draw:style-name="gr2" draw:text-style-name="P72" svg:width="1.2921in" svg:height="0.898in"><draw:image xlink:href="Pictures/10000000000000EC000000A41F1B68A2.jpg" xlink:type="simple" xlink:show="embed" xlink:actuate="onLoad" draw:mime-type="image/jpeg"><text:p/></draw:image></draw:frame></text:p></draw:text-box></draw:frame>Luke 6:48 He is like a man building a house, who dug down deep and laid the foundation on rock. When a flood came, the torrent struck that house but could not shake it, because it was well built.</text:p>
        <text:p text:style-name="P156">Luke 6:48 He is like a man building a house, who dug down deep and laid the foundation on rock. When a flood came, the torrent struck that house but could not shake it, because it was well built.</text:p>
        <text:p text:style-name="P156"/>
        <text:p text:style-name="P156"/>
        <text:p text:style-name="P153"><draw:frame draw:style-name="fr4" draw:name="Frame15" text:anchor-type="paragraph" svg:x="-0.0181in" svg:y="0.0035in" svg:width="1.378in" draw:z-index="74"><draw:text-box fo:min-height="1.2055in"><text:p text:style-name="P154">Picture <text:s/>18–2</text:p><text:p text:style-name="P155"><draw:frame text:anchor-type="as-char" draw:z-index="15" draw:name="Shape2_0" draw:style-name="gr2" draw:text-style-name="P72" svg:width="1.2921in" svg:height="0.8898in"><draw:image xlink:href="Pictures/10000000000000EC000000A3E38FD3DF.jpg" xlink:type="simple" xlink:show="embed" xlink:actuate="onLoad" draw:mime-type="image/jpeg"><text:p/></draw:image></draw:frame></text:p></draw:text-box></draw:frame>Luke 6:49 But the one who hears the Word and does not follow, is like a man building a house on a weak foundation. The second a storm hits, the house collapses, and it is no more.</text:p>
        <text:p text:style-name="English_20_Translation_20_-_20_Bible_20_story_20_inset"><text:soft-page-break/>Luke 6:49 But the one who hears the Word and does not follow, is like a man building a house on a weak foundation. The second a storm hits, the house collapses, and it is no more.</text:p>
        <text:p text:style-name="English_20_Translation_20_-_20_Bible_20_story_20_inset"/>
        <text:p text:style-name="P139">Skit</text:p>
        <text:p text:style-name="P153"><draw:frame draw:style-name="fr4" draw:name="Frame34" text:anchor-type="paragraph" svg:x="-0.0181in" svg:y="0.0035in" svg:width="1.378in" draw:z-index="73"><draw:text-box fo:min-height="1.2055in"><text:p text:style-name="P157"><draw:frame text:anchor-type="as-char" draw:z-index="32" draw:name="Shape3_0" draw:style-name="gr2" draw:text-style-name="P72" svg:width="1.2921in" svg:height="1.1776in"><draw:image xlink:href="Pictures/10000000000001D8000001AE8D3C1369.jpg" xlink:type="simple" xlink:show="embed" xlink:actuate="onLoad" draw:mime-type="image/jpeg"><text:p/></draw:image></draw:frame></text:p></draw:text-box></draw:frame>Have the children act this story out. Have one volunteer be the wise man. The child acting as the wise man chooses two friends to be in his house. They face each other and hold each others hands up in the air (to form the house.) The child who is acting as the wise man enters the “house” made by his friends' arms and bodies, and crouches down. Then, when the teacher gives the command, the rest of the children make storm noises.</text:p>
        <text:p text:style-name="P153">Discuss with the children that if they hear the teachings of the Bible and do what it says, they are like the wise man. When the difficulties of life come their way, they will not be shaken in their faith, but they will be able to stand strong.</text:p>
        <text:p text:style-name="P156">Have the children act this story out. Have one volunteer be the wise man. The child acting as the wise man chooses two friends to be in his house. They face each other and hold each others hands up in the air (to form the house.) The child who is acting as the wise man enters the “house” made by his friends' arms and bodies, and crouches down. Then, when the teacher gives the command, the rest of the children make storm noises.</text:p>
        <text:p text:style-name="P156">Discuss with the children that if they hear the teachings of the Bible and do what it says, they are like the wise man. When the difficulties of life come their way, they will not be shaken in their faith, but they will be able to stand strong.</text:p>
        <text:p text:style-name="P153"><draw:frame draw:style-name="fr4" draw:name="Frame44" text:anchor-type="paragraph" svg:x="-0.0181in" svg:y="0.0035in" svg:width="1.378in" draw:z-index="72"><draw:text-box fo:min-height="1.2055in"><text:p text:style-name="P155"><draw:frame text:anchor-type="as-char" draw:z-index="30" draw:name="Shape4_0" draw:style-name="gr2" draw:text-style-name="P72" svg:width="1.2921in" svg:height="1.465in"><draw:image xlink:href="Pictures/10000000000001D800000224B45A04DA.jpg" xlink:type="simple" xlink:show="embed" xlink:actuate="onLoad" draw:mime-type="image/jpeg"><text:p/></draw:image></draw:frame></text:p></draw:text-box></draw:frame>Next, Have a different volunteer act out being the foolish man. The child acting as the foolish man chooses two different friends to be his house. They face each other and hold each others hands up in the air. The child who is acting as the foolish man enters the “house” made by his friends' arms and bodies, and crouches down. Then, when the teacher gives the command, the rest of the children make storm noises again, like they did for the wise man.</text:p>
        <text:p text:style-name="P156">Next, Have a different volunteer act out being the foolish man. The child acting as the foolish man chooses two different friends to be his house. They face each other and hold each others hands up in the air. The child who is acting as the foolish man enters the “house” made by his friends' arms and bodies, and crouches down. Then, when the teacher gives the command, the rest of the children make storm noises again, like they did for the wise man. </text:p>
        <text:p text:style-name="P153"><draw:frame draw:style-name="fr4" draw:name="Frame62" text:anchor-type="paragraph" svg:x="-0.0181in" svg:y="0.0035in" svg:width="1.378in" draw:z-index="71"><draw:text-box fo:min-height="1.2055in"><text:p text:style-name="P155"><draw:frame text:anchor-type="as-char" draw:z-index="34" draw:name="Shape5_0" draw:style-name="gr2" draw:text-style-name="P72" svg:width="1.2921in" svg:height="0.9453in"><draw:image xlink:href="Pictures/10000000000001D800000158D59B7451.jpg" xlink:type="simple" xlink:show="embed" xlink:actuate="onLoad" draw:mime-type="image/jpeg"><text:p/></draw:image></draw:frame></text:p></draw:text-box></draw:frame>This time, when the storm noises are made, the children that are the “house” for the foolish man fall to the ground, and the foolish man yells and runs away.</text:p>
        <text:p text:style-name="P153">Discuss with the children that if they hear the teachings of the Bible and don't do what it says, then they are like the foolish man who builds his house on the sand. When the difficulties of life come their way, they will not be able to stand strong, they will be swept away by the world. <text:s text:c="3"/></text:p>
        <text:p text:style-name="P156">This time, when the storm noises are made, the children that are the “house” for the foolish man fall to the ground, and the foolish man yells and runs away.</text:p>
        <text:p text:style-name="P156">Discuss with the children that if they hear the teachings of the Bible and don't do what it says, then they are like the foolish man who builds his house on the sand. When the difficulties of life come their way, they will not be able to stand strong, they will be swept away by the world.</text:p>
        <text:p text:style-name="P139">Application</text:p>
        <text:p text:style-name="P151">After hearing the story, and acting out the story, how do we live a life that is firm and strong?</text:p>
        <text:p text:style-name="P152">After hearing the story, and acting out the story, how do we live a life that is firm and strong?</text:p>
        <text:p text:style-name="P151">To have a strong foundation in Jesus, we need to read the Bible, and follow what it teaches us. By doing this, we become wise.</text:p>
        <text:p text:style-name="P152">To have a strong foundation in Jesus, we need to read the Bible, and follow what it teaches us. By doing this, we become wise.</text:p>
        <text:p text:style-name="P151">We must resist sin, all the things we think, do, or say that displeases God, and stand firm in our faith in the Lord. We need to be strong and firm so that we can resist any temptation of sin that comes in our way.</text:p>
        <text:p text:style-name="P152">We must resist sin, all the things we think, do, or say that displeases God, and stand firm in our faith in the Lord. We need to be strong and firm so that we can resist any temptation of sin that comes in our way.</text:p>
        <text:p text:style-name="P149">A true disciple of Jesus does what the Bible teaches.</text:p>
        <text:p text:style-name="P150">A true disciple of Jesus does what the Bible teaches.</text:p>
        <text:p text:style-name="P158">Homework</text:p>
        <text:p text:style-name="P151">This week, make sure you take time to read, or listen to God's Word every day, and then do what it says you should do.</text:p>
        <text:p text:style-name="P152">This week, make sure you take time to read, or listen to God's Word every day, and then do what it says you should do.</text:p>
        <text:p text:style-name="P137">Prayer / Song</text:p>
        <text:p text:style-name="P138"><text:soft-page-break/>Review Game</text:p>
        <text:p text:style-name="P139">Spaghetti Game</text:p>
        <text:p text:style-name="P158">Materials</text:p>
        <text:list text:continue-numbering="true" text:style-name="Bullet_20_-_20_checkmark">
          <text:list-item>
            <text:p text:style-name="P140">Cooking pot with a lid</text:p>
          </text:list-item>
          <text:list-item>
            <text:p text:style-name="P159">Rope, string, or yarn cut into 10 pieces that are all different sizes</text:p>
          </text:list-item>
        </text:list>
        <text:p text:style-name="P158">How to Play</text:p>
        <text:list xml:id="list92018197299592" text:continue-numbering="true" text:style-name="Bullet_20_-_20_checkmark">
          <text:list-item>
            <text:p text:style-name="P140">Put the rope, string, or yarn in the pot with some of it hanging out. <text:s/>Put the lid on the pot over the ropes.</text:p>
          </text:list-item>
          <text:list-item>
            <text:p text:style-name="P159">Divide the children into two teams.</text:p>
          </text:list-item>
          <text:list-item>
            <text:p text:style-name="P159">When someone on the team answers the question correctly, they come to the front and choose one of the ropes. (They never know if they will get a long or short rope.)</text:p>
          </text:list-item>
          <text:list-item>
            <text:p text:style-name="P159">The ropes that each team gets are tied together into one long rope.</text:p>
          </text:list-item>
          <text:list-item>
            <text:p text:style-name="P159">At the end, measure the ropes from the two teams side by side.</text:p>
          </text:list-item>
          <text:list-item>
            <text:p text:style-name="P159">The teams with the longest rope wins.</text:p>
          </text:list-item>
        </text:list>
        <text:p text:style-name="P158">Questions for Review Game</text:p>
        <text:list text:style-name="L9">
          <text:list-item text:start-value="1">
            <text:p text:style-name="P160">What does the wise man do? (Builds his house on a rock)</text:p>
          </text:list-item>
        </text:list>
        <text:p text:style-name="P142">What does the wise man do? (Builds his house on a rock)</text:p>
        <text:list text:continue-numbering="true" text:style-name="L9">
          <text:list-item>
            <text:p text:style-name="P160">What happens to his house when a storm comes and the flood waters hit against it? (The house still stands.)</text:p>
          </text:list-item>
        </text:list>
        <text:p text:style-name="P142">What happens to his house when a storm comes and the flood waters hit against it? (The house still stands.)</text:p>
        <text:list text:continue-numbering="true" text:style-name="L9">
          <text:list-item>
            <text:p text:style-name="P160">Who is the wise man? (The person who reads the Bible and follows what it says)</text:p>
          </text:list-item>
        </text:list>
        <text:p text:style-name="P142">Who is the wise man? (The person who reads the Bible and follows what it says)</text:p>
        <text:list text:continue-numbering="true" text:style-name="L9">
          <text:list-item>
            <text:p text:style-name="P160">What does the foolish man do? (Builds his house on the sand)</text:p>
          </text:list-item>
        </text:list>
        <text:p text:style-name="P142">What does the foolish man do? (Builds his house on the sand)</text:p>
        <text:list text:continue-numbering="true" text:style-name="L9">
          <text:list-item>
            <text:p text:style-name="P160">What happens to the foolish man's house when the storm comes and the flood waters hit against it? (It is completely destroyed.)</text:p>
          </text:list-item>
        </text:list>
        <text:p text:style-name="P142">What happens to the foolish man's house when the storm comes and the flood waters hit against it? (It is completely destroyed.)</text:p>
        <text:list text:continue-numbering="true" text:style-name="L9">
          <text:list-item>
            <text:p text:style-name="P160">Who is like the foolish man? (The person who reads the Bible and does NOT do what it says)</text:p>
          </text:list-item>
        </text:list>
        <text:p text:style-name="P142">Who is like the foolish man? (The person who reads the Bible and does NOT do what it says)</text:p>
        <text:list text:continue-numbering="true" text:style-name="L9">
          <text:list-item>
            <text:p text:style-name="P160">A true follower of Jesus should be like which man? (The wise man)</text:p>
          </text:list-item>
        </text:list>
        <text:p text:style-name="P142">A true follower of Jesus should be like which man? (The wise man)</text:p>
        <text:list text:continue-numbering="true" text:style-name="L9">
          <text:list-item>
            <text:p text:style-name="P160">What should a true follower of Jesus do? (Listen to the teachings of the Bible and do what it says)</text:p>
          </text:list-item>
        </text:list>
        <text:p text:style-name="P142">What should a true follower of Jesus do? (Listen to the teachings of the Bible and do what it says)</text:p>
        <text:p text:style-name="P137">Song</text:p>
        <text:p text:style-name="P138">Memory Verse</text:p>
        <text:p text:style-name="P158">Materials and Preparations</text:p>
        <text:list xml:id="list92019325940906" text:continue-list="list92018197299592" text:style-name="Bullet_20_-_20_checkmark">
          <text:list-item>
            <text:p text:style-name="P140">Put a bookmark in <text:s/>Luke 6:47-48</text:p>
          </text:list-item>
          <text:list-item>
            <text:p text:style-name="P140">Write memory verse on the blackboard.</text:p>
          </text:list-item>
        </text:list>
        <text:p text:style-name="P141">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142">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139">Teach and Explain</text:p>
        <text:p text:style-name="P151">Our memory verse is in the Gospel of Luke. <text:s/>That is in the New Testament, a part of the Bible.</text:p>
        <text:p text:style-name="P152">Our memory verse is in the Gospel of Luke. <text:s/>That is in the New Testament, a part of the Bible.</text:p>
        <text:list xml:id="list92018626959486" text:continue-list="list92018203891398" text:style-name="WWNum1">
          <text:list-item text:start-value="1">
            <text:p text:style-name="P161">Read the verse from your Bible.</text:p>
          </text:list-item>
          <text:list-item>
            <text:p text:style-name="P161">Read the verse by yourself as you point to the words.</text:p>
          </text:list-item>
          <text:list-item>
            <text:p text:style-name="P161">Read the verse with the children as you point to the words.</text:p>
          </text:list-item>
          <text:list-item>
            <text:p text:style-name="P161">Explain the verse:</text:p>
          </text:list-item>
        </text:list>
        <text:list text:continue-list="list92019325940906" text:style-name="Bullet_20_-_20_checkmark">
          <text:list-item>
            <text:p text:style-name="P144">Our memory verse comes from today’s Bible story.</text:p>
          </text:list-item>
        </text:list>
        <text:p text:style-name="P142">Our memory verse comes from today’s Bible story.</text:p>
        <text:list xml:id="list92018889205784" text:continue-numbering="true" text:style-name="Bullet_20_-_20_checkmark">
          <text:list-item>
            <text:p text:style-name="P140"><text:soft-page-break/>As you read the verse, circle the words shown below. <text:s/>Explain each of these words.</text:p>
          </text:list-item>
        </text:list>
        <text:list text:continue-list="list92019336434247" text:style-name="Bullet_20_-_20_Diamond">
          <text:list-item>
            <text:p text:style-name="P145"><text:span text:style-name="Body_20_Emphasized_20_-_20_Small">Who comes to me: <text:s/></text:span>Refers to a sinner who comes to Jesus to have their sins forgiven. To become a follower of Jesus we must first some and pray to Jesus. We should not turn away from Jesus.</text:p>
          </text:list-item>
        </text:list>
        <text:p text:style-name="P146">Who comes to me: <text:s/>Refers to a sinner who comes to Jesus to have their sins forgiven. To become a follower of Jesus we must first some and pray to Jesus. We should not turn away from Jesus.</text:p>
        <text:list text:continue-numbering="true" text:style-name="Bullet_20_-_20_Diamond">
          <text:list-item>
            <text:p text:style-name="P145"><text:span text:style-name="Body_20_Emphasized_20_-_20_Small">Hears my word: <text:s/></text:span>Refers to a person who has heard what Jesus said in the Bible or has heard a lesson from the Bible.</text:p>
          </text:list-item>
        </text:list>
        <text:p text:style-name="P146">Hears my word: <text:s/>Refers to a person who has heard what Jesus said in the Bible or has heard a lesson from the Bible.</text:p>
        <text:list xml:id="list92018772284554" text:continue-numbering="true" text:style-name="Bullet_20_-_20_Diamond">
          <text:list-item>
            <text:p text:style-name="P145"><text:span text:style-name="Body_20_Emphasized_20_-_20_Small">Practice: <text:s/></text:span>It is not enough to hear the words of Jesus or a lesson from the Bible, we need to put those words into action. We must practice doing those actions over and over again.</text:p>
          </text:list-item>
        </text:list>
        <text:p text:style-name="P146">Practice: <text:s/>It is not enough to hear the words of Jesus or a lesson from the Bible, we need to put those words into action. We must practice doing those actions over and over again.</text:p>
        <text:list xml:id="list92019742033923" text:continue-list="list92018626959486" text:style-name="WWNum1">
          <text:list-item>
            <text:p text:style-name="P161">Read the verse again by yourself as you point to the words.</text:p>
          </text:list-item>
          <text:list-item>
            <text:p text:style-name="P161">Read the verse again with the children as you point to the words.</text:p>
          </text:list-item>
        </text:list>
        <text:p text:style-name="P151">God's Word, the Bible, teaches us how we can live in a way that pleases God. It teaches us how to be wise. Jesus tells us clearly how to be wise:</text:p>
        <text:list text:style-name="L10">
          <text:list-item text:start-value="1">
            <text:p text:style-name="P162">Come to Jesus by praying and asking Him to help you.</text:p>
          </text:list-item>
          <text:list-item>
            <text:p text:style-name="P162">Hear his teachings by reading, or listening to God's Word, the Bible.</text:p>
          </text:list-item>
          <text:list-item>
            <text:p text:style-name="P162">Do what you hear.</text:p>
          </text:list-item>
        </text:list>
        <text:p text:style-name="P152">God's Word, the Bible, teaches us how we can live in a way that pleases God. It teaches us how to be wise. Jesus tells us clearly how to be wise:</text:p>
        <text:list text:style-name="L11">
          <text:list-item>
            <text:p text:style-name="P163">Come to Jesus by praying and asking Him to help you.</text:p>
          </text:list-item>
          <text:list-item>
            <text:p text:style-name="P163">Hear his teachings by reading, or listening to God's Word, the Bible.</text:p>
          </text:list-item>
          <text:list-item>
            <text:p text:style-name="P163">Do what you hear.</text:p>
          </text:list-item>
        </text:list>
        <text:p text:style-name="P151">If God's Word says you SHOULD NOT do something, then don't do it. Can you tell me something that God's Word tells us not to do? (Do not steal, do not tell lies, do not fight, do not be bitter against people.)</text:p>
        <text:p text:style-name="P152">If God's Word says you SHOULD NOT do something, then don't do it. Can you tell me something that God's Word tells us not to do? (Do not steal, do not tell lies, do not fight, do not be bitter against people.)</text:p>
        <text:p text:style-name="P151">If God's Word says you SHOULD do something, then do it! Can you tell me something that God's Word tell us TO DO? (Be generous, tell the truth, respect and obey my parents, be helpful, be kind, and be forgiving.)</text:p>
        <text:p text:style-name="P152">If God's Word says you SHOULD do something, then do it! Can you tell me something that God's Word tell us TO DO? (Be generous, tell the truth, respect and obey my parents, be helpful, be kind, and be forgiving.)</text:p>
        <text:p text:style-name="P151">Do you take time to read, or to listen to God's Word every day? That is where you can learn to be wise and to live in the way that pleases God. This week, make sure you take time every day to read, or to listen to God's Word every day, and then do what it says you should do.</text:p>
        <text:p text:style-name="P152">Do you take time to read, or to listen to God's Word every day? That is where you can learn to be wise and to live in the way that pleases God. This week, make sure you take time every day to read, or to listen to God's Word every day, and then do what it says you should do.</text:p>
        <text:p text:style-name="P149">Remember our truth for the day? <text:s/>Let’s all say it together:</text:p>
        <text:p text:style-name="P150">Remember our truth for the day? <text:s/>Let’s all say it together:</text:p>
        <text:p text:style-name="P149">A true disciple of Jesus does what the Bible teaches.</text:p>
        <text:p text:style-name="P150">A true disciple of Jesus does what the Bible teaches.</text:p>
        <text:p text:style-name="P138">Memory Verse Review</text:p>
        <text:p text:style-name="P139">Children Repeat the Verse by Using Movements</text:p>
        <text:list xml:id="list92018569244645" text:continue-list="list92018889205784" text:style-name="Bullet_20_-_20_checkmark">
          <text:list-item>
            <text:p text:style-name="P140">Talk about different movements with our bodies: Your hands on your head, standing on one foot, jumping up and down, touching your toes....</text:p>
          </text:list-item>
          <text:list-item>
            <text:p text:style-name="P159">Ask the children the first question.</text:p>
          </text:list-item>
          <text:list-item>
            <text:p text:style-name="P159">When a question is answered correctly, that child chooses one of the movements listed above or chooses their own movement.</text:p>
          </text:list-item>
          <text:list-item>
            <text:p text:style-name="P159">The verse is said out loud together while doing the movement.</text:p>
          </text:list-item>
          <text:list-item>
            <text:p text:style-name="P159">Then the next question is asked.</text:p>
          </text:list-item>
          <text:list-item>
            <text:p text:style-name="P159">When that question is answered correctly, another child chooses one of the movements.</text:p>
          </text:list-item>
          <text:list-item>
            <text:p text:style-name="P159">The verse is said aloud again while doing the movement.</text:p>
          </text:list-item>
          <text:list-item>
            <text:p text:style-name="P159">Do this until all the questions are asked.</text:p>
          </text:list-item>
        </text:list>
        <text:p text:style-name="P158"><text:soft-page-break/>Questions for Memory Verse</text:p>
        <text:list text:style-name="L12">
          <text:list-item text:start-value="1">
            <text:p text:style-name="P164">Where is today's memory verse found? <text:s/>( <text:s/>Luke 6:47-48 <text:s/>)</text:p>
          </text:list-item>
        </text:list>
        <text:p text:style-name="P142">Where is today's memory verse found? <text:s/>( <text:s/>Luke 6:47-48 <text:s/>)</text:p>
        <text:list text:continue-numbering="true" text:style-name="L12">
          <text:list-item>
            <text:p text:style-name="P164">Where can you go to learn how to be strong and firm in the Lord? (The Bible)</text:p>
          </text:list-item>
        </text:list>
        <text:p text:style-name="P142">Where can you go to learn how to be strong and firm in the Lord? (The Bible)</text:p>
        <text:list text:continue-numbering="true" text:style-name="L12">
          <text:list-item>
            <text:p text:style-name="P164">In the Bible verse, where did the man dig his foundation? (On rock)</text:p>
          </text:list-item>
        </text:list>
        <text:p text:style-name="P142">In the Bible verse, where did the man dig his foundation? (On rock)</text:p>
        <text:list text:continue-numbering="true" text:style-name="L12">
          <text:list-item>
            <text:p text:style-name="P164">Name one out of the three ways how the Bible teaches us how to be wise? (Come to Jesus by praying and asking him to help you, hear his teachings by reading, or listening to God's Word, the Bible, and by doing what you hear.)</text:p>
          </text:list-item>
        </text:list>
        <text:p text:style-name="P142">Name one out of the three ways how the Bible teaches us how to be wise? (Come to Jesus by praying and asking him to help you, hear his teachings by reading, or listening to God's Word, the Bible, and by doing what you hear.)</text:p>
        <text:list text:continue-numbering="true" text:style-name="L12">
          <text:list-item>
            <text:p text:style-name="P164">Name another way how the Bible teaches us to be wise? (See answers to 4.)</text:p>
          </text:list-item>
        </text:list>
        <text:p text:style-name="P142">Name another way how the Bible teaches us to be wise? (See answers to 4.)</text:p>
        <text:list text:continue-numbering="true" text:style-name="L12">
          <text:list-item>
            <text:p text:style-name="P164">Name another way how the Bible teaches us to be wise? (See answers to 4.)</text:p>
          </text:list-item>
        </text:list>
        <text:p text:style-name="P142">Name another way how the Bible teaches us to be wise? (See answers to 4.)</text:p>
        <text:p text:style-name="P137">Song</text:p>
        <text:p text:style-name="P138">Closing and Homework</text:p>
        <text:list text:continue-list="list92018569244645" text:style-name="Bullet_20_-_20_checkmark">
          <text:list-item>
            <text:p text:style-name="P140">Say the truth together:</text:p>
          </text:list-item>
        </text:list>
        <text:p text:style-name="P141">A true disciple of Jesus does what the Bible teaches.</text:p>
        <text:p text:style-name="P142">A true disciple of Jesus does what the Bible teaches.</text:p>
        <text:list text:continue-numbering="true" text:style-name="Bullet_20_-_20_checkmark">
          <text:list-item>
            <text:p text:style-name="P140">Say the memory verse together:</text:p>
          </text:list-item>
        </text:list>
        <text:p text:style-name="P141">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P142">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list text:continue-numbering="true" text:style-name="Bullet_20_-_20_checkmark">
          <text:list-item>
            <text:p text:style-name="P140">Review the homework:</text:p>
          </text:list-item>
        </text:list>
        <text:p text:style-name="P141">This week, make sure you take time to read, or listen to God's Word every day, and then do what it says you should do.</text:p>
        <text:p text:style-name="P142">This week, make sure you take time to read, or listen to God's Word every day, and then do what it says you should do.</text:p>
        <text:list xml:id="list92019528162905" text:continue-numbering="true" text:style-name="Bullet_20_-_20_checkmark">
          <text:list-item>
            <text:p text:style-name="P140">Give any needed announcements.</text:p>
          </text:list-item>
        </text:list>
        <text:p text:style-name="P139">Closing Prayer</text:p>
        <text:p text:style-name="P148"><text:span text:style-name="Body_20_Emphasized_20_-_20_Small">Thank God <text:s/></text:span>that we are able to go to the Bible to learn how to live like a true follower of Jesus.</text:p>
        <text:p text:style-name="P148"><text:span text:style-name="Body_20_Emphasized_20_-_20_Small">Ask God <text:s/></text:span>that the children will remember to read the Bible every day, and that they will follow what the Bible says.</text:p>
        <text:p text:style-name="P165">Colouring page to colour and take home!</text:p>
        <text:p text:style-name="P148"/>
      </text:section>
      <text:p text:style-name="P54">A true disciple of Jesus does what the Bible teaches.</text:p>
      <text:p text:style-name="Bible_20_Story_20_-_20_Graphic_20_Number"><draw:frame draw:style-name="fr8" draw:name="Image16" text:anchor-type="as-char" svg:width="5.2366in" svg:height="4.35in" draw:z-index="77"><draw:image xlink:href="Pictures/1000000100000B1200000A325E29EC21.tif" xlink:type="simple" xlink:show="embed" xlink:actuate="onLoad" draw:mime-type="image/tiff"/></draw:frame></text:p>
      <text:p text:style-name="M.T._20_Coloring_20_Page_20_-_20_Memory_20_Verse">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Standard"/>
      <text:p text:style-name="P55">A true disciple of Jesus does what the Bible teaches.</text:p>
      <text:p text:style-name="Bible_20_Story_20_-_20_Graphic_20_Number"><draw:frame draw:style-name="fr8" draw:name="Image19" text:anchor-type="as-char" svg:width="5.2575in" svg:height="4.35in" draw:z-index="78"><draw:image xlink:href="Pictures/1000000100000B1200000A325E29EC21.tif" xlink:type="simple" xlink:show="embed" xlink:actuate="onLoad" draw:mime-type="image/tiff"/></draw:frame></text:p>
      <text:p text:style-name="Bible_20_Story_20_-_20_Graphic_20_Number">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h text:style-name="P25" text:outline-level="1"><draw:frame draw:style-name="fr3" draw:name="Image20" text:anchor-type="char" svg:x="0in" svg:y="0.0161in" svg:width="1.0752in" svg:height="1.0752in" draw:z-index="83"><draw:image xlink:href="Pictures/10000001000000D8000000D8782A56DD.png" xlink:type="simple" xlink:show="embed" xlink:actuate="onLoad" draw:mime-type="image/png"/></draw:frame>Jesus Heals the Centurion's Servant</text:h>
      <text:p text:style-name="M.T._20_Lesson_20_Title">Jesus Heals the Centurion's Servant</text:p>
      <text:p text:style-name="English_20_Translation_20_-_20_Lesson_20_title">Jesus Heals the Centurion's Servant</text:p>
      <text:p text:style-name="M.T._20_Text_20_-_20_Lesson_20_Title_20_Scrip_20_Reference">Luke <text:s/>7:1-10</text:p>
      <text:p text:style-name="Part_20_Heading">Lesson Overview</text:p>
      <table:table table:name="Table9" table:style-name="Table9" table:template-name="Lesson Overview">
        <table:table-column table:style-name="Table9.A"/>
        <table:table-column table:style-name="Table9.B"/>
        <table:table-row table:style-name="Table9.1">
          <table:table-cell table:style-name="Table9.A1" office:value-type="string">
            <text:p text:style-name="Table_20_Left_20_headings">Today’s Truth</text:p>
          </table:table-cell>
          <table:table-cell table:style-name="Table9.B1" office:value-type="string">
            <text:p text:style-name="M.T._20_Text">A true disciple of Jesus has faith in him.</text:p>
            <text:p text:style-name="English_20_translation">A true disciple of Jesus has faith in him.</text:p>
          </table:table-cell>
        </table:table-row>
        <table:table-row table:style-name="Table9.1">
          <table:table-cell table:style-name="Table9.A1" office:value-type="string">
            <text:p text:style-name="Table_20_Left_20_headings">Objective</text:p>
          </table:table-cell>
          <table:table-cell table:style-name="Table9.B1" office:value-type="string">
            <text:p text:style-name="Body_20_Tight_20_lines"><text:span text:style-name="Body_20_Emphasized_20_-_20_Small">KNOW: <text:s/></text:span>The children will know that to be a disciple of Jesus, you need to have faith in him.</text:p>
            <text:p text:style-name="Body_20_Tight_20_lines"><text:span text:style-name="Body_20_Emphasized_20_-_20_Small">DO:</text:span> <text:s/>The children will pray and ask God to help them with something.</text:p>
          </table:table-cell>
        </table:table-row>
        <table:table-row table:style-name="Table9.1">
          <table:table-cell table:style-name="Table9.A1" office:value-type="string">
            <text:p text:style-name="Table_20_Left_20_headings">Materials</text:p>
          </table:table-cell>
          <table:table-cell table:style-name="Table9.B1" office:value-type="string">
            <text:list xml:id="list92019732128164" text:continue-list="list92018873573244"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5-10 different sized containers or cups (You can also use shoes or hats/caps)</text:p>
              </text:list-item>
              <text:list-item>
                <text:p text:style-name="Table_20_Bullet_20_-_20_Checkmark">5-10 strips of paper (One for each container). <text:s/>Write different amounts of points on each. (Have numbers as low as 1 and numbers as high as 100.)</text:p>
              </text:list-item>
              <text:list-item>
                <text:p text:style-name="Table_20_Bullet_20_-_20_Checkmark">2 bottle caps, stones, or other small things to throw</text:p>
              </text:list-item>
            </text:list>
          </table:table-cell>
        </table:table-row>
        <table:table-row table:style-name="Table9.1">
          <table:table-cell table:style-name="Table9.A1" office:value-type="string">
            <text:p text:style-name="Table_20_Left_20_headings">Memory Verse</text:p>
          </table:table-cell>
          <table:table-cell table:style-name="Table9.B1" office:value-type="string">
            <text:p text:style-name="M.T._20_Text">Luke 7:9 When Jesus heard this, he was amazed at him, and turning to the crowd following him, he said, “I tell you, I have not found such great faith even in Israel.”</text:p>
            <text:p text:style-name="English_20_translation">Luke 7:9 When Jesus heard this, he was amazed at him, and turning to the crowd following him, he said, “I tell you, I have not found such great faith even in Israel.”</text:p>
          </table:table-cell>
        </table:table-row>
        <table:table-row table:style-name="Table9.1">
          <table:table-cell table:style-name="Table9.A1" office:value-type="string">
            <text:p text:style-name="Table_20_Left_20_headings">Homework</text:p>
          </table:table-cell>
          <table:table-cell table:style-name="Table9.B1" office:value-type="string">
            <text:p text:style-name="P166">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English_20_translation">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able:table-cell>
        </table:table-row>
      </table:table>
      <text:p text:style-name="Body_20_-_20_Small_20_Spacer"/>
      <text:p text:style-name="Part_20_Heading">Detailed Lesson Plan</text:p>
      <text:section text:style-name="Sect1" text:name="L-19 Detail Plan">
        <text:p text:style-name="Sub-Head_20_1_20_No_20_follow">Song</text:p>
        <text:p text:style-name="Section_20_Heading">Opening</text:p>
        <text:p text:style-name="Sub-Head_20_1">Welcome</text:p>
        <text:list text:continue-list="list92019528162905" text:style-name="Bullet_20_-_20_checkmark">
          <text:list-item>
            <text:p text:style-name="Body_20_Bullet_20_-_20_Checkmark">Be sure the children know you are happy to see them!</text:p>
          </text:list-item>
          <text:list-item>
            <text:p text:style-name="Body_20_Bullet_20_-_20_Checkmark_20_-_20_No_20_follow">Introduce yourself and your helpers.</text:p>
          </text:list-item>
        </text:list>
        <text:p text:style-name="Sub-Head_20_1">Sharing Time</text:p>
        <text:list text:continue-numbering="true" text:style-name="Bullet_20_-_20_checkmark">
          <text:list-item>
            <text:p text:style-name="Body_20_Bullet_20_-_20_Checkmark">Say the truth from the previous lesson together:</text:p>
          </text:list-item>
        </text:list>
        <text:p text:style-name="M.T._20_Text_20_-_20_Single_20_Inset">A true disciple of Jesus does what the Bible teaches.</text:p>
        <text:p text:style-name="English_20_Translation_20_-_20_single_20_inset">A true disciple of Jesus does what the Bible teaches.</text:p>
        <text:list text:continue-numbering="true" text:style-name="Bullet_20_-_20_checkmark">
          <text:list-item>
            <text:p text:style-name="Body_20_Bullet_20_-_20_Checkmark">Say the memory verse from the previous lesson together:</text:p>
          </text:list-item>
        </text:list>
        <text:p text:style-name="M.T._20_Text_20_-_20_Single_20_Inse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p text:style-name="English_20_Translation_20_-_20_single_20_inset">Luke 6:47-48 I will show you what he is like who comes to me and hears my words and puts them into practice. He is like a man building a house, who dug down deep and laid the foundation on rock. When the floodwaters rise and break against the house, it stands firm because it is well built.</text:p>
        <text:list text:continue-numbering="true" text:style-name="Bullet_20_-_20_checkmark">
          <text:list-item>
            <text:p text:style-name="Body_20_Bullet_20_-_20_Checkmark"><text:soft-page-break/>Review the homework from the previous lesson:</text:p>
          </text:list-item>
        </text:list>
        <text:p text:style-name="M.T._20_Text_20_-_20_Single_20_Inset">Did you remember to read the Bible or listen to God's Word every day last week? When? What did you learn?</text:p>
        <text:p text:style-name="English_20_Translation_20_-_20_single_20_inset">Did you remember to read the Bible or listen to God's Word every day last week? When? What did you learn?</text:p>
        <text:p text:style-name="Body_20_Inset">(Give children time to share.)</text:p>
        <text:p text:style-name="Sub-Head_20_1">Prayer</text:p>
        <text:list text:continue-numbering="true"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text:s/>Let children pray out loud if they volunteer. <text:s/>Do not force anyone to pray out loud.</text:p>
          </text:list-item>
        </text:list>
        <text:p text:style-name="Sub-Head_20_1_20_No_20_follow">Song</text:p>
        <text:p text:style-name="Section_20_Heading">Words to Discuss</text:p>
        <text:list xml:id="list92017823893940" text:continue-numbering="true" text:style-name="Bullet_20_-_20_checkmark">
          <text:list-item>
            <text:p text:style-name="Body_20_Bullet_20_-_20_Checkmark">On the blackboard, write the “Words to Discuss” from the list below.</text:p>
          </text:list-item>
          <text:list-item>
            <text:p text:style-name="M.T._20_Text_20_-_20_Checkmark_20_bullet">Let's discuss some words to help us better understand the Bible story for today.</text:p>
          </text:list-item>
        </text:list>
        <text:p text:style-name="English_20_Translation_20_-_20_single_20_inset">Let's discuss some words to help us better understand the Bible story for today.</text:p>
        <text:list text:continue-list="list92018772284554" text:style-name="Bullet_20_-_20_Diamond">
          <text:list-item>
            <text:p text:style-name="M.T._20_Text_20_-_20_Diamond_20_bullet"><text:span text:style-name="Body_20_Emphasized_20_-_20_Small">Synagogue: </text:span>Jewish place of worship.</text:p>
          </text:list-item>
        </text:list>
        <text:p text:style-name="English_20_Translation_20_-_20_double_20_inset">Synagogue: <text:s/>Jewish place of worship.</text:p>
        <text:list text:continue-numbering="true" text:style-name="Bullet_20_-_20_Diamond">
          <text:list-item>
            <text:p text:style-name="M.T._20_Text_20_-_20_Diamond_20_bullet"><text:span text:style-name="Body_20_Emphasized_20_-_20_Small">Roman Centurion: <text:s/></text:span>An officer in charge of one hundred soldiers.</text:p>
          </text:list-item>
        </text:list>
        <text:p text:style-name="English_20_Translation_20_-_20_double_20_inset">Roman Centurion: <text:s/>An officer in charge of one hundred soldiers.</text:p>
        <text:list text:continue-numbering="true" text:style-name="Bullet_20_-_20_Diamond">
          <text:list-item>
            <text:p text:style-name="M.T._20_Text_20_-_20_Diamond_20_bullet"><text:span text:style-name="Body_20_Emphasized_20_-_20_Small">Jewish Leader: <text:s/></text:span>A leader in Israel.</text:p>
          </text:list-item>
        </text:list>
        <text:p text:style-name="English_20_Translation_20_-_20_double_20_inset">Jewish Leader: <text:s/>A leader in Israel.</text:p>
        <text:list text:continue-numbering="true" text:style-name="Bullet_20_-_20_Diamond">
          <text:list-item>
            <text:p text:style-name="M.T._20_Text_20_-_20_Diamond_20_bullet"><text:span text:style-name="Body_20_Emphasized_20_-_20_Small">Gentile: <text:s/></text:span>A person who is not Jewish.</text:p>
          </text:list-item>
        </text:list>
        <text:p text:style-name="English_20_Translation_20_-_20_double_20_inset">Gentile: <text:s/>A person who is not Jewish.</text:p>
        <text:list xml:id="list92018122619308" text:continue-numbering="true" text:style-name="Bullet_20_-_20_Diamond">
          <text:list-item>
            <text:p text:style-name="M.T._20_Text_20_-_20_Diamond_20_bullet"><text:span text:style-name="Body_20_Emphasized_20_-_20_Small">People of Israel: <text:s/></text:span>All the people who were living in Israel.</text:p>
          </text:list-item>
        </text:list>
        <text:p text:style-name="English_20_Translation_20_-_20_double_20_inset">People of Israel: <text:s/>All the people who were living in Israel.</text:p>
        <text:p text:style-name="Sub-Head_20_1_20_No_20_follow">Song</text:p>
        <text:p text:style-name="Section_20_Heading">Bible Story / Lesson</text:p>
        <text:p text:style-name="Body">Have a volunteer stand straight with their arms crossed in front of them, so that their hands touch their shoulders. The teacher then stands behind the volunteer and then asks the volunteer to have faith in them by closing their eyes and letting them fall backward until the teacher catches them.</text:p>
        <text:list text:continue-list="list92017823893940" text:style-name="Bullet_20_-_20_checkmark">
          <text:list-item>
            <text:p text:style-name="M.T._20_Text_20_-_20_Checkmark_20_bullet">This demonstrates faith. Faith means putting confidence in something. We put our confidence in many things. We have confidence that a chair will hold us up when we sit in it. We have confidence that the rain will fall in rainy season, so that we can plant our farms. Can you think of anything else?</text:p>
          </text:list-item>
        </text:list>
        <text:p text:style-name="English_20_Translation_20_-_20_single_20_inset">This demonstrates faith. Faith means putting confidence in something. We put our confidence in many things. We have confidence that a chair will hold us up when we sit in it. We have confidence that the rain will fall in rainy season, so that we can plant our farms. Can you think of anything else?</text:p>
        <text:list text:continue-numbering="true" text:style-name="Bullet_20_-_20_checkmark">
          <text:list-item>
            <text:p text:style-name="M.T._20_Text_20_-_20_Checkmark_20_bullet">A true follower of Jesus has faith, they put their confidence in Jesus because they know that Jesus will do what he said he will do.</text:p>
          </text:list-item>
        </text:list>
        <text:p text:style-name="English_20_Translation_20_-_20_single_20_inset">A true follower of Jesus has faith, they put their confidence in Jesus because they know that Jesus will do what he said he will do.</text:p>
        <text:list text:continue-numbering="true" text:style-name="Bullet_20_-_20_checkmark">
          <text:list-item>
            <text:p text:style-name="M.T._20_Text_20_-_20_Checkmark_20_bullet">Today we will be learning that a true disciple of Jesus has faith in him.</text:p>
          </text:list-item>
        </text:list>
        <text:p text:style-name="English_20_Translation_20_-_20_single_20_inset">Today we will be learning that a true disciple of Jesus has faith in him.</text:p>
        <text:p text:style-name="Sub-Head_20_1">Introduce Truth</text:p>
        <text:p text:style-name="M.T._20_Text">Our truth for today is: <text:s/>A true disciple of Jesus has faith in him.</text:p>
        <text:p text:style-name="English_20_translation">Our truth for today is: <text:s/>A true disciple of Jesus has faith in him.</text:p>
        <text:p text:style-name="M.T._20_Text">This reminds me of a true story from the Bible.</text:p>
        <text:p text:style-name="English_20_translation">This reminds me of a true story from the Bible.</text:p>
        <text:p text:style-name="Sub-Head_20_1">Bible Story: <text:s/>Luke <text:s/>7:1-10</text:p>
        <text:p text:style-name="M.T._20_Text_20_-_20_Indented">[ <text:s/>In the time of Jesus, Rome ruled over the land of Israel. Roman soldiers were stationed at different places throughout the country to keep the peace. <text:s/>]</text:p>
        <text:p text:style-name="English_20_Translation_20_-_20_Indented"><text:soft-page-break/>[ <text:s/>In the time of Jesus, Rome ruled over the land of Israel. Roman soldiers were stationed at different places throughout the country to keep the peace. <text:s/>]</text:p>
        <text:p text:style-name="M.T._20_Text_20_-_20_Bible_20_story_20_inset"><draw:frame draw:style-name="fr4" draw:name="Frame25" text:anchor-type="paragraph" svg:x="-0.0181in" svg:y="0.0035in" svg:width="1.378in" draw:z-index="79"><draw:text-box fo:min-height="1.2055in"><text:p text:style-name="P167"><text:span text:style-name="T6">Picture <text:s/></text:span><text:span text:style-name="T7">19-1</text:span></text:p><text:p text:style-name="P167"><draw:frame draw:style-name="fr5" draw:name="Image21" text:anchor-type="as-char" svg:width="1.2917in" svg:height="0.9366in" draw:z-index="84"><draw:image xlink:href="Pictures/100000000000015F000000FEB38FF3BC.jpg" xlink:type="simple" xlink:show="embed" xlink:actuate="onLoad" draw:mime-type="image/jpeg"/></draw:frame></text:p></draw:text-box></draw:frame>Luke 7:1-5 A certain Roman Centurion lived in Capernaum. A Centurion was an officer in charge of one hundred soldiers. The Centurion had a servant who was very dear to him. The servant was very sick. When the Centurion heard of Jesus, he asked some of the Jewish leaders of the city to go and talk to Jesus for him. These leaders urged Jesus to heal the Centurion's servant. They said, “This man deserves your help. Although he is a Gentile, he loves the Jewish people. He even built a synagogue for us.”</text:p>
        <text:p text:style-name="English_20_Translation_20_-_20_Bible_20_story_20_inset">Luke 7:1-5 A certain Roman Centurion lived in Capernaum. A Centurion was an officer in charge of one hundred soldiers. The Centurion had a servant who was very dear to him. The servant was very sick. When the Centurion heard of Jesus, he asked some of the Jewish leaders of the city to go and talk to Jesus for him. These leaders urged Jesus to heal the Centurion's servant. They said, “This man deserves your help. Although he is a Gentile, he loves the Jewish people. He even built a synagogue for us.”</text:p>
        <text:p text:style-name="M.T._20_Text_20_-_20_Bible_20_story_20_inset"><draw:frame draw:style-name="fr4" draw:name="Frame16" text:anchor-type="paragraph" svg:x="-0.0181in" svg:y="0.0035in" svg:width="1.378in" draw:z-index="80"><draw:text-box fo:min-height="1.2055in"><text:p text:style-name="P168">Picture <text:s/>19–2</text:p><text:p text:style-name="P167"><draw:frame draw:style-name="fr5" draw:name="Image22" text:anchor-type="as-char" svg:width="1.2917in" svg:height="0.9366in" draw:z-index="85"><draw:image xlink:href="Pictures/100000000000015F000000FEBA73A5F5.jpg" xlink:type="simple" xlink:show="embed" xlink:actuate="onLoad" draw:mime-type="image/jpeg"/></draw:frame></text:p></draw:text-box></draw:frame>Luke 7:6-8 So Jesus went with the Jewish leaders to the Centurion's house. When they were not far off, the Centurion saw them coming and sent out some friends. “Give Jesus this message,” he told them. The message said: “Lord, I am not worthy to have you come into my house. This is why I sent other people instead of coming myself. If you just say the word, I know my servant will be healed. I also am a man with authority,” the message continued. “If I say to one of my soldiers, 'Go!' He goes. If I say to another, 'Come!' He comes. If I say to my servant, 'Do this!' He does it.”</text:p>
        <text:p text:style-name="English_20_Translation_20_-_20_Bible_20_story_20_inset">Luke 7:6-8 So Jesus went with the Jewish leaders to the Centurion's house. When they were not far off, the Centurion saw them coming and sent out some friends. “Give Jesus this message,” he told them. The message said: “Lord, I am not worthy to have you come into my house. This is why I sent other people instead of coming myself. If you just say the word, I know my servant will be healed. I also am a man with authority,” the message continued. “If I say to one of my soldiers, 'Go!' He goes. If I say to another, 'Come!' He comes. If I say to my servant, 'Do this!' He does it.” <text:s/></text:p>
        <text:p text:style-name="M.T._20_Text_20_-_20_Bible_20_story_20_inset"><draw:frame draw:style-name="fr4" draw:name="Frame35" text:anchor-type="paragraph" svg:x="-0.0181in" svg:y="0.0035in" svg:width="1.378in" draw:z-index="81"><draw:text-box fo:min-height="1.2055in"><text:p text:style-name="P168">Picture <text:s/>19–3</text:p><text:p text:style-name="P167"><draw:frame draw:style-name="fr5" draw:name="Image23" text:anchor-type="as-char" svg:width="1.2917in" svg:height="0.9366in" draw:z-index="86"><draw:image xlink:href="Pictures/100000000000015F000000FE02298944.jpg" xlink:type="simple" xlink:show="embed" xlink:actuate="onLoad" draw:mime-type="image/jpeg"/></draw:frame></text:p></draw:text-box></draw:frame>Luke 7:9 Jesus was very surprised at the Centurion's words. He turned to those who were following him and said, “I have not found such faith as this even among the people of Israel!” Jesus said to the friends whom the Centurion had sent to him, “Tell the Centurion that it will be done for him as he has believed.”</text:p>
        <text:p text:style-name="English_20_Translation_20_-_20_Bible_20_story_20_inset">Luke 7:9 Jesus was very surprised at the Centurion's words. He turned to those who were following him and said, “I have not found such faith as this even among the people of Israel!” Jesus said to the friends whom the Centurion had sent to him, “Tell the Centurion that it will be done for him as he has believed.” </text:p>
        <text:p text:style-name="M.T._20_Text_20_-_20_Bible_20_story_20_inset"><draw:frame draw:style-name="fr4" draw:name="Frame45" text:anchor-type="paragraph" svg:x="-0.0181in" svg:y="0.0035in" svg:width="1.378in" draw:z-index="82"><draw:text-box fo:min-height="1.2055in"><text:p text:style-name="P168">Picture <text:s/>19–4</text:p><text:p text:style-name="P167"><draw:frame draw:style-name="fr5" draw:name="Image24" text:anchor-type="as-char" svg:width="1.2917in" svg:height="0.9366in" draw:z-index="87"><draw:image xlink:href="Pictures/100000000000015F000000FE6000D6B4.jpg" xlink:type="simple" xlink:show="embed" xlink:actuate="onLoad" draw:mime-type="image/jpeg"/></draw:frame></text:p></draw:text-box></draw:frame>Luke 7:10 Then Jesus sent the Centurion's friends back to the house. When they got there, they found the servant was already well!</text:p>
        <text:p text:style-name="English_20_Translation_20_-_20_Bible_20_story_20_inset">Luke 7:10 Then Jesus sent the Centurion's friends back to the house. When they got there, they found the servant was already well!</text:p>
        <text:p text:style-name="English_20_Translation_20_-_20_Bible_20_story_20_inset"/>
        <text:p text:style-name="English_20_Translation_20_-_20_Bible_20_story_20_inset"/>
        <text:p text:style-name="English_20_Translation_20_-_20_Bible_20_story_20_inset"/>
        <text:p text:style-name="Sub-Head_20_1">Application</text:p>
        <text:p text:style-name="M.T._20_Text_20_-_20_Indented">In what, or who do you put your confidence? Some people look to the traditional medicine man, the Fon, family, friends, or teachers. It is not wrong to look to some of these people for help and guidance if they are followers of Jesus, but they cannot do what Jesus can do: save us from our sins and set us free. They also will let us down sometimes because they are human. A true follower of Jesus puts their confidence in Jesus. Jesus will never let us down.</text:p>
        <text:p text:style-name="English_20_Translation_20_-_20_Indented">In what, or who do you put your confidence? Some people look to the traditional medicine man, the Fon, family, friends, or teachers. It is not wrong to look to some of these people for help and guidance if they are followers of Jesus, but they cannot do what Jesus can do: save us from our sins and set us free. They also will let us down sometimes because they are human. A true follower of Jesus puts their confidence in Jesus. Jesus will never let us down.</text:p>
        <text:p text:style-name="M.T._20_Text">A true disciple of Jesus has faith in him.</text:p>
        <text:p text:style-name="English_20_translation">A true disciple of Jesus has faith in him.</text:p>
        <text:p text:style-name="Sub-Head_20_2">Homework</text:p>
        <text:p text:style-name="P169">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English_20_Translation_20_-_20_Indented">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Sub-Head_20_1_20_No_20_follow">Prayer / Song</text:p>
        <text:p text:style-name="Section_20_Heading"><text:soft-page-break/>Review Game</text:p>
        <text:p text:style-name="Sub-Head_20_1">Throw Bottle Caps into Containers</text:p>
        <text:p text:style-name="Sub-Head_20_2">Materials</text:p>
        <text:list text:continue-numbering="true" text:style-name="Bullet_20_-_20_checkmark">
          <text:list-item>
            <text:p text:style-name="Body_20_Bullet_20_-_20_Checkmark">Draw a line for the children to stand behind.</text:p>
          </text:list-item>
          <text:list-item>
            <text:p text:style-name="Body_20_Bullet_20_-_20_Checkmark_20_-_20_No_20_follow">Arrange 5-10 different sized containers or cups (you can also use shoes or hats/caps) into a group a distance from the line.</text:p>
          </text:list-item>
          <text:list-item>
            <text:p text:style-name="Body_20_Bullet_20_-_20_Checkmark_20_-_20_No_20_follow">Put one small paper with points written on it inside each container.</text:p>
          </text:list-item>
          <text:list-item>
            <text:p text:style-name="Body_20_Bullet_20_-_20_Checkmark_20_-_20_No_20_follow">Collect 2 bottle caps, stones, or other small things to throw and set them on the line that you drew for the children to stand behind.</text:p>
          </text:list-item>
        </text:list>
        <text:p text:style-name="Sub-Head_20_2">How to Play</text:p>
        <text:list xml:id="list92018538750087" text:continue-numbering="true" text:style-name="Bullet_20_-_20_checkmark">
          <text:list-item>
            <text:p text:style-name="Body_20_Bullet_20_-_20_Checkmark">Divide the class into 2 teams.</text:p>
          </text:list-item>
          <text:list-item>
            <text:p text:style-name="Body_20_Bullet_20_-_20_Checkmark_20_-_20_No_20_follow">The first team tries to answer the first question. <text:s/>The teacher can use this time to explain what the children do not seem to understand.</text:p>
          </text:list-item>
          <text:list-item>
            <text:p text:style-name="Body_20_Bullet_20_-_20_Checkmark_20_-_20_No_20_follow">The child on the team that answers the question correctly comes to the front and stands behind the line. <text:s/>If the child only gets part of the question right, the teacher can fill in the rest.</text:p>
          </text:list-item>
          <text:list-item>
            <text:p text:style-name="Body_20_Bullet_20_-_20_Checkmark_20_-_20_No_20_follow">The child then tries to throw the bottle cap into the group of containers. <text:s/>Wherever the bottle cap enters, the points on the paper inside that container are what the team has.</text:p>
          </text:list-item>
          <text:list-item>
            <text:p text:style-name="Body_20_Bullet_20_-_20_Checkmark_20_-_20_No_20_follow">Record the points. <text:s/><text:span text:style-name="T1">The team with the most points wins.</text:span></text:p>
          </text:list-item>
          <text:list-item>
            <text:p text:style-name="Body_20_Bullet_20_-_20_Checkmark_20_-_20_No_20_follow">Be sure to clap for both sides. <text:s/>No name-calling. <text:s/>Encourage good sportsmanship.</text:p>
          </text:list-item>
        </text:list>
        <text:p text:style-name="Sub-Head_20_2">Questions for Review Game</text:p>
        <text:list text:style-name="L13">
          <text:list-item>
            <text:p text:style-name="P170">Who ruled Israel during the time of Jesus? (The Romans)</text:p>
          </text:list-item>
        </text:list>
        <text:p text:style-name="English_20_Translation_20_-_20_single_20_inset">Who ruled Israel during the time of Jesus? (The Romans)</text:p>
        <text:list text:continue-numbering="true" text:style-name="L13">
          <text:list-item>
            <text:p text:style-name="P170">What kind of Roman Soldier was a Centurion? (A soldier who commanded over one hundred other soldiers)</text:p>
          </text:list-item>
        </text:list>
        <text:p text:style-name="English_20_Translation_20_-_20_single_20_inset">What kind of Roman Soldier was a Centurion? (A soldier who commanded over one hundred other soldiers)</text:p>
        <text:list text:continue-numbering="true" text:style-name="L13">
          <text:list-item>
            <text:p text:style-name="P170">What problem did the Centurion have? (His dear servant was very sick.)</text:p>
          </text:list-item>
        </text:list>
        <text:p text:style-name="English_20_Translation_20_-_20_single_20_inset">What problem did the Centurion have? (His dear servant was very sick.)</text:p>
        <text:list text:continue-numbering="true" text:style-name="L13">
          <text:list-item>
            <text:p text:style-name="P170">What did the Centurion do when he heard about Jesus? (He asked some Jewish leaders to go and talk to Jesus for him.)</text:p>
          </text:list-item>
        </text:list>
        <text:p text:style-name="English_20_Translation_20_-_20_single_20_inset">What did the Centurion do when he heard about Jesus? (He asked some Jewish leaders to go and talk to Jesus for him.)</text:p>
        <text:list text:continue-numbering="true" text:style-name="L13">
          <text:list-item>
            <text:p text:style-name="P170">What did the Jewish leaders tell Jesus about the Centurion? (The Centurion was kind to the Jews, and even built them a place to worship.)</text:p>
          </text:list-item>
        </text:list>
        <text:p text:style-name="English_20_Translation_20_-_20_single_20_inset">What did the Jewish leaders tell Jesus about the Centurion? (The Centurion was kind to the Jews, and even built them a place to worship.)</text:p>
        <text:list text:continue-numbering="true" text:style-name="L13">
          <text:list-item>
            <text:p text:style-name="P170">What did the Centurion do when he saw Jesus and the Jewish leaders on their way to his house? (He sent a message to Jesus telling him not to enter his house because he felt he was unworthy to have Jesus in his house.)</text:p>
          </text:list-item>
        </text:list>
        <text:p text:style-name="English_20_Translation_20_-_20_single_20_inset">What did the Centurion do when he saw Jesus and the Jewish leaders on their way to his house? (He sent a message to Jesus telling him not to enter his house because he felt he was unworthy to have Jesus in his house.)</text:p>
        <text:list text:continue-numbering="true" text:style-name="L13">
          <text:list-item>
            <text:p text:style-name="P170">How did the Centurion want Jesus to heal his servant? (Say a word so that his servant would be healed.)</text:p>
          </text:list-item>
        </text:list>
        <text:p text:style-name="English_20_Translation_20_-_20_single_20_inset">How did the Centurion want Jesus to heal his servant? (Say a word so that his servant would be healed.)</text:p>
        <text:list text:continue-numbering="true" text:style-name="L13">
          <text:list-item>
            <text:p text:style-name="P170">How did the Centurion describe his authority? (He tells a soldier to come and he comes, or he tells a soldier to go, and he goes. He tells a soldier to do something, and he does it.)</text:p>
          </text:list-item>
        </text:list>
        <text:p text:style-name="English_20_Translation_20_-_20_single_20_inset">How did the Centurion describe his authority? (He tells a soldier to come and he comes, or he tells a soldier to go, and he goes. He tells a soldier to do something, and he does it.)<text:tab/></text:p>
        <text:list text:continue-numbering="true" text:style-name="L13">
          <text:list-item>
            <text:p text:style-name="P170">Why was Jesus surprised? (He had not seen so much faith in all of Israel. The Centurion was not Jewish, but he had more confidence in Jesus than the Jewish people.)</text:p>
          </text:list-item>
        </text:list>
        <text:p text:style-name="English_20_Translation_20_-_20_single_20_inset">Why was Jesus surprised? (He had not seen so much faith in all of Israel. The Centurion was not Jewish, but he had more confidence in Jesus than the Jewish people.)</text:p>
        <text:list text:continue-numbering="true" text:style-name="L13">
          <text:list-item>
            <text:p text:style-name="P170">What did Jesus do for the Centurion? (Jesus healed the Centurion's servant.)</text:p>
          </text:list-item>
        </text:list>
        <text:p text:style-name="English_20_Translation_20_-_20_single_20_inset">What did Jesus do for the Centurion? (Jesus healed the Centurion's servant.)</text:p>
        <text:list text:continue-numbering="true" text:style-name="L13">
          <text:list-item>
            <text:p text:style-name="P170"><text:soft-page-break/>In what kinds of things, or people, do we wrongly place our confidence in? (Sometimes we place our confidence in traditional doctors, fons, teachers, family, and friends.)</text:p>
          </text:list-item>
        </text:list>
        <text:p text:style-name="English_20_Translation_20_-_20_single_20_inset">In what kinds of things, or people, do we wrongly place our confidence in? (Sometimes we place our confidence in traditional doctors, fons, teachers, family, and friends.)</text:p>
        <text:list text:continue-numbering="true" text:style-name="L13">
          <text:list-item>
            <text:p text:style-name="P170">As followers of Jesus, in whom should we put our confidence in? (Jesus)</text:p>
          </text:list-item>
        </text:list>
        <text:p text:style-name="English_20_Translation_20_-_20_single_20_inset">As followers of Jesus, in whom should we put our confidence in? (Jesus)</text:p>
        <text:p text:style-name="Sub-Head_20_1_20_No_20_follow">Song</text:p>
        <text:p text:style-name="Section_20_Heading">Memory Verse</text:p>
        <text:p text:style-name="Sub-Head_20_2">Materials and Preparations</text:p>
        <text:list xml:id="list92018064929404" text:continue-list="list92018538750087" text:style-name="Bullet_20_-_20_checkmark">
          <text:list-item>
            <text:p text:style-name="Body_20_Bullet_20_-_20_Checkmark_20_-_20_No_20_follow">Put a bookmark in <text:s/>Luke 7:9</text:p>
          </text:list-item>
          <text:list-item>
            <text:p text:style-name="Body_20_Bullet_20_-_20_Checkmark">Write memory verse on the blackboard.</text:p>
          </text:list-item>
        </text:list>
        <text:p text:style-name="M.T._20_Text_20_-_20_Single_20_Inset">Luke 7:9 When Jesus heard this, he was amazed at him, and turning to the crowd following him, he said, “I tell you, I have not found such great faith even in Israel.”</text:p>
        <text:p text:style-name="English_20_Translation_20_-_20_single_20_inset">Luke 7:9 When Jesus heard this, he was amazed at him, and turning to the crowd following him, he said, “I tell you, I have not found such great faith even in Israel.”</text:p>
        <text:p text:style-name="Sub-Head_20_1">Teach and Explain</text:p>
        <text:p text:style-name="M.T._20_Text_20_-_20_Indented">Our memory verse is in the Gospel of Luke. <text:s/>That is in the New Testament, a part of the Bible.</text:p>
        <text:p text:style-name="English_20_Translation_20_-_20_Indented">Our memory verse is in the Gospel of Luke. <text:s/>That is in the New Testament, a part of the Bible.</text:p>
        <text:list xml:id="list92019469411173" text:continue-list="list92019742033923"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Body_20_Numbered_20_List">Read the verse with the children as you point to the words.</text:p>
          </text:list-item>
          <text:list-item>
            <text:p text:style-name="Body_20_Numbered_20_List">Explain the verse:</text:p>
          </text:list-item>
        </text:list>
        <text:list text:continue-list="list92018064929404" text:style-name="Bullet_20_-_20_checkmark">
          <text:list-item>
            <text:p text:style-name="M.T._20_Text_20_-_20_Checkmark_20_bullet">Remember, a man named Luke wrote this book in the Bible. <text:s/>He was a doctor and a friend of Paul. <text:s/>He wrote this book so we would know what Jesus did.</text:p>
          </text:list-item>
        </text:list>
        <text:p text:style-name="English_20_Translation_20_-_20_single_20_inset">Remember, a man named Luke wrote this book in the Bible. <text:s/>He was a doctor and a friend of Paul. <text:s/>He wrote this book so we would know what Jesus did.</text:p>
        <text:list xml:id="list92018249151686" text:continue-numbering="true" text:style-name="Bullet_20_-_20_checkmark">
          <text:list-item>
            <text:p text:style-name="Body_20_Bullet_20_-_20_Checkmark">As you read the verse, circle the words shown below. <text:s/>Explain each of these words.</text:p>
          </text:list-item>
        </text:list>
        <text:list text:continue-list="list92018122619308" text:style-name="Bullet_20_-_20_Diamond">
          <text:list-item>
            <text:p text:style-name="M.T._20_Text_20_-_20_Diamond_20_bullet"><text:span text:style-name="Body_20_Emphasized_20_-_20_Small">Heard this: <text:s/></text:span>What was it that Jesus heard? Remember in the story for today we heard about the Centurion who asked Jesus to heal his servant, by just speaking a word. He knew Jesus had authority to do that because he himself was a man of authority. He tells his servant's come, go, do this, or that, and they do it.</text:p>
          </text:list-item>
        </text:list>
        <text:p text:style-name="English_20_Translation_20_-_20_double_20_inset">Heard this: <text:s/>What was it that Jesus heard? Remember in the story for today we heard about the Centurion who asked Jesus to heal his servant, by just speaking a word. He knew Jesus had authority to do that because he himself was a man of authority. He tells his servant's come, go, do this, or that, and they do it.</text:p>
        <text:list text:continue-numbering="true" text:style-name="Bullet_20_-_20_Diamond">
          <text:list-item>
            <text:p text:style-name="M.T._20_Text_20_-_20_Diamond_20_bullet"><text:span text:style-name="Body_20_Emphasized_20_-_20_Small">Amazed: <text:s/></text:span>Do you remember why Jesus was amazed at the words of the Centurion? (Jesus was amazed because the Centurion showed his faith and confidence in Jesus.)</text:p>
          </text:list-item>
        </text:list>
        <text:p text:style-name="English_20_Translation_20_-_20_double_20_inset">Amazed: <text:s/>Do you remember why Jesus was amazed at the words of the Centurion? (Jesus was amazed because the Centurion showed his faith and confidence in Jesus.)</text:p>
        <text:list text:continue-numbering="true" text:style-name="Bullet_20_-_20_Diamond">
          <text:list-item>
            <text:p text:style-name="M.T._20_Text_20_-_20_Diamond_20_bullet"><text:span text:style-name="Body_20_Emphasized_20_-_20_Small">Crowd: <text:s/></text:span>Why was a crowd following Jesus? (They wanted to see his miracles and hear his teachings.)</text:p>
          </text:list-item>
        </text:list>
        <text:p text:style-name="English_20_Translation_20_-_20_double_20_inset">Crowd: <text:s/>Why was a crowd following Jesus? (They wanted to see his miracles and hear his teachings.)</text:p>
        <text:list xml:id="list92018913493986" text:continue-numbering="true" text:style-name="Bullet_20_-_20_Diamond">
          <text:list-item>
            <text:p text:style-name="M.T._20_Text_20_-_20_Diamond_20_bullet"><text:span text:style-name="Body_20_Emphasized_20_-_20_Small">Great Faith: <text:s/></text:span>Why did Jesus say that the Centurion has such great faith? (Jesus said that the Centurion had great faith because he put his faith and confidence in Jesus.)</text:p>
          </text:list-item>
        </text:list>
        <text:p text:style-name="English_20_Translation_20_-_20_double_20_inset">Great Faith: <text:s/>Why did Jesus say that the Centurion has such great faith? (Jesus said that the Centurion had great faith because he put his faith and confidence in Jesus.)</text:p>
        <text:list xml:id="list92018979816408" text:continue-list="list92019469411173"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ext:p text:style-name="M.T._20_Text">Remember our truth for today? <text:s/><text:span text:style-name="T8">Let’s all say it together:</text:span></text:p>
        <text:p text:style-name="English_20_translation">Remember our truth for today? <text:s/>Let’s all say it together:</text:p>
        <text:p text:style-name="M.T._20_Text">A true disciple of Jesus has faith in him.</text:p>
        <text:p text:style-name="English_20_translation">A true disciple of Jesus has faith in him.</text:p>
        <text:p text:style-name="Section_20_Heading"><text:soft-page-break/>Memory Verse Review</text:p>
        <text:p text:style-name="Sub-Head_20_1">Children Repeat the Verse by Using Movements</text:p>
        <text:list xml:id="list92017939926079" text:continue-list="list92018249151686" text:style-name="Bullet_20_-_20_checkmark">
          <text:list-item>
            <text:p text:style-name="Body_20_Bullet_20_-_20_Checkmark">Talk about different movements with our bodies: Your hands on your head, standing on one foot, jumping up and down, touching your toes....</text:p>
          </text:list-item>
          <text:list-item>
            <text:p text:style-name="Body_20_Bullet_20_-_20_Checkmark_20_-_20_No_20_follow">Ask the children the first question.</text:p>
          </text:list-item>
          <text:list-item>
            <text:p text:style-name="Body_20_Bullet_20_-_20_Checkmark_20_-_20_No_20_follow">When a question is answered correctly, that child chooses one of the movements listed above or chooses their own movement.</text:p>
          </text:list-item>
          <text:list-item>
            <text:p text:style-name="Body_20_Bullet_20_-_20_Checkmark_20_-_20_No_20_follow">The verse is said out loud together while doing the movement.</text:p>
          </text:list-item>
          <text:list-item>
            <text:p text:style-name="Body_20_Bullet_20_-_20_Checkmark_20_-_20_No_20_follow">Then the next question is asked.</text:p>
          </text:list-item>
          <text:list-item>
            <text:p text:style-name="Body_20_Bullet_20_-_20_Checkmark_20_-_20_No_20_follow">When that question is answered correctly, another child chooses one of the movements.</text:p>
          </text:list-item>
          <text:list-item>
            <text:p text:style-name="Body_20_Bullet_20_-_20_Checkmark_20_-_20_No_20_follow">The verse is said aloud again while doing the movement.</text:p>
          </text:list-item>
          <text:list-item>
            <text:p text:style-name="Body_20_Bullet_20_-_20_Checkmark_20_-_20_No_20_follow">Do this until all the questions are asked.</text:p>
          </text:list-item>
        </text:list>
        <text:p text:style-name="Sub-Head_20_2">Questions for Memory Verse</text:p>
        <text:list text:style-name="L14">
          <text:list-item text:start-value="1">
            <text:p text:style-name="P171">How did the Centurion understand Jesus' authority? (He understood that Jesus had authority to do that, because he himself was a man of authority. He tells his servants come, go, do this, or that, and they do it.)</text:p>
          </text:list-item>
        </text:list>
        <text:p text:style-name="English_20_Translation_20_-_20_single_20_inset">How did the Centurion understand Jesus' authority? (He understood that Jesus had authority to do that, because he himself was a man of authority. He tells his servants come, go, do this, or that, and they do it.)</text:p>
        <text:list text:continue-numbering="true" text:style-name="L14">
          <text:list-item>
            <text:p text:style-name="P171">What amazed Jesus? (The Centurion's great faith in him)</text:p>
          </text:list-item>
        </text:list>
        <text:p text:style-name="English_20_Translation_20_-_20_single_20_inset">What amazed Jesus? (The Centurion's great faith in him)</text:p>
        <text:list text:continue-numbering="true" text:style-name="L14">
          <text:list-item>
            <text:p text:style-name="P171">Why was a crowd following Jesus? (They wanted to see his miracles and hear his teachings.)</text:p>
          </text:list-item>
        </text:list>
        <text:p text:style-name="English_20_Translation_20_-_20_single_20_inset">Why was a crowd following Jesus? (They wanted to see his miracles and hear his teachings.)</text:p>
        <text:list text:continue-numbering="true" text:style-name="L14">
          <text:list-item>
            <text:p text:style-name="P171">In whom does a follower of Jesus put their confidence in? (Jesus)</text:p>
          </text:list-item>
        </text:list>
        <text:p text:style-name="English_20_Translation_20_-_20_single_20_inset">In whom does a follower of Jesus put their confidence in? (Jesus)</text:p>
        <text:list text:continue-numbering="true" text:style-name="L14">
          <text:list-item>
            <text:p text:style-name="P171">Why does a follower of Jesus put their confidence in Jesus? What does Jesus have? (Jesus has all the authority.)</text:p>
          </text:list-item>
        </text:list>
        <text:p text:style-name="English_20_Translation_20_-_20_single_20_inset">Why does a follower of Jesus put their confidence in Jesus? What does Jesus have? (Jesus has all the authority.)</text:p>
        <text:p text:style-name="Sub-Head_20_1_20_No_20_follow">Song</text:p>
        <text:p text:style-name="Section_20_Heading">Closing and Homework</text:p>
        <text:list text:continue-list="list92017939926079" text:style-name="Bullet_20_-_20_checkmark">
          <text:list-item>
            <text:p text:style-name="Body_20_Bullet_20_-_20_Checkmark">Say the truth together:</text:p>
          </text:list-item>
        </text:list>
        <text:p text:style-name="M.T._20_Text_20_-_20_Single_20_Inset">A true disciple of Jesus has faith in him.</text:p>
        <text:p text:style-name="English_20_Translation_20_-_20_single_20_inset">A true disciple of Jesus has faith in him.</text:p>
        <text:list text:continue-numbering="true" text:style-name="Bullet_20_-_20_checkmark">
          <text:list-item>
            <text:p text:style-name="Body_20_Bullet_20_-_20_Checkmark">Say the memory verse together:</text:p>
          </text:list-item>
        </text:list>
        <text:p text:style-name="M.T._20_Text_20_-_20_Single_20_Inset">Luke 7:9 When Jesus heard this, he was amazed at him, and turning to the crowd following him, he said, “I tell you, I have not found such great faith even in Israel.”</text:p>
        <text:p text:style-name="English_20_Translation_20_-_20_single_20_inset">Luke 7:9 When Jesus heard this, he was amazed at him, and turning to the crowd following him, he said, “I tell you, I have not found such great faith even in Israel.”</text:p>
        <text:list text:continue-numbering="true" text:style-name="Bullet_20_-_20_checkmark">
          <text:list-item>
            <text:p text:style-name="Body_20_Bullet_20_-_20_Checkmark">Review the homework:</text:p>
          </text:list-item>
        </text:list>
        <text:p text:style-name="P172">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text:p>
        <text:p text:style-name="English_20_Translation_20_-_20_single_20_inset">This week, think of something that you can pray and ask God to help you with. Maybe you are worried about an exam, or you are sad because you are not getting along with a friend. Pray and ask God to help you with any problems that you may have. Just like the Centurion had confidence in Jesus to help him, we can put our confidence in Jesus to help us with our problems, too. </text:p>
        <text:list xml:id="list92019967347882" text:continue-numbering="true"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 <text:s/></text:span>that we are able to have faith in such an amazing God.</text:p>
        <text:p text:style-name="Body"><text:span text:style-name="Body_20_Emphasized_20_-_20_Small">Ask God <text:s/></text:span>that the children will go to Jesus with any problems that they may have.</text:p>
        <text:p text:style-name="Sub-Head_20_-_20_Coloring_20_page_20_last_20_paragraph">Colouring page to colour and take home!</text:p>
      </text:section>
      <text:p text:style-name="Body"><text:soft-page-break/></text:p>
      <text:p text:style-name="P54">A true disciple of Jesus has faith in him.</text:p>
      <text:p text:style-name="Bible_20_Story_20_-_20_Graphic_20_Number"><draw:frame draw:style-name="fr8" draw:name="Image26" text:anchor-type="as-char" svg:width="5.0618in" svg:height="4.8634in" draw:z-index="88"><draw:image xlink:href="Pictures/1000000100000B1200000B12621886DF.tif" xlink:type="simple" xlink:show="embed" xlink:actuate="onLoad" draw:mime-type="image/tiff"/></draw:frame></text:p>
      <text:p text:style-name="M.T._20_Coloring_20_Page_20_-_20_Memory_20_Verse">Luke 7:9 When Jesus heard this, he was amazed at him, and turning to the crowd following him, he said, “I tell you, I have not found such great faith even in Israel.”</text:p>
      <text:p text:style-name="P55">A true disciple of Jesus has faith in him.</text:p>
      <text:p text:style-name="Bible_20_Story_20_-_20_Graphic_20_Number"><draw:frame draw:style-name="fr8" draw:name="Image25" text:anchor-type="as-char" svg:width="5.0618in" svg:height="4.8634in" draw:z-index="89"><draw:image xlink:href="Pictures/1000000100000B1200000B12621886DF.tif" xlink:type="simple" xlink:show="embed" xlink:actuate="onLoad" draw:mime-type="image/tiff"/></draw:frame></text:p>
      <text:p text:style-name="Bible_20_Story_20_-_20_Graphic_20_Number">Luke 7:9 When Jesus heard this, he was amazed at him, and turning to the crowd following him, he said, “I tell you, I have not found such great faith even in Israel.”</text:p>
      <text:h text:style-name="P25" text:outline-level="1"><draw:frame draw:style-name="fr3" draw:name="Image27" text:anchor-type="char" svg:x="0in" svg:y="0.0161in" svg:width="1.0752in" svg:height="1.0752in" draw:z-index="90"><draw:image xlink:href="Pictures/10000001000000D8000000D87BF78704.png" xlink:type="simple" xlink:show="embed" xlink:actuate="onLoad" draw:mime-type="image/png"/></draw:frame>Review Lesson</text:h>
      <text:p text:style-name="M.T._20_Lesson_20_Title">Review Lesson</text:p>
      <text:p text:style-name="English_20_Translation_20_-_20_Lesson_20_title">Review Lesson</text:p>
      <text:p text:style-name="M.T._20_Text_20_-_20_Lesson_20_Title_20_Scrip_20_Reference">Lessons 14-19</text:p>
      <text:p text:style-name="Body_20_Tight_20_lines">NOTE: <text:s/>It is important to review the lessons previously taught to help the children remember what they have learned. <text:s/>It is also important to make the review lessons exciting and fun! <text:s/>Turn the whole lesson into a game. <text:s/>If you have time, have the children act out their favourite stories while you read it from the “Picture Book”.</text:p>
      <text:p text:style-name="Sub-Head_20_1">Materials</text:p>
      <text:list text:continue-numbering="true" text:style-name="Bullet_20_-_20_checkmark">
        <text:list-item>
          <text:p text:style-name="Body_20_Bullet_20_-_20_Checkmark">Quarter <text:s/>2 <text:s/>Picture book, Bible, chalk</text:p>
        </text:list-item>
        <text:list-item>
          <text:p text:style-name="Body_20_Bullet_20_-_20_Checkmark_20_-_20_No_20_follow">Cooking pot with a lid</text:p>
        </text:list-item>
        <text:list-item>
          <text:p text:style-name="Body_20_Bullet_20_-_20_Checkmark_20_-_20_No_20_follow">Rope, string, or yarn cut into 25 pieces that are all different sizes</text:p>
        </text:list-item>
      </text:list>
      <text:section text:style-name="Sect1" text:name="L-20 Detail Plan">
        <text:p text:style-name="P173">Song</text:p>
        <text:p text:style-name="P174">Opening</text:p>
        <text:p text:style-name="P175">Welcome</text:p>
        <text:list text:continue-numbering="true" text:style-name="Bullet_20_-_20_checkmark">
          <text:list-item>
            <text:p text:style-name="P176">Be sure the children know you are happy to see them!</text:p>
          </text:list-item>
          <text:list-item>
            <text:p text:style-name="P176">Introduce yourself and your helpers.</text:p>
          </text:list-item>
        </text:list>
        <text:p text:style-name="P175">Sharing Time</text:p>
        <text:list xml:id="list92018430260815" text:continue-numbering="true" text:style-name="Bullet_20_-_20_checkmark">
          <text:list-item>
            <text:p text:style-name="P176">Say the truth from the previous lesson together:</text:p>
          </text:list-item>
        </text:list>
        <text:p text:style-name="P177">A true disciple of Jesus has faith in him.</text:p>
        <text:p text:style-name="P178">A true disciple of Jesus has faith in him.</text:p>
        <text:p text:style-name="P177">Do you remember what it means to put your faith in Jesus? (It means you trust him above everyone else.)</text:p>
        <text:list text:style-name="Bullet_20_-_20_Check_20_mark">
          <text:list-header>
            <text:p text:style-name="P179">Do you remember what it means to put your faith in Jesus? (It means you trust him above everyone else.)</text:p>
          </text:list-header>
        </text:list>
        <text:list text:continue-list="list92018430260815" text:style-name="Bullet_20_-_20_checkmark">
          <text:list-item>
            <text:p text:style-name="P176">Say the memory verse from the previous lesson together:</text:p>
          </text:list-item>
        </text:list>
        <text:p text:style-name="P177">Luke 7:9 When Jesus heard this, he was amazed at him, and turning to the crowd following him, he said, “I tell you, I have not found such great faith even in Israel.”</text:p>
        <text:p text:style-name="P180">Luke 7:9 When Jesus heard this, he was amazed at him, and turning to the crowd following him, he said, “I tell you, I have not found such great faith even in Israel.”</text:p>
        <text:list text:continue-numbering="true" text:style-name="Bullet_20_-_20_checkmark">
          <text:list-item>
            <text:p text:style-name="P176">Review the homework from the previous lesson:</text:p>
          </text:list-item>
        </text:list>
        <text:p text:style-name="P177">Did you think of something that you can pray and ask God to help you with? What are some things that you need God's help with? Did you pray to God about these things?</text:p>
        <text:p text:style-name="P178">Did you think of something that you can pray and ask God to help you with? What are some things that you need God's help with? Did you pray to God about these things?</text:p>
        <text:p text:style-name="P181">(Give children time to share.)</text:p>
        <text:p text:style-name="P175">Prayer</text:p>
        <text:list text:continue-numbering="true" text:style-name="Bullet_20_-_20_checkmark">
          <text:list-item>
            <text:p text:style-name="P176">Let the children share praises and prayer requests.</text:p>
          </text:list-item>
          <text:list-item>
            <text:p text:style-name="P182">Keep a record of what the children are sharing so you can remember to thank God together for answered prayers.</text:p>
          </text:list-item>
          <text:list-item>
            <text:p text:style-name="P182">Spend time praying together. <text:s/>Let the children pray out loud if they volunteer. <text:s/>Do not force anyone to pray out loud.</text:p>
          </text:list-item>
        </text:list>
        <text:p text:style-name="P173">Song</text:p>
        <text:p text:style-name="P183">Today we are going to do another review lesson. We are going to review all the words, truths, stories and memory verses that we have had up to this point. We are going to start with a game right now!</text:p>
        <text:p text:style-name="P184">Today we are going to do another review lesson. We are going to review all the words, truths, stories and memory verses that we have had up to this point. We are going to start with a game right now!</text:p>
        <text:p text:style-name="P174"><text:soft-page-break/>Review Game</text:p>
        <text:p text:style-name="P175">Spaghetti Game</text:p>
        <text:p text:style-name="P185">Materials</text:p>
        <text:list text:continue-numbering="true" text:style-name="Bullet_20_-_20_checkmark">
          <text:list-item>
            <text:p text:style-name="P176">Cooking pot with a lid</text:p>
          </text:list-item>
          <text:list-item>
            <text:p text:style-name="P182">Rope, string, or yarn cut into 10 pieces that are all different sizes</text:p>
          </text:list-item>
        </text:list>
        <text:p text:style-name="P185">How to Play</text:p>
        <text:list xml:id="list92018740133259" text:continue-numbering="true" text:style-name="Bullet_20_-_20_checkmark">
          <text:list-item>
            <text:p text:style-name="P176">Put the rope, string, or yarn in the pot with some of it hanging out. <text:s/>Put the lid on the pot over the ropes.</text:p>
          </text:list-item>
          <text:list-item>
            <text:p text:style-name="P182">Divide the children into two teams.</text:p>
          </text:list-item>
          <text:list-item>
            <text:p text:style-name="P182">When someone on the team answers the question correctly, they come to the front and choose one of the ropes. (They never know if they will get a long or short rope.)</text:p>
          </text:list-item>
          <text:list-item>
            <text:p text:style-name="P182">The ropes that each team gets are tied together into one long rope.</text:p>
          </text:list-item>
          <text:list-item>
            <text:p text:style-name="P182">At the end, measure the ropes from the two teams side by side.</text:p>
          </text:list-item>
          <text:list-item>
            <text:p text:style-name="P182">The teams with the longest rope wins.</text:p>
          </text:list-item>
        </text:list>
        <text:p text:style-name="P186"/>
        <text:p text:style-name="P187">NOTE: <text:s/>It is important to remember that this is a review. Teach the key points, but DO NOT teach the entire story again.</text:p>
        <text:p text:style-name="P174">Lesson <text:s/>14</text:p>
        <text:p text:style-name="P175">The Twelve Apostles</text:p>
        <text:p text:style-name="P188">In Lesson 14 we learned about Jesus and his followers. The people who followed Jesus and lived by his teachings were called 'disciples'. Jesus chose twelve men to be his chief disciples, and he called them apostles, because they were going to teach about Jesus to others. These disciples went everywhere with Jesus and were very close to him. We can learn how to be disciples, or followers of Jesus by obeying his teachings and imitating him.</text:p>
        <text:p text:style-name="P189">In Lesson 14 we learned about Jesus and his followers. The people who followed Jesus and lived by his teachings were called 'disciples'. Jesus chose twelve men to be his chief disciples, and he called them apostles, because they were going to teach about Jesus to others. These disciples went everywhere with Jesus and were very close to him. We can learn how to be disciples, or followers of Jesus by obeying his teachings and imitating him.</text:p>
        <text:p text:style-name="P183">The truth of this lesson is: <text:s/>A true disciple of Jesus follows him and his teachings.</text:p>
        <text:p text:style-name="P184">The truth of this lesson is: <text:s/>A true disciple of Jesus follows him and his teachings.</text:p>
        <text:p text:style-name="P185">Questions for Review</text:p>
        <text:list text:style-name="L15">
          <text:list-item text:start-value="1">
            <text:p text:style-name="P190">What are disciples? (People that follow Jesus and live by his teachings)</text:p>
          </text:list-item>
        </text:list>
        <text:p text:style-name="P178">What are disciples? (People that follow Jesus and live by his teachings)</text:p>
        <text:list text:continue-numbering="true" text:style-name="L15">
          <text:list-item>
            <text:p text:style-name="P190">What was the apostles' job? (Carry the teachings of Jesus to others)</text:p>
          </text:list-item>
        </text:list>
        <text:p text:style-name="P178">What was the apostles' job? (Carry the teachings of Jesus to others)</text:p>
        <text:list text:continue-numbering="true" text:style-name="L15">
          <text:list-item>
            <text:p text:style-name="P190">How can we be disciples of Jesus? (By following his teachings, and by trying to imitate him in the way we live.)</text:p>
          </text:list-item>
        </text:list>
        <text:p text:style-name="P178">How can we be disciples of Jesus? (By following his teachings, and by trying to imitate him in the way we live.)</text:p>
        <text:list text:continue-numbering="true" text:style-name="L15">
          <text:list-item>
            <text:p text:style-name="P190">What is one way we can follow Jesus? (Pray, read the Bible, tell others about him, love others, etc.)</text:p>
          </text:list-item>
        </text:list>
        <text:p text:style-name="P178">What is one way we can follow Jesus? (Pray, read the Bible, tell others about him, love others, etc.)</text:p>
        <text:list text:continue-numbering="true" text:style-name="L15">
          <text:list-item>
            <text:p text:style-name="P190">What is another way we can follow Jesus? (See answers to 4.)</text:p>
          </text:list-item>
        </text:list>
        <text:p text:style-name="P178">What is another way we can follow Jesus? (See answers to 4.)</text:p>
        <text:p text:style-name="P174">Lesson <text:s/>15</text:p>
        <text:p text:style-name="P175">True Disciples of Jesus Love Their Enemies</text:p>
        <text:p text:style-name="P188">Lesson 15 was a story from the village. There were two families that lived close to each other, the Ngwa family and the Mbeng family, but the Mbeng family hated the Ngwa family. One day, the Mbeng family chased away the Ngwa family from their farm and they scattered the Ngwa family's farm. When the Ngwa family saw this, they knew they would have much work to do. The children knew who had done this, so they wanted to scatter the Mbeng family farm. But Pa Ngwa said “No, we will not do that, Jesus said that his true followers do not try to do harm to their enemies,” and they worked to prepare their farm again. Later, they heard a scream, <text:soft-page-break/>because one of the Mbeng boys had been bit by a snake. Instead of leaving him, Pa Ngwa carried him to the hospital, because he said, “Jesus said that his true followers love even their enemies.”</text:p>
        <text:p text:style-name="P189">Lesson 15 was a story from the village. There were two families that lived close to each other, the Ngwa family and the Mbeng family, but the Mbeng family hated the Ngwa family. One day, the Mbeng family chased away the Ngwa family from their farm and they scattered the Ngwa family's farm. When the Ngwa family saw this, they knew they would have much work to do. The children knew who had done this, so they wanted to scatter the Mbeng family farm. But Pa Ngwa said “No, we will not do that, Jesus said that his true followers do not try to do harm to their enemies,” and they worked to prepare their farm again. Later, they heard a scream, because one of the Mbeng boys had been bit by a snake. Instead of leaving him, Pa Ngwa carried him to the hospital, because he said, “Jesus said that his true followers love even their enemies.”</text:p>
        <text:p text:style-name="P183">The truth of this lesson is: <text:s/>A true disciple of Jesus follows him and his teachings.</text:p>
        <text:p text:style-name="P184">The truth of this lesson is: <text:s/>A true disciple of Jesus follows him and his teachings.</text:p>
        <text:p text:style-name="P185">Questions for Review</text:p>
        <text:list text:style-name="L16">
          <text:list-item text:start-value="1">
            <text:p text:style-name="P191">Who did Jesus say a true disciple of his loves? (Everyone, even their enemies)</text:p>
          </text:list-item>
        </text:list>
        <text:p text:style-name="P178">Who did Jesus say a true disciple of his loves? (Everyone, even their enemies)</text:p>
        <text:list text:continue-numbering="true" text:style-name="L16">
          <text:list-item>
            <text:p text:style-name="P191">How do you know that Pa Ngwa was a follower of Jesus? (He showed love to his enemy.)</text:p>
          </text:list-item>
        </text:list>
        <text:p text:style-name="P178">How do you know that Pa Ngwa was a follower of Jesus? (He showed love to his enemy.)</text:p>
        <text:list text:continue-numbering="true" text:style-name="L16">
          <text:list-item>
            <text:p text:style-name="P191">What was the memory verse from this lesson? <text:s/>( <text:s/>Luke 6:27-28 But I tell you who hear me: Love your enemies, do good to those who hate you, bless those who curse you, pray for those who mistreat you. <text:s/>)</text:p>
          </text:list-item>
        </text:list>
        <text:p text:style-name="P178">What was the memory verse from this lesson? <text:s/>( <text:s/>Luke 6:27-28 But I tell you who hear me: Love your enemies, do good to those who hate you, bless those who curse you, pray for those who mistreat you. <text:s/>)</text:p>
        <text:list text:continue-numbering="true" text:style-name="L16">
          <text:list-item>
            <text:p text:style-name="P191">What should we do to those who hate us? (Do good to those who hate us)</text:p>
          </text:list-item>
        </text:list>
        <text:p text:style-name="P178">What should we do to those who hate us? (Do good to those who hate us)</text:p>
        <text:list text:continue-numbering="true" text:style-name="L16">
          <text:list-item>
            <text:p text:style-name="P191">What should we do when someone mistreats us? (Pray for them)</text:p>
          </text:list-item>
        </text:list>
        <text:p text:style-name="P178">What should we do when someone mistreats us? (Pray for them)</text:p>
        <text:p text:style-name="P174">Lesson <text:s/>16</text:p>
        <text:p text:style-name="P175">A True Disciple of Jesus is Generous</text:p>
        <text:p text:style-name="P188">In the Bible, Jesus said that we should treat others the way we want to be treated. That means a follower of Jesus is generous. Lesson 16 was another story from the village. One day, the Nfor family's cookhouse caught fire and burned down, and all their seed they had to plant was burned too. They didn't know what to do because they didn't have money to buy more seed. So Pa Nfor went to ask for help from Elder Mbe, but he could not help him. Pa Nfor was sad and didn't know what they would do. When he arrived at his home, his friend Pa Akem was there and gave him a bag of seed, even though Pa Akem would not have enough for his family if he gave his seed to Pa Nfor. Pa Akem knew that Jesus said that a follower of Jesus is generous to others and give to those who ask. He also knew that God would take care of his need. <text:s text:c="4"/></text:p>
        <text:p text:style-name="P189">In the Bible, Jesus said that we should treat others the way we want to be treated. That means a follower of Jesus is generous. Lesson 16 was another story from the village. One day, the Nfor family's cookhouse caught fire and burned down, and all their seed they had to plant was burned too. They didn't know what to do because they didn't have money to buy more seed. So Pa Nfor went to ask for help from Elder Mbe, but he could not help him. Pa Nfor was sad and didn't know what they would do. When he arrived at his home, his friend Pa Akem was there and gave him a bag of seed, even though Pa Akem would not have enough for his family if he gave his seed to Pa Nfor. Pa Akem knew that Jesus said that a follower of Jesus is generous to others and give to those who ask. He also knew that God would take care of his need.</text:p>
        <text:p text:style-name="P183">The truth of this lesson is: <text:s/>A true disciple of Jesus is generous.</text:p>
        <text:p text:style-name="P184">The truth of this lesson is: <text:s/>A true disciple of Jesus is generous.</text:p>
        <text:p text:style-name="P185">Questions for Review</text:p>
        <text:list text:style-name="L17">
          <text:list-item text:start-value="1">
            <text:p text:style-name="P192">What was the memory verse for this lesson? <text:s/>( <text:s/>Luke 6:30-31 Give to everyone who asks you, and do not ask for your possessions back from the person who takes them away. Treat others in the same way that you would want them to treat you. <text:s/>)</text:p>
          </text:list-item>
        </text:list>
        <text:p text:style-name="P178">What was the memory verse for this lesson? <text:s/>( <text:s/>Luke 6:30-31 Give to everyone who asks you, and do not ask for your possessions back from the person who takes them away. Treat others in the same way that you would want them to treat you. <text:s/>)</text:p>
        <text:list text:continue-numbering="true" text:style-name="L17">
          <text:list-item>
            <text:p text:style-name="P192">What did Jesus say his true followers will do when people ask for help? (They are generous and give to those who ask.)</text:p>
          </text:list-item>
        </text:list>
        <text:p text:style-name="P180">What did Jesus say his true followers will do when people ask for help? (They are generous and give to those who ask.)</text:p>
        <text:list text:continue-numbering="true" text:style-name="L17">
          <text:list-item>
            <text:p text:style-name="P192">What do you think it means to treat others like we want to be treated? (Being genererous, being honest, being patient, being helpful, being kind, etc.)</text:p>
          </text:list-item>
        </text:list>
        <text:p text:style-name="P178">What do you think it means to treat others like we want to be treated? (Being genererous, being honest, being patient, being helpful, being kind, etc.)</text:p>
        <text:list text:continue-numbering="true" text:style-name="L17">
          <text:list-item>
            <text:p text:style-name="P192"><text:soft-page-break/>To whom should we be kind? (Everyone! Jesus tells us to treat ALL people with kindness, whether we like them or not.)</text:p>
          </text:list-item>
        </text:list>
        <text:p text:style-name="P178">To whom should we be kind? (Everyone! Jesus tells us to treat ALL people with kindness, whether we like them or not.)</text:p>
        <text:p text:style-name="P174">Lesson <text:s/>17</text:p>
        <text:p text:style-name="P175">A True Disciple of Jesus Bears Good Fruit</text:p>
        <text:p text:style-name="P188">Lesson 17 was another story from the village, and it taught us what it means to 'bear good fruit'. Remember the story of the two brothers, Ngum and Tata? They went to carry firewood, and on the way home, they went to a Bible club. They both prayed that God would forgive them of their sins, so they could bear good fruit. When they left, their firewood had been taken, so when they reached their house, their mother asked why they didn't have firewood. Ngum told a lie, but Tata told the truth, so Ngum was punished. </text:p>
        <text:p text:style-name="P188">The next day, Ngum was still angry so he beat his sister, and Tata protected her. Then Ngum stole money from his mother, even though Tata told him it was wrong. Ngum continued to do wrong things. He spent the money on sweets, didn't share them and then fought with some boys. He knew he was doing wrong things, so he asked Tata for help. Tata said that when he prayed for forgiveness he meant it with his whole heart, and Ngum wanted to pray the prayer again with his whole heart. Ngum didn't really mean it the first time, but Tata did and that's why Tata was bearing good fruit (doing good things), because he wanted to be a follower of Jesus.</text:p>
        <text:p text:style-name="P189">Lesson 17 was another story from the village, and it taught us what it means to 'bear good fruit'. Remember the story of the two brothers, Ngum and Tata? They went to carry firewood, and on the way home, they went to a Bible club. They both prayed that God would forgive them of their sins, so they could bear good fruit. When they left, their firewood had been taken, so when they reached their house, their mother asked why they didn't have firewood. Ngum told a lie, but Tata told the truth, so Ngum was punished. <text:s/></text:p>
        <text:p text:style-name="P189">The next day, Ngum was still angry so he beat his sister, and Tata protected her. Then Ngum stole money from his mother, even though Tata told him it was wrong. Ngum continued to do wrong things. He spent the money on sweets, didn't share them and then fought with some boys. He knew he was doing wrong things, so he asked Tata for help. Tata said that when he prayed for forgiveness he meant it with his whole heart, and Ngum wanted to pray the prayer again with his whole heart. Ngum didn't really mean it the first time, but Tata did and that's why Tata was bearing good fruit (doing good things), because he wanted to be a follower of Jesus.</text:p>
        <text:p text:style-name="P183">The truth of this lesson is: <text:s/>A true disciple of Jesus bears good fruit.</text:p>
        <text:p text:style-name="P184">The truth of this lesson is: <text:s/>A true disciple of Jesus bears good fruit.</text:p>
        <text:p text:style-name="P185">Questions for Review</text:p>
        <text:list text:style-name="L18">
          <text:list-item text:start-value="1">
            <text:p text:style-name="P193">What does it mean to bear good fruit? (Do good things)</text:p>
          </text:list-item>
        </text:list>
        <text:p text:style-name="P178">What does it mean to bear good fruit? (Do good things)</text:p>
        <text:list text:continue-numbering="true" text:style-name="L18">
          <text:list-item>
            <text:p text:style-name="P193">Why did Tata bear good fruit, but Ngum didn't? (Tata believed with his whole heart, and Ngum didn't.)</text:p>
          </text:list-item>
        </text:list>
        <text:p text:style-name="P178">Why did Tata bear good fruit, but Ngum didn't? (Tata believed with his whole heart, and Ngum didn't.)</text:p>
        <text:list text:continue-numbering="true" text:style-name="L18">
          <text:list-item>
            <text:p text:style-name="P193">What does good fruit look like in the life of a follower of Jesus? (Being honest, helpful, generous, kind, praying, and studying the Bible to know how God wants us to live, etc.)</text:p>
          </text:list-item>
        </text:list>
        <text:p text:style-name="P178">What does good fruit look like in the life of a follower of Jesus? (Being honest, helpful, generous, kind, praying, and studying the Bible to know how God wants us to live, etc.)</text:p>
        <text:list text:continue-numbering="true" text:style-name="L18">
          <text:list-item>
            <text:p text:style-name="P193">What else does good fruit look like in the life of a follower of Jesus? (See answers to 2.)</text:p>
          </text:list-item>
        </text:list>
        <text:p text:style-name="P178">What else does good fruit look like in the life of a follower of Jesus? (See answers to 2.)</text:p>
        <text:p text:style-name="P174">Lesson <text:s/>18</text:p>
        <text:p text:style-name="P175">The Wise Man and the Foolish Man</text:p>
        <text:p text:style-name="P188">In Lesson 18, we acted out a story. It was a story that Jesus told in Luke 6:46-49, because he wanted people to understand that if you believe in him, you will do what he says. We acted out the story of two different men that each built a house. The wise man who does what the Bible teaches, built his house on a strong foundation, so when the storm came, his house stayed strong. The foolish man who hears what the Bible says, but doesn't do it, built his house on a weak foundation, so when the storm came, his house fell down.</text:p>
        <text:p text:style-name="P189">In Lesson 18, we acted out a story. It was a story that Jesus told in Luke 6:46-49, because he wanted people to understand that if you believe in him, you will do what he says. We acted out the story of two different men that each built a house. The wise man who does what the Bible teaches, built his house on a strong foundation, so when the storm came, his house stayed strong. The foolish man who hears what the Bible says, but doesn't do it, built his house on a weak foundation, so when the storm came, his house fell down.</text:p>
        <text:p text:style-name="P183">The truth of this lesson is: <text:s/>A true disciple of Jesus does what the Bible teaches.</text:p>
        <text:p text:style-name="P184">The truth of this lesson is: <text:s/>A true disciple of Jesus does what the Bible teaches.</text:p>
        <text:p text:style-name="P185">Questions for Review</text:p>
        <text:list text:style-name="L19">
          <text:list-item text:start-value="1">
            <text:p text:style-name="P194">A true follower of Jesus should be like which man? (The wise man)</text:p>
          </text:list-item>
        </text:list>
        <text:p text:style-name="P178">A true follower of Jesus should be like which man? (The wise man)</text:p>
        <text:list text:continue-numbering="true" text:style-name="L19">
          <text:list-item>
            <text:p text:style-name="P194"><text:soft-page-break/>What should a true follower of Jesus do? (Listen to the teachings of the Bible and do what it says)</text:p>
          </text:list-item>
        </text:list>
        <text:p text:style-name="P178">What should a true follower of Jesus do? (Listen to the teachings of the Bible and do what it says)</text:p>
        <text:list text:continue-numbering="true" text:style-name="L19">
          <text:list-item>
            <text:p text:style-name="P194">Where can you go to learn how to be strong and firm in the Lord? (The Bible)</text:p>
          </text:list-item>
        </text:list>
        <text:p text:style-name="P178">Where can you go to learn how to be strong and firm in the Lord? (The Bible)</text:p>
        <text:list text:continue-numbering="true" text:style-name="L19">
          <text:list-item>
            <text:p text:style-name="P194">Name one way the Bible teaches us how to be wise? (Come to Jesus by praying and asking him to help you, hear his teachings by reading, or listening to God's Word, the Bible, and by doing what you hear.)</text:p>
          </text:list-item>
        </text:list>
        <text:p text:style-name="P178">Name one way the Bible teaches us how to be wise? (Come to Jesus by praying and asking him to help you, hear his teachings by reading, or listening to God's Word, the Bible, and by doing what you hear.)</text:p>
        <text:p text:style-name="P174">Lesson <text:s/>19</text:p>
        <text:p text:style-name="P175">Jesus Heals the Centurion's Servant</text:p>
        <text:p text:style-name="P188">Lesson 19 was about a Centurion who had great faith. He had a servant who was very dear to him and the servant was very sick. The Centurion believed that Jesus had healing powers so he asked Jesus to heal his servant. When Jesus was coming, the Centurion knew he was not worthy to have Jesus in his house, but he knew one word from Jesus would heal his servant. Jesus realized this man had great faith, and the servant was healed because of the Centurion's faith.</text:p>
        <text:p text:style-name="P189">Lesson 19 was about a Centurion who had great faith. He had a servant who was very dear to him and the servant was very sick. The Centurion believed that Jesus had healing powers so he asked Jesus to heal his servant. When Jesus was coming, the Centurion knew he was not worthy to have Jesus in his house, but he knew one word from Jesus would heal his servant. Jesus realized this man had great faith, and the servant was healed because of the Centurion's faith.</text:p>
        <text:p text:style-name="P183">The truth of this lesson is: <text:s/>A true disciple of Jesus has faith in him.</text:p>
        <text:p text:style-name="P184">The truth of this lesson is: <text:s/>A true disciple of Jesus has faith in him.</text:p>
        <text:p text:style-name="P185">Questions for Review</text:p>
        <text:list text:style-name="L20">
          <text:list-item text:start-value="1">
            <text:p text:style-name="P195">What did Jesus do for the Centurion? (Jesus healed the Centurion's servant.)</text:p>
          </text:list-item>
        </text:list>
        <text:p text:style-name="P178">What did Jesus do for the Centurion? (Jesus healed the Centurion's servant.)</text:p>
        <text:list text:continue-numbering="true" text:style-name="L20">
          <text:list-item>
            <text:p text:style-name="P195">What did the Centurion have? (Great faith in Jesus)</text:p>
          </text:list-item>
        </text:list>
        <text:p text:style-name="P178">What did the Centurion have? (Great faith in Jesus)</text:p>
        <text:list text:continue-numbering="true" text:style-name="L20">
          <text:list-item>
            <text:p text:style-name="P195">In what kinds of things, or people, do we wrongly place our confidence in? (Sometimes we place our confidence in traditional doctors, fons, teachers, family, and friends.)</text:p>
          </text:list-item>
        </text:list>
        <text:p text:style-name="P178">In what kinds of things, or people, do we wrongly place our confidence in? (Sometimes we place our confidence in traditional doctors, fons, teachers, family, and friends.)</text:p>
        <text:list text:continue-numbering="true" text:style-name="L20">
          <text:list-item>
            <text:p text:style-name="P195">As followers of Jesus, in whom should we put our confidence in? (Jesus)</text:p>
          </text:list-item>
        </text:list>
        <text:p text:style-name="P178">As followers of Jesus, in whom should we put our confidence in? (Jesus)</text:p>
        <text:p text:style-name="P174">Closing and Homework</text:p>
        <text:p text:style-name="P175">Homework</text:p>
        <text:p text:style-name="P188">This week spend time everyday praying to God asking him to forgive your sins and to help you be a follower of him. Remember that a follower of Jesus loves their enemies, is generous, bears good fruit, does what the Bible teaches and has faith in Jesus. Work on memorizing all the verses we have had so far to say next week.</text:p>
        <text:p text:style-name="P189">This week spend time everyday praying to God asking him to forgive your sins and to help you be a follower of him. Remember that a follower of Jesus loves their enemies, is generous, bears good fruit, does what the Bible teaches and has faith in Jesus. Work on memorizing all the verses we have had so far to say next week.</text:p>
        <text:list text:style-name="Bullet_20_-_20_Check_20_mark">
          <text:list-item>
            <text:p text:style-name="P196">Give any needed announcements.</text:p>
          </text:list-item>
        </text:list>
        <text:p text:style-name="P175">Closing Prayer</text:p>
        <text:p text:style-name="P197"><text:span text:style-name="Body_20_Emphasized_20_-_20_Small">Thank God <text:s/></text:span>for giving us his words so that we can know how we should live.</text:p>
        <text:p text:style-name="P197"><text:span text:style-name="Body_20_Emphasized_20_-_20_Small">Ask God <text:s/></text:span>that he would help the children to spend time reading their memory verses everyday and praying. Pray that the lives of the children would be changed.</text:p>
      </text:section>
      <text:p text:style-name="Body"/>
      <text:h text:style-name="P25" text:outline-level="1"><draw:frame draw:style-name="fr3" draw:name="Image28" text:anchor-type="char" svg:x="0in" svg:y="0.0161in" svg:width="1.0752in" svg:height="1.0752in" draw:z-index="91"><draw:image xlink:href="Pictures/10000001000000D8000000D8CAC59DFA.png" xlink:type="simple" xlink:show="embed" xlink:actuate="onLoad" draw:mime-type="image/png"/></draw:frame>A Woman Wipes Jesus' Feet</text:h>
      <text:p text:style-name="M.T._20_Lesson_20_Title">A Woman Wipes Jesus' Feet</text:p>
      <text:p text:style-name="English_20_Translation_20_-_20_Lesson_20_title">A Woman Wipes Jesus' Feet</text:p>
      <text:p text:style-name="M.T._20_Text_20_-_20_Lesson_20_Title_20_Scrip_20_Reference">Luke <text:s/>7:36-50</text:p>
      <text:p text:style-name="Part_20_Heading">Lesson Overview</text:p>
      <table:table table:name="Table10" table:style-name="Table10">
        <table:table-column table:style-name="Table10.A"/>
        <table:table-column table:style-name="Table10.B"/>
        <table:table-row>
          <table:table-cell table:style-name="Table10.A1" office:value-type="string">
            <text:p text:style-name="Table_20_Left_20_headings">Today’s Truth</text:p>
          </table:table-cell>
          <table:table-cell table:style-name="Table10.B1" office:value-type="string">
            <text:p text:style-name="M.T._20_Text">Jesus forgives our sins.</text:p>
            <text:p text:style-name="English_20_translation">Jesus forgives our sins.</text:p>
          </table:table-cell>
        </table:table-row>
        <table:table-row>
          <table:table-cell table:style-name="Table10.A1" office:value-type="string">
            <text:p text:style-name="Table_20_Left_20_headings">Objective</text:p>
          </table:table-cell>
          <table:table-cell table:style-name="Table10.B2" office:value-type="string">
            <text:p text:style-name="Body_20_Tight_20_lines"><text:span text:style-name="Body_20_Emphasized_20_-_20_Small">KNOW: <text:s/></text:span>The children will know that all of our sins can be forgiven.</text:p>
            <text:p text:style-name="Body_20_Tight_20_lines"><text:span text:style-name="Body_20_Emphasized_20_-_20_Small">DO:</text:span> <text:s/>The children will think of different ways to show love to Jesus, and then do them.</text:p>
          </table:table-cell>
        </table:table-row>
        <table:table-row>
          <table:table-cell table:style-name="Table10.A1" office:value-type="string">
            <text:p text:style-name="Table_20_Left_20_headings">Materials</text:p>
          </table:table-cell>
          <table:table-cell table:style-name="Table10.B3" office:value-type="string">
            <text:list xml:id="list92018216736182" text:continue-list="list92019732128164" text:style-name="Table_20_Bullet_20_-_20_checkmark">
              <text:list-item>
                <text:p text:style-name="P198">Quarter <text:s/><text:span text:style-name="T9">2</text:span> <text:s/>Picture book, Bible, chalk</text:p>
              </text:list-item>
              <text:list-item>
                <text:p text:style-name="P199">Copies of the memory verse coloring page for the children to take home.</text:p>
              </text:list-item>
              <text:list-item>
                <text:p text:style-name="Table_20_Bullet_20_-_20_Checkmark">Tic Tac Toe/Long Line – You can use chalk and blackboard, paper and pen, or a stick and dirt</text:p>
              </text:list-item>
            </text:list>
          </table:table-cell>
        </table:table-row>
        <table:table-row>
          <table:table-cell table:style-name="Table10.A1" office:value-type="string">
            <text:p text:style-name="Table_20_Left_20_headings">Memory Verse</text:p>
          </table:table-cell>
          <table:table-cell table:style-name="Table10.B3" office:value-type="string">
            <text:p text:style-name="P200">Luke 7:48 Jesus said to her, “Your sins are forgiven.”</text:p>
            <text:p text:style-name="P200">Luke 7:50 Jesus said to the woman, “Your faith has saved you; go in peace.”</text:p>
            <text:p text:style-name="P201">Luke 7:48 Jesus said to her, “Your sins are forgiven.”</text:p>
            <text:p text:style-name="P201">Luke 7:50 Jesus said to the woman, “Your faith has saved you; go in peace.”</text:p>
          </table:table-cell>
        </table:table-row>
        <table:table-row>
          <table:table-cell table:style-name="Table10.A1" office:value-type="string">
            <text:p text:style-name="Table_20_Left_20_headings">Homework</text:p>
          </table:table-cell>
          <table:table-cell table:style-name="Table10.B3" office:value-type="string">
            <text:p text:style-name="M.T._20_Text">This week, first be sure you have put your faith in Jesus to cancel your debt of sin. Then, think of ways you can show your love and appreciation for Jesus and what he has done for you, and then do them.</text:p>
            <text:p text:style-name="English_20_translation">This week, first be sure you have put your faith in Jesus to cancel your debt of sin. Then, think of ways you can show your love and appreciation for Jesus and what he has done for you, and then do them.</text:p>
          </table:table-cell>
        </table:table-row>
      </table:table>
      <text:p text:style-name="Body_20_-_20_Small_20_Spacer"/>
      <text:p text:style-name="Part_20_Heading">Detailed Lesson Plan</text:p>
      <text:section text:style-name="Sect1" text:name="L-21 Detail Plan">
        <text:p text:style-name="P202">Song</text:p>
        <text:p text:style-name="P203">Opening</text:p>
        <text:p text:style-name="P204">Welcome</text:p>
        <text:list text:continue-list="list92018740133259" text:style-name="Bullet_20_-_20_checkmark">
          <text:list-item>
            <text:p text:style-name="P205">Be sure the children know you are happy to see them!</text:p>
          </text:list-item>
          <text:list-item>
            <text:p text:style-name="P205">Introduce yourself and your helpers.</text:p>
          </text:list-item>
        </text:list>
        <text:p text:style-name="P204">Sharing Time</text:p>
        <text:list text:continue-numbering="true" text:style-name="Bullet_20_-_20_checkmark">
          <text:list-item>
            <text:p text:style-name="P206">Does anyone remember a truth from the first five lessons? <text:s/>( <text:s/><text:span text:style-name="T10">1. <text:s/></text:span>God hears our prayers. <text:s/><text:span text:style-name="T10">2. <text:s/></text:span>Nothing is impossible with God. <text:s/><text:span text:style-name="T10">3. <text:s/></text:span>God ALWAYS keeps His promises. <text:s/><text:span text:style-name="T10">4. <text:s/></text:span>God’s way is the best way to grow. <text:s/><text:span text:style-name="T10">5. <text:s/></text:span>God expects true repentance. <text:s/>)</text:p>
          </text:list-item>
        </text:list>
        <text:p text:style-name="P207">Does anyone remember a truth from the first five lessons? <text:s/>( <text:s/>1. <text:s/>God hears our prayers. <text:s/>2. <text:s/>Nothing is impossible with God. <text:s/>3. <text:s/>God ALWAYS keeps His promises. <text:s/>4. <text:s/>God’s way is the best way to grow. <text:s/>5. <text:s/>God expects true repentance. <text:s/>)</text:p>
        <text:list text:continue-numbering="true" text:style-name="Bullet_20_-_20_checkmark">
          <text:list-item>
            <text:p text:style-name="P206">Does anyone remember a truth from these most recent lessons?</text:p>
          </text:list-item>
        </text:list>
        <text:p text:style-name="P207">Does anyone remember a truth from these most recent lessons?</text:p>
        <text:p text:style-name="P208">(Give children time to share.)</text:p>
        <text:list text:continue-numbering="true" text:style-name="Bullet_20_-_20_checkmark">
          <text:list-item>
            <text:p text:style-name="P206">It is important to remember all of these truths. They help us have a better relationship with Jesus. Make sure that you remember all of the truths, and that you are always putting them to practice.</text:p>
          </text:list-item>
        </text:list>
        <text:p text:style-name="P207">It is important to remember all of these truths. They help us have a better relationship with Jesus. Make sure that you remember all of the truths, and that you are always putting them to practice.</text:p>
        <text:p text:style-name="P204">Prayer</text:p>
        <text:list text:continue-numbering="true" text:style-name="Bullet_20_-_20_checkmark">
          <text:list-item>
            <text:p text:style-name="P205">Let the children share praises and prayer requests.</text:p>
          </text:list-item>
          <text:list-item>
            <text:p text:style-name="P209">Keep a record of what the children are sharing so you can remember to thank God together for answered prayers.</text:p>
          </text:list-item>
          <text:list-item>
            <text:p text:style-name="P209">Spend time praying together. <text:s/>Let children pray out loud if they volunteer. <text:s/>Do not force anyone to pray out loud.</text:p>
          </text:list-item>
        </text:list>
        <text:p text:style-name="P202"><text:soft-page-break/>Song</text:p>
        <text:p text:style-name="P203">Words to Discuss</text:p>
        <text:list xml:id="list92019095405673" text:continue-numbering="true" text:style-name="Bullet_20_-_20_checkmark">
          <text:list-item>
            <text:p text:style-name="P205">On the blackboard, write the “Words to Discuss” from the list below.</text:p>
          </text:list-item>
          <text:list-item>
            <text:p text:style-name="P206">Let's discuss some words to help us better understand the Bible story for today.</text:p>
          </text:list-item>
        </text:list>
        <text:p text:style-name="P207">Let's discuss some words to help us better understand the Bible story for today.</text:p>
        <text:list text:continue-list="list92018913493986" text:style-name="Bullet_20_-_20_Diamond">
          <text:list-item>
            <text:p text:style-name="P210"><text:span text:style-name="Body_20_Emphasized_20_-_20_Small">Pharisee: <text:s/></text:span>Religious teacher of Jewish Law.</text:p>
          </text:list-item>
        </text:list>
        <text:p text:style-name="P211">Pharisee: <text:s/>Religious teacher of Jewish Law.</text:p>
        <text:list text:continue-numbering="true" text:style-name="Bullet_20_-_20_Diamond">
          <text:list-item>
            <text:p text:style-name="P210"><text:span text:style-name="Body_20_Emphasized_20_-_20_Small">Perfume: <text:s/></text:span>Oil from flowers and spices that make a nice smell.</text:p>
          </text:list-item>
        </text:list>
        <text:p text:style-name="P211">Perfume: <text:s/>Oil from flowers and spices that make a nice smell.</text:p>
        <text:list text:continue-numbering="true" text:style-name="Bullet_20_-_20_Diamond">
          <text:list-item>
            <text:p text:style-name="P210"><text:span text:style-name="Body_20_Emphasized_20_-_20_Small">Prophet: <text:s/></text:span>A man or woman God uses as His messenger.</text:p>
          </text:list-item>
        </text:list>
        <text:p text:style-name="P211">Prophet: <text:s/>A man or woman God uses as His messenger.</text:p>
        <text:list text:continue-numbering="true" text:style-name="Bullet_20_-_20_Diamond">
          <text:list-item>
            <text:p text:style-name="P210"><text:span text:style-name="Body_20_Emphasized_20_-_20_Small">Debt: <text:s/></text:span>Something like money that is owed or due.</text:p>
          </text:list-item>
        </text:list>
        <text:p text:style-name="P211">Debt: <text:s/>Something like money that is owed or due.</text:p>
        <text:list xml:id="list92018140432618" text:continue-numbering="true" text:style-name="Bullet_20_-_20_Diamond">
          <text:list-item>
            <text:p text:style-name="P210"><text:span text:style-name="Body_20_Emphasized_20_-_20_Small">Faith: <text:s/></text:span>Complete trust or confidence that we put in something or someone.</text:p>
          </text:list-item>
        </text:list>
        <text:p text:style-name="P211">Faith: <text:s/>Complete trust or confidence that we put in something or someone.</text:p>
        <text:p text:style-name="P202">Song</text:p>
        <text:p text:style-name="P203">Bible Story / Lesson</text:p>
        <text:p text:style-name="P212">Have you or your family ever owed anyone something?</text:p>
        <text:p text:style-name="P213">Have you or your family ever owed anyone something?</text:p>
        <text:p text:style-name="P212">This is called a debt. What kind of debt did you have? How did it make you feel when you had that debt? How did you feel when that debt was paid off?</text:p>
        <text:p text:style-name="P213">This is called a debt. What kind of debt did you have? How did it make you feel when you had that debt? How did you feel when that debt was paid off?</text:p>
        <text:p text:style-name="P212">What would you think if someone came along and took care of every large debt that you had? Would you be happy? Would you tell other people what had happened? Would you celebrate?</text:p>
        <text:p text:style-name="P213">What would you think if someone came along and took care of every large debt that you had? Would you be happy? Would you tell other people what had happened? Would you celebrate?</text:p>
        <text:p text:style-name="P212">Today's story in the Bible is about how one woman's very large debt of sin was forgiven, and how she showed her gratitude for that gift.</text:p>
        <text:p text:style-name="P213">Today's story in the Bible is about how one woman's very large debt of sin was forgiven, and how she showed her gratitude for that gift.</text:p>
        <text:p text:style-name="P204">Introduce Truth</text:p>
        <text:p text:style-name="P214">Our truth for today is: <text:s/>Jesus forgives our sins.</text:p>
        <text:p text:style-name="P215">Our truth for today is: <text:s/>Jesus forgives our sins.</text:p>
        <text:p text:style-name="P214">This reminds me of a true story from the Bible.</text:p>
        <text:p text:style-name="P215">This reminds me of a true story from the Bible.</text:p>
        <text:p text:style-name="P216">Bible Story: <text:s/>Luke <text:s/>7:36-50</text:p>
        <text:p text:style-name="P217"><draw:frame draw:style-name="fr4" draw:name="Frame26" text:anchor-type="paragraph" svg:x="-0.0181in" svg:y="0.0972in" svg:width="1.378in" draw:z-index="92"><draw:text-box fo:min-height="1.2055in"><text:p text:style-name="P218">Picture <text:s/>21–1</text:p><text:p text:style-name="P219"><draw:frame draw:style-name="fr5" draw:name="Image29" text:anchor-type="as-char" svg:width="1.2917in" svg:height="0.9366in" draw:z-index="93"><draw:image xlink:href="Pictures/100000000000015F000000FE6543CF38.jpg" xlink:type="simple" xlink:show="embed" xlink:actuate="onLoad" draw:mime-type="image/jpeg"/></draw:frame></text:p></draw:text-box></draw:frame>Luke 7:36-38 Now one of the Pharisees invited Jesus to have dinner with him, so he went to the Pharisee’s house and reclined at the table. When a woman who had lived a sinful life in that town learned that Jesus was eating at the Pharisee’s house, she brought an alabaster jar of perfume, and as she stood behind him at his feet weeping, she began to wet his feet with her tears. Then she wiped them with her hair, kissed them and poured perfume on them.</text:p>
        <text:p text:style-name="P217">Luke 7:39 When the Pharisee who had invited him saw this, he said to himself, “If this man were a prophet, he would know who is touching him and what kind of woman she is — that she is a sinner.”</text:p>
        <text:p text:style-name="P217">Luke 7:40 Jesus answered him, “Simon, I have something to tell you.” “Tell me, teacher,” he said.</text:p>
        <text:p text:style-name="P220">Luke 7:36-38 Now one of the Pharisees invited Jesus to have dinner with him, so he went to the Pharisee’s house and reclined at the table. When a woman who had lived a sinful life in that town learned that Jesus was eating at the Pharisee’s house, she brought an alabaster jar of perfume, and as she stood behind him at his feet weeping, she began to wet his feet with her tears. Then she wiped them with her hair, kissed them and poured perfume on them.</text:p>
        <text:p text:style-name="P220"><text:soft-page-break/>Luke 7:39 When the Pharisee who had invited him saw this, he said to himself, “If this man were a prophet, he would know who is touching him and what kind of woman she is — that she is a sinner.”</text:p>
        <text:p text:style-name="P220">Luke 7:40 Jesus answered him, “Simon, I have something to tell you.” “Tell me, teacher,” he said.</text:p>
        <text:p text:style-name="P217"><draw:frame draw:style-name="fr4" draw:name="Frame17" text:anchor-type="paragraph" svg:x="-0.0181in" svg:y="0.0035in" svg:width="1.378in" draw:z-index="94"><draw:text-box fo:min-height="1.2055in"><text:p text:style-name="P218">Picture <text:s/>21–2</text:p><text:p text:style-name="P219"><draw:frame draw:style-name="fr10" draw:name="Image30" text:anchor-type="as-char" svg:width="1.2917in" svg:height="0.9366in" draw:z-index="95"><draw:image xlink:href="Pictures/100000000000015F000000FE3A28DBB6.jpg" xlink:type="simple" xlink:show="embed" xlink:actuate="onLoad" draw:mime-type="image/jpeg"/></draw:frame></text:p></draw:text-box></draw:frame>Luke 7:41-42 “Two men owed money to a certain moneylender. One owed him five hundred denarii, and the other fifty. Neither of them had the money to pay him back, so he canceled the debts of both. Now which of them will love him more?”</text:p>
        <text:p text:style-name="P217">Luke 7:43 Simon replied, “I suppose the one who had the bigger debt canceled.” “You have judged correctly,” Jesus said.</text:p>
        <text:p text:style-name="P220">Luke 7:41-42 “Two men owed money to a certain moneylender. One owed him five hundred denarii, and the other fifty. Neither of them had the money to pay him back, so he canceled the debts of both. Now which of them will love him more?”</text:p>
        <text:p text:style-name="P220">Luke 7:43 Simon replied, “I suppose the one who had the bigger debt canceled.” “You have judged correctly,” Jesus said.</text:p>
        <text:p text:style-name="P217"><draw:frame draw:style-name="fr4" draw:name="Frame36" text:anchor-type="paragraph" svg:x="-0.0181in" svg:y="0.0035in" svg:width="1.378in" draw:z-index="96"><draw:text-box fo:min-height="1.2055in"><text:p text:style-name="P218">Picture <text:s/>21–3</text:p><text:p text:style-name="P219"><draw:frame draw:style-name="fr5" draw:name="Image31" text:anchor-type="as-char" svg:width="1.2917in" svg:height="0.9366in" draw:z-index="97"><draw:image xlink:href="Pictures/100000000000015F000000FE4C092FF9.jpg" xlink:type="simple" xlink:show="embed" xlink:actuate="onLoad" draw:mime-type="image/jpeg"/></draw:frame></text:p></draw:text-box></draw:frame>Luke 7:44-47 Then he turned toward the woman and said to Simon, “Do you see this woman? I came into your house. You did not give me any water for my feet, but she wet my feet with her tears and wiped them with her hair. You did not give me a kiss, but this woman, from the time I entered, has not stopped kissing my feet. You did not put oil on my head, but she has poured perfume on my feet. Therefore, I tell you, her many sins have been forgiven — for she loved much. But he who has been forgiven little loves little.”</text:p>
        <text:p text:style-name="P220">Luke 7:44-47 Then he turned toward the woman and said to Simon, “Do you see this woman? I came into your house. You did not give me any water for my feet, but she wet my feet with her tears and wiped them with her hair. You did not give me a kiss, but this woman, from the time I entered, has not stopped kissing my feet. You did not put oil on my head, but she has poured perfume on my feet. Therefore, I tell you, her many sins have been forgiven — for she loved much. But he who has been forgiven little loves little.”</text:p>
        <text:p text:style-name="P217"><draw:frame draw:style-name="fr4" draw:name="Frame46" text:anchor-type="paragraph" svg:x="-0.0181in" svg:y="0.0035in" svg:width="1.378in" draw:z-index="98"><draw:text-box fo:min-height="1.2055in"><text:p text:style-name="P218">Picture <text:s/>21–4</text:p><text:p text:style-name="P219"><draw:frame draw:style-name="fr5" draw:name="Image32" text:anchor-type="as-char" svg:width="1.2917in" svg:height="0.9366in" draw:z-index="99"><draw:image xlink:href="Pictures/100000000000015F000000FEF7AD8A09.jpg" xlink:type="simple" xlink:show="embed" xlink:actuate="onLoad" draw:mime-type="image/jpeg"/></draw:frame></text:p></draw:text-box></draw:frame>Luke 7:48 Then Jesus said to her, “Your sins are forgiven.”</text:p>
        <text:p text:style-name="P217">Luke 7:49 The other guests began to say among themselves, “Who is this who even forgives sins?”</text:p>
        <text:p text:style-name="P217">Luke 7:50 Jesus said to the woman, “Your faith has saved you; go in peace.”</text:p>
        <text:p text:style-name="P220">Luke 7:48 Then Jesus said to her, “Your sins are forgiven.”</text:p>
        <text:p text:style-name="P220">Luke 7:49 The other guests began to say among themselves, “Who is this who even forgives sins?”</text:p>
        <text:p text:style-name="P220">Luke 7:50 Jesus said to the woman, “Your faith has saved you; go in peace.”</text:p>
        <text:p text:style-name="P204">Application</text:p>
        <text:p text:style-name="P212">We have a certain kind of debt to pay because of sin. Remember, sin is anything we think, say, or do that displeases God. Sin is what separates us from God. It is a debt we have with God that must be paid. Jesus came to earth to live, to die, and then to come alive again. He lived a perfect life with no sin. Then, he paid our debt of sin with his death on the cross. Finally, he proved that he has the power to forgive sin and set us free from death and judgment by rising from the dead.</text:p>
        <text:p text:style-name="P213">We have a certain kind of debt to pay because of sin. Remember, sin is anything we think, say, or do that displeases God. Sin is what separates us from God. It is a debt we have with God that must be paid. Jesus came to earth to live, to die, and then to come alive again. He lived a perfect life with no sin. Then, he paid our debt of sin with his death on the cross. Finally, he proved that he has the power to forgive sin and set us free from death and judgment by rising from the dead.</text:p>
        <text:p text:style-name="P212">Jesus is the only one who can pay the debt of our sin against God. Jesus cancelled our debt with his death, but we have to accept his payment for us. In our story today, the woman put her faith in Jesus. She knew Jesus was able to pay her debt. Jesus told her, “your faith has saved you.” Her faith in Jesus saved her from having to pay her debt of sin herself, and set her free. If we do what the woman did by putting our trust and confidence in Jesus, he will pay our debt, too, no matter how much sin we have.</text:p>
        <text:p text:style-name="P213">Jesus is the only one who can pay the debt of our sin against God. Jesus cancelled our debt with his death, but we have to accept his payment for us. In our story today, the woman put her faith in Jesus. She knew Jesus was able to pay her debt. Jesus told her, “your faith has saved you.” Her faith in Jesus saved her from having to pay her debt of sin herself, and set her free. If we do what the woman did by putting our trust and confidence in Jesus, he will pay our debt, too, no matter how much sin we have.</text:p>
        <text:p text:style-name="P212">Remember what Jesus said in our story? Those who are forgiven much, show much love and thankfulness to him. How much do you love Jesus? How are you showing your thankfulness to him?</text:p>
        <text:p text:style-name="P213">Remember what Jesus said in our story? Those who are forgiven much, show much love and thankfulness to him. How much do you love Jesus? How are you showing your thankfulness to him?</text:p>
        <text:p text:style-name="P214">Jesus forgives our sins.</text:p>
        <text:p text:style-name="P215">Jesus forgives our sins.</text:p>
        <text:p text:style-name="P221">Homework</text:p>
        <text:p text:style-name="P212">This week, first be sure you have put your faith in Jesus to cancel your debt of sin. Then, think of ways you can show your love and appreciation for Jesus and what he has done for you, and then do them.</text:p>
        <text:p text:style-name="P213"><text:soft-page-break/>This week, first be sure you have put your faith in Jesus to cancel your debt of sin. Then, think of ways you can show your love and appreciation for Jesus and what he has done for you, and then do them.</text:p>
        <text:p text:style-name="P202">Prayer / Song</text:p>
        <text:p text:style-name="P203">Review Game</text:p>
        <text:p text:style-name="P204">Tic-Tac-Toe/Long Line</text:p>
        <text:p text:style-name="P221">Materials</text:p>
        <text:list text:continue-list="list92019095405673" text:style-name="Bullet_20_-_20_checkmark">
          <text:list-item>
            <text:p text:style-name="P205">Draw on the blackboard, on the dirt, or on a paper a game board of two horizontal lines crossing two vertical lines.<draw:frame draw:style-name="fr11" draw:name="Image33" text:anchor-type="char" svg:y="-0.1965in" svg:width="1.1811in" svg:height="1.1811in" draw:z-index="100"><draw:image xlink:href="Pictures/10000000000000AF000000B06366BC3C.jpg" xlink:type="simple" xlink:show="embed" xlink:actuate="onLoad" draw:mime-type="image/jpeg"/></draw:frame></text:p>
          </text:list-item>
          <text:list-item>
            <text:p text:style-name="P209">One team marks the X's, one team marks the O's using chalk, marker, pen, or a stick.</text:p>
          </text:list-item>
        </text:list>
        <text:p text:style-name="P221">How to Play</text:p>
        <text:list xml:id="list92019421016355" text:continue-numbering="true" text:style-name="Bullet_20_-_20_checkmark">
          <text:list-item>
            <text:p text:style-name="P205">Divide the class into 2 teams.</text:p>
          </text:list-item>
          <text:list-item>
            <text:p text:style-name="P209">The first team tries to answer the first question. <text:s/>The teacher can use this time to explain what the children do not seem to understand.</text:p>
          </text:list-item>
          <text:list-item>
            <text:p text:style-name="P209">The child on the team that answers the question correctly comes to the front and marks and X (for team 1) or an O (for team 2) in one of the spaces on the Tic-Tac-Toe board.</text:p>
          </text:list-item>
          <text:list-item>
            <text:p text:style-name="P209">The first team to get three X's or O's in a row in any direction wins.</text:p>
          </text:list-item>
          <text:list-item>
            <text:p text:style-name="P209">Be sure to clap for both sides. <text:s/>No name-calling. <text:s/>Encourage good sportsmanship.</text:p>
          </text:list-item>
        </text:list>
        <text:p text:style-name="P221">Questions for Review Game</text:p>
        <text:list text:style-name="L21">
          <text:list-item>
            <text:p text:style-name="P222">Who invited Jesus for a meal? (A Pharisee named Simon)</text:p>
          </text:list-item>
        </text:list>
        <text:p text:style-name="P207">Who invited Jesus for a meal? (A Pharisee named Simon)</text:p>
        <text:list text:continue-numbering="true" text:style-name="L21">
          <text:list-item>
            <text:p text:style-name="P222">What is a Pharisee? (A religious teacher of Jewish Law)</text:p>
          </text:list-item>
        </text:list>
        <text:p text:style-name="P207">What is a Pharisee? (A religious teacher of Jewish Law)</text:p>
        <text:list text:continue-numbering="true" text:style-name="L21">
          <text:list-item>
            <text:p text:style-name="P222">Who came in while they were eating? (A sinful woman)</text:p>
          </text:list-item>
        </text:list>
        <text:p text:style-name="P207">Who came in while they were eating? (A sinful woman)</text:p>
        <text:list text:continue-numbering="true" text:style-name="L21">
          <text:list-item>
            <text:p text:style-name="P222">What did she do? (She washed Jesus' feet using her tears and hair, and then she anointed his feet with a rare perfume.)</text:p>
          </text:list-item>
        </text:list>
        <text:p text:style-name="P207">What did she do? (She washed Jesus' feet using her tears and hair, and then she anointed his feet with a rare perfume.)</text:p>
        <text:list text:continue-numbering="true" text:style-name="L21">
          <text:list-item>
            <text:p text:style-name="P222">What were the Pharisees thinking? (If Jesus was truly a prophet, then he would know that the woman touching him was sinful, and he would not allow it.)</text:p>
          </text:list-item>
        </text:list>
        <text:p text:style-name="P207">What were the Pharisees thinking? (If Jesus was truly a prophet, then he would know that the woman touching him was sinful, and he would not allow it.)</text:p>
        <text:list text:continue-numbering="true" text:style-name="L21">
          <text:list-item>
            <text:p text:style-name="P222">Jesus knew what what the Pharisees were thinking. How could Jesus know what they were thinking? (Jesus is God; He knows everything.)</text:p>
          </text:list-item>
        </text:list>
        <text:p text:style-name="P207">Jesus knew what what the Pharisees were thinking. How could Jesus know what they were thinking? (Jesus is God; He knows everything.)</text:p>
        <text:list text:continue-numbering="true" text:style-name="L21">
          <text:list-item>
            <text:p text:style-name="P222">Jesus told a story about a man who loaned two men money-five hundred pieces of silver to one, and fifty pieces to the other. Then what happened? (The man who loaned the money to both men canceled their debts.)</text:p>
          </text:list-item>
        </text:list>
        <text:p text:style-name="P207">Jesus told a story about a man who loaned two men money-five hundred pieces of silver to one, and fifty pieces to the other. Then what happened? (The man who loaned the money to both men canceled their debts.)</text:p>
        <text:list text:continue-numbering="true" text:style-name="L21">
          <text:list-item>
            <text:p text:style-name="P222">According to the story Jesus told, who shows love the most? (Those who are forgiven love the most.)</text:p>
          </text:list-item>
        </text:list>
        <text:p text:style-name="P207">According to the story Jesus told, who shows love the most? (Those who are forgiven love the most.)</text:p>
        <text:list text:continue-numbering="true" text:style-name="L21">
          <text:list-item>
            <text:p text:style-name="P222">Why did the woman do those things to Jesus? (She loved him very much, and she was showing her gratitude.)</text:p>
          </text:list-item>
        </text:list>
        <text:p text:style-name="P207">Why did the woman do those things to Jesus? (She loved him very much, and she was showing her gratitude.)</text:p>
        <text:list text:continue-numbering="true" text:style-name="L21">
          <text:list-item>
            <text:p text:style-name="P222">What did Jesus say had saved the woman? (Her faith had saved her.)</text:p>
          </text:list-item>
        </text:list>
        <text:p text:style-name="P207">What did Jesus say had saved the woman? (Her faith had saved her.)</text:p>
        <text:list text:continue-numbering="true" text:style-name="L21">
          <text:list-item>
            <text:p text:style-name="P222">What is faith? (Having complete trust or confidence in something or someone)</text:p>
          </text:list-item>
        </text:list>
        <text:p text:style-name="P207">What is faith? (Having complete trust or confidence in something or someone)</text:p>
        <text:list text:continue-numbering="true" text:style-name="L21">
          <text:list-item>
            <text:p text:style-name="P222">How does our debt of sin get forgiven? (By putting our complete trust or confidence in Jesus)</text:p>
          </text:list-item>
        </text:list>
        <text:p text:style-name="P207">How does our debt of sin get forgiven? (By putting our complete trust or confidence in Jesus)</text:p>
        <text:p text:style-name="P202">Song</text:p>
        <text:p text:style-name="P203"><text:soft-page-break/>Memory Verse</text:p>
        <text:p text:style-name="P221">Materials and Preparations</text:p>
        <text:list xml:id="list92018210698755" text:continue-list="list92019421016355" text:style-name="Bullet_20_-_20_checkmark">
          <text:list-item>
            <text:p text:style-name="P205">Put a bookmark in <text:s/>Luke 7:48 <text:s/>and <text:s/>Luke 7:50</text:p>
          </text:list-item>
          <text:list-item>
            <text:p text:style-name="P205">Write memory verse on the blackboard.</text:p>
          </text:list-item>
        </text:list>
        <text:p text:style-name="P223">Luke 7:48 Jesus said to her, “Your sins are forgiven.”</text:p>
        <text:p text:style-name="P223">Luke 7:50 Jesus said to the woman, “Your faith has saved you; go in peace.”</text:p>
        <text:p text:style-name="P207">Luke 7:48 Jesus said to her, “Your sins are forgiven.”</text:p>
        <text:p text:style-name="P207">Luke 7:50 Jesus said to the woman, “Your faith has saved you; go in peace.”</text:p>
        <text:p text:style-name="P204">Teach and Explain</text:p>
        <text:p text:style-name="P212">Our memory verse is in the Gospel of Luke. <text:s/>That is in the New Testament, a part of the Bible.</text:p>
        <text:p text:style-name="P213">Our memory verse is in the Gospel of Luke. <text:s/>That is in the New Testament, a part of the Bible.</text:p>
        <text:list xml:id="list92018737102727" text:continue-list="list92018979816408" text:style-name="WWNum1">
          <text:list-item text:start-value="1">
            <text:p text:style-name="P224">Read the verse from your Bible.</text:p>
          </text:list-item>
          <text:list-item>
            <text:p text:style-name="P224">Read the verse by yourself as you point to the words.</text:p>
          </text:list-item>
          <text:list-item>
            <text:p text:style-name="P224">Read the verse with the children as you point to the words.</text:p>
          </text:list-item>
          <text:list-item>
            <text:p text:style-name="P224">Explain the verse:</text:p>
          </text:list-item>
        </text:list>
        <text:list text:continue-list="list92018210698755" text:style-name="Bullet_20_-_20_checkmark">
          <text:list-item>
            <text:p text:style-name="P206">Our memory verse comes from today’s Bible story.</text:p>
          </text:list-item>
        </text:list>
        <text:p text:style-name="P207">Our memory verse comes from today’s Bible story.</text:p>
        <text:list xml:id="list92019849145541" text:continue-numbering="true" text:style-name="Bullet_20_-_20_checkmark">
          <text:list-item>
            <text:p text:style-name="P205">As you read the verse, circle the words shown below. <text:s/>Explain each of these words.</text:p>
          </text:list-item>
        </text:list>
        <text:list text:continue-list="list92018140432618" text:style-name="Bullet_20_-_20_Diamond">
          <text:list-item>
            <text:p text:style-name="P210"><text:span text:style-name="Body_20_Emphasized_20_-_20_Small">Sin: <text:s/></text:span>All the things we think, say and do that displease God. <text:s/>Sin leaves us with a debt in our relationship with God. Everyone has sinned. <text:s/></text:p>
          </text:list-item>
        </text:list>
        <text:p text:style-name="P211">Sin: <text:s/>All the things we think, say and do that displease God. <text:s/>Sin leaves us with a debt in our relationship with God. Everyone has sinned. <text:s/></text:p>
        <text:list text:continue-numbering="true" text:style-name="Bullet_20_-_20_Diamond">
          <text:list-item>
            <text:p text:style-name="P210"><text:span text:style-name="Body_20_Emphasized_20_-_20_Small">Forgiven: <text:s/></text:span>The word “forgiven” means the woman's sin was canceled.</text:p>
          </text:list-item>
        </text:list>
        <text:p text:style-name="P211">Forgiven: <text:s/><text:span text:style-name="T11">The word “forgiven” means the woman's sin was canceled.</text:span></text:p>
        <text:list text:continue-numbering="true" text:style-name="Bullet_20_-_20_Diamond">
          <text:list-item>
            <text:p text:style-name="P210"><text:span text:style-name="Body_20_Emphasized_20_-_20_Small">Woman: <text:s/></text:span>The woman that Jesus is talking to was a sinful woman. She has just been wiping Jesus' feet with her hair, with her tears, and with her rare perfume. She was doing this because she was very thankful that Jesus had forgiven her of all her sins.</text:p>
          </text:list-item>
        </text:list>
        <text:p text:style-name="P211">Woman: <text:s/>The woman that Jesus is talking to was a sinful woman. She has just been wiping Jesus' feet with her hair, with her tears, and with her rare perfume. She was doing this because she was very thankful that Jesus had forgiven her of all her sins.</text:p>
        <text:list text:continue-numbering="true" text:style-name="Bullet_20_-_20_Diamond">
          <text:list-item>
            <text:p text:style-name="P210"><text:span text:style-name="Body_20_Emphasized_20_-_20_Small">Faith: <text:s/></text:span>Complete trust or confidence that we put in something or someone. <text:s/>The woman had put her complete trust and faith in Jesus. That is what saved her. </text:p>
          </text:list-item>
        </text:list>
        <text:p text:style-name="P211">Faith: <text:s/><text:span text:style-name="T12">Complete trust or confidence that we put in something or someone.</text:span> The woman had put her complete trust and faith in Jesus. That is what saved her.</text:p>
        <text:list xml:id="list92019781620947" text:continue-numbering="true" text:style-name="Bullet_20_-_20_Diamond">
          <text:list-item>
            <text:p text:style-name="P210"><text:span text:style-name="Body_20_Emphasized_20_-_20_Small">Peace: <text:s/></text:span>Peace is what we have when Jesus forgives our sins, and we are saved. We have peace when our debt of sin is canceled. Only Jesus can forgive sins. When we agree to accept the payment Jesus made for our sins, we are set free and then we peace with God.</text:p>
          </text:list-item>
        </text:list>
        <text:p text:style-name="P211">Peace: <text:s/>Peace is what we have when Jesus forgives our sins, and we are saved. We have peace when our debt of sin is canceled. Only Jesus can forgive sins. When we agree to accept the payment Jesus made for our sins, we are set free and then we peace with God.</text:p>
        <text:list xml:id="list92018590288600" text:continue-list="list92018737102727" text:style-name="WWNum1">
          <text:list-item>
            <text:p text:style-name="P224">Read the verse again by yourself as you point to the words.</text:p>
          </text:list-item>
          <text:list-item>
            <text:p text:style-name="P224">Read the verse again with the children as you point to the words.</text:p>
          </text:list-item>
        </text:list>
        <text:p text:style-name="P212">It is not enough to know that Jesus died for sinners or that he can take sin away. You need to have faith in Him. You need to trust in Him with your life. You need to tell Him that you believe that He died and took your sin away. Give him your sin and give him your life.</text:p>
        <text:p text:style-name="P213">It is not enough to know that Jesus died for sinners or that he can take sin away. You need to have faith in Him. You need to trust in Him with your life. You need to tell Him that you believe that He died and took your sin away. Give him your sin and give him your life.</text:p>
        <text:p text:style-name="P214">Remember our truth for the day? <text:s/><text:span text:style-name="T13">Let’s all say it together:</text:span></text:p>
        <text:p text:style-name="P215">Remember our truth for the day? <text:s/>Let’s all say it together:</text:p>
        <text:p text:style-name="P214">Jesus forgives our sins.</text:p>
        <text:p text:style-name="P215">Jesus forgives our sins.</text:p>
        <text:p text:style-name="P203"><text:soft-page-break/>Memory Verse Review</text:p>
        <text:p text:style-name="P204">Children Repeat the Verse by Playing “Groupings”</text:p>
        <text:list xml:id="list92019606772757" text:continue-list="list92019849145541" text:style-name="Bullet_20_-_20_checkmark">
          <text:list-item>
            <text:p text:style-name="P205">Talk about different ways to group people. (All boys, all girls, all children who ate fufu corn this week, all the children wearing read, all the children in class 2, etc.)</text:p>
          </text:list-item>
          <text:list-item>
            <text:p text:style-name="P209">Ask the children the first question.</text:p>
          </text:list-item>
          <text:list-item>
            <text:p text:style-name="P209">When a question is answered correctly, that child chooses one of the groups listed above or chooses their own group.</text:p>
          </text:list-item>
          <text:list-item>
            <text:p text:style-name="P209">The verse is said out loud together by the group chosen.</text:p>
          </text:list-item>
          <text:list-item>
            <text:p text:style-name="P209">Then the next question is asked.</text:p>
          </text:list-item>
          <text:list-item>
            <text:p text:style-name="P209">When that question is answered correctly, another child chooses one of the groups.</text:p>
          </text:list-item>
          <text:list-item>
            <text:p text:style-name="P209">The verse is said aloud again by the group chosen.</text:p>
          </text:list-item>
          <text:list-item>
            <text:p text:style-name="P209">Do this until all the questions are asked.</text:p>
          </text:list-item>
        </text:list>
        <text:p text:style-name="P221">Questions for Memory Verse</text:p>
        <text:list text:style-name="L22">
          <text:list-item text:start-value="1">
            <text:p text:style-name="P225">Who is the woman that Jesus is talking to in the verse? (A sinful woman)</text:p>
          </text:list-item>
        </text:list>
        <text:p text:style-name="P207">Who is the woman that Jesus is talking to in the verse? (A sinful woman)</text:p>
        <text:list text:continue-numbering="true" text:style-name="L22">
          <text:list-item>
            <text:p text:style-name="P225">What had she been doing? (Washing Jesus' feet with her tears and hair, then she anointed his feet with a rare perfume.)</text:p>
          </text:list-item>
        </text:list>
        <text:p text:style-name="P207">What had she been doing? (Washing Jesus' feet with her tears and hair, then she anointed his feet with a rare perfume.)</text:p>
        <text:list text:continue-numbering="true" text:style-name="L22">
          <text:list-item>
            <text:p text:style-name="P225">What did Jesus say saved her? (Her faith had saved her.)</text:p>
          </text:list-item>
        </text:list>
        <text:p text:style-name="P207">What did Jesus say saved her? (Her faith had saved her.)</text:p>
        <text:list text:continue-numbering="true" text:style-name="L22">
          <text:list-item>
            <text:p text:style-name="P225">What is faith? (Having complete trust or confidence in something or someone)</text:p>
          </text:list-item>
        </text:list>
        <text:p text:style-name="P207">What is faith? (Having complete trust or confidence in something or someone)</text:p>
        <text:list text:continue-numbering="true" text:style-name="L22">
          <text:list-item>
            <text:p text:style-name="P225">What do we have after our debt of sin is canceled? (Peace)</text:p>
          </text:list-item>
        </text:list>
        <text:p text:style-name="P207">What do we have after our debt of sin is canceled? (Peace)</text:p>
        <text:p text:style-name="P202">Song</text:p>
        <text:p text:style-name="P203">Closing and Homework</text:p>
        <text:list text:continue-list="list92019606772757" text:style-name="Bullet_20_-_20_checkmark">
          <text:list-item>
            <text:p text:style-name="P226">Say the truth together:</text:p>
          </text:list-item>
        </text:list>
        <text:p text:style-name="P223">Jesus forgives our sins.</text:p>
        <text:p text:style-name="P207">Jesus forgives our sins.</text:p>
        <text:list text:continue-numbering="true" text:style-name="Bullet_20_-_20_checkmark">
          <text:list-item>
            <text:p text:style-name="P205">Say the memory verse together:</text:p>
          </text:list-item>
        </text:list>
        <text:p text:style-name="P223">Luke 7:48 Jesus said to her, “Your sins are forgiven.”</text:p>
        <text:p text:style-name="P223">Luke 7:50 Jesus said to the woman, “Your faith has saved you; go in peace.”</text:p>
        <text:p text:style-name="P207">Luke 7:48 Jesus said to her, “Your sins are forgiven.”</text:p>
        <text:p text:style-name="P207">Luke 7:50 Jesus said to the woman, “Your faith has saved you; go in peace.”</text:p>
        <text:list text:continue-numbering="true" text:style-name="Bullet_20_-_20_checkmark">
          <text:list-item>
            <text:p text:style-name="P205">Review the homework:</text:p>
          </text:list-item>
        </text:list>
        <text:p text:style-name="P223">This week, first be sure you have put your faith in Jesus to cancel your debt of sin. Then, think of ways you can show your love and appreciation for Jesus and what he has done for you, and then do them.</text:p>
        <text:p text:style-name="P207">This week, first be sure you have put your faith in Jesus to cancel your debt of sin. Then, think of ways you can show your love and appreciation for Jesus and what he has done for you, and then do them.</text:p>
        <text:list xml:id="list92018842750919" text:continue-numbering="true" text:style-name="Bullet_20_-_20_checkmark">
          <text:list-item>
            <text:p text:style-name="P205">Give any needed announcements.</text:p>
          </text:list-item>
        </text:list>
        <text:p text:style-name="P204">Closing Prayer</text:p>
        <text:p text:style-name="P227"><text:span text:style-name="Body_20_Emphasized_20_-_20_Small">Thank God <text:s/></text:span>that we are able to have all of our sins forgiven. Thank God that we have a God who loves us so much, that He sent His son to the earth to pay for our sins.</text:p>
        <text:p text:style-name="P227"><text:span text:style-name="Body_20_Emphasized_20_-_20_Small">Ask God <text:s/></text:span>that the children will remember to think of ways to show their love to Jesus.</text:p>
        <text:p text:style-name="P228">Colouring page to colour and take home!</text:p>
      </text:section>
      <text:p text:style-name="Body"/>
      <text:p text:style-name="P54">Jesus forgives our sins.</text:p>
      <text:p text:style-name="Bible_20_Story_20_-_20_Graphic_20_Number"/>
      <text:p text:style-name="Bible_20_Story_20_-_20_Graphic_20_Number"><draw:frame draw:style-name="fr7" draw:name="Image34" text:anchor-type="as-char" svg:width="5.2165in" svg:height="4.0236in" draw:z-index="101"><draw:image xlink:href="Pictures/100000010000061D000004B76A86C8F8.tif" xlink:type="simple" xlink:show="embed" xlink:actuate="onLoad" draw:mime-type="image/tiff"/></draw:frame></text:p>
      <text:p text:style-name="Bible_20_Story_20_-_20_Graphic_20_Number"/>
      <text:p text:style-name="M.T._20_Coloring_20_Page_20_-_20_Memory_20_Verse">Luke 7:48 Jesus said to her, “Your sins are forgiven.”</text:p>
      <text:p text:style-name="M.T._20_Coloring_20_Page_20_-_20_Memory_20_Verse">Luke 7:50 Jesus said to the woman, “Your faith has saved you; go in peace.”</text:p>
      <text:p text:style-name="P55">Jesus forgives our sins.</text:p>
      <text:p text:style-name="Bible_20_Story_20_-_20_Graphic_20_Number"/>
      <text:p text:style-name="Bible_20_Story_20_-_20_Graphic_20_Number"><draw:frame draw:style-name="fr7" draw:name="Image36" text:anchor-type="as-char" svg:width="5.2165in" svg:height="4.0236in" draw:z-index="102"><draw:image xlink:href="Pictures/100000010000061D000004B76A86C8F8.tif" xlink:type="simple" xlink:show="embed" xlink:actuate="onLoad" draw:mime-type="image/tiff"/></draw:frame></text:p>
      <text:p text:style-name="Bible_20_Story_20_-_20_Graphic_20_Number"/>
      <text:p text:style-name="M.T._20_Coloring_20_Page_20_-_20_Memory_20_Verse">Luke 7:48 Jesus said to her, “Your sins are forgiven.”</text:p>
      <text:p text:style-name="M.T._20_Coloring_20_Page_20_-_20_Memory_20_Verse">Luke 7:50 Jesus said to the woman, “Your faith has saved you; go in peace.”</text:p>
      <text:h text:style-name="P25" text:outline-level="1"><draw:frame draw:style-name="fr3" draw:name="Image37" text:anchor-type="char" svg:x="0in" svg:y="0.0161in" svg:width="1.0752in" svg:height="1.0752in" draw:z-index="111"><draw:image xlink:href="Pictures/10000001000000D8000000D8B40889C5.png" xlink:type="simple" xlink:show="embed" xlink:actuate="onLoad" draw:mime-type="image/png"/></draw:frame>The Seed and the Sower</text:h>
      <text:p text:style-name="M.T._20_Lesson_20_Title">The Seed and the Sower</text:p>
      <text:p text:style-name="English_20_Translation_20_-_20_Lesson_20_title">The Seed and the Sower</text:p>
      <text:p text:style-name="M.T._20_Text_20_-_20_Lesson_20_Title_20_Scrip_20_Reference">Luke <text:s/>8:4-15</text:p>
      <text:p text:style-name="Part_20_Heading">Lesson Overview</text:p>
      <table:table table:name="Table11" table:style-name="Table11" table:template-name="Lesson Overview">
        <table:table-column table:style-name="Table11.A"/>
        <table:table-column table:style-name="Table11.B"/>
        <table:table-row table:style-name="Table11.1">
          <table:table-cell table:style-name="Table11.A1" office:value-type="string">
            <text:p text:style-name="Table_20_Left_20_headings">Today’s Truth</text:p>
          </table:table-cell>
          <table:table-cell table:style-name="Table11.B1" office:value-type="string">
            <text:p text:style-name="M.T._20_Text">Follow Jesus no matter the cost.</text:p>
            <text:p text:style-name="English_20_translation">Follow Jesus no matter the cost.</text:p>
          </table:table-cell>
        </table:table-row>
        <table:table-row table:style-name="Table11.1">
          <table:table-cell table:style-name="Table11.A1" office:value-type="string">
            <text:p text:style-name="Table_20_Left_20_headings">Objective</text:p>
          </table:table-cell>
          <table:table-cell table:style-name="Table11.B1" office:value-type="string">
            <text:p text:style-name="Body_20_Tight_20_lines"><text:span text:style-name="Body_20_Emphasized_20_-_20_Small">KNOW: <text:s/></text:span>The children will know how to correctly follow Jesus.</text:p>
            <text:p text:style-name="Body_20_Tight_20_lines"><text:span text:style-name="Body_20_Emphasized_20_-_20_Small">DO:</text:span> <text:s/>The children will look for the four kinds of soil around their compound.</text:p>
          </table:table-cell>
        </table:table-row>
        <table:table-row table:style-name="Table11.1">
          <table:table-cell table:style-name="Table11.A1" office:value-type="string">
            <text:p text:style-name="Table_20_Left_20_headings">Materials</text:p>
          </table:table-cell>
          <table:table-cell table:style-name="Table11.B1" office:value-type="string">
            <text:list xml:id="list92018424793955" text:continue-list="list92018216736182"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ext:span text:style-name="T14">Ball</text:span> <text:s/>(Make a ball by tying wrappen (plastic bag) into knots many times, or fill an old sock with scrap material.)</text:p>
              </text:list-item>
              <text:list-item>
                <text:p text:style-name="Table_20_Bullet_20_-_20_Checkmark">A drum, shaker, or anything to make music with.</text:p>
              </text:list-item>
            </text:list>
          </table:table-cell>
        </table:table-row>
        <table:table-row table:style-name="Table11.1">
          <table:table-cell table:style-name="Table11.A1" office:value-type="string">
            <text:p text:style-name="Table_20_Left_20_headings">Memory Verse</text:p>
          </table:table-cell>
          <table:table-cell table:style-name="Table11.B1" office:value-type="string">
            <text:p text:style-name="M.T._20_Text">Luke 8:15 But the seed on the good soil stands for those with a noble and good heart, who hear the Word, retain it, and by persevering produce a crop.</text:p>
            <text:p text:style-name="English_20_translation">Luke 8:15 But the seed on the good soil stands for those with a noble and good heart, who hear the Word, retain it, and by persevering produce a crop.</text:p>
          </table:table-cell>
        </table:table-row>
        <table:table-row table:style-name="Table11.1">
          <table:table-cell table:style-name="Table11.A1" office:value-type="string">
            <text:p text:style-name="Table_20_Left_20_headings">Homework</text:p>
          </table:table-cell>
          <table:table-cell table:style-name="Table11.B1" office:value-type="string">
            <text:p text:style-name="M.T._20_Text">This week, as you walk or work or play outside this week, see if you can find examples of these four different kinds of soil around your compound. Ask God to help you be like the good soil and follow Jesus no matter what happens.</text:p>
            <text:p text:style-name="English_20_translation">This week, as you walk or work or play outside this week, see if you can find examples of these four different kinds of soil around your compound. Ask God to help you be like the good soil and follow Jesus no matter what happens.</text:p>
          </table:table-cell>
        </table:table-row>
      </table:table>
      <text:p text:style-name="Body_20_-_20_Small_20_Spacer"/>
      <text:p text:style-name="Part_20_Heading">Detailed Lesson Plan</text:p>
      <text:section text:style-name="Sect1" text:name="L-22 Detail Plan">
        <text:p text:style-name="P229">Song</text:p>
        <text:p text:style-name="P230">Opening</text:p>
        <text:p text:style-name="P231">Welcome</text:p>
        <text:list text:continue-list="list92018842750919" text:style-name="Bullet_20_-_20_checkmark">
          <text:list-item>
            <text:p text:style-name="P232">Be sure the children know you are happy to see them!</text:p>
          </text:list-item>
          <text:list-item>
            <text:p text:style-name="P232">Introduce yourself and your helpers.</text:p>
          </text:list-item>
        </text:list>
        <text:p text:style-name="P231">Sharing Time</text:p>
        <text:list text:continue-numbering="true" text:style-name="Bullet_20_-_20_checkmark">
          <text:list-item>
            <text:p text:style-name="P233">Say the truth from the previous lesson together:</text:p>
          </text:list-item>
        </text:list>
        <text:p text:style-name="P234">Jesus forgives our sins.</text:p>
        <text:p text:style-name="P235">Jesus forgives our sins.</text:p>
        <text:list text:continue-numbering="true" text:style-name="Bullet_20_-_20_checkmark">
          <text:list-item>
            <text:p text:style-name="P232">Say the memory verse from the previous lesson together:</text:p>
          </text:list-item>
        </text:list>
        <text:p text:style-name="P234">Luke 7:48 Jesus said to her, “Your sins are forgiven.”</text:p>
        <text:p text:style-name="P236">Luke 7:50 Jesus said to the woman, “Your faith has saved you; go in peace.”</text:p>
        <text:p text:style-name="P235">Luke 7:48 Jesus said to her, “Your sins are forgiven.”</text:p>
        <text:p text:style-name="P235">Luke 7:50 Jesus said to the woman, “Your faith has saved you; go in peace.”</text:p>
        <text:list text:continue-numbering="true" text:style-name="Bullet_20_-_20_checkmark">
          <text:list-item>
            <text:p text:style-name="P232">Review the homework from the previous lesson:</text:p>
          </text:list-item>
        </text:list>
        <text:p text:style-name="P234">The homework was to think of ways you can show your love for Jesus. What did you do? Did you confess a sin? Did you show love to an enemy? What did you do?</text:p>
        <text:p text:style-name="P235">The homework was to think of ways you can show your love for Jesus. What did you do? Did you confess a sin? Did you show love to an enemy? What did you do?</text:p>
        <text:p text:style-name="P231">Prayer</text:p>
        <text:list text:continue-numbering="true" text:style-name="Bullet_20_-_20_checkmark">
          <text:list-item>
            <text:p text:style-name="P232">Let the children share praises and prayer requests.</text:p>
          </text:list-item>
          <text:list-item>
            <text:p text:style-name="P237">Keep a record of what the children are sharing so you can remember to thank God together for answered prayers.</text:p>
          </text:list-item>
          <text:list-item>
            <text:p text:style-name="P237"><text:soft-page-break/>Spend time praying together. <text:s/>Let children pray out loud if they volunteer. <text:s/>Do not force anyone to pray out loud.</text:p>
          </text:list-item>
        </text:list>
        <text:p text:style-name="P229">Song</text:p>
        <text:p text:style-name="P230">Words to Discuss</text:p>
        <text:list xml:id="list92019850469437" text:continue-numbering="true" text:style-name="Bullet_20_-_20_checkmark">
          <text:list-item>
            <text:p text:style-name="P232">On the blackboard, write the “Words to Discuss” from the list below.</text:p>
          </text:list-item>
          <text:list-item>
            <text:p text:style-name="P238">Let's discuss some words to help us better understand the Bible story for today.</text:p>
          </text:list-item>
        </text:list>
        <text:p text:style-name="P235">Let's discuss some words to help us better understand the Bible story for today.</text:p>
        <text:list text:continue-list="list92019781620947" text:style-name="Bullet_20_-_20_Diamond">
          <text:list-item>
            <text:p text:style-name="P239"><text:span text:style-name="Body_20_Emphasized_20_-_20_Small">Farmer: <text:s/></text:span>(Let the children give their definitions.)</text:p>
          </text:list-item>
        </text:list>
        <text:p text:style-name="P240">Farmer: <text:s/>(Let the children give their definitions.)</text:p>
        <text:list text:continue-numbering="true" text:style-name="Bullet_20_-_20_Diamond">
          <text:list-item>
            <text:p text:style-name="P239"><text:span text:style-name="Body_20_Emphasized_20_-_20_Small">Seeds: <text:s/></text:span>(Let the children give their definitions.)</text:p>
          </text:list-item>
        </text:list>
        <text:p text:style-name="P240">Seeds: <text:s/>(Let the children give their definitions.)</text:p>
        <text:list xml:id="list92017921968440" text:continue-numbering="true" text:style-name="Bullet_20_-_20_Diamond">
          <text:list-item>
            <text:p text:style-name="P239"><text:span text:style-name="Body_20_Emphasized_20_-_20_Small">Soil: <text:s/></text:span>(Let the children give their definitions.)</text:p>
          </text:list-item>
        </text:list>
        <text:p text:style-name="P240">Soil: <text:s/>(Let the children give their definitions.)</text:p>
        <text:p text:style-name="P229">Song</text:p>
        <text:p text:style-name="P230">Bible Story / Lesson</text:p>
        <text:p text:style-name="P241">When planting season comes, what is the best kind of soil to plant your seeds in?</text:p>
        <text:p text:style-name="P242">When planting season comes, what is the best kind of soil to plant your seeds in?</text:p>
        <text:p text:style-name="P241">What do seeds need in order to grow?</text:p>
        <text:p text:style-name="P242">What do seeds need in order to grow?</text:p>
        <text:p text:style-name="P241">What will cause your seeds to not produce?</text:p>
        <text:p text:style-name="P242">What will cause your seeds to not produce?</text:p>
        <text:p text:style-name="P241">Today we will be learning about how to follow Jesus no matter the cost.</text:p>
        <text:p text:style-name="P242">Today we will be learning about how to follow Jesus no matter the cost.</text:p>
        <text:p text:style-name="P231">Introduce Truth</text:p>
        <text:p text:style-name="P243">Our truth for today is: <text:s/>Follow Jesus no matter the cost.</text:p>
        <text:p text:style-name="P244">Our truth for today is: <text:s/>Follow Jesus no matter the cost.</text:p>
        <text:p text:style-name="P243">This reminds me of a true story from the Bible.</text:p>
        <text:p text:style-name="P244">This reminds me of a true story from the Bible.</text:p>
        <text:p text:style-name="P245">Bible Story: <text:s/>Luke <text:s/>8:4-15</text:p>
        <text:p text:style-name="P246"><text:span text:style-name="T15">Note: <text:s/></text:span>In this lesson, you will show the picture of each type of soil Jesus describes, and you will show the picture again when Jesus explains the meaning of each.</text:p>
        <text:p text:style-name="P241">Luke 8:4 While a large crowd was gathering and people were coming to Jesus from town after town, he told this parable:</text:p>
        <text:p text:style-name="P242">Luke 8:4 While a large crowd was gathering and people were coming to Jesus from town after town, he told this parable:</text:p>
        <text:p text:style-name="P247"><draw:frame draw:style-name="fr4" draw:name="Frame27" text:anchor-type="paragraph" svg:x="-0.0181in" svg:y="0.0035in" svg:width="1.378in" draw:z-index="103"><draw:text-box fo:min-height="1.2055in"><text:p text:style-name="P248">Picture <text:s/>22–1</text:p><text:p text:style-name="P249"><draw:frame draw:style-name="fr5" draw:name="Image35" text:anchor-type="as-char" svg:width="1.2917in" svg:height="0.9366in" draw:z-index="112"><draw:image xlink:href="Pictures/100000000000015F000000FE526EB3BF.jpg" xlink:type="simple" xlink:show="embed" xlink:actuate="onLoad" draw:mime-type="image/jpeg"/></draw:frame></text:p></draw:text-box></draw:frame>Luke 8:5 A farmer went out to sow his seed. As he was scattering the seed, some fell along the path; it was trampled on, and the birds of the air ate it up.</text:p>
        <text:p text:style-name="P250">Luke 8:5 A farmer went out to sow his seed. As he was scattering the seed, some fell along the path; it was trampled on, and the birds of the air ate it up.</text:p>
        <text:p text:style-name="P250"/>
        <text:p text:style-name="P250"/>
        <text:p text:style-name="P250"/>
        <text:p text:style-name="P247"><draw:frame draw:style-name="fr4" draw:name="Frame18" text:anchor-type="paragraph" svg:x="-0.0181in" svg:y="0.0035in" svg:width="1.378in" draw:z-index="104"><draw:text-box fo:min-height="1.2055in"><text:p text:style-name="P248">Picture <text:s/>22–2</text:p><text:p text:style-name="P249"><draw:frame draw:style-name="fr5" draw:name="Image38" text:anchor-type="as-char" svg:width="1.2917in" svg:height="0.9366in" draw:z-index="113"><draw:image xlink:href="Pictures/100000000000015F000000FE48D5B260.jpg" xlink:type="simple" xlink:show="embed" xlink:actuate="onLoad" draw:mime-type="image/jpeg"/></draw:frame></text:p></draw:text-box></draw:frame>Luke 8:6 Some fell on rock, and when it came up, the plants withered because they had no moisture.</text:p>
        <text:p text:style-name="P242">Luke 8:6 Some fell on rock, and when it came up, the plants withered because they had no moisture.</text:p>
        <text:p text:style-name="P242"/>
        <text:p text:style-name="P242"/>
        <text:p text:style-name="P242"/>
        <text:p text:style-name="P242"/>
        <text:p text:style-name="P247"><draw:frame draw:style-name="fr4" draw:name="Frame37" text:anchor-type="paragraph" svg:x="-0.0181in" svg:y="0.0035in" svg:width="1.378in" draw:z-index="105"><draw:text-box fo:min-height="1.2055in"><text:p text:style-name="P248">Picture <text:s/>22–3</text:p><text:p text:style-name="P249"><draw:frame draw:style-name="fr5" draw:name="Image39" text:anchor-type="as-char" svg:width="1.2917in" svg:height="0.9366in" draw:z-index="114"><draw:image xlink:href="Pictures/100000000000015F000000FE49BFEF8A.jpg" xlink:type="simple" xlink:show="embed" xlink:actuate="onLoad" draw:mime-type="image/jpeg"/></draw:frame></text:p></draw:text-box></draw:frame>Luke 8:7 Other seed fell among thorns, which grew up with it and choked the plants.</text:p>
        <text:p text:style-name="P242">Luke 8:7 Other seed fell among thorns, which grew up with it and choked the plants.</text:p>
        <text:p text:style-name="P242"/>
        <text:p text:style-name="P242"/>
        <text:p text:style-name="P242"/>
        <text:p text:style-name="P242"/>
        <text:p text:style-name="P247"><draw:frame draw:style-name="fr4" draw:name="Frame47" text:anchor-type="paragraph" svg:x="-0.0181in" svg:y="0.0035in" svg:width="1.378in" draw:z-index="106"><draw:text-box fo:min-height="1.2055in"><text:p text:style-name="P248">Picture <text:s/>22–4</text:p><text:p text:style-name="P249"><draw:frame draw:style-name="fr5" draw:name="Image40" text:anchor-type="as-char" svg:width="1.2917in" svg:height="0.9366in" draw:z-index="115"><draw:image xlink:href="Pictures/100000000000015F000000FE737A598E.jpg" xlink:type="simple" xlink:show="embed" xlink:actuate="onLoad" draw:mime-type="image/jpeg"/></draw:frame></text:p></draw:text-box></draw:frame><text:soft-page-break/>Luke 8:8 Still other seed fell on good soil. It came up and yielded a crop, a hundred times more than was sown.” When he said this, he called out, “He who has ears to hear, let him hear.”</text:p>
        <text:p text:style-name="P242">Luke 8:8 Still other seed fell on good soil. It came up and yielded a crop, a hundred times more than was sown.” When he said this, he called out, “He who has ears to hear, let him hear.”</text:p>
        <text:p text:style-name="P242"/>
        <text:p text:style-name="P247">Luke 8:9-10 His disciples asked him what this parable meant. He said, “The knowledge of the secrets of the kingdom of God has been given to you, but to others I speak in parables, so that, “‘though seeing, they may not see; though hearing, they may not understand.’</text:p>
        <text:p text:style-name="P247">Luke 8:11 “This is the meaning of the parable: The seed is the word of God.</text:p>
        <text:p text:style-name="P250">Luke 8:9-10 His disciples asked him what this parable meant. He said, “The knowledge of the secrets of the kingdom of God has been given to you, but to others I speak in parables, so that, “‘though seeing, they may not see; though hearing, they may not understand.’</text:p>
        <text:p text:style-name="P250">Luke 8:11 “This is the meaning of the parable: The seed is the word of God.</text:p>
        <text:p text:style-name="P247"><draw:frame draw:style-name="fr4" draw:name="Frame63" text:anchor-type="paragraph" svg:x="-0.0181in" svg:y="0.0035in" svg:width="1.378in" draw:z-index="107"><draw:text-box fo:min-height="1.2055in"><text:p text:style-name="P251"><text:span text:style-name="T16">Picture <text:s/></text:span>22–1 <text:s/>(Repeat)</text:p><text:p text:style-name="P251"><draw:frame draw:style-name="fr5" draw:name="Image41" text:anchor-type="as-char" svg:width="1.2917in" svg:height="0.9366in" draw:z-index="116"><draw:image xlink:href="Pictures/100000000000015F000000FE526EB3BF.jpg" xlink:type="simple" xlink:show="embed" xlink:actuate="onLoad" draw:mime-type="image/jpeg"/></draw:frame></text:p></draw:text-box></draw:frame>Luke 8:12 Those along the path are the ones who hear, and then the devil comes and takes away the word from their hearts, so that they may not believe and be saved.</text:p>
        <text:p text:style-name="P250">Luke 8:12 Those along the path are the ones who hear, and then the devil comes and takes away the word from their hearts, so that they may not believe and be saved.</text:p>
        <text:p text:style-name="P242"/>
        <text:p text:style-name="P242"/>
        <text:p text:style-name="P247"><draw:frame draw:style-name="fr4" draw:name="Frame7" text:anchor-type="paragraph" svg:x="-0.0181in" svg:y="0.0035in" svg:width="1.378in" draw:z-index="108"><draw:text-box fo:min-height="1.2055in"><text:p text:style-name="P251"><text:span text:style-name="T16">Picture <text:s/></text:span>22–2 <text:s/>(Repeat)</text:p><text:p text:style-name="P251"><draw:frame draw:style-name="fr5" draw:name="Image42" text:anchor-type="as-char" svg:width="1.2917in" svg:height="0.9366in" draw:z-index="117"><draw:image xlink:href="Pictures/100000000000015F000000FE48D5B260.jpg" xlink:type="simple" xlink:show="embed" xlink:actuate="onLoad" draw:mime-type="image/jpeg"/></draw:frame></text:p></draw:text-box></draw:frame>Luke 8:13 Those on the rock are the ones who receive the word with joy when they hear it, but they have no root. They believe for a while, but in the time of testing they fall away.</text:p>
        <text:p text:style-name="P250">Luke 8:13 Those on the rock are the ones who receive the word with joy when they hear it, but they have no root. They believe for a while, but in the time of testing they fall away.</text:p>
        <text:p text:style-name="P242"/>
        <text:p text:style-name="P242"/>
        <text:p text:style-name="P247"><draw:frame draw:style-name="fr4" draw:name="Frame8" text:anchor-type="paragraph" svg:x="-0.0181in" svg:y="0.0035in" svg:width="1.378in" draw:z-index="109"><draw:text-box fo:min-height="1.2055in"><text:p text:style-name="P251"><text:span text:style-name="T16">Picture <text:s/></text:span>22–3 <text:s/>(Repeat)</text:p><text:p text:style-name="P251"><draw:frame draw:style-name="fr5" draw:name="Image43" text:anchor-type="as-char" svg:width="1.2917in" svg:height="0.9366in" draw:z-index="118"><draw:image xlink:href="Pictures/100000000000015F000000FE49BFEF8A.jpg" xlink:type="simple" xlink:show="embed" xlink:actuate="onLoad" draw:mime-type="image/jpeg"/></draw:frame></text:p></draw:text-box></draw:frame>Luke 8:14 The seed that fell among thorns stands for those who hear, but as they go on their way they are choked by life’s worries, riches and pleasures, and they do not mature.</text:p>
        <text:p text:style-name="P250">Luke 8:14 The seed that fell among thorns stands for those who hear, but as they go on their way they are choked by life’s worries, riches and pleasures, and they do not mature.</text:p>
        <text:p text:style-name="P242"/>
        <text:p text:style-name="P242"/>
        <text:p text:style-name="P247"><draw:frame draw:style-name="fr4" draw:name="Frame9" text:anchor-type="paragraph" svg:x="-0.0181in" svg:y="0.0035in" svg:width="1.378in" draw:z-index="110"><draw:text-box fo:min-height="1.2055in"><text:p text:style-name="P251"><text:span text:style-name="T16">Picture <text:s/></text:span>22–4 <text:s/>(Repeat)</text:p><text:p text:style-name="P251"><draw:frame draw:style-name="fr5" draw:name="Image44" text:anchor-type="as-char" svg:width="1.2917in" svg:height="0.9366in" draw:z-index="119"><draw:image xlink:href="Pictures/100000000000015F000000FE737A598E.jpg" xlink:type="simple" xlink:show="embed" xlink:actuate="onLoad" draw:mime-type="image/jpeg"/></draw:frame></text:p></draw:text-box></draw:frame>Luke 8:15 But the seed on good soil stands for those with a noble and good heart, who hear the word, retain it, and by persevering produce a crop.</text:p>
        <text:p text:style-name="P250">Luke 8:15 But the seed on good soil stands for those with a noble and good heart, who hear the word, retain it, and by persevering produce a crop.</text:p>
        <text:p text:style-name="P250"/>
        <text:p text:style-name="P250"/>
        <text:p text:style-name="P250"/>
        <text:p text:style-name="P250"/>
        <text:p text:style-name="P231">Application</text:p>
        <text:p text:style-name="P241">What kind of soil are you? Are you like the “footpath” that represented people who refuse to believe God's message? Are you like the “rocky soil” that represents people who believe the message of Jesus, but never get around to doing anything about it? Are you like the “thorny ground” that represents people that are overcome by worries and want all the things this life can offer, and leave no room in their lives for God? Or, are you like the “good soil” that represents people who follow Jesus no matter the cost? What soil would you like to be?</text:p>
        <text:p text:style-name="P242">What kind of soil are you? Are you like the “footpath” that represented people who refuse to believe God's message? Are you like the “rocky soil” that represents people who believe the message of Jesus, but never get around to doing anything about it? Are you like the “thorny ground” that represents people that are overcome by worries and want all the things this life can offer, and leave no room in their lives for God? Or, are you like the “good soil” that represents people who follow Jesus no matter the cost? What soil would you like to be?</text:p>
        <text:p text:style-name="P243">Follow Jesus no matter the cost.</text:p>
        <text:p text:style-name="P244">Follow Jesus no matter the cost.</text:p>
        <text:p text:style-name="P252">Homework</text:p>
        <text:p text:style-name="P253">This week, as you walk or work or play outside this week, see if you can find examples of these four different kinds of soil around your compound. Ask God to help you be like the good soil and follow Jesus no matter what happens.</text:p>
        <text:p text:style-name="P242">This week, as you walk or work or play outside this week, see if you can find examples of these four different kinds of soil around your compound. Ask God to help you be like the good soil and follow Jesus no matter what happens.</text:p>
        <text:p text:style-name="Sub-Head_20_1_20_No_20_follow"><text:soft-page-break/>Prayer / Song</text:p>
        <text:p text:style-name="P230">Review Game</text:p>
        <text:p text:style-name="P254">Team Hot Potato</text:p>
        <text:p text:style-name="P252">Materials</text:p>
        <text:list text:continue-list="list92019850469437" text:style-name="Bullet_20_-_20_checkmark">
          <text:list-item>
            <text:p text:style-name="P232"><text:span text:style-name="T17">Ball</text:span> <text:s/>(Make a ball by tying wrappen (plastic bag) into knots many times, or fill an old sock with scrap material.)</text:p>
          </text:list-item>
          <text:list-item>
            <text:p text:style-name="P237">A drum, shaker, or anything to make music with.</text:p>
          </text:list-item>
        </text:list>
        <text:p text:style-name="P252">How to Play</text:p>
        <text:list xml:id="list92019821047216" text:continue-numbering="true" text:style-name="Bullet_20_-_20_checkmark">
          <text:list-item>
            <text:p text:style-name="Body_20_Bullet_20_-_20_Checkmark">Divide the class into 2 teams. <text:s/>Pick 3 volunteers from each team.</text:p>
          </text:list-item>
          <text:list-item>
            <text:p text:style-name="Body_20_Bullet_20_-_20_Checkmark_20_-_20_No_20_follow">The 6 children will stand in a circle at the front of the room.</text:p>
          </text:list-item>
          <text:list-item>
            <text:p text:style-name="Body_20_Bullet_20_-_20_Checkmark_20_-_20_No_20_follow">The children will pass the ball from person to person in the circle as quickly as possible.</text:p>
          </text:list-item>
          <text:list-item>
            <text:p text:style-name="Body_20_Bullet_20_-_20_Checkmark_20_-_20_No_20_follow">Have a drummer not face the children and drum for a short time.</text:p>
          </text:list-item>
          <text:list-item>
            <text:p text:style-name="Body_20_Bullet_20_-_20_Checkmark_20_-_20_No_20_follow">When the drummer stops, the student holding the ball answers a question. <text:s/>If the answer is correct, that team gets a point.</text:p>
          </text:list-item>
          <text:list-item>
            <text:p text:style-name="Body_20_Bullet_20_-_20_Checkmark_20_-_20_No_20_follow">The drummer then starts to play again and the game continues.</text:p>
          </text:list-item>
          <text:list-item>
            <text:p text:style-name="Body_20_Bullet_20_-_20_Checkmark_20_-_20_No_20_follow">After playing 2 or 3 times, you can change the children in the circle. <text:s/>Have the chidren at the front sit down. <text:s/>Then, pick 3 different voluteers from each team.</text:p>
          </text:list-item>
          <text:list-item>
            <text:p text:style-name="Body_20_Bullet_20_-_20_Checkmark_20_-_20_No_20_follow">Continue playing the game.</text:p>
          </text:list-item>
          <text:list-item>
            <text:p text:style-name="Body_20_Bullet_20_-_20_Checkmark_20_-_20_No_20_follow">Record the points. <text:s/>The team with the most points wins.</text:p>
          </text:list-item>
          <text:list-item>
            <text:p text:style-name="Body_20_Bullet_20_-_20_Checkmark_20_-_20_No_20_follow">Be sure to clap for both sides. <text:s/>No name-calling. <text:s/>Encourage good sportsmanship.</text:p>
          </text:list-item>
        </text:list>
        <text:p text:style-name="P252">Questions for Review Game</text:p>
        <text:list text:style-name="L23">
          <text:list-item>
            <text:p text:style-name="P255">Jesus told a story about a farmer who was planting his seeds by scattering them across his field. What happened to the seed that fell on the footpath? (They were stepped on, and the birds came and ate them all.)</text:p>
          </text:list-item>
        </text:list>
        <text:p text:style-name="P235">Jesus told a story about a farmer who was planting his seeds by scattering them across his field. What happened to the seed that fell on the footpath? (They were stepped on, and the birds came and ate them all.)</text:p>
        <text:list text:continue-numbering="true" text:style-name="L23">
          <text:list-item>
            <text:p text:style-name="P255">What happened to the seed that fell on the shallow soil with underlying rock? (They began to grow, but soon it withered and died for lack of moisture.)</text:p>
          </text:list-item>
        </text:list>
        <text:p text:style-name="P235">What happened to the seed that fell on the shallow soil with underlying rock? (They began to grow, but soon it withered and died for lack of moisture.)</text:p>
        <text:list text:continue-numbering="true" text:style-name="L23">
          <text:list-item>
            <text:p text:style-name="P255">What happened to the seed that fell among the thorns? (They were choked.)</text:p>
          </text:list-item>
        </text:list>
        <text:p text:style-name="P235">What happened to the seed that fell among the thorns? (They were choked.)</text:p>
        <text:list text:continue-numbering="true" text:style-name="L23">
          <text:list-item>
            <text:p text:style-name="P255">What happened to the seed that fell on fertile soil? (They grew and produced a crop one hundred times as much as had been planted.)</text:p>
          </text:list-item>
        </text:list>
        <text:p text:style-name="P235">What happened to the seed that fell on fertile soil? (They grew and produced a crop one hundred times as much as had been planted.)</text:p>
        <text:list text:continue-numbering="true" text:style-name="L23">
          <text:list-item>
            <text:p text:style-name="P255">What did Jesus' disciples want to know? (The meaning of the story)</text:p>
          </text:list-item>
        </text:list>
        <text:p text:style-name="P235">What did Jesus' disciples want to know? (The meaning of the story)</text:p>
        <text:list text:continue-numbering="true" text:style-name="L23">
          <text:list-item>
            <text:p text:style-name="P255">What did the seed represent? (The message of God)</text:p>
          </text:list-item>
        </text:list>
        <text:p text:style-name="P235">What did the seed represent? (The message of God)</text:p>
        <text:list text:continue-numbering="true" text:style-name="L23">
          <text:list-item>
            <text:p text:style-name="P255">What kind of people did the footpath represent? (Those who hear the message, but then the devil comes and steals it away and prevents them from believing and being saved)</text:p>
          </text:list-item>
        </text:list>
        <text:p text:style-name="P235">What kind of people did the footpath represent? (Those who hear the message, but then the devil comes and steals it away and prevents them from believing and being saved)</text:p>
        <text:list text:continue-numbering="true" text:style-name="L23">
          <text:list-item>
            <text:p text:style-name="P255">What kind of people did the shallow soil with underlying hard rock represent? (Those who hear the message with joy. But like young plants in such soil, their roots don't go very deep. They believe for a while, but they wilt when the hot winds of testing blow.)</text:p>
          </text:list-item>
        </text:list>
        <text:p text:style-name="P235">What kind of people did the shallow soil with underlying hard rock represent? (Those who hear the message with joy. But like young plants in such soil, their roots don't go very deep. They believe for a while, but they wilt when the hot winds of testing blow.)</text:p>
        <text:list text:continue-numbering="true" text:style-name="L23">
          <text:list-item>
            <text:p text:style-name="P255">What kind of people did the thorny soil represent? (Those who hear and accept the message, but all too quickly the message is crowded out by the cares, riches, and pleasures of this life. The plants will never mature and grow.)</text:p>
          </text:list-item>
        </text:list>
        <text:p text:style-name="P235">What kind of people did the thorny soil represent? (Those who hear and accept the message, but all too quickly the message is crowded out by the cares, riches, and pleasures of this life. The plants will never mature and grow.)</text:p>
        <text:list text:continue-numbering="true" text:style-name="L23">
          <text:list-item>
            <text:p text:style-name="P255"><text:soft-page-break/>What kind of people did the fertile soil represent? (Honest, good-hearted people who hear God's message. They cling to it, and they steadily produce a huge harvest.)</text:p>
          </text:list-item>
        </text:list>
        <text:p text:style-name="P235">What kind of people did the fertile soil represent? (Honest, good-hearted people who hear God's message. They cling to it, and they steadily produce a huge harvest.)</text:p>
        <text:p text:style-name="Sub-Head_20_1_20_No_20_follow">Song</text:p>
        <text:p text:style-name="P230">Memory Verse</text:p>
        <text:p text:style-name="P252">Materials and Preparations</text:p>
        <text:list xml:id="list92018420308440" text:continue-list="list92019821047216" text:style-name="Bullet_20_-_20_checkmark">
          <text:list-item>
            <text:p text:style-name="P232">Put a bookmark in <text:s/>Luke 8:15</text:p>
          </text:list-item>
          <text:list-item>
            <text:p text:style-name="P232">Write memory verse on the blackboard.</text:p>
          </text:list-item>
        </text:list>
        <text:p text:style-name="P234">Luke 8:15 But the seed on the good soil stands for those with a noble and good heart, who hear the Word, retain it, and by persevering produce a crop.</text:p>
        <text:p text:style-name="P235">Luke 8:15 But the seed on the good soil stands for those with a noble and good heart, who hear the Word, retain it, and by persevering produce a crop.</text:p>
        <text:p text:style-name="P231">Teach and Explain</text:p>
        <text:p text:style-name="P241">Our memory verse is in the Gospel of Luke. <text:s/>That is in the New Testament, a part of the Bible.</text:p>
        <text:p text:style-name="P242">Our memory verse is in the Gospel of Luke. <text:s/>That is in the New Testament, a part of the Bible.</text:p>
        <text:list xml:id="list92018714956111" text:continue-list="list92018590288600" text:style-name="WWNum1">
          <text:list-item text:start-value="1">
            <text:p text:style-name="P256">Read the verse from your Bible.</text:p>
          </text:list-item>
          <text:list-item>
            <text:p text:style-name="P256">Read the verse by yourself as you point to the words.</text:p>
          </text:list-item>
          <text:list-item>
            <text:p text:style-name="P256">Read the verse with the children as you point to the words.</text:p>
          </text:list-item>
          <text:list-item>
            <text:p text:style-name="P256">Explain the verse:</text:p>
          </text:list-item>
        </text:list>
        <text:list text:continue-list="list92018420308440" text:style-name="Bullet_20_-_20_checkmark">
          <text:list-item>
            <text:p text:style-name="P238">Our memory verse comes from today’s Bible story.</text:p>
          </text:list-item>
        </text:list>
        <text:p text:style-name="P235">Our memory verse comes from today’s Bible story.</text:p>
        <text:list xml:id="list92019284933110" text:continue-numbering="true" text:style-name="Bullet_20_-_20_checkmark">
          <text:list-item>
            <text:p text:style-name="P232">As you read the verse, circle the words shown below. <text:s/>Explain each of these words.</text:p>
          </text:list-item>
        </text:list>
        <text:list text:continue-list="list92017921968440" text:style-name="Bullet_20_-_20_Diamond">
          <text:list-item>
            <text:p text:style-name="P239"><text:span text:style-name="Body_20_Emphasized_20_-_20_Small">Seed: <text:s/></text:span>Do you remember in the story Jesus told what the seed represents? (The message of God.) Seeds need to be planted on good soil if it is going to produce a harvest.</text:p>
          </text:list-item>
        </text:list>
        <text:p text:style-name="P240">Seed: <text:s/>Do you remember in the story Jesus told what the seed represents? (The message of God.) Seeds need to be planted on good soil if it is going to produce a harvest.</text:p>
        <text:list text:continue-numbering="true" text:style-name="Bullet_20_-_20_Diamond">
          <text:list-item>
            <text:p text:style-name="P239"><text:span text:style-name="Body_20_Emphasized_20_-_20_Small">Noble: <text:s/></text:span>Someone who is noble shows high moral qualities. Do you know someone who is noble? You know when someone has a good heart because they show kindness to others. You know when someone has a good heart because they show kindness to others.</text:p>
          </text:list-item>
        </text:list>
        <text:p text:style-name="P240">Noble: <text:s/>Someone who is noble shows high moral qualities. Do you know someone who is noble? You know when someone has a good heart because they show kindness to others. You know when someone has a good heart because they show kindness to others.</text:p>
        <text:list text:continue-numbering="true" text:style-name="Bullet_20_-_20_Diamond">
          <text:list-item>
            <text:p text:style-name="P239"><text:span text:style-name="Body_20_Emphasized_20_-_20_Small">Hear: <text:s/></text:span>How are ways that one hears the words of God? (By reading the Bible, going to church and Sunday school, having family Bible reading times, listening to radio programs.)</text:p>
          </text:list-item>
        </text:list>
        <text:p text:style-name="P240">Hear: <text:s/>How are ways that one hears the words of God? (By reading the Bible, going to church and Sunday school, having family Bible reading times, listening to radio programs.)</text:p>
        <text:list text:continue-numbering="true" text:style-name="Bullet_20_-_20_Diamond">
          <text:list-item>
            <text:p text:style-name="P239"><text:span text:style-name="Body_20_Emphasized_20_-_20_Small">Retain: <text:s/></text:span>To be good soil, one does not only hear God's message, but they keep it in their memory. The message goes with them wherever they go.</text:p>
          </text:list-item>
        </text:list>
        <text:p text:style-name="P240">Retain: <text:s/>To be good soil, one does not only hear God's message, but they keep it in their memory. The message goes with them wherever they go.</text:p>
        <text:list xml:id="list92020059082425" text:continue-numbering="true" text:style-name="Bullet_20_-_20_Diamond">
          <text:list-item>
            <text:p text:style-name="P239"><text:span text:style-name="Body_20_Emphasized_20_-_20_Small">Persevering: <text:s/></text:span>The one who produces a crop are those who follow Jesus no matter what the cost. They persevere, they continue to follow Jesus no matter what difficulties come their way.</text:p>
          </text:list-item>
        </text:list>
        <text:p text:style-name="P240">Persevering: <text:s/>The one who produces a crop are those who follow Jesus no matter what the cost. They persevere, they continue to follow Jesus no matter what difficulties come their way.</text:p>
        <text:list xml:id="list92019128450353" text:continue-list="list92018714956111" text:style-name="WWNum1">
          <text:list-item>
            <text:p text:style-name="P256">Read the verse again by yourself as you point to the words.</text:p>
          </text:list-item>
          <text:list-item>
            <text:p text:style-name="P256">Read the verse again with the children as you point to the words.</text:p>
          </text:list-item>
        </text:list>
        <text:p text:style-name="P243">Remember our truth for the day? <text:s/><text:span text:style-name="T18">Let’s all say it together:</text:span></text:p>
        <text:p text:style-name="P244">Remember our truth for the day? <text:s/>Let’s all say it together:</text:p>
        <text:p text:style-name="P243">Follow Jesus no matter the cost.</text:p>
        <text:p text:style-name="P244">Follow Jesus no matter the cost.</text:p>
        <text:p text:style-name="P230"><text:soft-page-break/>Memory Verse Review</text:p>
        <text:p text:style-name="P231">Children Repeat the Verse by Playing “Groupings”</text:p>
        <text:list xml:id="list92018812636283" text:continue-list="list92019284933110" text:style-name="Bullet_20_-_20_checkmark">
          <text:list-item>
            <text:p text:style-name="P232">Talk about different ways to group people. (All boys, all girls, all children who ate fufu corn this week, all the children wearing read, all the children in class 2, etc.)</text:p>
          </text:list-item>
          <text:list-item>
            <text:p text:style-name="P237">Ask the children the first question.</text:p>
          </text:list-item>
          <text:list-item>
            <text:p text:style-name="P237">When a question is answered correctly, that child chooses one of the groups listed above or chooses their own group.</text:p>
          </text:list-item>
          <text:list-item>
            <text:p text:style-name="P237">The verse is said out loud together by the group chosen.</text:p>
          </text:list-item>
          <text:list-item>
            <text:p text:style-name="P237">Then the next question is asked.</text:p>
          </text:list-item>
          <text:list-item>
            <text:p text:style-name="P237">When that question is answered correctly, another child chooses one of the groups.</text:p>
          </text:list-item>
          <text:list-item>
            <text:p text:style-name="P237">The verse is said aloud again by the group chosen.</text:p>
          </text:list-item>
          <text:list-item>
            <text:p text:style-name="P237">Do this until all the questions are asked.</text:p>
          </text:list-item>
        </text:list>
        <text:p text:style-name="P252">Questions for Memory Verse</text:p>
        <text:list text:style-name="L24">
          <text:list-item text:start-value="1">
            <text:p text:style-name="P257">Where in the Bible is today's memory verse found? <text:s/>( <text:s/>Luke 8:15 <text:s/>)</text:p>
          </text:list-item>
        </text:list>
        <text:p text:style-name="P235">Where in the Bible is today's memory verse found? <text:s/>( <text:s/>Luke 8:15 <text:s/>)</text:p>
        <text:list text:continue-numbering="true" text:style-name="L24">
          <text:list-item>
            <text:p text:style-name="P257">What does the seed represent? (God's message)</text:p>
          </text:list-item>
        </text:list>
        <text:p text:style-name="P235">What does the seed represent? (God's message)</text:p>
        <text:list text:continue-numbering="true" text:style-name="L24">
          <text:list-item>
            <text:p text:style-name="P257">The seed on good soil stands for the person with what kind of heart? (A noble and good heart)</text:p>
          </text:list-item>
        </text:list>
        <text:p text:style-name="P235">The seed on good soil stands for the person with what kind of heart? (A noble and good heart)</text:p>
        <text:list text:continue-numbering="true" text:style-name="L24">
          <text:list-item>
            <text:p text:style-name="P257">The people with good and noble hearts not only hear God's message, but they also do what? (Retain God's message)</text:p>
          </text:list-item>
        </text:list>
        <text:p text:style-name="P235">The people with good and noble hearts not only hear God's message, but they also do what? (Retain God's message)</text:p>
        <text:list text:continue-numbering="true" text:style-name="L24">
          <text:list-item>
            <text:p text:style-name="P257">What else do they do? (Follow Jesus no matter what the cost is. They persevere.)</text:p>
          </text:list-item>
        </text:list>
        <text:p text:style-name="P235">What else do they do? (Follow Jesus no matter what the cost is. They persevere.)</text:p>
        <text:p text:style-name="P229">Song</text:p>
        <text:p text:style-name="P230">Closing and Homework</text:p>
        <text:list text:continue-list="list92018812636283" text:style-name="Bullet_20_-_20_checkmark">
          <text:list-item>
            <text:p text:style-name="P232">Say the truth together:</text:p>
          </text:list-item>
        </text:list>
        <text:p text:style-name="P234">Follow Jesus no matter the cost.</text:p>
        <text:p text:style-name="P235">Follow Jesus no matter the cost.</text:p>
        <text:list text:continue-numbering="true" text:style-name="Bullet_20_-_20_checkmark">
          <text:list-item>
            <text:p text:style-name="P232">Say the memory verse together:</text:p>
          </text:list-item>
        </text:list>
        <text:p text:style-name="P234">Luke 8:15 But the seed on the good soil stands for those with a noble and good heart, who hear the Word, retain it, and by persevering produce a crop.</text:p>
        <text:p text:style-name="P235">Luke 8:15 But the seed on the good soil stands for those with a noble and good heart, who hear the Word, retain it, and by persevering produce a crop.</text:p>
        <text:list text:continue-numbering="true" text:style-name="Bullet_20_-_20_checkmark">
          <text:list-item>
            <text:p text:style-name="P232">Review the homework:</text:p>
          </text:list-item>
        </text:list>
        <text:p text:style-name="P234">This week, as you walk or work or play outside this week, see if you can find examples of these four different kinds of soil around your compound. Ask God to help you be like the good soil and follow Jesus no matter what happens.</text:p>
        <text:p text:style-name="P235">This week, as you walk or work or play outside this week, see if you can find examples of these four different kinds of soil around your compound. Ask God to help you be like the good soil and follow Jesus no matter what happens.</text:p>
        <text:list xml:id="list92019671693194" text:continue-numbering="true" text:style-name="Bullet_20_-_20_checkmark">
          <text:list-item>
            <text:p text:style-name="P232">Give any needed announcements.</text:p>
          </text:list-item>
        </text:list>
        <text:p text:style-name="P231">Closing Prayer</text:p>
        <text:p text:style-name="P246"><text:span text:style-name="Body_20_Emphasized_20_-_20_Small">Thank God <text:s/></text:span>that we can plant a firm faith in Him, even though we may not deserve it.</text:p>
        <text:p text:style-name="P246"><text:span text:style-name="Body_20_Emphasized_20_-_20_Small">Ask God <text:s/></text:span>that the children will remember to look for the four kinds of soil around their compound and decide to be like the good soil and follow Jesus no matter the cost.</text:p>
        <text:p text:style-name="P258">Colouring page to colour and take home!</text:p>
      </text:section>
      <text:p text:style-name="Body"/>
      <text:p text:style-name="P54">Follow Jesus no matter the cost.</text:p>
      <text:p text:style-name="Bible_20_Story_20_-_20_Graphic_20_Number"/>
      <text:p text:style-name="Bible_20_Story_20_-_20_Graphic_20_Number"><draw:frame draw:style-name="fr7" draw:name="Image45" text:anchor-type="as-char" svg:width="5.2165in" svg:height="3.8965in" draw:z-index="120"><draw:image xlink:href="Pictures/100000010000061D00000491AB9A9E12.tif" xlink:type="simple" xlink:show="embed" xlink:actuate="onLoad" draw:mime-type="image/tiff"/></draw:frame></text:p>
      <text:p text:style-name="Bible_20_Story_20_-_20_Graphic_20_Number"/>
      <text:p text:style-name="M.T._20_Coloring_20_Page_20_-_20_Memory_20_Verse">Luke 8:15 But the seed on the good soil stands for those with a noble and good heart, who hear the Word, retain it, and by persevering produce a crop.</text:p>
      <text:p text:style-name="P55">Follow Jesus no matter the cost.</text:p>
      <text:p text:style-name="Bible_20_Story_20_-_20_Graphic_20_Number"/>
      <text:p text:style-name="Bible_20_Story_20_-_20_Graphic_20_Number"><draw:frame draw:style-name="fr7" draw:name="Image47" text:anchor-type="as-char" svg:width="5.2165in" svg:height="3.8965in" draw:z-index="121"><draw:image xlink:href="Pictures/100000010000061D00000491AB9A9E12.tif" xlink:type="simple" xlink:show="embed" xlink:actuate="onLoad" draw:mime-type="image/tiff"/></draw:frame></text:p>
      <text:p text:style-name="Bible_20_Story_20_-_20_Graphic_20_Number"/>
      <text:p text:style-name="Bible_20_Story_20_-_20_Graphic_20_Number">Luke 8:15 But the seed on the good soil stands for those with a noble and good heart, who hear the Word, retain it, and by persevering produce a crop.</text:p>
      <text:h text:style-name="P25" text:outline-level="1"><draw:frame draw:style-name="fr3" draw:name="Image46" text:anchor-type="char" svg:x="0in" svg:y="0.0161in" svg:width="1.0752in" svg:height="1.0752in" draw:z-index="123"><draw:image xlink:href="Pictures/10000001000000D8000000D8E0316050.png" xlink:type="simple" xlink:show="embed" xlink:actuate="onLoad" draw:mime-type="image/png"/></draw:frame>The Lamp on a Stand</text:h>
      <text:p text:style-name="M.T._20_Lesson_20_Title">The Lamp on a Stand</text:p>
      <text:p text:style-name="English_20_Translation_20_-_20_Lesson_20_title">The Lamp on a Stand</text:p>
      <text:p text:style-name="M.T._20_Text_20_-_20_Lesson_20_Title_20_Scrip_20_Reference">Luke <text:s/>8:16-18</text:p>
      <text:p text:style-name="Part_20_Heading">Lesson Overview</text:p>
      <table:table table:name="Table12" table:style-name="Table12" table:template-name="Lesson Overview">
        <table:table-column table:style-name="Table12.A"/>
        <table:table-column table:style-name="Table12.B"/>
        <table:table-row table:style-name="Table12.1">
          <table:table-cell table:style-name="Table12.A1" office:value-type="string">
            <text:p text:style-name="Table_20_Left_20_headings">Today’s Truth</text:p>
          </table:table-cell>
          <table:table-cell table:style-name="Table12.B1" office:value-type="string">
            <text:p text:style-name="M.T._20_Text">Jesus shines through us.</text:p>
            <text:p text:style-name="English_20_translation">Jesus shines through us.</text:p>
          </table:table-cell>
        </table:table-row>
        <table:table-row table:style-name="Table12.1">
          <table:table-cell table:style-name="Table12.A1" office:value-type="string">
            <text:p text:style-name="Table_20_Left_20_headings">Objective</text:p>
          </table:table-cell>
          <table:table-cell table:style-name="Table12.B1" office:value-type="string">
            <text:p text:style-name="Body_20_Tight_20_lines"><text:span text:style-name="Body_20_Emphasized_20_-_20_Small">KNOW: <text:s/></text:span>The children will know that Jesus shines through them.</text:p>
            <text:p text:style-name="Body_20_Tight_20_lines"><text:span text:style-name="Body_20_Emphasized_20_-_20_Small">DO:</text:span> <text:s/>The children will share with someone about God's love for them, and they will act in a way that shows they are a follower of Jesus' teachings.</text:p>
          </table:table-cell>
        </table:table-row>
        <table:table-row table:style-name="Table12.1">
          <table:table-cell table:style-name="Table12.A1" office:value-type="string">
            <text:p text:style-name="Table_20_Left_20_headings">Materials</text:p>
          </table:table-cell>
          <table:table-cell table:style-name="Table12.B1" office:value-type="string">
            <text:list xml:id="list92018243406499" text:continue-list="list92018424793955"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ic Tac Toe/Long Line – You can use chalk and blackboard, paper and pen, or a stick and dirt</text:p>
              </text:list-item>
              <text:list-item>
                <text:p text:style-name="Table_20_Bullet_20_-_20_Checkmark">Bush lamp, or solar lamp, or candle; a basket; matches.</text:p>
              </text:list-item>
              <text:list-item>
                <text:p text:style-name="Table_20_Bullet_20_-_20_Checkmark">A basket large enough to cover the lamp, or candle.</text:p>
              </text:list-item>
            </text:list>
          </table:table-cell>
        </table:table-row>
        <table:table-row table:style-name="Table12.1">
          <table:table-cell table:style-name="Table12.A1" office:value-type="string">
            <text:p text:style-name="Table_20_Left_20_headings">Memory Verse</text:p>
          </table:table-cell>
          <table:table-cell table:style-name="Table12.B1" office:value-type="string">
            <text:p text:style-name="M.T._20_Text">Luke 8:16 No one lights a lamp and hides it in with a jar or puts it under a bed. Instead, he puts it on a stand so that those who come in can see the light.</text:p>
            <text:p text:style-name="English_20_translation">Luke 8:16 No one lights a lamp and hides it in with a jar or puts it under a bed. Instead, he puts it on a stand so that those who come in can see the light.</text:p>
          </table:table-cell>
        </table:table-row>
        <table:table-row table:style-name="Table12.1">
          <table:table-cell table:style-name="Table12.A1" office:value-type="string">
            <text:p text:style-name="Table_20_Left_20_headings">Homework</text:p>
          </table:table-cell>
          <table:table-cell table:style-name="Table12.B1" office:value-type="string">
            <text:p text:style-name="M.T._20_Text">Do not hide the light Jesus has placed inside of you. Shine bright for Jesus. Share with someone about God's love for them, and act in a way that shows you are a follower of Jesus' teachings. Share next week if anyone noticed your light.</text:p>
            <text:p text:style-name="English_20_translation">Do not hide the light Jesus has placed inside of you. Shine bright for Jesus. Share with someone about God's love for them, and act in a way that shows you are a follower of Jesus' teachings. Share next week if anyone noticed your light.</text:p>
          </table:table-cell>
        </table:table-row>
      </table:table>
      <text:p text:style-name="Body_20_-_20_Small_20_Spacer"/>
      <text:p text:style-name="Part_20_Heading">Detailed Lesson Plan</text:p>
      <text:section text:style-name="Sect1" text:name="L-23 Detail Plan">
        <text:p text:style-name="P259">Song</text:p>
        <text:p text:style-name="P260">Opening</text:p>
        <text:p text:style-name="P261">Welcome</text:p>
        <text:list text:continue-list="list92019671693194" text:style-name="Bullet_20_-_20_checkmark">
          <text:list-item>
            <text:p text:style-name="P262">Be sure the children know you are happy to see them!</text:p>
          </text:list-item>
          <text:list-item>
            <text:p text:style-name="P263">Introduce yourself and your helpers.</text:p>
          </text:list-item>
        </text:list>
        <text:p text:style-name="P264">Sharing Time</text:p>
        <text:list text:continue-numbering="true" text:style-name="Bullet_20_-_20_checkmark">
          <text:list-item>
            <text:p text:style-name="P262">Say the truth from the previous lesson together:</text:p>
          </text:list-item>
        </text:list>
        <text:p text:style-name="P265">Follow Jesus no matter the cost.</text:p>
        <text:p text:style-name="P266">Follow Jesus no matter the cost.</text:p>
        <text:list text:continue-numbering="true" text:style-name="Bullet_20_-_20_checkmark">
          <text:list-item>
            <text:p text:style-name="P262">Say the memory verse from the previous lesson together:</text:p>
          </text:list-item>
        </text:list>
        <text:p text:style-name="P265"><text:s/>Luke 8:15 But as for the seed that landed on good soil, these are the ones who, after hearing the word, cling to it with an honest and good heart, and bear fruit with steadfast endurance.</text:p>
        <text:p text:style-name="P266">Luke 8:15 But as for the seed that landed on good soil, these are the ones who, after hearing the word, cling to it with an honest and good heart, and bear fruit with steadfast endurance.</text:p>
        <text:list text:continue-numbering="true" text:style-name="Bullet_20_-_20_checkmark">
          <text:list-item>
            <text:p text:style-name="P262">Review the homework from the previous lesson:</text:p>
          </text:list-item>
        </text:list>
        <text:p text:style-name="P265">Did you find the four different kinds of soil near your compound? What are they and where did you find them? Did you ask Jesus to help you follow Him no matter the cost?</text:p>
        <text:p text:style-name="P266">Did you find the four different kinds of soil near your compound? What are they and where did you find them? Did you ask Jesus to help you follow Him no matter the cost?</text:p>
        <text:p text:style-name="P267">(Give children time to share.)</text:p>
        <text:p text:style-name="P264"><text:soft-page-break/>Prayer</text:p>
        <text:list text:continue-numbering="true" text:style-name="Bullet_20_-_20_checkmark">
          <text:list-item>
            <text:p text:style-name="P262">Let the children share praises and prayer requests.</text:p>
          </text:list-item>
          <text:list-item>
            <text:p text:style-name="P263">Keep a record of what the children are sharing so you can remember to thank God together for answered prayers.</text:p>
          </text:list-item>
          <text:list-item>
            <text:p text:style-name="P263">Spend time praying together. <text:s/>Let children pray out loud if they volunteer. <text:s/>Do not force anyone to pray out loud.</text:p>
          </text:list-item>
        </text:list>
        <text:p text:style-name="P259">Song</text:p>
        <text:p text:style-name="P260">Words to Discuss</text:p>
        <text:list xml:id="list92018029714598" text:continue-numbering="true" text:style-name="Bullet_20_-_20_checkmark">
          <text:list-item>
            <text:p text:style-name="P262">On the blackboard, write the “Words to Discuss” from the list below.</text:p>
          </text:list-item>
          <text:list-item>
            <text:p text:style-name="P268">Let's discuss some words to help us better understand the Bible story for today.</text:p>
          </text:list-item>
        </text:list>
        <text:p text:style-name="P266">Let's discuss some words to help us better understand the Bible story for today.</text:p>
        <text:list text:continue-list="list92020059082425" text:style-name="Bullet_20_-_20_Diamond">
          <text:list-item>
            <text:p text:style-name="P269"><text:span text:style-name="Body_20_Emphasized_20_-_20_Small">Light: <text:s/></text:span>Makes things visible in dark places.</text:p>
          </text:list-item>
        </text:list>
        <text:p text:style-name="P270">Light: <text:s/>Makes things visible in dark places.</text:p>
        <text:list text:continue-numbering="true" text:style-name="Bullet_20_-_20_Diamond">
          <text:list-item>
            <text:p text:style-name="P269"><text:span text:style-name="Body_20_Emphasized_20_-_20_Small">Lamp: <text:s/></text:span>Used to hold a small fire for light.</text:p>
          </text:list-item>
        </text:list>
        <text:p text:style-name="P270">Lamp: <text:s/>Used to hold a small fire for light.</text:p>
        <text:list xml:id="list92019766200242" text:continue-numbering="true" text:style-name="Bullet_20_-_20_Diamond">
          <text:list-item>
            <text:p text:style-name="P269"><text:span text:style-name="Body_20_Emphasized_20_-_20_Small">Stand/Lampstand: <text:s/></text:span>A table made for the lamp to rest on, so that the light is spread all around a dark room.</text:p>
          </text:list-item>
        </text:list>
        <text:p text:style-name="P270">Stand/Lampstand: <text:s/>A table made for the lamp to rest on, so that the light is spread all around a dark room.</text:p>
        <text:p text:style-name="P259">Song</text:p>
        <text:p text:style-name="P260">Bible Story / Lesson</text:p>
        <text:p text:style-name="P271">Let's talk about different kinds of light. Can you name different types of light? (Bush lamp, candle, light bulb, the sun, flashlight/torch, car, or motorbike headlights.)</text:p>
        <text:p text:style-name="P272">Let's talk about different kinds of light. Can you name different types of light? (Bush lamp, candle, light bulb, the sun, flashlight/torch, car, or motorbike headlights.)</text:p>
        <text:p text:style-name="P271">What is the purpose of light when it is dark? (To help us see our way)</text:p>
        <text:p text:style-name="P272">What is the purpose of light when it is dark? (To help us see our way)</text:p>
        <text:p text:style-name="P271">Today we are going to learn about how we are to be a type of light.</text:p>
        <text:p text:style-name="P272">Today we are going to learn about how we are to be a type of light.</text:p>
        <text:p text:style-name="P264">Introduce Truth</text:p>
        <text:p text:style-name="P273">Our truth for today is: <text:s/>Jesus shines through us.</text:p>
        <text:p text:style-name="P274">Our truth for today is: <text:s/>Jesus shines through us.</text:p>
        <text:p text:style-name="P273">This reminds me of a true story from the Bible that Jesus told.</text:p>
        <text:p text:style-name="P274">This reminds me of a true story from the Bible that Jesus told.</text:p>
        <text:p text:style-name="P275">Bible Story: <text:s/>Luke <text:s/>8:16-18</text:p>
        <text:p text:style-name="P276"><text:span text:style-name="Body_20_Emphasized_20_-_20_Small">Object Lesson</text:span></text:p>
        <text:p text:style-name="P276"><text:span text:style-name="Body_20_Emphasized_20_-_20_Small">Materials: <text:s/></text:span>Bush lamp, or solar lamp, or candle; a basket; matches.</text:p>
        <text:list xml:id="list92018670211272" text:continue-list="list92019128450353" text:style-name="WWNum1">
          <text:list-item>
            <text:p text:style-name="P277">Light the lamp, or candle.</text:p>
          </text:list-item>
        </text:list>
        <text:list xml:id="list92020084289764" text:continue-list="list92018029714598" text:style-name="Bullet_20_-_20_checkmark">
          <text:list-item>
            <text:p text:style-name="P268">Why do we light this bush lamp or candle at night? (In order to see.)</text:p>
          </text:list-item>
        </text:list>
        <text:p text:style-name="P266">Why do we light this bush lamp or candle at night? (In order to see.)</text:p>
        <text:list xml:id="list92018828053113" text:continue-list="list92018670211272" text:style-name="WWNum1">
          <text:list-item>
            <text:p text:style-name="P277">Put the basket over the lit bush lamp or candle.</text:p>
          </text:list-item>
        </text:list>
        <text:list xml:id="list92019201498776" text:continue-list="list92020084289764" text:style-name="Bullet_20_-_20_checkmark">
          <text:list-item>
            <text:p text:style-name="P268">Would it be strange to you if I lit this bush lamp and put it under a basket?</text:p>
          </text:list-item>
        </text:list>
        <text:p text:style-name="P266">Would it be strange to you if I lit this bush lamp and put it under a basket?</text:p>
        <text:list xml:id="list92019005766153" text:continue-list="list92018828053113" text:style-name="WWNum1">
          <text:list-item>
            <text:p text:style-name="P277">Remove the basket from over the bush lamp or candle.</text:p>
          </text:list-item>
        </text:list>
        <text:list text:continue-list="list92019201498776" text:style-name="Bullet_20_-_20_checkmark">
          <text:list-item>
            <text:p text:style-name="P268">Of course it would be strange!</text:p>
          </text:list-item>
        </text:list>
        <text:p text:style-name="P266">Of course it would be strange!</text:p>
        <text:list text:continue-numbering="true" text:style-name="Bullet_20_-_20_checkmark">
          <text:list-item>
            <text:p text:style-name="P268">Why would it be strange for me to put the bush lamp under a basket? (Because the basket would cover the light and it could even catch fire.)</text:p>
          </text:list-item>
        </text:list>
        <text:p text:style-name="P266">Why would it be strange for me to put the bush lamp under a basket? (Because the basket would cover the light and it could even catch fire.)</text:p>
        <text:list text:continue-numbering="true" text:style-name="Bullet_20_-_20_checkmark">
          <text:list-item>
            <text:p text:style-name="P268"><text:soft-page-break/>What would be the best thing to do with a bush lamp or candle after it has been lit? (To place it on something high in the middle of the room so it will light the whole room.)</text:p>
          </text:list-item>
        </text:list>
        <text:p text:style-name="P266">What would be the best thing to do with a bush lamp or candle after it has been lit? (To place it on something high in the middle of the room so it will light the whole room.)</text:p>
        <text:p text:style-name="P271">Here is what Jesus says about lamps: <text:s/>Luke 8:16 No one lights a lamp and hides it in with a jar or puts it under a bed. Instead, he puts it on a stand so that those who come in can see the light.</text:p>
        <text:p text:style-name="P273">It is not right to hide the light of a lamp from others when it is dark. We should share our light for others to see!</text:p>
        <text:p text:style-name="P272">Here is what Jesus says about lamps: <text:s/>Luke 8:16 No one lights a lamp and hides it in with a jar or puts it under a bed. Instead, he puts it on a stand so that those who come in can see the light.</text:p>
        <text:p text:style-name="P274">It is not right to hide the light of a lamp from others when it is dark. We should share our light for others to see!</text:p>
        <text:p text:style-name="P261">Application</text:p>
        <text:p text:style-name="P271">Jesus is the Son of God. He came to earth to die on a cross as a sacrifice to pay the penalty of our sins. When we agree to accept this truth about Jesus, it shines like a light in our lives. Our life changes, and people begin to notice. We become God's lamp to show His light in the dark world around us.</text:p>
        <text:p text:style-name="P272">Jesus is the Son of God. He came to earth to die on a cross as a sacrifice to pay the penalty of our sins. When we agree to accept this truth about Jesus, it shines like a light in our lives. Our life changes, and people begin to notice. We become God's lamp to show His light in the dark world around us.</text:p>
        <text:p text:style-name="P271">It is very strange to light a bush lamp, and then hide it under a basket. In the same way, it is very strange to try to hide the light of God's truth in our lives. We need to shine brightly to others so that they will also find the truth about Jesus and his teachings.</text:p>
        <text:p text:style-name="P272">It is very strange to light a bush lamp, and then hide it under a basket. In the same way, it is very strange to try to hide the light of God's truth in our lives. We need to shine brightly to others so that they will also find the truth about Jesus and his teachings.</text:p>
        <text:p text:style-name="P271">The way we shine bright is sharing with others how God loves them so much, that He sent His only son to save the world. We also shine bright by the things we do or do not do. We need to put into practice the teachings of Jesus that we have been learning. When we do that, we shine so bright, that others have to notice.</text:p>
        <text:p text:style-name="P272">The way we shine bright is sharing with others how God loves them so much, that He sent His only son to save the world. We also shine bright by the things we do or do not do. We need to put into practice the teachings of Jesus that we have been learning. When we do that, we shine so bright, that others have to notice.</text:p>
        <text:p text:style-name="P273">Jesus shines through us.</text:p>
        <text:p text:style-name="P274">Jesus shines through us.</text:p>
        <text:p text:style-name="P278">Homework</text:p>
        <text:p text:style-name="P273">This week: <text:s/><text:span text:style-name="T19">Do not hide the light Jesus has placed inside of you. Shine bright for Jesus. Share with someone about God's love for them, and act in a way that shows you are a follower of Jesus' teachings. Share next week if anyone noticed your light.</text:span></text:p>
        <text:p text:style-name="P274">This week: <text:s/><text:span text:style-name="T19">Do not hide the light Jesus has placed inside of you. Shine bright for Jesus. Share with someone about God's love for them, and act in a way that shows you are a follower of Jesus' teachings. Share next week if anyone noticed your light.</text:span></text:p>
        <text:p text:style-name="P259">Prayer / Song</text:p>
        <text:p text:style-name="P260">Review Game</text:p>
        <text:p text:style-name="P264">Tic-Tac-Toe/Long Line</text:p>
        <text:p text:style-name="P278">Materials</text:p>
        <text:list text:continue-numbering="true" text:style-name="Bullet_20_-_20_checkmark">
          <text:list-item>
            <text:p text:style-name="P262">Draw on the blackboard, on the dirt, or on a paper a game board of two horizontal lines crossing two vertical lines.<draw:frame draw:style-name="fr11" draw:name="Image49" text:anchor-type="char" svg:y="-0.1965in" svg:width="1.1811in" svg:height="1.1811in" draw:z-index="122"><draw:image xlink:href="Pictures/10000000000000AF000000B06366BC3C.jpg" xlink:type="simple" xlink:show="embed" xlink:actuate="onLoad" draw:mime-type="image/jpeg"/></draw:frame></text:p>
          </text:list-item>
          <text:list-item>
            <text:p text:style-name="P263">One team marks the X's, one team marks the O's using chalk, marker, pen, or a stick.</text:p>
          </text:list-item>
        </text:list>
        <text:p text:style-name="P278">How to Play</text:p>
        <text:list xml:id="list92019898945217" text:continue-numbering="true" text:style-name="Bullet_20_-_20_checkmark">
          <text:list-item>
            <text:p text:style-name="P262">Divide the class into 2 teams.</text:p>
          </text:list-item>
          <text:list-item>
            <text:p text:style-name="P263">The first team tries to answer the first question. <text:s/>The teacher can use this time to explain what the children do not seem to understand.</text:p>
          </text:list-item>
          <text:list-item>
            <text:p text:style-name="P263">The child on the team that answers the question correctly comes to the front and marks and X (for team 1) or an O (for team 2) in one of the spaces on the Tic-Tac-Toe board.</text:p>
          </text:list-item>
          <text:list-item>
            <text:p text:style-name="P263">The first team to get three X's or O's in a row in any direction wins.</text:p>
          </text:list-item>
          <text:list-item>
            <text:p text:style-name="P263">Be sure to clap for both sides. <text:s/>No name-calling. <text:s/>Encourage good sportsmanship.</text:p>
          </text:list-item>
        </text:list>
        <text:p text:style-name="P278"><text:soft-page-break/>Questions for Review Game</text:p>
        <text:list text:style-name="L25">
          <text:list-item text:start-value="1">
            <text:p text:style-name="P279">What is one type of light we talked about today? (Bush lamps, candles, torches, etc.)</text:p>
          </text:list-item>
        </text:list>
        <text:p text:style-name="P266">What is one type of light we talked about today? (Bush lamps, candles, torches, etc.)</text:p>
        <text:list text:continue-numbering="true" text:style-name="L25">
          <text:list-item>
            <text:p text:style-name="P279">What is the purpose of this type of light? (They help us see when it is dark.)</text:p>
          </text:list-item>
        </text:list>
        <text:p text:style-name="P266">What is the purpose of this type of light? (They help us see when it is dark.)</text:p>
        <text:list text:continue-numbering="true" text:style-name="L25">
          <text:list-item>
            <text:p text:style-name="P279">What would be a strange thing to do with a lit bush lamp or candle? (Hide them under a basket)</text:p>
          </text:list-item>
        </text:list>
        <text:p text:style-name="P266">What would be a strange thing to do with a lit bush lamp or candle? (Hide them under a basket)</text:p>
        <text:list text:continue-numbering="true" text:style-name="L25">
          <text:list-item>
            <text:p text:style-name="P279">Why would it be strange to hide a lit bush lamp or candle under a basket? (The basket would take away the light, and the basket could catch fire.)</text:p>
          </text:list-item>
        </text:list>
        <text:p text:style-name="P266">Why would it be strange to hide a lit bush lamp or candle under a basket? (The basket would take away the light, and the basket could catch fire.)</text:p>
        <text:list text:continue-numbering="true" text:style-name="L25">
          <text:list-item>
            <text:p text:style-name="P279">What would be a better thing to do with the lit bush lamp or candle? (Place the bush lamp or candle somewhere where the light could best be seen.)</text:p>
          </text:list-item>
        </text:list>
        <text:p text:style-name="P266">What would be a better thing to do with the lit bush lamp or candle? (Place the bush lamp or candle somewhere where the light could best be seen.)</text:p>
        <text:list text:continue-numbering="true" text:style-name="L25">
          <text:list-item>
            <text:p text:style-name="P279">What shines like a light in our lives? (The truth about Jesus and his teachings)</text:p>
          </text:list-item>
        </text:list>
        <text:p text:style-name="P266">What shines like a light in our lives? (The truth about Jesus and his teachings)</text:p>
        <text:list text:continue-numbering="true" text:style-name="L25">
          <text:list-item>
            <text:p text:style-name="P279">What should we do with the light that we have in our lives that Jesus gives us? (Shine the light)</text:p>
          </text:list-item>
        </text:list>
        <text:p text:style-name="P266">What should we do with the light that we have in our lives that Jesus gives us? (Shine the light)</text:p>
        <text:list text:continue-numbering="true" text:style-name="L25">
          <text:list-item>
            <text:p text:style-name="P279">What would be strange to do with the light in our lives that Jesus gives us? (Try and hide the light that we have in our lives)</text:p>
          </text:list-item>
        </text:list>
        <text:p text:style-name="P266">What would be strange to do with the light in our lives that Jesus gives us? (Try and hide the light that we have in our lives)</text:p>
        <text:list text:continue-numbering="true" text:style-name="L25">
          <text:list-item>
            <text:p text:style-name="P279">What is one way we can shine for Jesus that involves speaking? (Sharing with others the truth of who Jesus is, and his teachings)</text:p>
          </text:list-item>
        </text:list>
        <text:p text:style-name="P266">What is one way we can shine for Jesus that involves speaking? (Sharing with others the truth of who Jesus is, and his teachings)</text:p>
        <text:list text:continue-numbering="true" text:style-name="L25">
          <text:list-item>
            <text:p text:style-name="P279">What is another way we can shine? (Following the teachings of Jesus)</text:p>
          </text:list-item>
        </text:list>
        <text:p text:style-name="P266">What is another way we can shine? (Following the teachings of Jesus)</text:p>
        <text:p text:style-name="P259">Song</text:p>
        <text:p text:style-name="P260">Memory Verse</text:p>
        <text:p text:style-name="P278">Materials and Preparations</text:p>
        <text:list xml:id="list92018384946779" text:continue-list="list92019898945217" text:style-name="Bullet_20_-_20_checkmark">
          <text:list-item>
            <text:p text:style-name="P263">Put a bookmark in <text:s/>Luke 8:16</text:p>
          </text:list-item>
          <text:list-item>
            <text:p text:style-name="P262">Write memory verse on the blackboard.</text:p>
          </text:list-item>
        </text:list>
        <text:p text:style-name="P265">Luke 8:16 No one lights a lamp and hides it in with a jar or puts it under a bed. Instead, he puts it on a stand so that those who come in can see the light.</text:p>
        <text:p text:style-name="P266">Luke 8:16 No one lights a lamp and hides it in with a jar or puts it under a bed. Instead, he puts it on a stand so that those who come in can see the light.</text:p>
        <text:p text:style-name="P264">Teach and Explain</text:p>
        <text:p text:style-name="P280">Lamps are made to shine light to help people see. If we are followers of Jesus, we are made to shine our light too.</text:p>
        <text:p text:style-name="P274">Lamps are made to shine light to help people see. If we are followers of Jesus, we are made to shine our light too.</text:p>
        <text:list xml:id="list92019318492072" text:continue-list="list92019005766153" text:style-name="WWNum1">
          <text:list-item text:start-value="1">
            <text:p text:style-name="P277">Read the verse from your Bible.</text:p>
          </text:list-item>
          <text:list-item>
            <text:p text:style-name="P277">Read the verse by yourself as you point to the words.</text:p>
          </text:list-item>
          <text:list-item>
            <text:p text:style-name="P277">Read the verse with the children as you point to the words.</text:p>
          </text:list-item>
          <text:list-item>
            <text:p text:style-name="P277">Explain the verse:</text:p>
          </text:list-item>
        </text:list>
        <text:list text:continue-list="list92018384946779" text:style-name="Bullet_20_-_20_checkmark">
          <text:list-item>
            <text:p text:style-name="P268">Our memory verse comes from today’s Bible story.</text:p>
          </text:list-item>
        </text:list>
        <text:p text:style-name="P266">Our memory verse comes from today’s Bible story.</text:p>
        <text:list xml:id="list92018096746195" text:continue-numbering="true" text:style-name="Bullet_20_-_20_checkmark">
          <text:list-item>
            <text:p text:style-name="P262">As you read the verse, circle the words shown below. <text:s/>Explain each of these words.</text:p>
          </text:list-item>
        </text:list>
        <text:list text:continue-list="list92019766200242" text:style-name="Bullet_20_-_20_Diamond">
          <text:list-item>
            <text:p text:style-name="P269"><text:span text:style-name="Body_20_Emphasized_20_-_20_Small">Lights a lamp: <text:s/></text:span>We light a bush lamp or a candle on purpose.</text:p>
          </text:list-item>
        </text:list>
        <text:p text:style-name="P270">Lights a lamp: <text:s/>We light a bush lamp or a candle on purpose.</text:p>
        <text:list text:continue-numbering="true" text:style-name="Bullet_20_-_20_Diamond">
          <text:list-item>
            <text:p text:style-name="P269"><text:span text:style-name="Body_20_Emphasized_20_-_20_Small">Hides: <text:s/></text:span>If the light is covered, it will not shine. We do not hide a light with a jar!</text:p>
          </text:list-item>
        </text:list>
        <text:p text:style-name="P270">Hides: <text:s/>If the light is covered, it will not shine. We do not hide a light with a jar!</text:p>
        <text:list text:continue-numbering="true" text:style-name="Bullet_20_-_20_Diamond">
          <text:list-item>
            <text:p text:style-name="P269"><text:span text:style-name="Body_20_Emphasized_20_-_20_Small">Under: <text:s/></text:span>If the light is under something, it will not shine.</text:p>
          </text:list-item>
        </text:list>
        <text:p text:style-name="P270">Under: <text:s/>If the light is under something, it will not shine.</text:p>
        <text:list text:continue-numbering="true" text:style-name="Bullet_20_-_20_Diamond">
          <text:list-item>
            <text:p text:style-name="P269"><text:soft-page-break/><text:span text:style-name="Body_20_Emphasized_20_-_20_Small">Stand: <text:s/></text:span>A stand is a special place for the bush lamp or candle.</text:p>
          </text:list-item>
        </text:list>
        <text:p text:style-name="P270">Stand: <text:s/>A stand is a special place for the bush lamp or candle.</text:p>
        <text:list xml:id="list92018091529907" text:continue-numbering="true" text:style-name="Bullet_20_-_20_Diamond">
          <text:list-item>
            <text:p text:style-name="P269"><text:span text:style-name="Body_20_Emphasized_20_-_20_Small">Light: <text:s/></text:span>A bush lamp or candle is a light so that light will come into that place.</text:p>
          </text:list-item>
        </text:list>
        <text:p text:style-name="P270">Light: <text:s/>A bush lamp or candle is a light so that light will come into that place.</text:p>
        <text:list xml:id="list92019263318184" text:continue-list="list92019318492072" text:style-name="WWNum1">
          <text:list-item>
            <text:p text:style-name="P277">Read the verse again by yourself as you point to the words.</text:p>
          </text:list-item>
          <text:list-item>
            <text:p text:style-name="P277">Read the verse again with the children as you point to the words.</text:p>
          </text:list-item>
        </text:list>
        <text:p text:style-name="P271">Just as it is strange to light a bush lamp or a candle and hide it, it is strange for us to hide the light that Jesus has put inside of us. We are to shine the light of Jesus in our lives by sharing with others the truth about Jesus and his teachings. We also shine our lights for Jesus by following his teachings.</text:p>
        <text:p text:style-name="P272">Just as it is strange to light a bush lamp or a candle and hide it, it is strange for us to hide the light that Jesus has put inside of us. We are to shine the light of Jesus in our lives by sharing with others the truth about Jesus and his teachings. We also shine our lights for Jesus by following his teachings.</text:p>
        <text:p text:style-name="P273">Remember our truth for the day? <text:s/><text:span text:style-name="T20">Let’s all say it together:</text:span></text:p>
        <text:p text:style-name="P274">Remember our truth for the day? <text:s/>Let’s all say it together:</text:p>
        <text:p text:style-name="P273">Jesus shines through us.</text:p>
        <text:p text:style-name="P274">Jesus shines through us.</text:p>
        <text:p text:style-name="P260">Memory Verse Review</text:p>
        <text:p text:style-name="P264">Children Repeat the Verse by Playing “Groupings”</text:p>
        <text:list xml:id="list92018790374693" text:continue-list="list92018096746195" text:style-name="Bullet_20_-_20_checkmark">
          <text:list-item>
            <text:p text:style-name="P262">Talk about different ways to group people. (All boys, all girls, all children who ate fufu corn this week, all the children wearing read, all the children in class 2, etc.)</text:p>
          </text:list-item>
          <text:list-item>
            <text:p text:style-name="P263">Ask the children the first question.</text:p>
          </text:list-item>
          <text:list-item>
            <text:p text:style-name="P263">When a question is answered correctly, that child chooses one of the groups listed above or chooses their own group.</text:p>
          </text:list-item>
          <text:list-item>
            <text:p text:style-name="P263">The verse is said out loud together by the group chosen.</text:p>
          </text:list-item>
          <text:list-item>
            <text:p text:style-name="P263">Then the next question is asked.</text:p>
          </text:list-item>
          <text:list-item>
            <text:p text:style-name="P263">When that question is answered correctly, another child chooses one of the groups.</text:p>
          </text:list-item>
          <text:list-item>
            <text:p text:style-name="P263">The verse is said aloud again by the group chosen.</text:p>
          </text:list-item>
          <text:list-item>
            <text:p text:style-name="P263">Do this until all the questions are asked.</text:p>
          </text:list-item>
        </text:list>
        <text:p text:style-name="P278">Questions for Memory Verse</text:p>
        <text:list text:style-name="L26">
          <text:list-item text:start-value="1">
            <text:p text:style-name="P281">No one lights a _____? (Light)</text:p>
          </text:list-item>
        </text:list>
        <text:p text:style-name="P266">No one lights a _____? (Light)</text:p>
        <text:list text:continue-numbering="true" text:style-name="L26">
          <text:list-item>
            <text:p text:style-name="P281">No one lights a light and then hides it in a ____? (Jar)</text:p>
          </text:list-item>
        </text:list>
        <text:p text:style-name="P266">No one lights a light and then hides it in a ____? (Jar)</text:p>
        <text:list text:continue-numbering="true" text:style-name="L26">
          <text:list-item>
            <text:p text:style-name="P281">No one lights a light and then hides it in a jar or puts it under a ____? (Bed)</text:p>
          </text:list-item>
        </text:list>
        <text:p text:style-name="P266">No one lights a light and then hides it in a jar or puts it under a ____? (Bed)</text:p>
        <text:list text:continue-numbering="true" text:style-name="L26">
          <text:list-item>
            <text:p text:style-name="P281">No one lights a light and then hides it in a jar or puts it under a bed, but he puts it on a _____? (Stand)</text:p>
          </text:list-item>
        </text:list>
        <text:p text:style-name="P266">No one lights a light and then hides it in a jar or puts it under a bed, but he puts it on a _____? (Stand)</text:p>
        <text:list text:continue-numbering="true" text:style-name="L26">
          <text:list-item>
            <text:p text:style-name="P281">No one lights a light and then hides it in a jar or puts it under a bed, but he puts it on a stand so that those who come in can see the ______? (Light)</text:p>
          </text:list-item>
        </text:list>
        <text:p text:style-name="P266">No one lights a light and then hides it in a jar or puts it under a bed, but he puts it on a stand so that those who come in can see the ______? (Light)</text:p>
        <text:p text:style-name="P259">Song</text:p>
        <text:p text:style-name="P260">Closing and Homework</text:p>
        <text:list text:continue-list="list92018790374693" text:style-name="Bullet_20_-_20_checkmark">
          <text:list-item>
            <text:p text:style-name="P262">Say the truth together:</text:p>
          </text:list-item>
        </text:list>
        <text:p text:style-name="P265">Jesus shines through us.</text:p>
        <text:p text:style-name="P266">Jesus shines through us.</text:p>
        <text:list text:continue-numbering="true" text:style-name="Bullet_20_-_20_checkmark">
          <text:list-item>
            <text:p text:style-name="P262">Say the memory verse together:</text:p>
          </text:list-item>
        </text:list>
        <text:p text:style-name="P265">Luke 8:16 No one lights a lamp and hides it in with a jar or puts it under a bed. Instead, he puts it on a stand so that those who come in can see the light.</text:p>
        <text:p text:style-name="P266">Luke 8:16 No one lights a lamp and hides it in with a jar or puts it under a bed. Instead, he puts it on a stand so that those who come in can see the light.</text:p>
        <text:list xml:id="list92018050549620" text:continue-numbering="true" text:style-name="Bullet_20_-_20_checkmark">
          <text:list-item>
            <text:p text:style-name="P282"><text:soft-page-break/>Review the homework:</text:p>
          </text:list-item>
        </text:list>
        <text:p text:style-name="P265">This week:<text:span text:style-name="T21">Do not hide the light Jesus has placed inside of you. Shine bright for Jesus. Share with someone about God's love for them, and act in a way that shows you are a follower of Jesus' teachings. Share next week if anyone noticed your light.</text:span></text:p>
        <text:p text:style-name="P266">This week:<text:span text:style-name="T19">Do not hide the light Jesus has placed inside of you. Shine bright for Jesus. Share with someone about God's love for them, and act in a way that shows you are a follower of Jesus' teachings. Share next week if anyone noticed your light.</text:span></text:p>
        <text:list text:style-name="L27">
          <text:list-item>
            <text:p text:style-name="P283">Give any needed announcements.</text:p>
          </text:list-item>
        </text:list>
        <text:p text:style-name="P264">Closing Prayer</text:p>
        <text:p text:style-name="P284"><text:span text:style-name="Body_20_Emphasized_20_-_20_Small">Thank God <text:s/></text:span>that He continues to love us.</text:p>
        <text:p text:style-name="P284"><text:span text:style-name="Body_20_Emphasized_20_-_20_Small">Ask God <text:s/></text:span>that the children will remember to share God's love to someone, and that they would continue to act in a way that shows they are followers of Jesus.</text:p>
        <text:p text:style-name="P285">Colouring page to colour and take home!</text:p>
      </text:section>
      <text:p text:style-name="Body"/>
      <text:p text:style-name="P54">Jesus shines through us.</text:p>
      <text:p text:style-name="Bible_20_Story_20_-_20_Graphic_20_Number"><draw:frame draw:style-name="fr12" draw:name="Image48" text:anchor-type="as-char" svg:y="-5.248in" svg:width="3.4957in" svg:height="5.3102in" draw:z-index="124"><draw:image xlink:href="Pictures/1000000100000198000002587AA188E0.png" xlink:type="simple" xlink:show="embed" xlink:actuate="onLoad" draw:mime-type="image/png"/></draw:frame></text:p>
      <text:p text:style-name="M.T._20_Coloring_20_Page_20_-_20_Memory_20_Verse">Luke 8:16 No one lights a lamp and hides it in with a jar or puts it under a bed. Instead, he puts it on a stand so that those who come in can see the light.</text:p>
      <text:p text:style-name="P55">Jesus shines through us.</text:p>
      <text:p text:style-name="Bible_20_Story_20_-_20_Graphic_20_Number"><draw:frame draw:style-name="fr12" draw:name="Image50" text:anchor-type="as-char" svg:y="-5.4in" svg:width="3.3984in" svg:height="5.3409in" draw:z-index="125"><draw:image xlink:href="Pictures/1000000100000198000002587AA188E0.png" xlink:type="simple" xlink:show="embed" xlink:actuate="onLoad" draw:mime-type="image/png"/></draw:frame></text:p>
      <text:p text:style-name="Bible_20_Story_20_-_20_Graphic_20_Number">Luke 8:16 No one lights a lamp and hides it in with a jar or puts it under a bed. Instead, he puts it on a stand so that those who come in can see the light.</text:p>
      <text:h text:style-name="P25" text:outline-level="1"><draw:frame draw:style-name="fr3" draw:name="Image51" text:anchor-type="char" svg:x="0in" svg:y="0.0161in" svg:width="1.0752in" svg:height="1.0752in" draw:z-index="129"><draw:image xlink:href="Pictures/10000001000000D8000000D80960569F.png" xlink:type="simple" xlink:show="embed" xlink:actuate="onLoad" draw:mime-type="image/png"/></draw:frame>Jesus Calms a Storm</text:h>
      <text:p text:style-name="M.T._20_Lesson_20_Title">Jesus Calms a Storm</text:p>
      <text:p text:style-name="English_20_Translation_20_-_20_Lesson_20_title">Jesus Calms a Storm</text:p>
      <text:p text:style-name="M.T._20_Text_20_-_20_Lesson_20_Title_20_Scrip_20_Reference">Luke <text:s/>8:22-25</text:p>
      <text:p text:style-name="Part_20_Heading">Lesson Overview</text:p>
      <table:table table:name="Table13" table:style-name="Table13" table:template-name="Lesson Overview">
        <table:table-column table:style-name="Table13.A"/>
        <table:table-column table:style-name="Table13.B"/>
        <table:table-row table:style-name="Table13.1">
          <table:table-cell table:style-name="Table13.A1" office:value-type="string">
            <text:p text:style-name="Table_20_Left_20_headings">Today’s Truth</text:p>
          </table:table-cell>
          <table:table-cell table:style-name="Table13.B1" office:value-type="string">
            <text:p text:style-name="M.T._20_Text">Jesus has true power over nature.</text:p>
            <text:p text:style-name="English_20_translation">Jesus has true power over nature.</text:p>
          </table:table-cell>
        </table:table-row>
        <table:table-row table:style-name="Table13.1">
          <table:table-cell table:style-name="Table13.A1" office:value-type="string">
            <text:p text:style-name="Table_20_Left_20_headings">Objective</text:p>
          </table:table-cell>
          <table:table-cell table:style-name="Table13.B1" office:value-type="string">
            <text:p text:style-name="Body_20_Tight_20_lines"><text:span text:style-name="Body_20_Emphasized_20_-_20_Small">KNOW: <text:s/></text:span>The children will know that Jesus has power over nature.</text:p>
            <text:p text:style-name="Body_20_Tight_20_lines"><text:span text:style-name="Body_20_Emphasized_20_-_20_Small">DO:</text:span> <text:s/>The children will look for things in nature and thank Jesus for his power over everything.</text:p>
          </table:table-cell>
        </table:table-row>
        <table:table-row table:style-name="Table13.1">
          <table:table-cell table:style-name="Table13.A1" office:value-type="string">
            <text:p text:style-name="Table_20_Left_20_headings">Materials</text:p>
          </table:table-cell>
          <table:table-cell table:style-name="Table13.B1" office:value-type="string">
            <text:list xml:id="list92018888974714" text:continue-list="list92018243406499"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ext:span text:style-name="T22">Ball</text:span> <text:s/>(Make a ball by tying wrappen (plastic bag) into knots many times, or fill an old sock with scrap material.)</text:p>
              </text:list-item>
              <text:list-item>
                <text:p text:style-name="Table_20_Bullet_20_-_20_Checkmark">A drum, shaker, or anything to make music with.</text:p>
              </text:list-item>
            </text:list>
          </table:table-cell>
        </table:table-row>
        <table:table-row table:style-name="Table13.1">
          <table:table-cell table:style-name="Table13.A1" office:value-type="string">
            <text:p text:style-name="Table_20_Left_20_headings">Memory Verse</text:p>
          </table:table-cell>
          <table:table-cell table:style-name="Table13.B1" office:value-type="string">
            <text:p text:style-name="M.T._20_Text">Luke 8:25 In fear and amazement they asked one another, “Who is this? He commands even the winds and the water, and they obey him.”</text:p>
            <text:p text:style-name="English_20_translation">Luke 8:25 In fear and amazement they asked one another, “Who is this? He commands even the winds and the water, and they obey him.”</text:p>
          </table:table-cell>
        </table:table-row>
        <table:table-row table:style-name="Table13.1">
          <table:table-cell table:style-name="Table13.A1" office:value-type="string">
            <text:p text:style-name="Table_20_Left_20_headings">Homework</text:p>
          </table:table-cell>
          <table:table-cell table:style-name="Table13.B1" office:value-type="string">
            <text:p text:style-name="M.T._20_Text">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English_20_translation">As you go through the week, look around and see the beauty of everything God created. Thank him for this beauty. Give thanks also that Jesus showed us that he is God and that he has power over everything. Tell Jesus you trust him even in bad times because he is truly powerful.</text:p>
          </table:table-cell>
        </table:table-row>
      </table:table>
      <text:p text:style-name="Body_20_-_20_Small_20_Spacer"/>
      <text:p text:style-name="Part_20_Heading">Detailed Lesson Plan</text:p>
      <text:section text:style-name="Sect1" text:name="L-24 Detail Plan">
        <text:p text:style-name="P286">Song</text:p>
        <text:p text:style-name="P287">Opening</text:p>
        <text:p text:style-name="P288">Welcome</text:p>
        <text:list text:continue-list="list92018050549620" text:style-name="Bullet_20_-_20_checkmark">
          <text:list-item>
            <text:p text:style-name="P289">Be sure the children know you are happy to see them!</text:p>
          </text:list-item>
          <text:list-item>
            <text:p text:style-name="P289">Introduce yourself and your helpers.</text:p>
          </text:list-item>
        </text:list>
        <text:p text:style-name="P288">Sharing Time</text:p>
        <text:list text:continue-numbering="true" text:style-name="Bullet_20_-_20_checkmark">
          <text:list-item>
            <text:p text:style-name="P289">Say the truth from the previous lesson together:</text:p>
          </text:list-item>
        </text:list>
        <text:p text:style-name="P290">Jesus shines through us.</text:p>
        <text:p text:style-name="P291">Jesus shines through us.</text:p>
        <text:list text:continue-numbering="true" text:style-name="Bullet_20_-_20_checkmark">
          <text:list-item>
            <text:p text:style-name="P292">Say the memory verse from the previous lesson together:</text:p>
          </text:list-item>
        </text:list>
        <text:p text:style-name="P290">Luke 8:16 No one lights a lamp and hides it in with a jar or puts it under a bed. Instead, he puts it on a stand so that those who come in can see the light.</text:p>
        <text:p text:style-name="P291">Luke 8:16 No one lights a lamp and hides it in with a jar or puts it under a bed. Instead, he puts it on a stand so that those who come in can see the light.</text:p>
        <text:list text:continue-numbering="true" text:style-name="Bullet_20_-_20_checkmark">
          <text:list-item>
            <text:p text:style-name="P289">Review the homework from the previous lesson:</text:p>
          </text:list-item>
        </text:list>
        <text:p text:style-name="P290">Did anyone notice your light this last week? Did you share with someone about the love that Jesus has for them?</text:p>
        <text:p text:style-name="P291">Did anyone notice your light this last week? Did you share with someone about the love that Jesus has for them?</text:p>
        <text:p text:style-name="P293">(Give children time to share.)</text:p>
        <text:p text:style-name="P288"><text:soft-page-break/>Prayer</text:p>
        <text:list text:continue-numbering="true" text:style-name="Bullet_20_-_20_checkmark">
          <text:list-item>
            <text:p text:style-name="P289">Let the children share praises and prayer requests.</text:p>
          </text:list-item>
          <text:list-item>
            <text:p text:style-name="P294">Keep a record of what the children are sharing so you can remember to thank God together for answered prayers.</text:p>
          </text:list-item>
          <text:list-item>
            <text:p text:style-name="P294">Spend time praying together. <text:s/>Let children pray out loud if they volunteer. <text:s/>Do not force anyone to pray out loud.</text:p>
          </text:list-item>
        </text:list>
        <text:p text:style-name="P286">Song</text:p>
        <text:p text:style-name="P287">Words to Discuss</text:p>
        <text:list xml:id="list92018734995725" text:continue-numbering="true" text:style-name="Bullet_20_-_20_checkmark">
          <text:list-item>
            <text:p text:style-name="P289">On the blackboard, write the “Words to Discuss” from the list below.</text:p>
          </text:list-item>
          <text:list-item>
            <text:p text:style-name="P295">Let's discuss some words to help us better understand the Bible story for today.</text:p>
          </text:list-item>
        </text:list>
        <text:p text:style-name="P291">Let's discuss some words to help us better understand the Bible story for today.</text:p>
        <text:list text:continue-list="list92018091529907" text:style-name="Bullet_20_-_20_Diamond">
          <text:list-item>
            <text:p text:style-name="P296"><text:span text:style-name="Body_20_Emphasized_20_-_20_Small">Lake: <text:s/></text:span>A large body of water.</text:p>
          </text:list-item>
        </text:list>
        <text:p text:style-name="P297">Lake: <text:s/>A large body of water.</text:p>
        <text:list text:continue-numbering="true" text:style-name="Bullet_20_-_20_Diamond">
          <text:list-item>
            <text:p text:style-name="P296"><text:span text:style-name="Body_20_Emphasized_20_-_20_Small">Storm/Squall: <text:s/></text:span>A heavy storm with a lot of wind that makes large waves on a lake.</text:p>
          </text:list-item>
        </text:list>
        <text:p text:style-name="P297">Storm/Squall: <text:s/>A heavy storm with a lot of wind that makes large waves on a lake.</text:p>
        <text:list text:continue-numbering="true" text:style-name="Bullet_20_-_20_Diamond">
          <text:list-item>
            <text:p text:style-name="P296"><text:span text:style-name="Body_20_Emphasized_20_-_20_Small">Rebuke: <text:s/></text:span>To speak with strong disapproval.</text:p>
          </text:list-item>
        </text:list>
        <text:p text:style-name="P297">Rebuke: <text:s/>To speak with strong disapproval.</text:p>
        <text:list text:continue-numbering="true" text:style-name="Bullet_20_-_20_Diamond">
          <text:list-item>
            <text:p text:style-name="P296"><text:span text:style-name="Body_20_Emphasized_20_-_20_Small">Faith: <text:s/></text:span>Having confidence in someone, to trust them.</text:p>
          </text:list-item>
        </text:list>
        <text:p text:style-name="P297">Faith: <text:s/>Having confidence in someone, to trust them.</text:p>
        <text:list xml:id="list92018066273410" text:continue-numbering="true" text:style-name="Bullet_20_-_20_Diamond">
          <text:list-item>
            <text:p text:style-name="P296"><text:span text:style-name="Body_20_Emphasized_20_-_20_Small">Amazement: <text:s/></text:span>A feeling of surprise or wonder.</text:p>
          </text:list-item>
        </text:list>
        <text:p text:style-name="P297">Amazement: <text:s/>A feeling of surprise or wonder.</text:p>
        <text:p text:style-name="P298">Song</text:p>
        <text:p text:style-name="P287">Bible Story / Lesson</text:p>
        <text:p text:style-name="P299">Have you ever met someone with great strength?</text:p>
        <text:p text:style-name="P300">Have you ever met someone with great strength?</text:p>
        <text:p text:style-name="P299">What did they do that showed you how strong they are?</text:p>
        <text:p text:style-name="P300">What did they do that showed you how strong they are?</text:p>
        <text:p text:style-name="P299">Were you amazed by what you saw? Were you afraid of them because of their power?</text:p>
        <text:p text:style-name="P300">Were you amazed by what you saw? Were you afraid of them because of their power?</text:p>
        <text:p text:style-name="P299">Today we will be learning how Jesus has power over nature.</text:p>
        <text:p text:style-name="P300">Today we will be learning how Jesus has power over nature.</text:p>
        <text:p text:style-name="P288">Introduce Truth</text:p>
        <text:p text:style-name="P301">Our truth for today is: <text:s/>Jesus has true power over nature.</text:p>
        <text:p text:style-name="P302">Our truth for today is: <text:s/>Jesus has true power over nature.</text:p>
        <text:p text:style-name="P301">This reminds me of a true story from the Bible.</text:p>
        <text:p text:style-name="P302">This reminds me of a true story from the Bible.</text:p>
        <text:p text:style-name="P303">Bible Story: <text:s/>Luke <text:s/>8:22-25</text:p>
        <text:p text:style-name="P304"><draw:frame draw:style-name="fr4" draw:name="Frame28" text:anchor-type="paragraph" svg:x="-0.0181in" svg:y="0.0862in" svg:width="1.378in" draw:z-index="128"><draw:text-box fo:min-height="1.2055in"><text:p text:style-name="P305"><text:span text:style-name="T6">Picture <text:s/></text:span>24–1</text:p><text:p text:style-name="P305"><draw:frame text:anchor-type="as-char" draw:z-index="13" draw:name="Shape1_0" draw:style-name="gr2" draw:text-style-name="P72" svg:width="1.2921in" svg:height="0.8276in"><draw:image xlink:href="Pictures/10000000000000EC000000A2777F7C0A.jpg" xlink:type="simple" xlink:show="embed" xlink:actuate="onLoad" draw:mime-type="image/jpeg"><text:p/></draw:image></draw:frame></text:p></draw:text-box></draw:frame>Luke 8:22 One day Jesus said to his disciples, “Let’s go over to the other side of the lake.” So they got into a boat and set out.</text:p>
        <text:p text:style-name="P306">Luke 8:22 One day Jesus said to his disciples, “Let’s go over to the other side of the lake.” So they got into a boat and set out.</text:p>
        <text:p text:style-name="P306"/>
        <text:p text:style-name="P306"/>
        <text:p text:style-name="P306"/>
        <text:p text:style-name="P304"><draw:frame draw:style-name="fr4" draw:name="Frame19" text:anchor-type="paragraph" svg:x="-0.0181in" svg:y="0.0862in" svg:width="1.378in" draw:z-index="127"><draw:text-box fo:min-height="1.2055in"><text:p text:style-name="P307">Picture <text:s/>24–2</text:p><text:p text:style-name="P305"><draw:frame text:anchor-type="as-char" draw:z-index="24" draw:name="Shape2_0" draw:style-name="gr2" draw:text-style-name="P72" svg:width="1.2921in" svg:height="0.898in"><draw:image xlink:href="Pictures/10000000000000EC000000A4031B8558.jpg" xlink:type="simple" xlink:show="embed" xlink:actuate="onLoad" draw:mime-type="image/jpeg"><text:p/></draw:image></draw:frame></text:p></draw:text-box></draw:frame>Luke 8:23 As they sailed, he fell asleep. A squall came down on the lake, so that the boat was being swamped, and they were in great danger.</text:p>
        <text:p text:style-name="P306">Luke 8:23 As they sailed, he fell asleep. A squall came down on the lake, so that the boat was being swamped, and they were in great danger.</text:p>
        <text:p text:style-name="P306"/>
        <text:p text:style-name="P306"/>
        <text:p text:style-name="P306"/>
        <text:p text:style-name="P304"><draw:frame draw:style-name="fr4" draw:name="Frame38" text:anchor-type="paragraph" svg:x="-0.0181in" svg:y="0.0862in" svg:width="1.378in" draw:z-index="126"><draw:text-box fo:min-height="1.2055in"><text:p text:style-name="P307">Picture <text:s/>24–3</text:p><text:p text:style-name="P305"><draw:frame text:anchor-type="as-char" draw:z-index="18" draw:name="Shape3_0" draw:style-name="gr2" draw:text-style-name="P72" svg:width="1.2921in" svg:height="0.898in"><draw:image xlink:href="Pictures/10000000000000EC000000A4B93C8D38.jpg" xlink:type="simple" xlink:show="embed" xlink:actuate="onLoad" draw:mime-type="image/jpeg"><text:p/></draw:image></draw:frame></text:p></draw:text-box></draw:frame><text:soft-page-break/>Luke 8:24-25 The disciples went and woke him, saying, “Master, Master, we’re going to drown!” He got up and rebuked the wind and the raging waters; the storm subsided, and all was calm. “Where is your faith?” he asked his disciples. In fear and amazement they asked one another, “Who is this? He commands even the winds and the water, and they obey him.”</text:p>
        <text:p text:style-name="P306">Luke 8:24-25 The disciples went and woke him, saying, “Master, Master, we’re going to drown!” He got up and rebuked the wind and the raging waters; the storm subsided, and all was calm. “Where is your faith?” he asked his disciples. In fear and amazement they asked one another, “Who is this? He commands even the winds and the water, and they obey him.”</text:p>
        <text:p text:style-name="P288">Application</text:p>
        <text:p text:style-name="P299">The stories about Jesus in the Bible show us how powerful he is. In this story, the disciples were afraid in the big storm. They did not believe that Jesus was in control. They did not believe they would reach the other side of the lake safely. They thought their ship would sink and they would all die! Storms and bad things happen in our lives, but Jesus is always in control.</text:p>
        <text:p text:style-name="P300">The stories about Jesus in the Bible show us how powerful he is. In this story, the disciples were afraid in the big storm. They did not believe that Jesus was in control. They did not believe they would reach the other side of the lake safely. They thought their ship would sink and they would all die! Storms and bad things happen in our lives, but Jesus is always in control.</text:p>
        <text:p text:style-name="P299">These Bible stories also teach us that Jesus is truly God; he has power over everything. Only God can do things like calm the wind and the sea with only a word. Some people say they have the power to call for rain, or thunder, but they are using counterfeit that is not from God; it is evil power. The power Jesus has is the true power that only comes from God, because he is God. These stories help us have more faith in Jesus. We can have confidence that He is able to do everything He promises because He has shown us His great power. The disciples were amazed at the power they saw in Jesus; they had never seen anyt. We should be amazed as well. Jesus is God! He is powerful. We can put our faith in him!</text:p>
        <text:p text:style-name="P302">These Bible stories also teach us that Jesus is truly God; he has power over everything. Only God can do things like calm the wind and the sea with only a word. Some people say they have the power to call for rain, or thunder, but they are using counterfeit that is not from God; it is evil power. The power Jesus has is the true power that only comes from God, because he is God. These stories help us have more faith in Jesus. We can have confidence that He is able to do everything He promises because He has shown us His great power. The disciples were amazed at the power they saw in Jesus; they had never seen anyt. We should be amazed as well. Jesus is God! He is powerful. We can put our faith in him! </text:p>
        <text:p text:style-name="P301">Jesus has true power over nature.</text:p>
        <text:p text:style-name="P302">Jesus has true power over nature.</text:p>
        <text:p text:style-name="P308">Homework:</text:p>
        <text:p text:style-name="P299">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300">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286">Prayer / Song</text:p>
        <text:p text:style-name="P287">Review Game</text:p>
        <text:p text:style-name="P309">Team Hot Potato</text:p>
        <text:p text:style-name="P310">Materials</text:p>
        <text:list text:continue-list="list92018734995725" text:style-name="Bullet_20_-_20_checkmark">
          <text:list-item>
            <text:p text:style-name="P311"><text:span text:style-name="T17">Ball</text:span> <text:s/>(Make a ball by tying wrappen (plastic bag) into knots many times, or fill an old sock with scrap material.)</text:p>
          </text:list-item>
          <text:list-item>
            <text:p text:style-name="P312">A drum, shaker, or anything to make music with.</text:p>
          </text:list-item>
        </text:list>
        <text:p text:style-name="P310">How to Play</text:p>
        <text:list xml:id="list92018383076549" text:continue-numbering="true" text:style-name="Bullet_20_-_20_checkmark">
          <text:list-item>
            <text:p text:style-name="P311">Divide the class into 2 teams. <text:s/>Pick 3 volunteers from each team.</text:p>
          </text:list-item>
          <text:list-item>
            <text:p text:style-name="P312">The 6 children will stand in a circle at the front of the room.</text:p>
          </text:list-item>
          <text:list-item>
            <text:p text:style-name="P312">The children will pass the ball from person to person in the circle as quickly as possible.</text:p>
          </text:list-item>
          <text:list-item>
            <text:p text:style-name="P312">Have a drummer not face the children and drum for a short time.</text:p>
          </text:list-item>
          <text:list-item>
            <text:p text:style-name="P312">When the drummer stops, the student holding the ball answers a question. <text:s/>If the answer is correct, that team gets a point.</text:p>
          </text:list-item>
          <text:list-item>
            <text:p text:style-name="P312">The drummer then starts to play again and the game continues.</text:p>
          </text:list-item>
          <text:list-item>
            <text:p text:style-name="P312"><text:soft-page-break/>After playing 2 or 3 times, you can change the children in the circle. <text:s/>Have the chidren at the front sit down. <text:s/>Then, pick 3 different voluteers from each team.</text:p>
          </text:list-item>
          <text:list-item>
            <text:p text:style-name="P312">Continue playing the game.</text:p>
          </text:list-item>
          <text:list-item>
            <text:p text:style-name="P312">Record the points. <text:s/>The team with the most points wins.</text:p>
          </text:list-item>
          <text:list-item>
            <text:p text:style-name="P312">Be sure to clap for both sides. <text:s/>No name-calling. <text:s/>Encourage good sportsmanship.</text:p>
          </text:list-item>
        </text:list>
        <text:p text:style-name="P313">Questions for Review Game</text:p>
        <text:list text:style-name="L28">
          <text:list-item>
            <text:p text:style-name="P314">What did Jesus want to do with his disciples? (Cross the Sea of Galilee, a very large sea in Israel)</text:p>
          </text:list-item>
        </text:list>
        <text:p text:style-name="P291">What did Jesus want to do with his disciples? (Cross the Sea of Galilee, a very large sea in Israel)</text:p>
        <text:list text:continue-numbering="true" text:style-name="L28">
          <text:list-item>
            <text:p text:style-name="P314">What happened on their way across the sea? (A strong storm came on them with heavy winds, and large waves filled the boat with water.)</text:p>
          </text:list-item>
        </text:list>
        <text:p text:style-name="P291">What happened on their way across the sea? (A strong storm came on them with heavy winds, and large waves filled the boat with water.)</text:p>
        <text:list text:continue-numbering="true" text:style-name="L28">
          <text:list-item>
            <text:p text:style-name="P314">What was Jesus doing during the storm? (Jesus was sleeping.)</text:p>
          </text:list-item>
        </text:list>
        <text:p text:style-name="P291">What was Jesus doing during the storm? (Jesus was sleeping.)</text:p>
        <text:list text:continue-numbering="true" text:style-name="L28">
          <text:list-item>
            <text:p text:style-name="P314">How did the disciples feel? (Afraid)</text:p>
          </text:list-item>
        </text:list>
        <text:p text:style-name="P291">How did the disciples feel? (Afraid)</text:p>
        <text:list text:continue-numbering="true" text:style-name="L28">
          <text:list-item>
            <text:p text:style-name="P314">What did the disciples do? (They woke Jesus up and told him that they were afraid.)</text:p>
          </text:list-item>
        </text:list>
        <text:p text:style-name="P291">What did the disciples do? (They woke Jesus up and told him that they were afraid.)</text:p>
        <text:list text:continue-numbering="true" text:style-name="L28">
          <text:list-item>
            <text:p text:style-name="P314">What did Jesus do? (Jesus commanded the storm to stop, and it did.)</text:p>
          </text:list-item>
        </text:list>
        <text:p text:style-name="P291">What did Jesus do? (Jesus commanded the storm to stop, and it did.)</text:p>
        <text:list text:continue-numbering="true" text:style-name="L28">
          <text:list-item>
            <text:p text:style-name="P314">Why do you think the disciples were afraid of the power that Jesus had? (They had never known anyone who had the power to control the wind and the sea.)</text:p>
          </text:list-item>
        </text:list>
        <text:p text:style-name="P291">Why do you think the disciples were afraid of the power that Jesus had? (They had never known anyone who had the power to control the wind and the sea.)</text:p>
        <text:list text:continue-numbering="true" text:style-name="L28">
          <text:list-item>
            <text:p text:style-name="P314">Jesus asked the disciples if they had no faith in him. What do you think it means, “to have faith?” (To trust, or have confidence in someone)</text:p>
          </text:list-item>
        </text:list>
        <text:p text:style-name="P291">Jesus asked the disciples if they had no faith in him. What do you think it means, “to have faith?” (To trust, or have confidence in someone)</text:p>
        <text:list text:continue-numbering="true" text:style-name="L28">
          <text:list-item>
            <text:p text:style-name="P314">If the disciples had faith in Jesus, how would they have reacted to the storm? (They would have not been afraid if they had faith. They would have rested just like Jesus was resting.)</text:p>
          </text:list-item>
        </text:list>
        <text:p text:style-name="P291">If the disciples had faith in Jesus, how would they have reacted to the storm? (They would have not been afraid if they had faith. They would have rested just like Jesus was resting.)</text:p>
        <text:list text:continue-numbering="true" text:style-name="L28">
          <text:list-item>
            <text:p text:style-name="P314">Is there something in your life that makes you afraid? If so, do you have faith that Jesus is in control, and that He has the power to overcome whatever that is? Let's pray now and tell Jesus what makes us afraid.</text:p>
          </text:list-item>
        </text:list>
        <text:p text:style-name="P291">Is there something in your life that makes you afraid? If so, do you have faith that Jesus is in control, and that He has the power to overcome whatever that is? Let's pray now and tell Jesus what makes us afraid.</text:p>
        <text:p text:style-name="P286">Song</text:p>
        <text:p text:style-name="P287">Memory Verse</text:p>
        <text:p text:style-name="P313">Materials and Preparations</text:p>
        <text:list xml:id="list92018702722921" text:continue-list="list92018383076549" text:style-name="Bullet_20_-_20_checkmark">
          <text:list-item>
            <text:p text:style-name="P289">Put a bookmark in <text:s/>Luke 8:25</text:p>
          </text:list-item>
          <text:list-item>
            <text:p text:style-name="P289">Write memory verse on the blackboard.</text:p>
          </text:list-item>
        </text:list>
        <text:p text:style-name="P290">Luke 8:25 In fear and amazement they asked one another, “Who is this? He commands even the winds and the water, and they obey him.”</text:p>
        <text:p text:style-name="P291">Luke 8:25 In fear and amazement they asked one another, “Who is this? He commands even the winds and the water, and they obey him.”</text:p>
        <text:p text:style-name="P288">Teach and Explain</text:p>
        <text:p text:style-name="P315">Our memory verse is in the Gospel of Luke. <text:s/>That is in the New Testament, a part of the Bible.</text:p>
        <text:p text:style-name="P302">Our memory verse is in the Gospel of Luke. <text:s/>That is in the New Testament, a part of the Bible.</text:p>
        <text:list xml:id="list92018110251924" text:continue-list="list92019263318184" text:style-name="WWNum1">
          <text:list-item text:start-value="1">
            <text:p text:style-name="P316">Read the verse from your Bible.</text:p>
          </text:list-item>
          <text:list-item>
            <text:p text:style-name="P316">Read the verse by yourself as you point to the words.</text:p>
          </text:list-item>
          <text:list-item>
            <text:p text:style-name="P316">Read the verse with the children as you point to the words.</text:p>
          </text:list-item>
          <text:list-item>
            <text:p text:style-name="P316">Explain the verse:</text:p>
          </text:list-item>
        </text:list>
        <text:list text:continue-list="list92018702722921" text:style-name="Bullet_20_-_20_checkmark">
          <text:list-item>
            <text:p text:style-name="P295">Our memory verse comes from today’s Bible story.</text:p>
          </text:list-item>
        </text:list>
        <text:p text:style-name="P291">Our memory verse comes from today’s Bible story.</text:p>
        <text:list xml:id="list92019131161468" text:continue-numbering="true" text:style-name="Bullet_20_-_20_checkmark">
          <text:list-item>
            <text:p text:style-name="P289"><text:soft-page-break/>As you read the verse, circle the words shown below. <text:s/>Explain each of these words.</text:p>
          </text:list-item>
        </text:list>
        <text:list text:continue-list="list92018066273410" text:style-name="Bullet_20_-_20_Diamond">
          <text:list-item>
            <text:p text:style-name="P296"><text:span text:style-name="Body_20_Emphasized_20_-_20_Small">Fear and amazement: <text:s/></text:span>When we see great power at work, it makes us have feelings of fear because we know that we are weak. We also feel amazement because it is not normal to see that kind of power at work.</text:p>
          </text:list-item>
        </text:list>
        <text:p text:style-name="P297">Fear and amazement: <text:s/>When we see great power at work, it makes us have feelings of fear because we know that we are weak. We also feel amazement because it is not normal to see that kind of power at work.</text:p>
        <text:list text:continue-numbering="true" text:style-name="Bullet_20_-_20_Diamond">
          <text:list-item>
            <text:p text:style-name="P296"><text:span text:style-name="Body_20_Emphasized_20_-_20_Small">Who is this?: <text:s/></text:span>I would ask this too if I saw someone who could control the wind and the sea! Would you?</text:p>
          </text:list-item>
        </text:list>
        <text:p text:style-name="P297">Who is this?: <text:s/>I would ask this too if I saw someone who could control the wind and the sea! Would you?</text:p>
        <text:list text:continue-numbering="true" text:style-name="Bullet_20_-_20_Diamond">
          <text:list-item>
            <text:p text:style-name="P296"><text:span text:style-name="Body_20_Emphasized_20_-_20_Small">Command: <text:s/></text:span>This is like how a general commands an army. Jesus is in charge of everything; he commands everything.</text:p>
          </text:list-item>
        </text:list>
        <text:p text:style-name="P297">Command: <text:s/>This is like how a general commands an army. Jesus is in charge of everything; he commands everything.</text:p>
        <text:list xml:id="list92019573475006" text:continue-numbering="true" text:style-name="Bullet_20_-_20_Diamond">
          <text:list-item>
            <text:p text:style-name="P296"><text:span text:style-name="Body_20_Emphasized_20_-_20_Small">Obey: <text:s/></text:span>Because Jesus commands the wind and the sea, they must do what He says, they obey Him.</text:p>
          </text:list-item>
        </text:list>
        <text:p text:style-name="P297">Obey: <text:s/>Because Jesus commands the wind and the sea, they must do what He says, they obey Him.</text:p>
        <text:list xml:id="list92018171259190" text:continue-list="list92018110251924" text:style-name="WWNum1">
          <text:list-item>
            <text:p text:style-name="P316">Read the verse again by yourself as you point to the words.</text:p>
          </text:list-item>
          <text:list-item>
            <text:p text:style-name="P316">Read the verse again with the children as you point to the words.</text:p>
          </text:list-item>
        </text:list>
        <text:p text:style-name="P301">Remember our truth for the day? <text:s/><text:span text:style-name="T23">Let’s all say it together:</text:span></text:p>
        <text:p text:style-name="P302">Remember our truth for the day? <text:s/>Let’s all say it together:</text:p>
        <text:p text:style-name="P301">Jesus has true power over nature.</text:p>
        <text:p text:style-name="P302">Jesus has true power over nature.</text:p>
        <text:p text:style-name="P287">Memory Verse Review</text:p>
        <text:p text:style-name="P288">Children Repeat the Verse by Playing “Groupings”</text:p>
        <text:list xml:id="list92019548781521" text:continue-list="list92019131161468" text:style-name="Bullet_20_-_20_checkmark">
          <text:list-item>
            <text:p text:style-name="P289">Talk about different ways to group people. (All boys, all girls, all children who ate fufu corn this week, all the children wearing read, all the children in class 2, etc.)</text:p>
          </text:list-item>
          <text:list-item>
            <text:p text:style-name="P294">Ask the children the first question.</text:p>
          </text:list-item>
          <text:list-item>
            <text:p text:style-name="P294">When a question is answered correctly, that child chooses one of the groups listed above or chooses their own group.</text:p>
          </text:list-item>
          <text:list-item>
            <text:p text:style-name="P294">The verse is said out loud together by the group chosen.</text:p>
          </text:list-item>
          <text:list-item>
            <text:p text:style-name="P294">Then the next question is asked.</text:p>
          </text:list-item>
          <text:list-item>
            <text:p text:style-name="P294">When that question is answered correctly, another child chooses one of the groups.</text:p>
          </text:list-item>
          <text:list-item>
            <text:p text:style-name="P294">The verse is said aloud again by the group chosen.</text:p>
          </text:list-item>
          <text:list-item>
            <text:p text:style-name="P294">Do this until all the questions are asked.</text:p>
          </text:list-item>
        </text:list>
        <text:p text:style-name="P313">Questions for Memory Verse</text:p>
        <text:list text:style-name="L29">
          <text:list-item text:start-value="1">
            <text:p text:style-name="P317">What was the disciples reaction to the power that they saw when Jesus commanded the wind and the sea to be still? (Fear and amazement)</text:p>
          </text:list-item>
        </text:list>
        <text:p text:style-name="P291">What was the disciples reaction to the power that they saw when Jesus commanded the wind and the sea to be still? (Fear and amazement)</text:p>
        <text:list text:continue-numbering="true" text:style-name="L29">
          <text:list-item>
            <text:p text:style-name="P317">What question did the disciples ask when they saw that power? (“Who is this?”)</text:p>
          </text:list-item>
        </text:list>
        <text:p text:style-name="P291">What question did the disciples ask when they saw that power? (“Who is this?”)</text:p>
        <text:list text:continue-numbering="true" text:style-name="L29">
          <text:list-item>
            <text:p text:style-name="P317">What does it mean to “command” something? (To have control over something, like a general has control over an army)</text:p>
          </text:list-item>
        </text:list>
        <text:p text:style-name="P291">What does it mean to “command” something? (To have control over something, like a general has control over an army)</text:p>
        <text:list text:continue-numbering="true" text:style-name="L29">
          <text:list-item>
            <text:p text:style-name="P317">When a general commands his army, what must they do? (Obey the general's commands)</text:p>
          </text:list-item>
        </text:list>
        <text:p text:style-name="P291">When a general commands his army, what must they do? (Obey the general's commands)</text:p>
        <text:list text:continue-numbering="true" text:style-name="L29">
          <text:list-item>
            <text:p text:style-name="P317">When Jesus commands us to do something, what must we do? (Obey what Jesus commands us to do)</text:p>
          </text:list-item>
        </text:list>
        <text:p text:style-name="P291">When Jesus commands us to do something, what must we do? (Obey what Jesus commands us to do)</text:p>
        <text:list text:continue-numbering="true" text:style-name="L29">
          <text:list-item>
            <text:p text:style-name="P317">When we read the stories in the Bible that show Jesus' great power, what should grow in us? (Faith in Jesus)</text:p>
          </text:list-item>
        </text:list>
        <text:p text:style-name="P291">When we read the stories in the Bible that show Jesus' great power, what should grow in us? (Faith in Jesus)</text:p>
        <text:p text:style-name="P286">Song</text:p>
        <text:p text:style-name="P287"><text:soft-page-break/>Closing and Homework</text:p>
        <text:list text:continue-list="list92019548781521" text:style-name="Bullet_20_-_20_checkmark">
          <text:list-item>
            <text:p text:style-name="P289">Say the truth together:</text:p>
          </text:list-item>
        </text:list>
        <text:p text:style-name="P290">Jesus has true power over nature.</text:p>
        <text:p text:style-name="P291">Jesus has true power over nature.</text:p>
        <text:list text:continue-numbering="true" text:style-name="Bullet_20_-_20_checkmark">
          <text:list-item>
            <text:p text:style-name="P289">Say the memory verse together:</text:p>
          </text:list-item>
        </text:list>
        <text:p text:style-name="P290">Luke 8:25 In fear and amazement they asked one another, “Who is this? He commands even the winds and the water, and they obey him.”</text:p>
        <text:p text:style-name="P291">Luke 8:25 In fear and amazement they asked one another, “Who is this? He commands even the winds and the water, and they obey him.”</text:p>
        <text:list text:continue-numbering="true" text:style-name="Bullet_20_-_20_checkmark">
          <text:list-item>
            <text:p text:style-name="P289">Review the homework:</text:p>
          </text:list-item>
        </text:list>
        <text:p text:style-name="P290">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p text:style-name="P291">As you go through the week, look around and see the beauty of everything God created. Thank him for this beauty. Give thanks also that Jesus showed us that he is God and that he has power over everything. Tell Jesus you trust him even in bad times because he is truly powerful.</text:p>
        <text:list xml:id="list92018568746493" text:continue-numbering="true" text:style-name="Bullet_20_-_20_checkmark">
          <text:list-item>
            <text:p text:style-name="P289">Give any needed announcements.</text:p>
          </text:list-item>
        </text:list>
        <text:p text:style-name="P288">Closing Prayer</text:p>
        <text:p text:style-name="P318"><text:span text:style-name="Body_20_Emphasized_20_-_20_Small">Thank God <text:s/></text:span>that He has great power, including power over nature.</text:p>
        <text:p text:style-name="P318"><text:span text:style-name="Body_20_Emphasized_20_-_20_Small">Ask God <text:s/></text:span>that the children will remember to look for things in nature that remind them of this truth and thank Jesus for his power over everything.</text:p>
        <text:p text:style-name="P319">Colouring page to colour and take home!</text:p>
      </text:section>
      <text:p text:style-name="Body"/>
      <text:p text:style-name="P54">Jesus has true power over nature.</text:p>
      <text:p text:style-name="Bible_20_Story_20_-_20_Graphic_20_Number"><draw:frame draw:style-name="fr8" draw:name="Image52" text:anchor-type="as-char" svg:width="5.1335in" svg:height="5.0547in" draw:z-index="130"><draw:image xlink:href="Pictures/10000001000009EC00000998E8629FAB.tif" xlink:type="simple" xlink:show="embed" xlink:actuate="onLoad" draw:mime-type="image/tiff"/></draw:frame></text:p>
      <text:p text:style-name="M.T._20_Coloring_20_Page_20_-_20_Memory_20_Verse">Luke 8:25 In fear and amazement they asked one another, “Who is this? He commands even the winds and the water, and they obey him.”</text:p>
      <text:p text:style-name="P55">Jesus has true power over nature.</text:p>
      <text:p text:style-name="Bible_20_Story_20_-_20_Graphic_20_Number"><draw:frame draw:style-name="fr8" draw:name="Image53" text:anchor-type="as-char" svg:width="5.1335in" svg:height="5.0547in" draw:z-index="131"><draw:image xlink:href="Pictures/10000001000009EC00000998E8629FAB.tif" xlink:type="simple" xlink:show="embed" xlink:actuate="onLoad" draw:mime-type="image/tiff"/></draw:frame></text:p>
      <text:p text:style-name="Bible_20_Story_20_-_20_Graphic_20_Number">Luke 8:25 In fear and amazement they asked one another, “Who is this? He commands even the winds and the water, and they obey him.”</text:p>
      <text:h text:style-name="P25" text:outline-level="1"><draw:frame draw:style-name="fr3" draw:name="Image54" text:anchor-type="char" svg:x="0in" svg:y="0.0161in" svg:width="1.0752in" svg:height="1.0752in" draw:z-index="137"><draw:image xlink:href="Pictures/10000001000000D8000000D84820B298.png" xlink:type="simple" xlink:show="embed" xlink:actuate="onLoad" draw:mime-type="image/png"/></draw:frame>Jesus Casts out Demons into Pigs</text:h>
      <text:p text:style-name="M.T._20_Lesson_20_Title">Jesus Casts out Demons into Pigs</text:p>
      <text:p text:style-name="English_20_Translation_20_-_20_Lesson_20_title">Jesus Casts out Demons into Pigs</text:p>
      <text:p text:style-name="M.T._20_Text_20_-_20_Lesson_20_Title_20_Scrip_20_Reference">Luke <text:s/>8:26-39</text:p>
      <text:p text:style-name="Part_20_Heading">Lesson Overview</text:p>
      <table:table table:name="Table14" table:style-name="Table14">
        <table:table-column table:style-name="Table14.A"/>
        <table:table-column table:style-name="Table14.B"/>
        <table:table-row>
          <table:table-cell table:style-name="Table14.A1" office:value-type="string">
            <text:p text:style-name="Table_20_Left_20_headings">Today’s Truth</text:p>
          </table:table-cell>
          <table:table-cell table:style-name="Table14.B1" office:value-type="string">
            <text:p text:style-name="P320">Jesus has power over evil spirits.</text:p>
            <text:p text:style-name="English_20_translation">Jesus has power over evil spirits.</text:p>
          </table:table-cell>
        </table:table-row>
        <table:table-row>
          <table:table-cell table:style-name="Table14.A1" office:value-type="string">
            <text:p text:style-name="Table_20_Left_20_headings">Objective</text:p>
          </table:table-cell>
          <table:table-cell table:style-name="Table14.B2" office:value-type="string">
            <text:p text:style-name="Body_20_Tight_20_lines"><text:span text:style-name="Body_20_Emphasized_20_-_20_Small">KNOW:</text:span> <text:s/>The children will know that we can rely on Jesus when dealing with evil spirits.</text:p>
            <text:p text:style-name="Body_20_Tight_20_lines"><text:span text:style-name="Body_20_Emphasized_20_-_20_Small">DO:</text:span> <text:s/>The children will go and tell someone about something God has done for them.</text:p>
          </table:table-cell>
        </table:table-row>
        <table:table-row>
          <table:table-cell table:style-name="Table14.A1" office:value-type="string">
            <text:p text:style-name="Table_20_Left_20_headings">Materials</text:p>
          </table:table-cell>
          <table:table-cell table:style-name="Table14.B3" office:value-type="string">
            <text:list text:continue-list="list92018888974714" text:style-name="Table_20_Bullet_20_-_20_checkmark">
              <text:list-item>
                <text:p text:style-name="P321">Quarter <text:s/><text:span text:style-name="T9">2</text:span> <text:s/>Picture book, Bible, chalk</text:p>
              </text:list-item>
              <text:list-item>
                <text:p text:style-name="P322">Copies of the memory verse coloring page for the children to take home.</text:p>
              </text:list-item>
              <text:list-item>
                <text:p text:style-name="Table_20_Bullet_20_-_20_Checkmark">Tic Tac Toe/Long Line – You can use chalk and blackboard, paper and pen, or a stick and dirt</text:p>
              </text:list-item>
            </text:list>
          </table:table-cell>
        </table:table-row>
        <table:table-row>
          <table:table-cell table:style-name="Table14.A1" office:value-type="string">
            <text:p text:style-name="Table_20_Left_20_headings">Memory Verse</text:p>
          </table:table-cell>
          <table:table-cell table:style-name="Table14.B3" office:value-type="string">
            <text:p text:style-name="P323">[ <text:s/>Jesus said, <text:s/>] <text:s/>Luke 8:39 “Return home and tell how much God has done for you.” So the man went away and told all over town how much Jesus had done for him.</text:p>
            <text:p text:style-name="English_20_translation">[ <text:s/>Jesus said, <text:s/>] <text:s/>Luke 8:39 “Return home and tell how much God has done for you.” So the man went away and told all over town how much Jesus had done for him.</text:p>
          </table:table-cell>
        </table:table-row>
        <table:table-row>
          <table:table-cell table:style-name="Table14.A1" office:value-type="string">
            <text:p text:style-name="Table_20_Left_20_headings">Homework</text:p>
          </table:table-cell>
          <table:table-cell table:style-name="Table14.B3" office:value-type="string">
            <text:p text:style-name="M.T._20_Text">Go and tell someone about something God has done for you.</text:p>
            <text:p text:style-name="English_20_translation">Go and tell someone about something God has done for you.</text:p>
          </table:table-cell>
        </table:table-row>
      </table:table>
      <text:p text:style-name="Body_20_-_20_Small_20_Spacer"/>
      <text:p text:style-name="Part_20_Heading">Detailed Lesson Plan</text:p>
      <text:section text:style-name="Sect1" text:name="L-25 Detail Plan">
        <text:p text:style-name="P324">Song</text:p>
        <text:p text:style-name="P325">Opening</text:p>
        <text:p text:style-name="P326">Welcome</text:p>
        <text:list text:continue-list="list92018568746493" text:style-name="Bullet_20_-_20_checkmark">
          <text:list-item>
            <text:p text:style-name="P327">Be sure the children know you are happy to see them!</text:p>
          </text:list-item>
          <text:list-item>
            <text:p text:style-name="P327">Introduce yourself and your helpers.</text:p>
          </text:list-item>
        </text:list>
        <text:p text:style-name="P326">Sharing Time</text:p>
        <text:list text:continue-numbering="true" text:style-name="Bullet_20_-_20_checkmark">
          <text:list-item>
            <text:p text:style-name="P327">Say the truth from the previous lesson together:</text:p>
          </text:list-item>
        </text:list>
        <text:p text:style-name="P328">Jesus has true power over nature.</text:p>
        <text:p text:style-name="P329">Jesus has true power over nature.</text:p>
        <text:list text:continue-numbering="true" text:style-name="Bullet_20_-_20_checkmark">
          <text:list-item>
            <text:p text:style-name="P330">Say the memory verse from the previous lesson together:</text:p>
          </text:list-item>
        </text:list>
        <text:p text:style-name="P328">Luke 8:25 In fear and amazement they asked one another, “Who is this? He commands even the winds and the water, and they obey him.”</text:p>
        <text:p text:style-name="P329">Luke 8:25 In fear and amazement they asked one another, “Who is this? He commands even the winds and the water, and they obey him.”</text:p>
        <text:list text:continue-numbering="true" text:style-name="Bullet_20_-_20_checkmark">
          <text:list-item>
            <text:p text:style-name="P327">Review the homework from the previous lesson:</text:p>
          </text:list-item>
        </text:list>
        <text:p text:style-name="P328">What things did you see in nature this week? Did you remember to thank Jesus for his power over everything?</text:p>
        <text:p text:style-name="P329">What things did you see in nature this week? Did you remember to thank Jesus for his power over everything?</text:p>
        <text:p text:style-name="P331">(Give children time to share.)</text:p>
        <text:p text:style-name="P326">Prayer</text:p>
        <text:list text:continue-numbering="true" text:style-name="Bullet_20_-_20_checkmark">
          <text:list-item>
            <text:p text:style-name="P327">Let the children share praises and prayer requests.</text:p>
          </text:list-item>
          <text:list-item>
            <text:p text:style-name="P332">Keep a record of what the children are sharing so you can remember to thank God together for answered prayers.</text:p>
          </text:list-item>
          <text:list-item>
            <text:p text:style-name="P332">Spend time praying together. <text:s/>Let children pray out loud if they volunteer. <text:s/>Do not force anyone to pray out loud.</text:p>
          </text:list-item>
        </text:list>
        <text:p text:style-name="P324">Song</text:p>
        <text:p text:style-name="P325"><text:soft-page-break/>Words to Discuss</text:p>
        <text:list xml:id="list92018094247815" text:continue-numbering="true" text:style-name="Bullet_20_-_20_checkmark">
          <text:list-item>
            <text:p text:style-name="P327">On the blackboard, write the “Words to Discuss” from the list below.</text:p>
          </text:list-item>
          <text:list-item>
            <text:p text:style-name="P333">Let's discuss some words to help us better understand the Bible story for today.</text:p>
          </text:list-item>
        </text:list>
        <text:p text:style-name="P329">Let's discuss some words to help us better understand the Bible story for today.</text:p>
        <text:list text:continue-list="list92019573475006" text:style-name="Bullet_20_-_20_Diamond">
          <text:list-item>
            <text:p text:style-name="P334"><text:span text:style-name="Body_20_Emphasized_20_-_20_Small">Gerasenes:</text:span> <text:s/>A Greek town on the opposite side of the Sea of Galilee from Israel.</text:p>
          </text:list-item>
        </text:list>
        <text:p text:style-name="P335">Gerasenes: <text:s/>A Greek town on the opposite side of the Sea of Galilee from Israel.</text:p>
        <text:list text:continue-numbering="true" text:style-name="Bullet_20_-_20_Diamond">
          <text:list-item>
            <text:p text:style-name="P334"><text:span text:style-name="Body_20_Emphasized_20_-_20_Small">Evil Spirits (demon): <text:s/></text:span>Spiritual beings that do not serve God, but serve Satan.</text:p>
          </text:list-item>
        </text:list>
        <text:p text:style-name="P335">Evil Spirits (demon): <text:s/>Spiritual beings that do not serve God, but serve Satan.</text:p>
        <text:list text:continue-numbering="true" text:style-name="Bullet_20_-_20_Diamond">
          <text:list-item>
            <text:p text:style-name="P334"><text:span text:style-name="Body_20_Emphasized_20_-_20_Small">Legion:</text:span> <text:s/>A unit in the Roman army with three thousand to six thousand soldiers.</text:p>
          </text:list-item>
        </text:list>
        <text:p text:style-name="P335">Legion: <text:s/>A unit in the Roman army with three thousand to six thousand soldiers.</text:p>
        <text:list xml:id="list92019757074540" text:continue-numbering="true" text:style-name="Bullet_20_-_20_Diamond">
          <text:list-item>
            <text:p text:style-name="P334"><text:span text:style-name="Body_20_Emphasized_20_-_20_Small">Cemetery:</text:span> <text:s/>Unlike here in Cameroon where the dead are buried in the family compound, people had a special place in Jesus' time where the dead were buried. It was normally found just outside the village.</text:p>
          </text:list-item>
        </text:list>
        <text:p text:style-name="P335">Cemetery: <text:s/>Unlike here in Cameroon where the dead are buried in the family compound, people had a special place in Jesus' time where the dead were buried. It was normally found just outside the village.</text:p>
        <text:p text:style-name="P324">Song</text:p>
        <text:p text:style-name="P325">Bible Story / Lesson</text:p>
        <text:list text:continue-list="list92018094247815" text:style-name="Bullet_20_-_20_checkmark">
          <text:list-item>
            <text:p text:style-name="P333">Do people in your village talk about evil spirits?</text:p>
          </text:list-item>
        </text:list>
        <text:p text:style-name="P329">Do people in your village talk about evil spirits?</text:p>
        <text:p text:style-name="P331">(Give children time to share.)</text:p>
        <text:list text:continue-numbering="true" text:style-name="Bullet_20_-_20_checkmark">
          <text:list-item>
            <text:p text:style-name="P333">Are you afraid of evil spirits?</text:p>
          </text:list-item>
        </text:list>
        <text:p text:style-name="P329">Are you afraid of evil spirits?</text:p>
        <text:p text:style-name="P331">(Give children time to share.)</text:p>
        <text:list text:continue-numbering="true" text:style-name="Bullet_20_-_20_checkmark">
          <text:list-item>
            <text:p text:style-name="P333">Last week, we learned that Jesus has power over nature. In our Bible story this week, we will see that Jesus has power over evil spirits.</text:p>
          </text:list-item>
        </text:list>
        <text:p text:style-name="P329">Last week, we learned that Jesus has power over nature. In our Bible story this week, we will see that Jesus has power over evil spirits.</text:p>
        <text:p text:style-name="P326">Introduce Truth</text:p>
        <text:p text:style-name="P336">Our truth for today is: <text:s/>Jesus has power over evil spirits.</text:p>
        <text:p text:style-name="P337">Our truth for today is: <text:s/>Jesus has power over evil spirits.</text:p>
        <text:p text:style-name="P336">This reminds me of a true story from the Bible.</text:p>
        <text:p text:style-name="P337">This reminds me of a true story from the Bible.</text:p>
        <text:p text:style-name="P338">Bible Story: <text:s/>Luke <text:s/>8:26-39</text:p>
        <text:p text:style-name="P339">[ <text:s/>Jesus and his disciples continued their journey by boat. <text:s/>]</text:p>
        <text:p text:style-name="P339">Luke 8:26 They sailed to the region of the Gerasenes, which is across the lake from Galilee.</text:p>
        <text:p text:style-name="P340">[ <text:s/>Jesus and his disciples continued their journey by boat. <text:s/>]</text:p>
        <text:p text:style-name="P340">Luke 8:26 They sailed to the region of the Gerasenes, which is across the lake from Galilee.</text:p>
        <text:p text:style-name="P341"><draw:frame draw:style-name="fr4" draw:name="Frame29" text:anchor-type="paragraph" svg:x="-0.0181in" svg:y="0.1098in" svg:width="1.378in" draw:z-index="132"><draw:text-box fo:min-height="1.2055in"><text:p text:style-name="P342">Picture <text:s/>25–1</text:p><text:p text:style-name="P343"><draw:frame draw:style-name="fr5" draw:name="Image55" text:anchor-type="as-char" svg:width="1.2917in" svg:height="0.9366in" draw:z-index="138"><draw:image xlink:href="Pictures/100000000000015F000000FE82A96B21.jpg" xlink:type="simple" xlink:show="embed" xlink:actuate="onLoad" draw:mime-type="image/jpeg"/></draw:frame></text:p></draw:text-box></draw:frame>Luke 8:27 When Jesus stepped ashore, he was met by a demon-possessed man from the town. For a long time this man had not worn clothes or lived in a house, but had lived in the tombs.</text:p>
        <text:p text:style-name="P344">Luke 8:27 When Jesus stepped ashore, he was met by a demon-possessed man from the town. For a long time this man had not worn clothes or lived in a house, but had lived in the tombs.</text:p>
        <text:p text:style-name="P344"/>
        <text:p text:style-name="P344"/>
        <text:p text:style-name="P341"><draw:frame draw:style-name="fr4" draw:name="Frame110" text:anchor-type="paragraph" svg:x="-0.0181in" svg:y="0.0035in" svg:width="1.378in" draw:z-index="133"><draw:text-box fo:min-height="1.2055in"><text:p text:style-name="P342">Picture <text:s/>25–2</text:p><text:p text:style-name="P343"><draw:frame draw:style-name="fr5" draw:name="Image56" text:anchor-type="as-char" svg:width="1.2917in" svg:height="0.9366in" draw:z-index="139"><draw:image xlink:href="Pictures/100000000000015F000000FE86D3CF01.jpg" xlink:type="simple" xlink:show="embed" xlink:actuate="onLoad" draw:mime-type="image/jpeg"/></draw:frame></text:p></draw:text-box></draw:frame><text:span text:style-name="T24">Luke 8:28-29 When he saw Jesus, he cried out and fell at his feet, shouting at the top of his voice, “What do you want with me, Jesus, Son of the Most High God? I beg you, don’t torture me!” For Jesus had commanded the evil spirit to come out of the man. Many times it had seized him, and though he was chained hand and foot and kept under guard, he had broken his chains and had been driven by the demon into solitary places.</text:span> </text:p>
        <text:p text:style-name="P341">Luke 8:30 Jesus asked him, “What is your name?” “Legion,” he replied, because many demons had gone into him.</text:p>
        <text:p text:style-name="P344">Luke 8:28-29 When he saw Jesus, he cried out and fell at his feet, shouting at the top of his voice, “What do you want with me, Jesus, Son of the Most High God? I beg you, don’t torture me!” For Jesus had commanded the evil spirit to come out of the man. Many times it had seized him, and though he was chained <text:soft-page-break/>hand and foot and kept under guard, he had broken his chains and had been driven by the demon into solitary places.</text:p>
        <text:p text:style-name="P344">Luke 8:30 Jesus asked him, “What is your name?” “Legion,” he replied, because many demons had gone into him.</text:p>
        <text:p text:style-name="P341"><draw:frame draw:style-name="fr4" draw:name="Frame39" text:anchor-type="paragraph" svg:x="-0.0181in" svg:y="0.0035in" svg:width="1.378in" draw:z-index="134"><draw:text-box fo:min-height="1.2055in"><text:p text:style-name="P342">Picture <text:s/>25–3</text:p><text:p text:style-name="P343"><draw:frame draw:style-name="fr5" draw:name="Image57" text:anchor-type="as-char" svg:width="1.2917in" svg:height="0.9366in" draw:z-index="140"><draw:image xlink:href="Pictures/100000000000015F0000010245C82B1C.jpg" xlink:type="simple" xlink:show="embed" xlink:actuate="onLoad" draw:mime-type="image/jpeg"/></draw:frame></text:p></draw:text-box></draw:frame>Luke 8:31 And they begged him repeatedly not to order them to go into the Abyss.</text:p>
        <text:p text:style-name="P341">Luke 8:32-33 A large herd of pigs was feeding there on the hillside. The demons begged Jesus to let them go into them, and he gave them permission. When the demons came out of the man, they went into the pigs, and the herd rushed down the steep bank into the lake and was drowned.</text:p>
        <text:p text:style-name="P344">Luke 8:31 And they begged him repeatedly not to order them to go into the Abyss.</text:p>
        <text:p text:style-name="P344">Luke 8:32-33 A large herd of pigs was feeding there on the hillside. The demons begged Jesus to let them go into them, and he gave them permission. When the demons came out of the man, they went into the pigs, and the herd rushed down the steep bank into the lake and was drowned.</text:p>
        <text:p text:style-name="P341"><draw:frame draw:style-name="fr4" draw:name="Frame48" text:anchor-type="paragraph" svg:x="-0.0181in" svg:y="0.0035in" svg:width="1.378in" draw:z-index="135"><draw:text-box fo:min-height="1.2055in"><text:p text:style-name="P345">Picture <text:s/>25–4</text:p><text:p text:style-name="P346"><draw:frame draw:style-name="fr5" draw:name="Image58" text:anchor-type="as-char" svg:width="1.2917in" svg:height="0.9366in" draw:z-index="141"><draw:image xlink:href="Pictures/100000000000015F000000FE579819F0.jpg" xlink:type="simple" xlink:show="embed" xlink:actuate="onLoad" draw:mime-type="image/jpeg"/></draw:frame></text:p></draw:text-box></draw:frame>Luke 8:34-37 When those tending the pigs saw what had happened, they ran off and reported this in the town and countryside, and the people went out to see what had happened. When they came to Jesus, they found the man from whom the demons had gone out, sitting at Jesus’ feet, dressed and in his right mind; and they were afraid. Those who had seen it told the people how the demon-possessed man had been cured. Then all the people of the region of the Gerasenes asked Jesus to leave them, because they were overcome with fear. So he got into the boat and left.</text:p>
        <text:p text:style-name="P341">Luke 8:38-39 The man from whom the demons had gone out begged to go with him, but Jesus sent him away, saying, “Return home and tell how much God has done for you.” So the man went away and told all over town how much Jesus had done for him.</text:p>
        <text:p text:style-name="P344">Luke 8:34-37 When those tending the pigs saw what had happened, they ran off and reported this in the town and countryside, and the people went out to see what had happened. When they came to Jesus, they found the man from whom the demons had gone out, sitting at Jesus’ feet, dressed and in his right mind; and they were afraid. Those who had seen it told the people how the demon-possessed man had been cured. Then all the people of the region of the Gerasenes asked Jesus to leave them, because they were overcome with fear. So he got into the boat and left.</text:p>
        <text:p text:style-name="P344">Luke 8:38-39 The man from whom the demons had gone out begged to go with him, but Jesus sent him away, saying, “Return home and tell how much God has done for you.” So the man went away and told all over town how much Jesus had done for him.</text:p>
        <text:p text:style-name="P347">Application</text:p>
        <text:p text:style-name="P339">Some people say that Jesus was a normal man like you and me. People say he is not the Son of God. In our story today, we see that even evil spirits know who Jesus is, and they are afraid of him. We also see that Jesus has power over evil spirits. Jesus came to earth as a man so that he could tell us how to be set free from sin, and how to live in a way that is pleasing to God. He looked like a normal man, but he was truly the Son of God. The evil spirits knew the truth about Jesus, even though they did not serve him.</text:p>
        <text:p text:style-name="P340">Some people say that Jesus was a normal man like you and me. People say he is not the Son of God. In our story today, we see that even evil spirits know who Jesus is, and they are afraid of him. We also see that Jesus has power over evil spirits. Jesus came to earth as a man so that he could tell us how to be set free from sin, and how to live in a way that is pleasing to God. He looked like a normal man, but he was truly the Son of God. The evil spirits knew the truth about Jesus, even though they did not serve him.</text:p>
        <text:p text:style-name="P339">Our story today shows us that Jesus is truly the Son of God. It also shows us again that Jesus has amazing power; more power than thousands of evil spirits! The story also teaches us what Jesus came to do: to set people free from all sorts of evil and sin.</text:p>
        <text:p text:style-name="P340">Our story today shows us that Jesus is truly the Son of God. It also shows us again that Jesus has amazing power; more power than thousands of evil spirits! The story also teaches us what Jesus came to do: to set people free from all sorts of evil and sin.</text:p>
        <text:p text:style-name="P339">Do you agree that Jesus is the Son of God? Do you accept that he has the power to set you free from your sins? If you do, then ask Jesus to forgive you and set you free from your own sin. Then, go and tell others about the wonderful work Jesus did for you.</text:p>
        <text:p text:style-name="P340">Do you agree that Jesus is the Son of God? Do you accept that he has the power to set you free from your sins? If you do, then ask Jesus to forgive you and set you free from your own sin. Then, go and tell others about the wonderful work Jesus did for you.</text:p>
        <text:p text:style-name="P336">Jesus has power over evil spirits.</text:p>
        <text:p text:style-name="P337">Jesus has power over evil spirits.</text:p>
        <text:p text:style-name="P348">Homework</text:p>
        <text:p text:style-name="P336">Go and tell someone about something God has done for you.</text:p>
        <text:p text:style-name="P337">Go and tell someone about something God has done for you.</text:p>
        <text:p text:style-name="P324">Prayer / Song</text:p>
        <text:p text:style-name="P325"><text:soft-page-break/>Review Game</text:p>
        <text:p text:style-name="P326">Tic-Tac-Toe/Long Line</text:p>
        <text:p text:style-name="P348">Materials</text:p>
        <text:list text:continue-numbering="true" text:style-name="Bullet_20_-_20_checkmark">
          <text:list-item>
            <text:p text:style-name="P327">Draw on the blackboard, on the dirt, or on a paper a game board of two horizontal lines crossing two vertical lines.<draw:frame draw:style-name="fr11" draw:name="Image59" text:anchor-type="char" svg:y="-0.1965in" svg:width="1.1811in" svg:height="1.1811in" draw:z-index="136"><draw:image xlink:href="Pictures/10000000000000AF000000B06366BC3C.jpg" xlink:type="simple" xlink:show="embed" xlink:actuate="onLoad" draw:mime-type="image/jpeg"/></draw:frame></text:p>
          </text:list-item>
          <text:list-item>
            <text:p text:style-name="P332">One team marks the X's, one team marks the O's using chalk, marker, pen, or a stick.</text:p>
          </text:list-item>
        </text:list>
        <text:p text:style-name="P348">How to Play</text:p>
        <text:list xml:id="list92020048102467" text:continue-numbering="true" text:style-name="Bullet_20_-_20_checkmark">
          <text:list-item>
            <text:p text:style-name="P327">Divide the class into 2 teams.</text:p>
          </text:list-item>
          <text:list-item>
            <text:p text:style-name="P332">The first team tries to answer the first question. <text:s/>The teacher can use this time to explain what the children do not seem to understand.</text:p>
          </text:list-item>
          <text:list-item>
            <text:p text:style-name="P332">The child on the team that answers the question correctly comes to the front and marks and X (for team 1) or an O (for team 2) in one of the spaces on the Tic-Tac-Toe board.</text:p>
          </text:list-item>
          <text:list-item>
            <text:p text:style-name="P332">The first team to get three X's or O's in a row in any direction wins.</text:p>
          </text:list-item>
          <text:list-item>
            <text:p text:style-name="P332">Be sure to clap for both sides. <text:s/>No name-calling. <text:s/>Encourage good sportsmanship.</text:p>
          </text:list-item>
        </text:list>
        <text:p text:style-name="P348">Questions for Review Game</text:p>
        <text:list text:style-name="L30">
          <text:list-item>
            <text:p text:style-name="P349">Who came to meet Jesus as he got out of the boat? (A man possessed by evil spirits)</text:p>
          </text:list-item>
        </text:list>
        <text:p text:style-name="P329">Who came to meet Jesus as he got out of the boat? (A man possessed by evil spirits)</text:p>
        <text:list text:continue-numbering="true" text:style-name="L30">
          <text:list-item>
            <text:p text:style-name="P349">Where did the possessed man live? (In a cemetery. He did not have a home, and he was naked.)</text:p>
          </text:list-item>
        </text:list>
        <text:p text:style-name="P329">Where did the possessed man live? (In a cemetery. He did not have a home, and he was naked.)</text:p>
        <text:list text:continue-numbering="true" text:style-name="L30">
          <text:list-item>
            <text:p text:style-name="P349">What did the man do when he met Jesus? (He fell to the ground.)</text:p>
          </text:list-item>
        </text:list>
        <text:p text:style-name="P329">What did the man do when he met Jesus? (He fell to the ground.)</text:p>
        <text:list text:continue-numbering="true" text:style-name="L30">
          <text:list-item>
            <text:p text:style-name="P349">What did the evil spirits in the man call Jesus? (“Jesus, Son of the Most High God”)</text:p>
          </text:list-item>
        </text:list>
        <text:p text:style-name="P329">What did the evil spirits in the man call Jesus? (“Jesus, Son of the Most High God”)</text:p>
        <text:list text:continue-numbering="true" text:style-name="L30">
          <text:list-item>
            <text:p text:style-name="P349">How did the evil spirits feel about meeting Jesus? (They were afraid.)</text:p>
          </text:list-item>
        </text:list>
        <text:p text:style-name="P329">How did the evil spirits feel about meeting Jesus? (They were afraid.)</text:p>
        <text:list text:continue-numbering="true" text:style-name="L30">
          <text:list-item>
            <text:p text:style-name="P349">The evil spirits said their name was “Legion.” What does the word “Legion” mean? (A unit in the Roman army that had between three thousand and six thousand soldiers in it)</text:p>
          </text:list-item>
        </text:list>
        <text:p text:style-name="P329">The evil spirits said their name was “Legion.” What does the word “Legion” mean? (A unit in the Roman army that had between three thousand and six thousand soldiers in it)</text:p>
        <text:list text:continue-numbering="true" text:style-name="L30">
          <text:list-item>
            <text:p text:style-name="P349">What did it mean that the evil spirits said their name was “Legion”? (There were many evil spirits in the man, not just one. It also means they were very powerful.)</text:p>
          </text:list-item>
        </text:list>
        <text:p text:style-name="P329">What did it mean that the evil spirits said their name was “Legion”? (There were many evil spirits in the man, not just one. It also means they were very powerful.)</text:p>
        <text:list text:continue-numbering="true" text:style-name="L30">
          <text:list-item>
            <text:p text:style-name="P349">Where did the evil spirits fear that Jesus would send them? (The “bottomless pit.”)</text:p>
          </text:list-item>
        </text:list>
        <text:p text:style-name="P329">Where did the evil spirits fear that Jesus would send them? (The “bottomless pit.”)<text:tab/></text:p>
        <text:list text:continue-numbering="true" text:style-name="L30">
          <text:list-item>
            <text:p text:style-name="P349">Where did they go instead? (Into a herd of pigs)</text:p>
          </text:list-item>
        </text:list>
        <text:p text:style-name="P329">Where did they go instead? (Into a herd of pigs)</text:p>
        <text:list text:continue-numbering="true" text:style-name="L30">
          <text:list-item>
            <text:p text:style-name="P349">What happened to the pigs when the evil spirits entered them? (They became mad and they ran off a cliff into the lake and drowned.)</text:p>
          </text:list-item>
        </text:list>
        <text:p text:style-name="P329">What happened to the pigs when the evil spirits entered them? (They became mad and they ran off a cliff into the lake and drowned.)</text:p>
        <text:list text:continue-numbering="true" text:style-name="L30">
          <text:list-item>
            <text:p text:style-name="P349">How did the townspeople react to what Jesus did? (They were afraid of Jesus, and they begged him to leave.)</text:p>
          </text:list-item>
        </text:list>
        <text:p text:style-name="P329">How did the townspeople react to what Jesus did? (They were afraid of Jesus, and they begged him to leave.)</text:p>
        <text:list text:continue-numbering="true" text:style-name="L30">
          <text:list-item>
            <text:p text:style-name="P349">What did the man who was set free do? (He begged to follow Jesus back across the lake, but then he obeyed Jesus and went to tell everyone about the wonderful work that Jesus had done for him.)</text:p>
          </text:list-item>
        </text:list>
        <text:p text:style-name="P329">What did the man who was set free do? (He begged to follow Jesus back across the lake, but then he obeyed Jesus and went to tell everyone about the wonderful work that Jesus had done for him.)</text:p>
        <text:p text:style-name="P324">Song</text:p>
        <text:p text:style-name="P325"><text:soft-page-break/>Memory Verse</text:p>
        <text:p text:style-name="P348">Materials and Preparations</text:p>
        <text:list xml:id="list92020131838599" text:continue-list="list92020048102467" text:style-name="Bullet_20_-_20_checkmark">
          <text:list-item>
            <text:p text:style-name="P327">Put a bookmark in <text:s/>Luke 8:39</text:p>
          </text:list-item>
          <text:list-item>
            <text:p text:style-name="P327">Write memory verse on the blackboard.</text:p>
          </text:list-item>
        </text:list>
        <text:p text:style-name="P328">[ <text:s/>Jesus said, <text:s/>] <text:s/>Luke 8:39 “Return home and tell how much God has done for you.” So the man went away and told all over town how much Jesus had done for him.</text:p>
        <text:p text:style-name="P329">[ <text:s/>Jesus said, <text:s/>] <text:s/>Luke 8:39 “Return home and tell how much God has done for you.” So the man went away and told all over town how much Jesus had done for him.</text:p>
        <text:p text:style-name="P326">Teach and Explain</text:p>
        <text:p text:style-name="P339">Our memory verse is in the Gospel of Luke. <text:s/>That is in the New Testament, a part of the Bible.</text:p>
        <text:p text:style-name="P340">Our memory verse is in the Gospel of Luke. <text:s/>That is in the New Testament, a part of the Bible.</text:p>
        <text:list xml:id="list92019166613101" text:continue-list="list92018171259190" text:style-name="WWNum1">
          <text:list-item text:start-value="1">
            <text:p text:style-name="P350">Read the verse from your Bible.</text:p>
          </text:list-item>
          <text:list-item>
            <text:p text:style-name="P350">Read the verse by yourself as you point to the words.</text:p>
          </text:list-item>
          <text:list-item>
            <text:p text:style-name="P350">Read the verse with the children as you point to the words.</text:p>
          </text:list-item>
          <text:list-item>
            <text:p text:style-name="P350">Explain the verse:</text:p>
          </text:list-item>
        </text:list>
        <text:list text:continue-list="list92020131838599" text:style-name="Bullet_20_-_20_checkmark">
          <text:list-item>
            <text:p text:style-name="P333">Our memory verse comes from today’s Bible story.</text:p>
          </text:list-item>
        </text:list>
        <text:p text:style-name="P329">Our memory verse comes from today’s Bible story.</text:p>
        <text:list xml:id="list92019193005002" text:continue-numbering="true" text:style-name="Bullet_20_-_20_checkmark">
          <text:list-item>
            <text:p text:style-name="P327">As you read the verse, circle the words shown below. <text:s/>Explain each of these words.</text:p>
          </text:list-item>
        </text:list>
        <text:list text:continue-list="list92019757074540" text:style-name="Bullet_20_-_20_Diamond">
          <text:list-item>
            <text:p text:style-name="P334"><text:span text:style-name="Body_20_Emphasized_20_-_20_Small">Return:</text:span> <text:s/>The man set free from the evil spirits wanted to follow Jesus. But, Jesus told him to go back to his family.</text:p>
          </text:list-item>
        </text:list>
        <text:p text:style-name="P335">Return: <text:s/>The man set free from the evil spirits wanted to follow Jesus. But, Jesus told him to go back to his family.</text:p>
        <text:list text:continue-numbering="true" text:style-name="Bullet_20_-_20_Diamond">
          <text:list-item>
            <text:p text:style-name="P334"><text:span text:style-name="Body_20_Emphasized_20_-_20_Small">How much God has done:</text:span> <text:s/>Jesus wanted the man to tell others of the freedom that God gave him. Jesus wants us to tell others of the wonderful things he has done for us too.</text:p>
          </text:list-item>
        </text:list>
        <text:p text:style-name="P335">How much God has done: <text:s/>Jesus wanted the man to tell others of the freedom that God gave him. Jesus wants us to tell others of the wonderful things he has done for us too.</text:p>
        <text:list text:continue-numbering="true" text:style-name="Bullet_20_-_20_Diamond">
          <text:list-item>
            <text:p text:style-name="P334"><text:span text:style-name="Body_20_Emphasized_20_-_20_Small">All over town:</text:span> <text:s/>The man didn't just go back to his family, he was so happy to be free he told everyone all over the town. The man shared to them about what Jesus had done for him. We can do that too! We can tell everyone in the town, village, and everywhere in between how happy we are that Jesus has set us free!</text:p>
          </text:list-item>
        </text:list>
        <text:p text:style-name="P335">All over town: <text:s/>The man didn't just go back to his family, he was so happy to be free he told everyone all over the town. The man shared to them about what Jesus had done for him. We can do that too! We can tell everyone in the town, village, and everywhere in between how happy we are that Jesus has set us free!</text:p>
        <text:list text:continue-list="list92019166613101" text:style-name="WWNum1">
          <text:list-item>
            <text:p text:style-name="P350">Read the verse again by yourself as you point to the words.</text:p>
          </text:list-item>
          <text:list-item>
            <text:p text:style-name="P350">Read the verse again with the children as you point to the words.</text:p>
          </text:list-item>
        </text:list>
        <text:p text:style-name="P339">Even though the man who was set free from the evil spirits wanted to follow Jesus on his trip, Jesus wanted him to stay with his people. Jesus wanted him to tell the others about the miracle that God had done for him. We don't have to travel a long way off to tell about the wonderful gift of freedom that Jesus gives us. We can tell all the people right around us what Jesus has done to set us free.</text:p>
        <text:p text:style-name="P340">Even though the man who was set free from the evil spirits wanted to follow Jesus on his trip, Jesus wanted him to stay with his people. Jesus wanted him to tell the others about the miracle that God had done for him. We don't have to travel a long way off to tell about the wonderful gift of freedom that Jesus gives us. We can tell all the people right around us what Jesus has done to set us free.</text:p>
        <text:p text:style-name="P336">Remember our truth for the day? <text:s/><text:span text:style-name="T25">Let’s all say it together:</text:span></text:p>
        <text:p text:style-name="P337">Remember our truth for the day? <text:s/>Let’s all say it together:</text:p>
        <text:p text:style-name="P336">Jesus has power over evil spirits.</text:p>
        <text:p text:style-name="P337">Jesus has power over evil spirits.</text:p>
        <text:p text:style-name="P325">Memory Verse Review</text:p>
        <text:p text:style-name="P326">Children Repeat the Verse by Playing “Groupings”</text:p>
        <text:list xml:id="list92018187159744" text:continue-list="list92019193005002" text:style-name="Bullet_20_-_20_checkmark">
          <text:list-item>
            <text:p text:style-name="P327">Talk about different ways to group people. (All boys, all girls, all children who ate fufu corn this week, all the children wearing read, all the children in class 2, etc.)</text:p>
          </text:list-item>
          <text:list-item>
            <text:p text:style-name="P332">Ask the children the first question.</text:p>
          </text:list-item>
          <text:list-item>
            <text:p text:style-name="P332">When a question is answered correctly, that child chooses one of the groups listed above or chooses their own group.</text:p>
          </text:list-item>
          <text:list-item>
            <text:p text:style-name="P332">The verse is said out loud together by the group chosen.</text:p>
          </text:list-item>
          <text:list-item>
            <text:p text:style-name="P332"><text:soft-page-break/>Then the next question is asked.</text:p>
          </text:list-item>
          <text:list-item>
            <text:p text:style-name="P332">When that question is answered correctly, another child chooses one of the groups.</text:p>
          </text:list-item>
          <text:list-item>
            <text:p text:style-name="P332">The verse is said aloud again by the group chosen.</text:p>
          </text:list-item>
          <text:list-item>
            <text:p text:style-name="P332">Do this until all the questions are asked.</text:p>
          </text:list-item>
        </text:list>
        <text:p text:style-name="P348">Questions for Memory Verse</text:p>
        <text:list text:style-name="L31">
          <text:list-item text:start-value="1">
            <text:p text:style-name="P351">What did the man who was set free from the evil spirits want to do? (He wanted to join Jesus in the boat, and follow him to the other side. He did not want to leave Jesus.)</text:p>
          </text:list-item>
        </text:list>
        <text:p text:style-name="P329">What did the man who was set free from the evil spirits want to do? (He wanted to join Jesus in the boat, and follow him to the other side. He did not want to leave Jesus.)</text:p>
        <text:list text:continue-numbering="true" text:style-name="L31">
          <text:list-item>
            <text:p text:style-name="P351">What did Jesus want him to do? (Stay and tell his family about the wonderful work God had done for him)</text:p>
          </text:list-item>
        </text:list>
        <text:p text:style-name="P329">What did Jesus want him to do? (Stay and tell his family about the wonderful work God had done for him)</text:p>
        <text:list text:continue-numbering="true" text:style-name="L31">
          <text:list-item>
            <text:p text:style-name="P351">What did the man do? (Obeyed Jesus and stayed, but he did not just tell his family. The man told EVERYONE!)</text:p>
          </text:list-item>
        </text:list>
        <text:p text:style-name="P329">What did the man do? (Obeyed Jesus and stayed, but he did not just tell his family. The man told EVERYONE!)</text:p>
        <text:list text:continue-numbering="true" text:style-name="L31">
          <text:list-item>
            <text:p text:style-name="P351">What did Jesus come to earth to do? (Set people free from evil and sin, so that they can live in a way that is pleasing to God)</text:p>
          </text:list-item>
        </text:list>
        <text:p text:style-name="P329">What did Jesus come to earth to do? (Set people free from evil and sin, so that they can live in a way that is pleasing to God)</text:p>
        <text:list text:continue-numbering="true" text:style-name="L31">
          <text:list-item>
            <text:p text:style-name="P351">Who should we share to that Jesus has set us free from sin? (Everyone)</text:p>
          </text:list-item>
        </text:list>
        <text:p text:style-name="P329">Who should we share to that Jesus has set us free from sin? (Everyone)</text:p>
        <text:p text:style-name="P324">Song</text:p>
        <text:p text:style-name="P325">Closing and Homework</text:p>
        <text:list text:continue-list="list92018187159744" text:style-name="Bullet_20_-_20_checkmark">
          <text:list-item>
            <text:p text:style-name="P327">Say the truth together:</text:p>
          </text:list-item>
        </text:list>
        <text:p text:style-name="P328">Jesus has power over evil spirits.</text:p>
        <text:p text:style-name="P329">Jesus has power over evil spirits.</text:p>
        <text:list text:continue-numbering="true" text:style-name="Bullet_20_-_20_checkmark">
          <text:list-item>
            <text:p text:style-name="P327">Say the memory verse together:</text:p>
          </text:list-item>
        </text:list>
        <text:p text:style-name="P328">[ <text:s/>Jesus said, <text:s/>] <text:s/>Luke 8:39 “Return home and tell how much God has done for you.” So the man went away and told all over town how much Jesus had done for him.</text:p>
        <text:p text:style-name="P329">[ <text:s/>Jesus said, <text:s/>] <text:s/>Luke 8:39 “Return home and tell how much God has done for you.” So the man went away and told all over town how much Jesus had done for him.</text:p>
        <text:list text:continue-numbering="true" text:style-name="Bullet_20_-_20_checkmark">
          <text:list-item>
            <text:p text:style-name="P327">Review the homework:</text:p>
          </text:list-item>
        </text:list>
        <text:p text:style-name="P328">Go and tell someone about something God has done for you. <text:s/><text:span text:style-name="T26">Be ready to share your stories next week.</text:span></text:p>
        <text:p text:style-name="P329">Go and tell someone about something God has done for you. <text:s/>Be ready to share your stories next week.</text:p>
        <text:list xml:id="list92018961866980" text:continue-numbering="true" text:style-name="Bullet_20_-_20_checkmark">
          <text:list-item>
            <text:p text:style-name="P327">Give any needed announcements.</text:p>
          </text:list-item>
        </text:list>
        <text:p text:style-name="P326">Closing Prayer</text:p>
        <text:p text:style-name="P352"><text:span text:style-name="Body_20_Emphasized_20_-_20_Small">Thank God <text:s/></text:span>that He has power over evil spirits.</text:p>
        <text:p text:style-name="P352"><text:span text:style-name="Body_20_Emphasized_20_-_20_Small">Ask God <text:s/></text:span>that the children will remember how powerful God is and go and tell someone about something God has done for them.</text:p>
        <text:p text:style-name="P353">Colouring page to colour and take home!</text:p>
      </text:section>
      <text:p text:style-name="Body"/>
      <text:p text:style-name="P54">Jesus has power over evil spirits.</text:p>
      <text:p text:style-name="Bible_20_Story_20_-_20_Graphic_20_Number"/>
      <text:p text:style-name="Bible_20_Story_20_-_20_Graphic_20_Number"><draw:frame draw:style-name="fr7" draw:name="Image60" text:anchor-type="as-char" svg:width="5.2165in" svg:height="4.0134in" draw:z-index="142"><draw:image xlink:href="Pictures/100000010000061D000004B4A5884E27.tif" xlink:type="simple" xlink:show="embed" xlink:actuate="onLoad" draw:mime-type="image/tiff"/></draw:frame></text:p>
      <text:p text:style-name="Bible_20_Story_20_-_20_Graphic_20_Number"/>
      <text:p text:style-name="M.T._20_Coloring_20_Page_20_-_20_Memory_20_Verse">[ <text:s/>Jesus said, <text:s/>] <text:s/>Luke 8:39 “Return home and tell how much God has done for you.” So the man went away and told all over town how much Jesus had done for him.</text:p>
      <text:p text:style-name="P55">Jesus has power over evil spirits.</text:p>
      <text:p text:style-name="Bible_20_Story_20_-_20_Graphic_20_Number"/>
      <text:p text:style-name="Bible_20_Story_20_-_20_Graphic_20_Number"><draw:frame draw:style-name="fr7" draw:name="Image61" text:anchor-type="as-char" svg:width="5.2165in" svg:height="4.0134in" draw:z-index="143"><draw:image xlink:href="Pictures/100000010000061D000004B4A5884E27.tif" xlink:type="simple" xlink:show="embed" xlink:actuate="onLoad" draw:mime-type="image/tiff"/></draw:frame></text:p>
      <text:p text:style-name="Bible_20_Story_20_-_20_Graphic_20_Number"/>
      <text:p text:style-name="Bible_20_Story_20_-_20_Graphic_20_Number">[ <text:s/>Jesus said, <text:s/>] <text:s/>Luke 8:39 “Return home and tell how much God has done for you.” So the man went away and told all over town how much Jesus had done for him.</text:p>
      <text:h text:style-name="P25" text:outline-level="1"><draw:frame draw:style-name="fr3" draw:name="Image62" text:anchor-type="char" svg:x="0in" svg:y="0.0161in" svg:width="1.0752in" svg:height="1.0752in" draw:z-index="145"><draw:image xlink:href="Pictures/10000001000000D8000000D8D71C9DDC.png" xlink:type="simple" xlink:show="embed" xlink:actuate="onLoad" draw:mime-type="image/png"/></draw:frame>Review Lesson</text:h>
      <text:p text:style-name="M.T._20_Lesson_20_Title">Review Lesson</text:p>
      <text:p text:style-name="P354">Review Lesson</text:p>
      <text:p text:style-name="M.T._20_Text_20_-_20_Lesson_20_Title_20_Scrip_20_Reference">Lessons 21-25</text:p>
      <text:p text:style-name="P355">NOTE: <text:s/>It is important to review the lessons previously taught to help the children remember what they have learned. <text:s/>It is also important to make the review lessons exciting and fun! <text:s/>Turn the whole lesson into a game. <text:s/>If you have time, have the children act out their favourite stories while you read it from the “Picture Book”.</text:p>
      <text:p text:style-name="Sub-Head_20_1">Materials</text:p>
      <text:list text:continue-numbering="true" text:style-name="Bullet_20_-_20_checkmark">
        <text:list-item>
          <text:p text:style-name="P356">Quarter <text:s/><text:span text:style-name="T9">2</text:span> <text:s/>Picture book, Bible, chalk</text:p>
        </text:list-item>
        <text:list-item>
          <text:p text:style-name="Body_20_Bullet_20_-_20_Checkmark">Ball <text:s/>(Make a ball by tying wrappen (plastic bag) into knots many times, or fill an old sock with scrap material.)</text:p>
        </text:list-item>
        <text:list-item>
          <text:p text:style-name="Body_20_Bullet_20_-_20_Checkmark">Bush lamp or candle</text:p>
        </text:list-item>
        <text:list-item>
          <text:p text:style-name="Body_20_Bullet_20_-_20_Checkmark">Matches</text:p>
        </text:list-item>
      </text:list>
      <text:section text:style-name="Sect1" text:name="L-26 Detail Plan">
        <text:p text:style-name="P357">Opening</text:p>
        <text:p text:style-name="P358">Song</text:p>
        <text:p text:style-name="P358">Welcome</text:p>
        <text:list text:continue-numbering="true" text:style-name="Bullet_20_-_20_checkmark">
          <text:list-item>
            <text:p text:style-name="P359">Be sure the children know you are happy to see them!</text:p>
          </text:list-item>
          <text:list-item>
            <text:p text:style-name="P359">Introduce yourself and your helpers.</text:p>
          </text:list-item>
        </text:list>
        <text:p text:style-name="P358">Sharing Time</text:p>
        <text:list text:continue-numbering="true" text:style-name="Bullet_20_-_20_checkmark">
          <text:list-item>
            <text:p text:style-name="P359">Say the truth from the previous lesson together:</text:p>
          </text:list-item>
        </text:list>
        <text:p text:style-name="P360">Jesus has power over evil spirits.</text:p>
        <text:p text:style-name="P361">Jesus has power over evil spirits.</text:p>
        <text:list text:continue-numbering="true" text:style-name="Bullet_20_-_20_checkmark">
          <text:list-item>
            <text:p text:style-name="P359">Say the memory verse from the previous lesson together:</text:p>
          </text:list-item>
        </text:list>
        <text:p text:style-name="P360">[ <text:s/>Jesus said, <text:s/>] <text:s/>Luke 8:39 “Return home and tell how much God has done for you.” So the man went away and told all over town how much Jesus had done for him.</text:p>
        <text:p text:style-name="P361">[ <text:s/>Jesus said, <text:s/>] <text:s/>Luke 8:39 “Return home and tell how much God has done for you.” So the man went away and told all over town how much Jesus had done for him.</text:p>
        <text:list text:continue-numbering="true" text:style-name="Bullet_20_-_20_checkmark">
          <text:list-item>
            <text:p text:style-name="P359">Review the homework from the previous lesson:</text:p>
          </text:list-item>
        </text:list>
        <text:p text:style-name="P360">Did you go and tell someone about something God has done for you?</text:p>
        <text:p text:style-name="P361">Did you go and tell someone about something God has done for you?</text:p>
        <text:p text:style-name="P362">(Give children time to share.)</text:p>
        <text:p text:style-name="P358">Prayer</text:p>
        <text:list text:continue-numbering="true" text:style-name="Bullet_20_-_20_checkmark">
          <text:list-item>
            <text:p text:style-name="P359">Let the children share praises and prayer requests.</text:p>
          </text:list-item>
          <text:list-item>
            <text:p text:style-name="P359">Keep a record of what the children are sharing so you can remember to thank God together for answered prayers.</text:p>
          </text:list-item>
          <text:list-item>
            <text:p text:style-name="P359">Spend time praying together. <text:s/>Let the children pray out loud if they volunteer. <text:s/>Do not force anyone to pray out loud.</text:p>
          </text:list-item>
        </text:list>
        <text:p text:style-name="P363">Song</text:p>
        <text:p text:style-name="P364">Today we are going to do another review lesson. We are going to review all the words, truths, stories and memory verses that we have had up to this point. We are going to start with a game right now!</text:p>
        <text:p text:style-name="P365">Today we are going to do another review lesson. We are going to review all the words, truths, stories and memory verses that we have had up to this point. We are going to start with a game right now!</text:p>
        <text:p text:style-name="P357"><text:soft-page-break/>Review Game</text:p>
        <text:p text:style-name="P358">Throw the Ball at the Target on the Wall</text:p>
        <text:p text:style-name="P366">Materials</text:p>
        <text:list text:continue-numbering="true" text:style-name="Bullet_20_-_20_checkmark">
          <text:list-item>
            <text:p text:style-name="P367">Make a target as shown on the blackboard or wall.<draw:frame draw:style-name="fr13" draw:name="Image63" text:anchor-type="char" svg:y="-0.3937in" svg:width="1.1811in" svg:height="1.1811in" draw:z-index="144"><draw:image xlink:href="Pictures/10000001000000EC000000EDC07F7958.png" xlink:type="simple" xlink:show="embed" xlink:actuate="onLoad" draw:mime-type="image/png"/><draw:contour-polygon svg:width="1.5531in" svg:height="1.5598in" svg:viewBox="0 0 3945 3962" draw:points="16,16 16,33 16,50 16,67 16,84 16,101 16,118 16,135 16,152 16,169 16,186 16,203 16,220 16,236 16,253 16,270 16,287 16,304 16,321 16,338 16,355 16,372 16,389 16,406 16,423 16,440 16,457 16,473 16,490 16,507 16,524 16,541 16,558 16,575 16,592 16,609 16,626 16,643 16,660 16,677 16,694 16,710 16,727 16,744 16,761 16,778 16,795 16,812 16,829 16,846 16,863 16,880 16,897 16,914 16,931 16,947 16,964 16,981 16,998 16,1015 16,1032 16,1049 16,1066 16,1083 16,1100 16,1117 16,1134 16,1151 16,1168 16,1184 16,1201 16,1218 16,1235 16,1252 16,1269 16,1286 16,1303 16,1320 16,1337 16,1354 16,1371 16,1388 16,1405 16,1421 16,1438 16,1455 16,1472 16,1489 16,1506 16,1523 16,1540 16,1557 16,1574 16,1591 16,1608 16,1625 16,1642 16,1658 16,1675 16,1692 16,1709 16,1726 16,1743 16,1760 16,1777 16,1794 16,1811 16,1828 16,1845 16,1862 16,1879 16,1895 16,1912 16,1929 16,1946 16,1963 16,1980 16,1997 16,2014 16,2031 16,2048 16,2065 16,2082 16,2099 16,2116 16,2132 16,2149 16,2166 16,2183 16,2200 16,2217 16,2234 16,2251 16,2268 16,2285 16,2302 16,2319 16,2336 16,2353 16,2369 16,2386 16,2403 16,2420 16,2437 16,2454 16,2471 16,2488 16,2505 16,2522 16,2539 16,2556 16,2573 16,2590 16,2606 16,2623 16,2640 16,2657 16,2674 16,2691 16,2708 16,2725 16,2742 16,2759 16,2776 16,2793 16,2810 16,2827 16,2843 16,2860 16,2877 16,2894 16,2911 16,2928 16,2945 16,2962 16,2979 16,2996 16,3013 16,3030 16,3047 16,3064 16,3080 16,3097 16,3114 16,3131 16,3148 16,3165 16,3182 16,3199 16,3216 16,3233 16,3250 16,3267 16,3284 16,3301 16,3317 16,3334 16,3351 16,3368 16,3385 16,3402 16,3419 16,3436 16,3453 16,3470 16,3487 16,3504 16,3521 16,3538 16,3554 16,3571 16,3588 16,3605 16,3622 16,3639 16,3656 16,3673 16,3690 16,3707 16,3724 16,3741 16,3758 16,3775 16,3791 16,3808 16,3825 16,3842 16,3859 16,3876 16,3893 16,3910 16,3927 16,3944 16,3961 16,3978 3961,3978 3961,3961 3961,3944 3961,3927 3961,3910 3961,3893 3961,3876 3961,3859 3961,3842 3961,3825 3961,3808 3961,3791 3961,3775 3961,3758 3961,3741 3961,3724 3961,3707 3961,3690 3961,3673 3961,3656 3961,3639 3961,3622 3961,3605 3961,3588 3961,3571 3961,3554 3961,3538 3961,3521 3961,3504 3961,3487 3961,3470 3961,3453 3961,3436 3961,3419 3961,3402 3961,3385 3961,3368 3961,3351 3961,3334 3961,3317 3961,3301 3961,3284 3961,3267 3961,3250 3961,3233 3961,3216 3961,3199 3961,3182 3961,3165 3961,3148 3961,3131 3961,3114 3961,3097 3961,3080 3961,3064 3961,3047 3961,3030 3961,3013 3961,2996 3961,2979 3961,2962 3961,2945 3961,2928 3961,2911 3961,2894 3961,2877 3961,2860 3961,2843 3961,2827 3961,2810 3961,2793 3961,2776 3961,2759 3961,2742 3961,2725 3961,2708 3961,2691 3961,2674 3961,2657 3961,2640 3961,2623 3961,2606 3961,2590 3961,2573 3961,2556 3961,2539 3961,2522 3961,2505 3961,2488 3961,2471 3961,2454 3961,2437 3961,2420 3961,2403 3961,2386 3961,2369 3961,2353 3961,2336 3961,2319 3961,2302 3961,2285 3961,2268 3961,2251 3961,2234 3961,2217 3961,2200 3961,2183 3961,2166 3961,2149 3961,2132 3961,2116 3961,2099 3961,2082 3961,2065 3961,2048 3961,2031 3961,2014 3961,1997 3961,1980 3961,1963 3961,1946 3961,1929 3961,1912 3961,1895 3961,1879 3961,1862 3961,1845 3961,1828 3961,1811 3961,1794 3961,1777 3961,1760 3961,1743 3961,1726 3961,1709 3961,1692 3961,1675 3961,1658 3961,1642 3961,1625 3961,1608 3961,1591 3961,1574 3961,1557 3961,1540 3961,1523 3961,1506 3961,1489 3961,1472 3961,1455 3961,1438 3961,1421 3961,1405 3961,1388 3961,1371 3961,1354 3961,1337 3961,1320 3961,1303 3961,1286 3961,1269 3961,1252 3961,1235 3961,1218 3961,1201 3961,1184 3961,1168 3961,1151 3961,1134 3961,1117 3961,1100 3961,1083 3961,1066 3961,1049 3961,1032 3961,1015 3961,998 3961,981 3961,964 3961,947 3961,931 3961,914 3961,897 3961,880 3961,863 3961,846 3961,829 3961,812 3961,795 3961,778 3961,761 3961,744 3961,727 3961,710 3961,694 3961,677 3961,660 3961,643 3961,626 3961,609 3961,592 3961,575 3961,558 3961,541 3961,524 3961,507 3961,490 3961,473 3961,457 3961,440 3961,423 3961,406 3961,389 3961,372 3961,355 3961,338 3961,321 3961,304 3961,287 3961,270 3961,253 3961,236 3961,220 3961,203 3961,186 3961,169 3961,152 3961,135 3961,118 3961,101 3961,84 3961,67 3961,50 3961,33 3961,16" draw:recreate-on-edit="true"/></draw:frame></text:p>
          </text:list-item>
          <text:list-item>
            <text:p text:style-name="P368">Ball <text:s/>(Make a ball by tying wrappen (plastic bag) into knots many times, or fill an old sock with scrap material.)</text:p>
          </text:list-item>
          <text:list-item>
            <text:p text:style-name="P368">Draw a line on the floor for the children to stand behind.</text:p>
          </text:list-item>
          <text:list-item>
            <text:p text:style-name="P367">Review the different ways they have thrown the ball at the target (The regular way, under one leg, back to the target, under spread legs with back to the target)</text:p>
          </text:list-item>
          <text:list-item>
            <text:p text:style-name="P369">Have children vote on their favourite way to throw the ball. (For each lesson review, the children can vote on a different way to throw the ball. Children could even suggest a new way to throw the ball.) <text:s/></text:p>
          </text:list-item>
        </text:list>
        <text:p text:style-name="P366">How to Play</text:p>
        <text:list xml:id="list92018879103615" text:continue-numbering="true" text:style-name="Bullet_20_-_20_checkmark">
          <text:list-item>
            <text:p text:style-name="P359">Divide the class into 2 teams.</text:p>
          </text:list-item>
          <text:list-item>
            <text:p text:style-name="P368">The first team tries to answer the first question. <text:s/>The teacher can use this time to explain what the children do not seem to understand.</text:p>
          </text:list-item>
          <text:list-item>
            <text:p text:style-name="P368">The student on the team that answers the question correctly comes to the front and stands behind the line with their back facing the target. <text:s/>If the child only gets part of the question correct, the teacher can fill in the rest. <text:s/>The child can also ask for help from another child on his/her team. <text:s/>Help the child to succeed.</text:p>
          </text:list-item>
          <text:list-item>
            <text:p text:style-name="P368">The student then tries to throw the ball at the target.</text:p>
          </text:list-item>
          <text:list-item>
            <text:p text:style-name="P368"><text:span text:style-name="Body_20_Emphasized_20_-_20_Underline">That student then tries to throw the ball at the target in the way they chose.</text:span></text:p>
          </text:list-item>
          <text:list-item>
            <text:p text:style-name="P368">Wherever the ball hits shows how many points that team has.</text:p>
          </text:list-item>
          <text:list-item>
            <text:p text:style-name="P368">Record the points. <text:s/>The team with the most points wins.</text:p>
          </text:list-item>
          <text:list-item>
            <text:p text:style-name="P368">Be sure to clap for both sides. <text:s/>No name-calling. <text:s/>Encourage good sportsmanship.</text:p>
          </text:list-item>
        </text:list>
        <text:p text:style-name="P370"/>
        <text:p text:style-name="P371">NOTE: <text:s/>It is important to remember that this is a review. Teach the key points, but DO NOT teach the entire story again.</text:p>
        <text:p text:style-name="P357">Lesson <text:s/>21</text:p>
        <text:p text:style-name="P372">A Woman Wipes Jesus' Feet</text:p>
        <text:p text:style-name="P364">We have heard in other lessons how Jesus loves sinners. In Lesson 21, we saw how Jesus treated another sinner, an immoral woman that came to see him while he was eating at a Pharisee's house. This woman was so sorry for her sins and loved Jesus so much that she washed Jesus' feet with her tears and wiped them with her hair and anointed him with expensive perfume. Jesus forgave this woman of her sins. The Pharisee did not like that Jesus again was allowing sinners to be near him, but Jesus said that this woman's many sins have been forgiven, so she has shown me much love. She was saved because of her faith in Jesus.</text:p>
        <text:p text:style-name="P365">We have heard in other lessons how Jesus loves sinners. In Lesson 21, we saw how Jesus treated another sinner, an immoral woman that came to see him while he was eating at a Pharisee's house. This woman was so sorry for her sins and loved Jesus so much that she washed Jesus' feet with her tears and wiped them with her hair and anointed him with expensive perfume. Jesus forgave this woman of her sins. The Pharisee did not like that Jesus again was allowing sinners to be near him, but Jesus said that this woman's many sins have been forgiven, so she has shown me much love. She was saved because of her faith in Jesus. </text:p>
        <text:p text:style-name="P373">The truth of this lesson is: <text:s/>Jesus forgives our sins.</text:p>
        <text:p text:style-name="P374">The truth of this lesson is: <text:s/>Jesus forgives our sins.</text:p>
        <text:p text:style-name="P366">Questions for Review</text:p>
        <text:list text:style-name="L32">
          <text:list-item>
            <text:p text:style-name="P375">Why did the woman do those things to Jesus? (She loved him very much, and she was showing her gratitude.)</text:p>
          </text:list-item>
        </text:list>
        <text:p text:style-name="P361">Why did the woman do those things to Jesus? (She loved him very much, and she was showing her gratitude.)</text:p>
        <text:list text:continue-numbering="true" text:style-name="L32">
          <text:list-item>
            <text:p text:style-name="P375">Why was the woman saved? (She had faith.)</text:p>
          </text:list-item>
        </text:list>
        <text:p text:style-name="P361">Why was the woman saved? (She had faith.)</text:p>
        <text:list text:continue-numbering="true" text:style-name="L32">
          <text:list-item>
            <text:p text:style-name="P375">What is faith? (Having complete trust or confidence in something or someone)</text:p>
          </text:list-item>
        </text:list>
        <text:p text:style-name="P361">What is faith? (Having complete trust or confidence in something or someone)</text:p>
        <text:list text:continue-numbering="true" text:style-name="L32">
          <text:list-item>
            <text:p text:style-name="P375">How does our debt of sin get forgiven? (By putting our complete trust or confidence in Jesus)</text:p>
          </text:list-item>
        </text:list>
        <text:p text:style-name="P361">How does our debt of sin get forgiven? (By putting our complete trust or confidence in Jesus)</text:p>
        <text:list text:continue-numbering="true" text:style-name="L32">
          <text:list-item>
            <text:p text:style-name="P375"><text:soft-page-break/>What is the truth from this lesson? <text:s/>( <text:s/>Jesus forgives our sins. <text:s/>)</text:p>
          </text:list-item>
        </text:list>
        <text:p text:style-name="P361">What is the truth from this lesson? <text:s/>( <text:s/>Jesus forgives our sins. <text:s/>)</text:p>
        <text:list text:continue-numbering="true" text:style-name="L32">
          <text:list-item>
            <text:p text:style-name="P375">What was the memory verse from this lesson? <text:s/>( <text:s/>Luke 7:48 Jesus said to her, “Your sins are forgiven.” <text:s/>Luke 7:50 Jesus said to the woman, “Your faith has saved you; go in peace.” <text:s/>)</text:p>
          </text:list-item>
        </text:list>
        <text:p text:style-name="P361">What was the memory verse from this lesson? <text:s/>( <text:s/>Luke 7:48 Jesus said to her, “Your sins are forgiven.” <text:s/>Luke 7:50 Jesus said to the woman, “Your faith has saved you; go in peace.” <text:s/>)</text:p>
        <text:p text:style-name="P357">Lesson <text:s/>22</text:p>
        <text:p text:style-name="P358">The Seed and the Sower</text:p>
        <text:p text:style-name="P364">In Lesson 22, Jesus told a parable about a farmer who planted his seeds. The seeds fell in four places. Do you remember the four places the seeds fell? (On the footpath, on the shallow soil with rocks below, among the thorns, and on the fertile soil.)</text:p>
        <text:p text:style-name="P365">In Lesson 22, Jesus told a parable about a farmer who planted his seeds. The seeds fell in four places. Do you remember the four places the seeds fell? (On the footpath, on the shallow soil with rocks below, among the thorns, and on the fertile soil.)</text:p>
        <text:p text:style-name="P364">Do you remember what happened to them? (The seeds on the footpath were stepped on and carried away, the seeds on the rocky soil grew but withered because of lack of moisture, the seeds in the thorny patch were choked by the thorns, and the seeds on the fertile soil grew and produced a big crop.)</text:p>
        <text:p text:style-name="P365">Do you remember what happened to them? (The seeds on the footpath were stepped on and carried away, the seeds on the rocky soil grew but withered because of lack of moisture, the seeds in the thorny patch were choked by the thorns, and the seeds on the fertile soil grew and produced a big crop.)</text:p>
        <text:p text:style-name="P364">Then Jesus explained what it meant. The seed is the message of God. The hard footpath is the people who hear the message, but the devil comes and steals it away. The rocky soil is people who believe with joy, but they stop believing when it becomes difficult. The thorny ground is the people who believe, but quickly that message is crowded out by the cares and riches of the world. And the fertile soil is the people who believe God's word, love it, and have fruitful lives.</text:p>
        <text:p text:style-name="P365">Then Jesus explained what it meant. The seed is the message of God. The hard footpath is the people who hear the message, but the devil comes and steals it away. The rocky soil is people who believe with joy, but they stop believing when it becomes difficult. The thorny ground is the people who believe, but quickly that message is crowded out by the cares and riches of the world. And the fertile soil is the people who believe God's word, love it, and have fruitful lives.</text:p>
        <text:p text:style-name="P373">The truth of this lesson is: <text:s/>Follow Jesus no matter the cost.</text:p>
        <text:p text:style-name="P374">The truth of this lesson is: <text:s/>Follow Jesus no matter the cost.</text:p>
        <text:p text:style-name="P366">Questions for Review</text:p>
        <text:list text:style-name="L33">
          <text:list-item text:start-value="1">
            <text:p text:style-name="P376">What did the seed represent? (The message of God)</text:p>
          </text:list-item>
        </text:list>
        <text:p text:style-name="P361">What did the seed represent? (The message of God)</text:p>
        <text:list text:continue-numbering="true" text:style-name="L33">
          <text:list-item>
            <text:p text:style-name="P376">What kind of soil are those who hear the message, but then the devil comes and steals it away and prevents them from believing and being saved? (The footpath)</text:p>
          </text:list-item>
        </text:list>
        <text:p text:style-name="P361">What kind of soil are those who hear the message, but then the devil comes and steals it away and prevents them from believing and being saved? (The footpath)</text:p>
        <text:list text:continue-numbering="true" text:style-name="L33">
          <text:list-item>
            <text:p text:style-name="P376">What kind of soil are those who hear the message with joy, but their roots don't go very deep, and they believe for a while, but they wilt when the hot winds of testing blow? (The rocky soil)</text:p>
          </text:list-item>
        </text:list>
        <text:p text:style-name="P361">What kind of soil are those who hear the message with joy, but their roots don't go very deep, and they believe for a while, but they wilt when the hot winds of testing blow? (The rocky soil)<text:tab/></text:p>
        <text:list text:continue-numbering="true" text:style-name="L33">
          <text:list-item>
            <text:p text:style-name="P376">What kind of soil are those who hear and accept the message, but quickly the message is crowded out by the cares, riches, and pleasures of this life? (The thorny soil)</text:p>
          </text:list-item>
        </text:list>
        <text:p text:style-name="P361">What kind of soil are those who hear and accept the message, but quickly the message is crowded out by the cares, riches, and pleasures of this life? (The thorny soil)</text:p>
        <text:list text:continue-numbering="true" text:style-name="L33">
          <text:list-item>
            <text:p text:style-name="P376">What kind of soil are those who are honest, good-hearted people who hear God's message, cling to it, and they steadily produce a huge harvest.? (The fertile soil)</text:p>
          </text:list-item>
        </text:list>
        <text:p text:style-name="P361">What kind of soil are those who are honest, good-hearted people who hear God's message, cling to it, and they steadily produce a huge harvest.? (The fertile soil)</text:p>
        <text:list text:continue-numbering="true" text:style-name="L33">
          <text:list-item>
            <text:p text:style-name="P376">What is the truth from this lesson? <text:s/>( <text:s/>Follow Jesus no matter the cost. <text:s/>)</text:p>
          </text:list-item>
        </text:list>
        <text:p text:style-name="P361">What is the truth from this lesson? <text:s/>( <text:s/>Follow Jesus no matter the cost. <text:s/>)</text:p>
        <text:p text:style-name="P366">Additional Questions (Not for the Game)</text:p>
        <text:list text:style-name="L34">
          <text:list-item text:start-value="1">
            <text:p text:style-name="P377">What kind of soil would you like to be?</text:p>
          </text:list-item>
        </text:list>
        <text:p text:style-name="P361">What kind of soil would you like to be?</text:p>
        <text:p text:style-name="P362">(Give children time to answer.)</text:p>
        <text:list text:continue-numbering="true" text:style-name="L34">
          <text:list-item>
            <text:p text:style-name="P377">Why do you want to be fertile soil?</text:p>
          </text:list-item>
        </text:list>
        <text:p text:style-name="P361">Why do you want to be fertile soil?</text:p>
        <text:p text:style-name="P362"><text:soft-page-break/>(Give children time to answer.)</text:p>
        <text:p text:style-name="P357">Lesson <text:s/>23</text:p>
        <text:p text:style-name="P358">The Lamp on a Stand</text:p>
        <text:list xml:id="list92018995911402" text:continue-list="list92018879103615" text:style-name="Bullet_20_-_20_checkmark">
          <text:list-item>
            <text:p text:style-name="P359">Light the bush lamp or candle</text:p>
          </text:list-item>
        </text:list>
        <text:p text:style-name="P360">I lit this lamp (or candle) to remind you of what we learned in Lesson 23. Do you remember what we learned about this light?</text:p>
        <text:p text:style-name="P361">I lit this lamp (or candle) to remind you of what we learned in Lesson 23. Do you remember what we learned about this light?</text:p>
        <text:p text:style-name="P360">Jesus came to earth to die on a cross as a sacrifice to pay the penalty of our sins. When we believe in Jesus as our Saviour, his truth shines like a light in our lives. Our life changes, and people begin to see that. We become God's lamp to show His light in the dark world around us. Just like this light, we want to shine.</text:p>
        <text:p text:style-name="P361">Jesus came to earth to die on a cross as a sacrifice to pay the penalty of our sins. When we believe in Jesus as our Saviour, his truth shines like a light in our lives. Our life changes, and people begin to see that. We become God's lamp to show His light in the dark world around us. Just like this light, we want to shine.</text:p>
        <text:p text:style-name="P360">Do we want to hide this light?</text:p>
        <text:p text:style-name="P361">Do we want to hide this light?</text:p>
        <text:p text:style-name="P360">In the same way, we don't want to hide the light of God's truth in our lives. We need to shine brightly to others so that they will also find the truth about Jesus and his teachings.</text:p>
        <text:p text:style-name="P361">In the same way, we don't want to hide the light of God's truth in our lives. We need to shine brightly to others so that they will also find the truth about Jesus and his teachings.</text:p>
        <text:p text:style-name="P360">The truth of this lesson is: <text:s/>Jesus shines through us.</text:p>
        <text:p text:style-name="P361">The truth of this lesson is: <text:s/>Jesus shines through us.</text:p>
        <text:p text:style-name="P366">Questions for Review</text:p>
        <text:list text:style-name="L35">
          <text:list-item text:start-value="1">
            <text:p text:style-name="P378">What was the memory verse for this lesson? <text:s/>( <text:s/>Luke 8:16 No one lights a lamp and hides it in with a jar or puts it under a bed. Instead, he puts it on a stand so that those who come in can see the light. <text:s/>)</text:p>
          </text:list-item>
        </text:list>
        <text:p text:style-name="P361">What was the memory verse for this lesson? <text:s/>( <text:s/>Luke 8:16 No one lights a lamp and hides it in with a jar or puts it under a bed. Instead, he puts it on a stand so that those who come in can see the light. <text:s/>)</text:p>
        <text:list text:continue-numbering="true" text:style-name="L35">
          <text:list-item>
            <text:p text:style-name="P378">What is the truth from this lesson? <text:s/>( <text:s/>Jesus shines through us. <text:s/>)</text:p>
          </text:list-item>
        </text:list>
        <text:p text:style-name="P361">What is the truth from this lesson? <text:s/>( <text:s/>Jesus shines through us. <text:s/>)</text:p>
        <text:list text:continue-numbering="true" text:style-name="L35">
          <text:list-item>
            <text:p text:style-name="P378">What is one way we can shine for Jesus? (Sharing with others the truth of who Jesus is, following the teachings of Jesus, etc.)</text:p>
          </text:list-item>
        </text:list>
        <text:p text:style-name="P361">What is one way we can shine for Jesus? (Sharing with others the truth of who Jesus is, following the teachings of Jesus, etc.)</text:p>
        <text:list text:continue-numbering="true" text:style-name="L35">
          <text:list-item>
            <text:p text:style-name="P378">What is another way we can shine for Jesus? (See answers to 3.)</text:p>
          </text:list-item>
        </text:list>
        <text:p text:style-name="P361">What is another way we can shine for Jesus? (See answers to 3.)</text:p>
        <text:p text:style-name="P357">Lesson <text:s/>24</text:p>
        <text:p text:style-name="P358">Jesus Calms a Storm</text:p>
        <text:p text:style-name="P364">In Lesson 24, Jesus was in a boat with his disciples and a huge storm suddenly arose. The disciples were frightened, but Jesus was asleep, so the disciples woke him up saying that he must save them, because they were about to die. Jesus spoke, “Be quiet! Be still!” and the storm calmed. The disciples were so amazed and wondered who Jesus was, because even the wind and sea obeyed him. Jesus is truly God. Only God can do things like calm the wind and the sea. These stories will help us have more faith in Jesus. We can have confidence that He is able to do everything that He promises because He has shown us His great power.</text:p>
        <text:p text:style-name="P365">In Lesson 24, Jesus was in a boat with his disciples and a huge storm suddenly arose. The disciples were frightened, but Jesus was asleep, so the disciples woke him up saying that he must save them, because they were about to die. Jesus spoke, “Be quiet! Be still!” and the storm calmed. The disciples were so amazed and wondered who Jesus was, because even the wind and sea obeyed him. Jesus is truly God. Only God can do things like calm the wind and the sea. These stories will help us have more faith in Jesus. We can have confidence that He is able to do everything that He promises because He has shown us His great power.</text:p>
        <text:p text:style-name="P373">The truth of this lesson is: <text:s/>Jesus has true power over nature.<text:span text:style-name="Body_20_Emphasized_20_-_20_Small"> </text:span></text:p>
        <text:p text:style-name="P379">The truth of this lesson is: <text:s/>Jesus has true power over nature.</text:p>
        <text:p text:style-name="P366">Questions for Review</text:p>
        <text:list text:style-name="L36">
          <text:list-item text:start-value="1">
            <text:p text:style-name="P380">Why were the disciples afraid? (The disciples that they were going to die in the big storm.)</text:p>
          </text:list-item>
        </text:list>
        <text:p text:style-name="P361">Why were the disciples afraid? (The disciples that they were going to die in the big storm.)</text:p>
        <text:list text:continue-numbering="true" text:style-name="L36">
          <text:list-item>
            <text:p text:style-name="P380">Who is the only one that has the kind of power to control nature? (God)</text:p>
          </text:list-item>
        </text:list>
        <text:p text:style-name="P361">Who is the only one that has the kind of power to control nature? (God)</text:p>
        <text:list text:continue-numbering="true" text:style-name="L36">
          <text:list-item>
            <text:p text:style-name="P380"><text:soft-page-break/>When we read the stories in the Bible that show Jesus' great power, what should grow in us? (Faith in Jesus)</text:p>
          </text:list-item>
        </text:list>
        <text:p text:style-name="P361">When we read the stories in the Bible that show Jesus' great power, what should grow in us? (Faith in Jesus)</text:p>
        <text:list text:continue-numbering="true" text:style-name="L36">
          <text:list-item>
            <text:p text:style-name="P380">What does it mean to have faith in Jesus? (To trust him, or have confidence in him)</text:p>
          </text:list-item>
        </text:list>
        <text:p text:style-name="P361">What does it mean to have faith in Jesus? (To trust him, or have confidence in him)</text:p>
        <text:list text:continue-numbering="true" text:style-name="L36">
          <text:list-item>
            <text:p text:style-name="P380">What is the truth from this lesson? <text:s/>( <text:s/>Jesus has true power over nature. <text:s/>)</text:p>
          </text:list-item>
        </text:list>
        <text:p text:style-name="P361">What is the truth from this lesson? <text:s/>( <text:s/>Jesus has true power over nature. <text:s/>)</text:p>
        <text:p text:style-name="P357">Lesson <text:s/>25</text:p>
        <text:p text:style-name="P358">Jesus Casts out Demons into Pigs</text:p>
        <text:p text:style-name="P364">The story continued in Lesson 25. When Jesus and the disciples reached the other side of the lake, they met a man who was possessed by evil spirits. The evil spirits in this man were so strong in this man that even chains could not hold him. The evil spirits knew that this was Jesus, the Son of God, and they were afraid of him. Even the evil spirits knew that Jesus was much more powerful than them. They begged Jesus not to send them to the bottomless pit, but into a heard of pigs. Jesus gave them permission, and they went into the pigs. The pigs became mad and ran off the edge of the cliff and into the lake and drowned. The man was set free! But the people who saw this were terrified of Jesus' power and wanted him to leave. The freed man wanted to go with Jesus, but Jesus told him to stay and tell everyone what happened, and he did. <text:s text:c="3"/></text:p>
        <text:p text:style-name="P365">The story continued in Lesson 25. When Jesus and the disciples reached the other side of the lake, they met a man who was possessed by evil spirits. The evil spirits in this man were so strong in this man that even chains could not hold him. The evil spirits knew that this was Jesus, the Son of God, and they were afraid of him. Even the evil spirits knew that Jesus was much more powerful than them. They begged Jesus not to send them to the bottomless pit, but into a heard of pigs. Jesus gave them permission, and they went into the pigs. The pigs became mad and ran off the edge of the cliff and into the lake and drowned. The man was set free! But the people who saw this were terrified of Jesus' power and wanted him to leave. The freed man wanted to go with Jesus, but Jesus told him to stay and tell everyone what happened, and he did.</text:p>
        <text:p text:style-name="P381">The truth of this lesson is: <text:s/>Jesus has power over evil spirits.</text:p>
        <text:p text:style-name="P379">The truth of this lesson is: <text:s/>Jesus has power over evil spirits.</text:p>
        <text:p text:style-name="P366">Questions for Review</text:p>
        <text:list text:style-name="L37">
          <text:list-item text:start-value="1">
            <text:p text:style-name="P382">Why were the evil spirits afraid of Jesus? (They knew he was the Son of God and he was more powerful than them.)</text:p>
          </text:list-item>
        </text:list>
        <text:p text:style-name="P361">Why were the evil spirits afraid of Jesus? (They knew he was the Son of God and he was more powerful than them.)</text:p>
        <text:list text:continue-numbering="true" text:style-name="L37">
          <text:list-item>
            <text:p text:style-name="P382">What did Jesus come to earth to do? (Set people free from evil and sin, so that they can live in a way that is pleasing to God)</text:p>
          </text:list-item>
        </text:list>
        <text:p text:style-name="P383">What did Jesus come to earth to do? (Set people free from evil and sin, so that they can live in a way that is pleasing to God)</text:p>
        <text:list text:continue-numbering="true" text:style-name="L37">
          <text:list-item>
            <text:p text:style-name="P382">Who should we put our faith in to be set free from evil? (Jesus)</text:p>
          </text:list-item>
        </text:list>
        <text:p text:style-name="P361">Who should we put our faith in to be set free from evil? (Jesus)</text:p>
        <text:list text:continue-numbering="true" text:style-name="L37">
          <text:list-item>
            <text:p text:style-name="P382">Who should we share to that Jesus has set us free from sin? (Everyone)</text:p>
          </text:list-item>
        </text:list>
        <text:p text:style-name="P361">Who should we share to that Jesus has set us free from sin? (Everyone)</text:p>
        <text:list text:continue-numbering="true" text:style-name="L37">
          <text:list-item>
            <text:p text:style-name="P382">What is the truth from this lesson? <text:s/>( <text:s/>Jesus has power over evil spirits. <text:s/>)</text:p>
          </text:list-item>
        </text:list>
        <text:p text:style-name="P361">What is the truth from this lesson? <text:s/>( <text:s/>Jesus has power over evil spirits. <text:s/>)</text:p>
        <text:p text:style-name="P357">Closing and Homework</text:p>
        <text:p text:style-name="P358">Homework</text:p>
        <text:p text:style-name="P364">This week spend time everyday praying to God and asking Jesus to shine through you. Make sure you are showing Jesus to your family and friends every day by telling them what you know about Jesus.</text:p>
        <text:p text:style-name="P365">This week spend time everyday praying to God and asking Jesus to shine through you. Make sure you are showing Jesus to your family and friends every day by telling them what you know about Jesus.</text:p>
        <text:list text:continue-list="list92018995911402" text:style-name="Bullet_20_-_20_checkmark">
          <text:list-item>
            <text:p text:style-name="P359">Give any needed announcements.</text:p>
          </text:list-item>
        </text:list>
        <text:p text:style-name="P358">Closing Prayer</text:p>
        <text:p text:style-name="P384"><text:span text:style-name="Body_20_Emphasized_20_-_20_Small">Thank God <text:s/></text:span>for giving us his words so that we can know how we should live.</text:p>
        <text:p text:style-name="P384"><text:span text:style-name="Body_20_Emphasized_20_-_20_Small">Ask God <text:s/></text:span>that he would help the children to spend time reading their memory verses everyday and praying. Pray that the lives of the children would be changed.</text:p>
      </text:section>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mily-generic="roman"/>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PingFang SC" svg:font-family="'PingFang SC'" style:font-family-generic="system" style:font-pitch="variable"/>
    <style:font-face style:name="Songti SC" svg:font-family="'Songti SC'" style:font-family-generic="system" style:font-pitch="variable"/>
    <style:font-face style:name="StarSymbol"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loext:gradient-stop svg:offset="0" loext:color-type="rgb" loext:color-value="#000000"/>
      <loext:gradient-stop svg:offset="1" loext:color-type="rgb" loext:color-value="#b3b3b3"/>
    </draw:gradient>
    <draw:gradient draw:name="Gradient_20_15" draw:display-name="Gradient 15" draw:style="linear" draw:start-color="#b3b3b3" draw:end-color="#ffffff" draw:start-intensity="100%" draw:end-intensity="100%" draw:angle="90deg" draw:border="0%">
      <loext:gradient-stop svg:offset="0" loext:color-type="rgb" loext:color-value="#b3b3b3"/>
      <loext:gradient-stop svg:offset="1" loext:color-type="rgb" loext:color-value="#ffffff"/>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loext:hidden="true" style:hidden="true" style:parent-style-name="Heading" style:next-style-name="Body_20_Tight_20_lines" style:class="chapter" style:master-page-name="">
      <loext:graphic-properties draw:fill="solid" draw:fill-color="#b3b3b3" draw:opacity="100%"/>
      <style:paragraph-properties fo:margin-left="-0.0717in" fo:margin-right="0in" fo:margin-top="0.15in" fo:margin-bottom="0.0799in" style:contextual-spacing="false" fo:orphans="2" fo:widows="2" fo:text-indent="0.0807in" style:auto-text-indent="false" style:page-number="auto" fo:background-color="#b3b3b3" style:shadow="none" fo:keep-with-next="always" text:number-lines="false" text:line-number="0">
        <style:tab-stops>
          <style:tab-stop style:position="0.4465in"/>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class="chapter" style:master-page-name="">
      <loext:graphic-properties draw:fill="solid" draw:fill-color="#ffffff" draw:opacity="100%"/>
      <style:paragraph-properties fo:margin-left="0.3154in" fo:margin-right="0in" fo:margin-top="0.0598in" fo:margin-bottom="0in" style:contextual-spacing="false" fo:keep-together="auto" fo:orphans="2" fo:widows="2" fo:hyphenation-ladder-count="no-limit" fo:hyphenation-keep="auto" loext:hyphenation-keep-type="column" loext:hyphenation-keep-line="false" fo:text-indent="-0.3154in"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chapter" style:master-page-name="">
      <loext:graphic-properties draw:fill="solid" draw:fill-color="#ffffff" draw:opacity="100%"/>
      <style:paragraph-properties fo:margin-left="0.3154in" fo:margin-right="0in" fo:margin-top="0.0598in" fo:margin-bottom="0.0201in" style:contextual-spacing="false" fo:orphans="2" fo:widows="2" fo:hyphenation-ladder-count="no-limit" fo:hyphenation-keep="auto" loext:hyphenation-keep-type="column" loext:hyphenation-keep-line="false" fo:text-indent="-0.3154in"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in" fo:margin-right="0in" fo:margin-top="0.0193in" fo:margin-bottom="0.0398in" style:contextual-spacing="false" fo:orphans="2" fo:widows="2" fo:hyphenation-ladder-count="no-limit" fo:hyphenation-keep="auto" loext:hyphenation-keep-type="column" loext:hyphenation-keep-line="false" fo:text-indent="0in" style:auto-text-indent="false" style:page-number="auto" fo:background-color="transparent" style:writing-mode="lr-tb">
        <style:tab-stops>
          <style:tab-stop style:position="0.5in"/>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in" fo:margin-bottom="0in" style:contextual-spacing="false" fo:orphans="2" fo:widows="2" fo:hyphenation-ladder-count="no-limit" fo:hyphenation-keep="auto" loext:hyphenation-keep-type="column" loext:hyphenation-keep-line="false" style:writing-mode="lr-tb">
        <style:tab-stops>
          <style:tab-stop style:position="3.15in" style:type="center"/>
          <style:tab-stop style:position="5.6756in"/>
          <style:tab-stop style:position="6.5in"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0.3937in" fo:margin-right="0in" fo:margin-top="0in" fo:margin-bottom="0in" style:contextual-spacing="false" fo:orphans="0" fo:widows="0" fo:hyphenation-ladder-count="no-limit" fo:hyphenation-keep="auto" loext:hyphenation-keep-type="column" loext:hyphenation-keep-line="false" fo:text-indent="-0.1965in"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3484in" fo:margin-right="0in" fo:margin-top="0.0201in" fo:margin-bottom="0in" style:contextual-spacing="false" fo:orphans="2" fo:widows="2" fo:text-indent="-0.1362in" style:auto-text-indent="false" fo:background-color="#ffffff" fo:keep-with-next="always">
        <style:tab-stops>
          <style:tab-stop style:position="0.3484in"/>
          <style:tab-stop style:position="0.6807in"/>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loext:hidden="true" style:hidden="true" style:parent-style-name="Standard" style:default-outline-level="" style:class="extra">
      <style:paragraph-properties fo:margin-left="0in" fo:margin-right="0in" fo:margin-top="0in" fo:margin-bottom="0.0402in" style:contextual-spacing="false" fo:text-indent="0in" style:auto-text-indent="false" style:border-line-width-bottom="0.0008in 0.0138in 0.0008in" fo:padding="0in" fo:border-left="none" fo:border-right="none" fo:border-top="none" fo:border-bottom="1.11pt double #000001" text:number-lines="false" text:line-number="0">
        <style:tab-stops>
          <style:tab-stop style:position="3in" style:type="center"/>
          <style:tab-stop style:position="6.6in"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3.75in" style:type="center"/>
          <style:tab-stop style:position="6.848in"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2957in" fo:margin-right="0in" fo:margin-top="0in" fo:margin-bottom="0in" style:contextual-spacing="false" fo:text-indent="0in" style:auto-text-indent="false"/>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Bold" style:display-name="Body Bold" style:family="paragraph" style:parent-style-name="Standard" style:default-outline-level="">
      <style:paragraph-properties fo:margin-left="0in" fo:margin-right="0in" fo:margin-top="0.0598in" fo:margin-bottom="0.0598in" style:contextual-spacing="false" fo:text-align="start" style:justify-single-word="false" fo:text-indent="0in"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in" fo:margin-bottom="0.0398in"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in" fo:margin-bottom="0.0193in"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0.4929in" fo:margin-right="0.6634in" fo:margin-top="0.0598in" fo:margin-bottom="0in" style:contextual-spacing="false" fo:orphans="2" fo:widows="2" fo:text-indent="0in" style:auto-text-indent="false">
        <style:tab-stops>
          <style:tab-stop style:position="0.9929in"/>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0.5445in" fo:margin-right="0in" fo:margin-top="0.1in" fo:margin-bottom="0.0799in" style:contextual-spacing="false" fo:keep-together="always" fo:orphans="2" fo:widows="2" fo:hyphenation-ladder-count="no-limit" fo:hyphenation-keep="auto" loext:hyphenation-keep-type="column" loext:hyphenation-keep-line="false" fo:text-indent="0.4283in"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in" fo:margin-right="0in" fo:margin-top="0in" fo:margin-bottom="0in" style:contextual-spacing="false" fo:text-align="start" style:justify-single-word="false" fo:orphans="2" fo:widows="2" fo:hyphenation-ladder-count="no-limit" fo:hyphenation-keep="auto" loext:hyphenation-keep-type="column" loext:hyphenation-keep-line="false" fo:text-indent="0.0783in" style:auto-text-indent="false" style:page-number="auto" fo:break-before="auto" fo:break-after="auto" fo:background-color="#5a5a5a" fo:padding="0in"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1965in" fo:margin-right="0in" fo:margin-top="0in" fo:margin-bottom="0in" style:contextual-spacing="false" fo:text-indent="-0.3in" style:auto-text-indent="false">
        <style:tab-stops>
          <style:tab-stop style:position="0.4465in"/>
        </style:tab-stops>
      </style:paragraph-properties>
    </style:style>
    <style:style style:name="Table_20_Left_20_headings" style:display-name="Table Left headings" style:family="paragraph" style:parent-style-name="Body_20_Bold">
      <style:paragraph-properties fo:margin-left="0in" fo:margin-right="0.0193in" fo:margin-top="0in" fo:margin-bottom="0in" style:contextual-spacing="false" fo:text-align="end" style:justify-single-word="false" fo:text-indent="0in"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181in" fo:margin-right="0in" fo:margin-top="0in" fo:margin-bottom="0in" style:contextual-spacing="false" fo:text-indent="-0.4in" style:auto-text-indent="false">
        <style:tab-stops/>
      </style:paragraph-properties>
    </style:style>
    <style:style style:name="Table_20_Bullet_20_List" style:display-name="Table Bullet List" style:family="paragraph" style:auto-update="true" style:default-outline-level="1" style:list-style-name="" style:class="extra">
      <style:paragraph-properties fo:margin-left="0.2638in" fo:margin-right="-0.0071in" fo:margin-top="0in" fo:margin-bottom="0in" style:contextual-spacing="false" fo:orphans="2" fo:widows="2" fo:hyphenation-ladder-count="no-limit" fo:hyphenation-keep="auto" loext:hyphenation-keep-type="column" loext:hyphenation-keep-line="false" fo:text-indent="-0.25in" style:auto-text-indent="false" style:shadow="none" text:number-lines="false" text:line-number="0" style:writing-mode="lr-tb">
        <style:tab-stops>
          <style:tab-stop style:position="0.25in"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 style:display-name="M.T. Text" style:family="paragraph" style:parent-style-name="Body" style:next-style-name="English_20_translation" style:master-page-name="">
      <loext:graphic-properties draw:fill="solid" draw:fill-color="#ffffcc" draw:opacity="100%" draw:fill-image-width="0in" draw:fill-image-height="0in"/>
      <style:paragraph-properties fo:margin-top="0in" fo:margin-bottom="0in" style:contextual-spacing="true" style:page-number="auto" fo:background-color="#ffffcc" fo:keep-with-next="auto">
        <style:tab-stops>
          <style:tab-stop style:position="2.5063in"/>
        </style:tab-stops>
      </style:paragraph-properties>
      <style:text-properties style:font-name="Andika4" fo:font-family="Andika"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0.9453in" fo:margin-right="0in" fo:margin-top="0in" fo:margin-bottom="0in" style:contextual-spacing="false" fo:orphans="2" fo:widows="2" fo:hyphenation-ladder-count="no-limit" fo:hyphenation-keep="auto" loext:hyphenation-keep-type="column" loext:hyphenation-keep-line="false" fo:text-indent="0in" style:auto-text-indent="false" text:number-lines="false" text:line-number="0" style:writing-mode="lr-tb">
        <style:tab-stops>
          <style:tab-stop style:position="3.3807in" style:type="center"/>
          <style:tab-stop style:position="6in"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0.472in" fo:margin-right="0in" fo:margin-top="0in" fo:margin-bottom="0in" style:contextual-spacing="true" fo:orphans="2" fo:widows="2" fo:hyphenation-ladder-count="no-limit" fo:hyphenation-keep="auto" loext:hyphenation-keep-type="column" loext:hyphenation-keep-line="false" fo:text-indent="-0.1965in" style:auto-text-indent="false" style:page-number="auto" fo:background-color="transparent" fo:keep-with-next="always" style:writing-mode="lr-tb">
        <style:tab-stops>
          <style:tab-stop style:position="0.4736in"/>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in" fo:margin-right="0in" fo:margin-top="0in" fo:margin-bottom="0in" style:contextual-spacing="false" fo:text-align="end" style:justify-single-word="false" fo:text-indent="0in"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055in" fo:margin-right="-0.0035in" fo:margin-top="0in" fo:margin-bottom="0in" style:contextual-spacing="false" fo:text-align="center" style:justify-single-word="false" fo:text-indent="0in"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0.5118in" fo:margin-right="0in" fo:margin-top="0in" fo:margin-bottom="0in" style:contextual-spacing="true" fo:orphans="2" fo:widows="2" fo:hyphenation-ladder-count="no-limit" fo:hyphenation-keep="auto" loext:hyphenation-keep-type="column" loext:hyphenation-keep-line="false" fo:text-indent="-0.2362in" style:auto-text-indent="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0.7083in" fo:margin-right="0in" fo:margin-top="0in" fo:margin-bottom="0in" style:contextual-spacing="false" fo:orphans="2" fo:widows="2" fo:hyphenation-ladder-count="no-limit" fo:hyphenation-keep="auto" loext:hyphenation-keep-type="column" loext:hyphenation-keep-line="false" fo:text-indent="-0.2362in" style:auto-text-indent="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0.7083in" fo:margin-right="0in" fo:margin-top="0in" fo:margin-bottom="0.0398in" style:contextual-spacing="true" fo:text-align="start" style:justify-single-word="false" fo:orphans="2" fo:widows="2" fo:hyphenation-ladder-count="no-limit" fo:hyphenation-keep="auto" loext:hyphenation-keep-type="column" loext:hyphenation-keep-line="false" fo:text-indent="0in"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0.5118in" fo:margin-right="0in" fo:margin-top="0in" fo:margin-bottom="0.0398in" style:contextual-spacing="true" fo:text-align="start" style:justify-single-word="false" fo:orphans="2" fo:widows="2" fo:hyphenation-ladder-count="no-limit" fo:hyphenation-keep="auto" loext:hyphenation-keep-type="column" loext:hyphenation-keep-line="false" fo:text-indent="0in"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Bible_20_Story_20_-_20_Graphic_20_Number" style:display-name="Bible Story - Graphic Number" style:family="paragraph" style:parent-style-name="Body" style:master-page-name="">
      <style:paragraph-properties fo:margin-top="0.0398in" fo:margin-bottom="0in"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in" fo:margin-right="0in" fo:margin-top="0in" fo:margin-bottom="0in" style:contextual-spacing="false" fo:orphans="2" fo:widows="2" fo:hyphenation-ladder-count="no-limit" fo:hyphenation-keep="auto" loext:hyphenation-keep-type="column" loext:hyphenation-keep-line="false" fo:text-indent="0in" style:auto-text-indent="false" style:page-number="auto" fo:keep-with-next="always" style:writing-mode="lr-tb">
        <style:tab-stops>
          <style:tab-stop style:position="0.4465in"/>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in" fo:margin-right="0in" fo:margin-top="0.1181in" fo:margin-bottom="0.0783in" style:contextual-spacing="true" fo:orphans="2" fo:widows="2" fo:hyphenation-ladder-count="no-limit" fo:hyphenation-keep="auto" loext:hyphenation-keep-type="column" loext:hyphenation-keep-line="false" fo:text-indent="0.0783in" style:auto-text-indent="false" style:page-number="auto" fo:background-color="#d9d9d9" fo:keep-with-next="always" style:writing-mode="lr-tb">
        <style:tab-stops>
          <style:tab-stop style:position="0.4465in"/>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in" fo:margin-right="0in" fo:margin-top="0.0398in" fo:margin-bottom="0in" style:contextual-spacing="false" fo:text-indent="0in"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Body_20_-_20_Small_20_Spacer" style:display-name="Body - Small Spacer" style:family="paragraph" style:parent-style-name="Body">
      <style:paragraph-properties fo:margin-top="0in" fo:margin-bottom="0in"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class="chapter">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1181in" fo:margin-right="0in" fo:margin-top="0.0398in" fo:margin-bottom="0.0984in" style:contextual-spacing="false" fo:text-align="start" style:justify-single-word="false" fo:orphans="2" fo:widows="2" fo:hyphenation-ladder-count="no-limit" fo:hyphenation-keep="auto" loext:hyphenation-keep-type="column" loext:hyphenation-keep-line="false" fo:text-indent="0in"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in" fo:margin-bottom="0in" style:contextual-spacing="false" fo:orphans="2" fo:widows="2" fo:hyphenation-ladder-count="no-limit" fo:hyphenation-keep="auto" loext:hyphenation-keep-type="column" loext:hyphenation-keep-line="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055in" fo:margin-right="-0.0035in" fo:margin-top="0in" fo:margin-bottom="0in" style:contextual-spacing="false" fo:text-align="center" style:justify-single-word="false" fo:text-indent="0in"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1965in" fo:margin-right="0in" fo:margin-top="0in" fo:margin-bottom="0in" style:contextual-spacing="false" fo:orphans="2" fo:widows="2" fo:hyphenation-ladder-count="no-limit" fo:hyphenation-keep="auto" loext:hyphenation-keep-type="column" loext:hyphenation-keep-line="false" fo:text-indent="-0.1965in" style:auto-text-indent="false" fo:background-color="transparent" fo:keep-with-next="always" style:writing-mode="lr-tb">
        <style:tab-stops>
          <style:tab-stop style:position="0.4736in"/>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1965in" fo:margin-right="0in" fo:text-indent="0in"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0.4925in" fo:margin-right="0in" fo:text-indent="0in"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in" fo:margin-bottom="0in" style:contextual-spacing="false" fo:orphans="2" fo:widows="2" fo:hyphenation-ladder-count="no-limit" fo:hyphenation-keep="auto" loext:hyphenation-keep-type="column" loext:hyphenation-keep-line="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1965in" fo:margin-right="0in" fo:margin-top="0in" fo:margin-bottom="0.0398in" style:contextual-spacing="true" fo:text-align="start" style:justify-single-word="false" fo:orphans="2" fo:widows="2" fo:hyphenation-ladder-count="no-limit" fo:hyphenation-keep="auto" loext:hyphenation-keep-type="column" loext:hyphenation-keep-line="false" fo:text-indent="0in"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in" fo:margin-right="0in" fo:margin-top="0in" fo:margin-bottom="0in" style:contextual-spacing="false" fo:text-align="start" style:justify-single-word="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in" fo:margin-right="0in" fo:margin-top="0in" fo:margin-bottom="0in" style:contextual-spacing="false" fo:text-align="center" style:justify-single-word="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in" fo:margin-right="0.0783in" fo:margin-top="0.0398in" fo:margin-bottom="0.0398in" style:contextual-spacing="false" fo:text-align="center" style:justify-single-word="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in" fo:margin-right="0in" fo:margin-top="0in" fo:margin-bottom="0in" style:contextual-spacing="false" fo:text-indent="0in" style:auto-text-indent="false"/>
      <style:text-properties fo:color="#ffffff" loext:opacity="100%"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ffffff" loext:opacity="100%" style:text-outline="false" style:text-line-through-style="none" style:text-line-through-type="none" style:font-name="Lucida Sans"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ffffff" loext:opacity="100%" style:text-outline="false" style:text-line-through-style="none" style:text-line-through-type="none" style:font-name="Lucida Sans"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ffffff" loext:opacity="100%" style:text-outline="false" style:text-line-through-style="none" style:text-line-through-type="none" style:font-name="Lucida Sans"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in" fo:margin-bottom="0.0783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loext:opacity="100%" style:text-outline="false" style:text-line-through-style="none" style:text-line-through-type="none" style:font-name="Lucida Sans"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ay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ay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w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w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w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orange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orange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orange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turquoise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turquoise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turquoise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lue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lue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lue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un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un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un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earth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earth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earth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een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een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green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eetang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eetang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seetang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lightblue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lightblue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lightblue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yellow1"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yellow2"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yellow3" style:family="paragraph" style:default-outline-level="">
      <style:paragraph-properties fo:margin-left="0in" fo:margin-right="0in" fo:margin-top="0in" fo:margin-bottom="0in" style:contextual-spacing="false" fo:text-indent="0in" style:auto-text-indent="false"/>
      <style:text-properties fo:color="#ffffff" loext:opacity="100%" style:font-name="Lucida Sans"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ffffff" loext:opacity="100%" style:text-outline="false" style:text-line-through-style="none" style:text-line-through-type="none" style:font-name="Lucida Sans"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ffffff" loext:opacity="100%" style:text-outline="false" style:text-line-through-style="none" style:text-line-through-type="none" style:font-name="Lucida Sans"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ffffff" loext:opacity="100%" style:text-outline="false" style:text-line-through-style="none" style:text-line-through-type="none" style:font-name="Lucida Sans"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ffffff" loext:opacity="100%"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Bullets" style:display-name="Table Bullets" style:family="paragraph" style:parent-style-name="Table_20_Contents" style:auto-update="true" style:default-outline-level="1" style:list-style-name="" style:class="extra" style:master-page-name="">
      <style:paragraph-properties fo:margin-left="0.2638in" fo:margin-right="-0.0071in" fo:margin-top="0in" fo:margin-bottom="0in" style:contextual-spacing="false" fo:orphans="2" fo:widows="2" fo:hyphenation-ladder-count="no-limit" fo:hyphenation-keep="auto" loext:hyphenation-keep-type="column" loext:hyphenation-keep-line="false" fo:text-indent="-0.25in"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Body_20_-_20_1st_20_Line_20_Indent" style:display-name="Body - 1st Line Indent" style:family="paragraph" style:parent-style-name="Body" style:default-outline-level="">
      <style:paragraph-properties fo:margin-left="0in" fo:margin-right="0in" fo:margin-top="0.0193in" fo:margin-bottom="0.0783in" style:contextual-spacing="false" fo:orphans="2" fo:widows="2" fo:hyphenation-ladder-count="no-limit" fo:hyphenation-keep="auto" loext:hyphenation-keep-type="column" loext:hyphenation-keep-line="false" fo:text-indent="0.2362in" style:auto-text-indent="false" style:writing-mode="lr-tb">
        <style:tab-stops>
          <style:tab-stop style:position="0.5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0783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tab-stop style:position="0.5118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in" fo:margin-right="0in" fo:margin-top="0.0398in" fo:margin-bottom="0in" style:contextual-spacing="false" fo:orphans="2" fo:widows="2" fo:hyphenation-ladder-count="no-limit" fo:hyphenation-keep="auto" loext:hyphenation-keep-type="column" loext:hyphenation-keep-line="false" fo:text-indent="0in" style:auto-text-indent="false" style:writing-mode="lr-tb">
        <style:tab-stops>
          <style:tab-stop style:position="2.5063in"/>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in" fo:margin-bottom="0in"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0783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style:page-number="auto" style:writing-mode="lr-tb">
        <style:tab-stops>
          <style:tab-stop style:position="0.5118in"/>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0783in" fo:margin-right="0in" fo:margin-top="0in" fo:margin-bottom="0.0398in" style:contextual-spacing="true" fo:text-align="start"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0783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fo:keep-with-next="always" text:number-lines="false" text:line-number="0" style:writing-mode="lr-tb">
        <style:tab-stops>
          <style:tab-stop style:position="0.5in"/>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Table_20_of_20_Contents_20_-_20_Scrip_20_references" style:display-name="Table of Contents - Scrip references" style:family="paragraph" style:parent-style-name="M.T._20_Table_20_of_20_Contents">
      <style:text-properties fo:background-color="transparent"/>
    </style:style>
    <style:style style:name="Lesson_20_Number" style:display-name="Lesson Number" style:family="paragraph" style:parent-style-name="Standard" style:default-outline-level="" style:master-page-name="">
      <loext:graphic-properties draw:fill="none" draw:fill-color="#ffffff"/>
      <style:paragraph-properties fo:margin-left="0in" fo:margin-right="0in" fo:margin-top="0in" fo:margin-bottom="0in" style:contextual-spacing="false" fo:text-align="center" style:justify-single-word="false" fo:orphans="0" fo:widows="0" fo:hyphenation-ladder-count="no-limit" fo:hyphenation-keep="auto" loext:hyphenation-keep-type="column" loext:hyphenation-keep-line="false" fo:text-indent="0in" style:auto-text-indent="false" style:page-number="auto" fo:break-before="auto" fo:break-after="auto" fo:background-color="transparent" style:vertical-align="bottom" style:writing-mode="lr-tb">
        <style:tab-stops>
          <style:tab-stop style:position="0.4465in"/>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Body_20_-_20_Large_20_Spacer" style:display-name="Body - Large Spacer" style:family="paragraph" style:parent-style-name="Body" style:class="text">
      <style:paragraph-properties fo:margin-top="0.1965in" fo:margin-bottom="0in" style:contextual-spacing="false"/>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in" fo:margin-right="0in" fo:margin-top="0in" fo:margin-bottom="0in" style:contextual-spacing="true" fo:text-align="start" style:justify-single-word="false" fo:orphans="2" fo:widows="2" fo:hyphenation-ladder-count="no-limit" fo:hyphenation-keep="auto" loext:hyphenation-keep-type="column" loext:hyphenation-keep-line="false" fo:text-indent="0.1965in" style:auto-text-indent="false" style:page-number="auto" fo:keep-with-next="auto"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in" fo:margin-right="0in" fo:margin-top="0in" fo:margin-bottom="0.0398in" style:contextual-spacing="true" fo:text-align="start" style:justify-single-word="false" fo:orphans="2" fo:widows="2" fo:hyphenation-ladder-count="no-limit" fo:hyphenation-keep="auto" loext:hyphenation-keep-type="column" loext:hyphenation-keep-line="false" fo:text-indent="0.2362in"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in" fo:margin-right="0in" fo:margin-top="0in" fo:margin-bottom="0in" style:contextual-spacing="false" fo:orphans="2" fo:widows="2" fo:hyphenation-ladder-count="no-limit" fo:hyphenation-keep="auto" loext:hyphenation-keep-type="column" loext:hyphenation-keep-line="false" fo:text-indent="0in" style:auto-text-indent="false" style:page-number="auto" fo:keep-with-next="auto" style:writing-mode="lr-tb">
        <style:tab-stops>
          <style:tab-stop style:position="0.4465in"/>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1965in" fo:margin-right="0in" fo:margin-top="0in" fo:margin-bottom="0in" style:contextual-spacing="false" fo:orphans="2" fo:widows="2" fo:hyphenation-ladder-count="no-limit" fo:hyphenation-keep="auto" loext:hyphenation-keep-type="column" loext:hyphenation-keep-line="false" fo:text-indent="0in" style:auto-text-indent="false" fo:background-color="transparent" style:writing-mode="lr-tb">
        <style:tab-stops>
          <style:tab-stop style:position="5.8701in"/>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in" fo:margin-right="0in" fo:margin-top="0.0398in" fo:margin-bottom="0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in" fo:margin-bottom="0in" style:contextual-spacing="true" fo:orphans="2" fo:widows="2" fo:hyphenation-ladder-count="no-limit" fo:hyphenation-keep="auto" loext:hyphenation-keep-type="column" loext:hyphenation-keep-line="false" style:page-number="auto"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6937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4972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3008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6.1043in"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9075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1965in" fo:margin-right="0in" fo:margin-top="0in" fo:margin-bottom="0.0984in" style:contextual-spacing="false" fo:text-align="start" style:justify-single-word="false" fo:orphans="2" fo:widows="2" fo:hyphenation-ladder-count="no-limit" fo:hyphenation-keep="auto" loext:hyphenation-keep-type="column" loext:hyphenation-keep-line="false" fo:text-indent="0in"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3154in" fo:margin-right="0in" fo:text-indent="0in"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Front_20_Matter_20_footer" style:display-name="Front Matter footer" style:family="paragraph" style:parent-style-name="Footer" style:master-page-name="">
      <style:paragraph-properties style:page-number="auto">
        <style:tab-stops>
          <style:tab-stop style:position="3.6173in" style:type="center"/>
          <style:tab-stop style:position="6.848in" style:type="right"/>
        </style:tab-stops>
      </style:paragraph-properties>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25in" fo:margin-right="0in" fo:margin-top="0in" fo:margin-bottom="0in" style:contextual-spacing="false" fo:orphans="2" fo:widows="2" fo:hyphenation-ladder-count="no-limit" fo:hyphenation-keep="auto" loext:hyphenation-keep-type="column" loext:hyphenation-keep-line="false" fo:text-indent="-0.25in" style:auto-text-indent="false" fo:background-color="#ffffff" fo:keep-with-next="always" style:writing-mode="lr-tb">
        <style:tab-stops>
          <style:tab-stop style:position="0.248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1.4173in" fo:margin-right="0in" fo:margin-top="0in" fo:margin-bottom="0.0398in" style:contextual-spacing="true" fo:text-align="start" style:justify-single-word="false" fo:orphans="2" fo:widows="2" fo:hyphenation-ladder-count="no-limit" fo:hyphenation-keep="auto" loext:hyphenation-keep-type="column" loext:hyphenation-keep-line="false" fo:text-indent="0.2362in"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Drawing" style:family="paragraph" style:parent-style-name="Caption"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loext:opacity="100%" style:font-name="Lucida Sans"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in" draw:fill-image-height="0in"/>
      <style:paragraph-properties fo:margin-left="1.4173in" fo:margin-right="0in" fo:margin-top="0in" fo:margin-bottom="0in" style:contextual-spacing="true" fo:text-align="start" style:justify-single-word="false" fo:orphans="2" fo:widows="2" fo:hyphenation-ladder-count="no-limit" fo:hyphenation-keep="auto" loext:hyphenation-keep-type="column" loext:hyphenation-keep-line="false" fo:text-indent="0.1965in" style:auto-text-indent="false" style:page-number="auto" fo:keep-with-next="auto"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cripture_20_References" style:display-name="Scripture References" style:family="paragraph" style:parent-style-name="Table_20_of_20_Lessons" style:default-outline-level="">
      <loext:graphic-properties draw:fill="none" draw:fill-color="#729fcf"/>
      <style:paragraph-properties fo:margin-left="0.0783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style:writing-mode="lr-tb">
        <style:tab-stops>
          <style:tab-stop style:position="0.5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1181in" fo:margin-bottom="0in" style:contextual-spacing="false"/>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M.T._20_Text_20_-_20_Lesson_20_Title_20_Scrip_20_Reference" style:display-name="M.T. Text - Lesson Title Scrip Reference" style:family="paragraph" style:parent-style-name="M.T._20_Text" style:default-outline-level="">
      <style:paragraph-properties fo:margin-left="0in" fo:margin-right="0in" fo:margin-top="0in" fo:margin-bottom="0.1181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Body_20_-_20_Small_20_spacer" style:display-name="Body - Small spacer" style:family="paragraph" style:parent-style-name="Body">
      <style:paragraph-properties fo:margin-top="0in" fo:margin-bottom="0in" style:contextual-spacing="false"/>
      <style:text-properties fo:font-size="6pt" style:font-size-asian="5.25pt" style:font-size-complex="6pt"/>
    </style:style>
    <style:style style:name="M.T._20_Lesson_20_Title" style:display-name="M.T. Lesson Title" style:family="paragraph" style:parent-style-name="M.T._20_Text" style:default-outline-level="" style:master-page-name="">
      <loext:graphic-properties draw:fill-image-width="0in" draw:fill-image-height="0in"/>
      <style:paragraph-properties fo:margin-left="0in" fo:margin-right="0in" fo:margin-top="0.1181in" fo:margin-bottom="0in" style:contextual-spacing="false" fo:orphans="0" fo:widows="0" fo:hyphenation-ladder-count="no-limit" fo:hyphenation-keep="auto" loext:hyphenation-keep-type="column" loext:hyphenation-keep-line="false" fo:text-indent="0in" style:auto-text-indent="false" style:page-number="auto" style:shadow="none" style:vertical-align="auto" style:writing-mode="lr-tb">
        <style:tab-stops>
          <style:tab-stop style:position="0.4465in"/>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in" fo:margin-right="0in" fo:text-indent="0in"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in" fo:margin-right="0in" fo:text-align="end" style:justify-single-word="false" fo:text-indent="0in"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in" fo:margin-right="0in" fo:margin-top="0in" fo:margin-bottom="0.0193in" style:contextual-spacing="true" fo:text-align="end"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in" fo:margin-right="0in" fo:margin-top="0in" fo:margin-bottom="0in" style:contextual-spacing="true" fo:text-align="start"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indent" style:display-name="English translation - indent" style:family="paragraph" style:parent-style-name="English_20_translation" style:default-outline-level="">
      <style:paragraph-properties fo:margin-left="0.5118in" fo:margin-right="0in" fo:margin-top="0in" fo:margin-bottom="0.0398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1965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tab-stop style:position="0.5in"/>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Body_20_Translated" style:display-name="Body Translated" style:family="paragraph" style:parent-style-name="Body" style:auto-update="true">
      <style:paragraph-properties fo:margin-top="0.0598in" fo:margin-bottom="0in" style:contextual-spacing="false"/>
      <style:text-properties fo:font-weight="normal" style:font-weight-asian="normal" style:font-weight-complex="normal"/>
    </style:style>
    <style:style style:name="Lesson_20_Title_20_Scrip_20_Reference" style:display-name="Lesson Title Scrip Reference" style:family="paragraph" style:parent-style-name="Body" style:default-outline-level="" style:master-page-name="">
      <loext:graphic-properties draw:fill="none" draw:fill-color="#729fcf"/>
      <style:paragraph-properties fo:margin-left="0in" fo:margin-right="0in" fo:margin-top="0in" fo:margin-bottom="0.1181in" style:contextual-spacing="false" fo:text-align="start" style:justify-single-word="false" fo:orphans="2" fo:widows="2" fo:hyphenation-ladder-count="no-limit" fo:hyphenation-keep="auto" loext:hyphenation-keep-type="column" loext:hyphenation-keep-line="false" fo:text-indent="0in" style:auto-text-indent="false" style:page-number="auto" fo:background-color="transparent" fo:keep-with-next="always"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M.T_20_Bible_20_Story" style:display-name="M.T Bible Story" style:family="paragraph" style:parent-style-name="English_20_translation">
      <style:paragraph-properties fo:margin-left="0in" fo:margin-right="0in" fo:margin-top="0in" fo:margin-bottom="0in" style:contextual-spacing="false" fo:text-indent="0in"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in" fo:margin-right="0in" fo:margin-top="0in" fo:margin-bottom="0in" style:contextual-spacing="false" fo:text-indent="0in"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M.T._20_Text_20_Numbered" style:display-name="M.T. Text Numbered" style:family="paragraph" style:parent-style-name="M.T._20_Text" style:list-style-name="WWNum2"/>
    <style:style style:name="Detailed_20_Lesson_20_Plan" style:display-name="Detailed Lesson Plan" style:family="paragraph" style:parent-style-name="Lesson_20_Overview_20_Header" style:master-page-name="">
      <loext:graphic-properties draw:fill="solid" draw:fill-color="#000000" draw:opacity="100%" draw:fill-image-width="0in" draw:fill-image-height="0in"/>
      <style:paragraph-properties fo:margin-top="0.0398in" fo:margin-bottom="0in" style:contextual-spacing="true" fo:text-align="start" style:justify-single-word="false" style:page-number="auto" fo:break-before="auto" fo:break-after="auto" fo:background-color="#000000"/>
      <style:text-properties style:font-name="Andika New Basic1" fo:font-family="'Andika New Basic'" style:font-style-name="Bold" style:font-pitch="variable" fo:font-weight="bold"/>
    </style:style>
    <style:style style:name="Normal" style:family="paragraph">
      <style:paragraph-properties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fo:hyphenation-remain-char-count="2" fo:hyphenation-push-char-count="2" loext:hyphenation-no-caps="false" loext:hyphenation-no-last-word="false" loext:hyphenation-word-char-count="no-limit" loext:hyphenation-zone="no-limit"/>
    </style:style>
    <style:style style:name="Lesson_20_Overview_20_Header" style:display-name="Lesson Overview Header" style:family="paragraph" style:parent-style-name="Standard" style:default-outline-level="" style:list-style-name="" style:master-page-name="">
      <loext:graphic-properties draw:fill="solid" draw:fill-color="#000000" draw:opacity="100%"/>
      <style:paragraph-properties fo:margin-left="0in" fo:margin-right="0in" fo:margin-top="0.1965in" fo:margin-bottom="0in" style:contextual-spacing="false" fo:text-align="start" style:justify-single-word="false" fo:orphans="2" fo:widows="2" fo:hyphenation-ladder-count="no-limit" fo:hyphenation-keep="auto" loext:hyphenation-keep-type="column" loext:hyphenation-keep-line="false" fo:text-indent="0.0783in" style:auto-text-indent="false" style:page-number="auto" fo:break-before="auto" fo:break-after="auto" fo:background-color="#000000" fo:padding="0in" fo:border="none" style:shadow="none" fo:keep-with-next="always" style:vertical-align="bottom" style:writing-mode="lr-tb">
        <style:tab-stops/>
      </style:paragraph-properties>
      <style:text-properties fo:color="#ffffff" loext:opacity="100%" style:text-outline="false" style:font-name="Andika4" fo:font-family="Andika" style:font-style-name="Regular" style:font-pitch="variable" fo:font-size="22pt" fo:font-weight="normal"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Detailed_20_Part_20_Heading" style:display-name="Detailed Part Heading" style:family="paragraph" style:parent-style-name="Part_20_Heading">
      <style:paragraph-properties fo:margin-left="0in" fo:margin-right="0in" fo:margin-top="0in" fo:margin-bottom="0in" style:contextual-spacing="false" fo:text-align="start" style:justify-single-word="false" fo:text-indent="0in" style:auto-text-indent="false"/>
      <style:text-properties style:font-name="Andika" fo:font-family="Andika" style:font-pitch="variable"/>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181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_20_Review_20_Game" style:display-name="Eng. Review Game" style:family="paragraph" style:parent-style-name="English_20_translation"/>
    <style:style style:name="Detailed_20_lesson_20_plan_20_" style:display-name="Detailed lesson plan " style:family="paragraph" style:parent-style-name="Table_20_Left_20_headings">
      <style:paragraph-properties fo:text-align="start" style:justify-single-word="false"/>
      <style:text-properties fo:color="#ffffff" loext:opacity="100%" fo:font-size="12pt" style:font-size-asian="12pt" style:font-size-complex="12pt"/>
    </style:style>
    <style:style style:name="Body_20_Bullet_20_-_20_Checkmark_20_No_20_break" style:display-name="Body Bullet - Checkmark No break" style:family="paragraph" style:parent-style-name="Body_20_Bullet_20_-_20_Checkmark" style:master-page-name="">
      <style:paragraph-properties style:page-number="auto" fo:keep-with-next="always"/>
    </style:style>
    <style:style style:name="English_20_translation_20_-_20_Indent" style:display-name="English translation - Indent" style:family="paragraph" style:parent-style-name="English_20_translation" style:default-outline-level="">
      <style:paragraph-properties fo:margin-left="0.5118in" fo:margin-right="0in" fo:margin-top="0in" fo:margin-bottom="0.0398in" style:contextual-spacing="false" fo:text-align="start" style:justify-single-word="false" fo:orphans="2" fo:widows="2" fo:hyphenation-ladder-count="no-limit" fo:hyphenation-keep="auto" loext:hyphenation-keep-type="column" loext:hyphenation-keep-line="false" fo:text-indent="0in"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 style:display-name="M.T. Text - Numbered" style:family="paragraph" style:parent-style-name="M.T._20_Text" style:list-style-name="WWNum1">
      <loext:graphic-properties draw:fill="solid" draw:fill-color="#ffff66" draw:opacity="100%"/>
      <style:paragraph-properties fo:margin-left="0.3937in" fo:margin-right="0in" fo:text-indent="-0.1965in" style:auto-text-indent="false" fo:background-color="#ffff66" text:number-lines="true" text:line-number="1">
        <style:tab-stops>
          <style:tab-stop style:position="0.5in"/>
        </style:tab-stops>
      </style:paragraph-properties>
    </style:style>
    <style:style style:name="English_20_Translation_20_-_20_Num_20_List_20_inset" style:display-name="English Translation - Num List inset" style:family="paragraph" style:parent-style-name="English_20_Translation_20_-_20_single_20_inset" style:default-outline-level="">
      <style:paragraph-properties fo:margin-left="0.3154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New Basic" fo:font-family="'Andika New Basic'" style:font-pitch="variable" fo:font-size="18pt" fo:font-weight="bold" officeooo:rsid="00135fa9" style:font-size-asian="18pt" style:font-weight-asian="bold" style:font-size-complex="18pt" style:font-weight-complex="bold"/>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1965in" fo:margin-right="0in" fo:margin-top="0.0193in" fo:margin-bottom="0.0398in" style:contextual-spacing="false" fo:text-align="start" style:justify-single-word="false" fo:orphans="2" fo:widows="2" fo:hyphenation-ladder-count="no-limit" fo:hyphenation-keep="auto" loext:hyphenation-keep-type="column" loext:hyphenation-keep-line="false" fo:text-indent="0in" style:auto-text-indent="false" fo:background-color="transparent" style:writing-mode="lr-tb">
        <style:tab-stops>
          <style:tab-stop style:position="0.5in"/>
        </style:tab-stops>
      </style:paragraph-properties>
      <style:text-properties style:font-name="Andika New Basic" fo:font-family="'Andika New Basic'"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M.T._20_Text_20_-_20_Badge_20_Inset" style:display-name="M.T. Text - Badge Inset" style:family="paragraph" style:parent-style-name="M.T._20_Text" style:default-outline-level="" style:master-page-name="">
      <loext:graphic-properties draw:fill="solid" draw:fill-color="#ffffcc" draw:opacity="100%"/>
      <style:paragraph-properties fo:margin-left="0.5902in" fo:margin-right="0in" fo:margin-top="0.0398in" fo:margin-bottom="0in" style:contextual-spacing="false" fo:orphans="2" fo:widows="2" fo:hyphenation-ladder-count="no-limit" fo:hyphenation-keep="auto" loext:hyphenation-keep-type="column" loext:hyphenation-keep-line="false" fo:text-indent="0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adge_20_Inset" style:display-name="English Translation - Badge Inset" style:family="paragraph" style:parent-style-name="English_20_Translation_20_-_20_single_20_inset" style:default-outline-level="">
      <style:paragraph-properties fo:margin-left="0.5902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0783in" loext:padding-right="0.1374in" loext:padding-top="0.1374in" loext:padding-bottom="0.0783in"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Police_20_par_20_défaut" style:display-name="Police par défaut" style:family="text"/>
    <style:style style:name="Page_20_Number" style:display-name="Page Number" style:family="text">
      <style:text-properties style:font-name="Arial2" fo:font-family="Arial" style:font-family-generic="swiss" style:font-pitch="variable"/>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3" style:display-name="WW_CharLFO4LVL3" style:family="text">
      <style:text-properties fo:font-weight="normal" style:font-weight-asian="normal" style:font-weight-complex="normal"/>
    </style:style>
    <style:style style:name="WW_5f_CharLFO4LVL4" style:display-name="WW_CharLFO4LVL4" style:family="text">
      <style:text-properties fo:font-weight="normal" style:font-weight-asian="normal" style:font-weight-complex="normal"/>
    </style:style>
    <style:style style:name="WW_5f_CharLFO4LVL5" style:display-name="WW_CharLFO4LVL5" style:family="text">
      <style:text-properties fo:font-weight="normal" style:font-weight-asian="normal" style:font-weight-complex="norma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8" style:display-name="WW_CharLFO4LVL8"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style:font-name="OpenSymbol1" fo:font-family="OpenSymbol" style:font-family-generic="system" style:font-charset="x-symbol" fo:font-weight="normal" style:font-weight-asian="normal" style:font-weight-complex="normal"/>
    </style:style>
    <style:style style:name="WW_5f_CharLFO5LVL5" style:display-name="WW_CharLFO5LVL5" style:family="text">
      <style:text-properties style:font-name="OpenSymbol1" fo:font-family="OpenSymbol" style:font-family-generic="system" style:font-charset="x-symbol" fo:font-weight="normal" style:font-weight-asian="normal" style:font-weight-complex="normal"/>
    </style:style>
    <style:style style:name="WW_5f_CharLFO5LVL6" style:display-name="WW_CharLFO5LVL6" style:family="text">
      <style:text-properties style:font-name="OpenSymbol1" fo:font-family="OpenSymbol" style:font-family-generic="system" style:font-charset="x-symbol" fo:font-weight="normal" style:font-weight-asian="normal" style:font-weight-complex="normal"/>
    </style:style>
    <style:style style:name="WW_5f_CharLFO5LVL7" style:display-name="WW_CharLFO5LVL7" style:family="text">
      <style:text-properties style:font-name="OpenSymbol1" fo:font-family="OpenSymbol" style:font-family-generic="system" style:font-charset="x-symbol" fo:font-weight="normal" style:font-weight-asian="normal" style:font-weight-complex="normal"/>
    </style:style>
    <style:style style:name="WW_5f_CharLFO5LVL8" style:display-name="WW_CharLFO5LVL8" style:family="text">
      <style:text-properties style:font-name="OpenSymbol1" fo:font-family="OpenSymbol" style:font-family-generic="system" style:font-charset="x-symbol" fo:font-weight="normal" style:font-weight-asian="normal" style:font-weight-complex="normal"/>
    </style:style>
    <style:style style:name="WW_5f_CharLFO5LVL9" style:display-name="WW_CharLFO5LVL9" style:family="text">
      <style:text-properties style:font-name="OpenSymbol1" fo:font-family="OpenSymbol" style:font-family-generic="system" style:font-charset="x-symbol" fo:font-weight="normal" style:font-weight-asian="normal" style:font-weight-complex="normal"/>
    </style:style>
    <style:style style:name="WW_5f_CharLFO9LVL1" style:display-name="WW_CharLFO9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9LVL2" style:display-name="WW_CharLFO9LVL2" style:family="text">
      <style:text-properties style:text-position="sub 67%" fo:font-size="12pt" style:font-size-asian="12pt"/>
    </style:style>
    <style:style style:name="WW_5f_CharLFO9LVL3" style:display-name="WW_CharLFO9LVL3" style:family="text">
      <style:text-properties style:text-position="sub 67%" fo:font-size="12pt" style:font-size-asian="12pt"/>
    </style:style>
    <style:style style:name="WW_5f_CharLFO9LVL4" style:display-name="WW_CharLFO9LVL4" style:family="text">
      <style:text-properties style:text-position="sub 67%" fo:font-size="12pt" style:font-size-asian="12pt"/>
    </style:style>
    <style:style style:name="WW_5f_CharLFO9LVL5" style:display-name="WW_CharLFO9LVL5" style:family="text">
      <style:text-properties style:text-position="sub 67%" fo:font-size="12pt" style:font-size-asian="12pt"/>
    </style:style>
    <style:style style:name="WW_5f_CharLFO9LVL6" style:display-name="WW_CharLFO9LVL6" style:family="text">
      <style:text-properties style:text-position="sub 67%" fo:font-size="12pt" style:font-size-asian="12pt"/>
    </style:style>
    <style:style style:name="WW_5f_CharLFO9LVL7" style:display-name="WW_CharLFO9LVL7" style:family="text">
      <style:text-properties style:text-position="sub 67%" fo:font-size="12pt" style:font-size-asian="12pt"/>
    </style:style>
    <style:style style:name="WW_5f_CharLFO9LVL8" style:display-name="WW_CharLFO9LVL8" style:family="text">
      <style:text-properties style:text-position="sub 67%" fo:font-size="12pt" style:font-size-asian="12pt"/>
    </style:style>
    <style:style style:name="WW_5f_CharLFO9LVL9" style:display-name="WW_CharLFO9LVL9" style:family="text">
      <style:text-properties style:text-position="sub 67%" fo:font-size="12pt" style:font-size-asian="12pt"/>
    </style:style>
    <style:style style:name="WW_5f_CharLFO12LVL1" style:display-name="WW_CharLFO12LVL1" style:family="text">
      <style:text-properties style:font-name-complex="Wingdings 21" style:font-family-complex="'Wingdings 2'" style:font-family-generic-complex="roman" style:font-pitch-complex="variable" style:font-charset-complex="x-symbol"/>
    </style:style>
    <style:style style:name="WW_5f_CharLFO12LVL2" style:display-name="WW_CharLFO12LVL2" style:family="text">
      <style:text-properties style:font-name-complex="OpenSymbol1" style:font-family-complex="OpenSymbol" style:font-family-generic-complex="system" style:font-charset-complex="x-symbol"/>
    </style:style>
    <style:style style:name="WW_5f_CharLFO12LVL3" style:display-name="WW_CharLFO12LVL3" style:family="text">
      <style:text-properties style:font-name-complex="OpenSymbol1" style:font-family-complex="OpenSymbol" style:font-family-generic-complex="system" style:font-charset-complex="x-symbol"/>
    </style:style>
    <style:style style:name="WW_5f_CharLFO12LVL4" style:display-name="WW_CharLFO12LVL4" style:family="text">
      <style:text-properties style:font-name-complex="Wingdings 21" style:font-family-complex="'Wingdings 2'" style:font-family-generic-complex="roman" style:font-pitch-complex="variable" style:font-charset-complex="x-symbol"/>
    </style:style>
    <style:style style:name="WW_5f_CharLFO12LVL5" style:display-name="WW_CharLFO12LVL5" style:family="text">
      <style:text-properties style:font-name-complex="OpenSymbol1" style:font-family-complex="OpenSymbol" style:font-family-generic-complex="system" style:font-charset-complex="x-symbol"/>
    </style:style>
    <style:style style:name="WW_5f_CharLFO12LVL6" style:display-name="WW_CharLFO12LVL6" style:family="text">
      <style:text-properties style:font-name-complex="OpenSymbol1" style:font-family-complex="OpenSymbol" style:font-family-generic-complex="system" style:font-charset-complex="x-symbol"/>
    </style:style>
    <style:style style:name="WW_5f_CharLFO12LVL7" style:display-name="WW_CharLFO12LVL7" style:family="text">
      <style:text-properties style:font-name-complex="Wingdings 21" style:font-family-complex="'Wingdings 2'" style:font-family-generic-complex="roman" style:font-pitch-complex="variable" style:font-charset-complex="x-symbol"/>
    </style:style>
    <style:style style:name="WW_5f_CharLFO12LVL8" style:display-name="WW_CharLFO12LVL8" style:family="text">
      <style:text-properties style:font-name-complex="OpenSymbol1" style:font-family-complex="OpenSymbol" style:font-family-generic-complex="system" style:font-charset-complex="x-symbol"/>
    </style:style>
    <style:style style:name="WW_5f_CharLFO12LVL9" style:display-name="WW_CharLFO12LVL9" style:family="text">
      <style:text-properties style:font-name-complex="OpenSymbol1" style:font-family-complex="OpenSymbol" style:font-family-generic-complex="system" style:font-charset-complex="x-symbol"/>
    </style:style>
    <style:style style:name="WW_5f_CharLFO14LVL1" style:display-name="WW_CharLFO14LVL1" style:family="text">
      <style:text-properties style:font-name-complex="Wingdings 21" style:font-family-complex="'Wingdings 2'" style:font-family-generic-complex="roman" style:font-pitch-complex="variable" style:font-charset-complex="x-symbol"/>
    </style:style>
    <style:style style:name="WW_5f_CharLFO14LVL2" style:display-name="WW_CharLFO14LVL2" style:family="text">
      <style:text-properties style:font-name-complex="OpenSymbol1" style:font-family-complex="OpenSymbol" style:font-family-generic-complex="system" style:font-charset-complex="x-symbol"/>
    </style:style>
    <style:style style:name="WW_5f_CharLFO14LVL3" style:display-name="WW_CharLFO14LVL3" style:family="text">
      <style:text-properties style:font-name-complex="OpenSymbol1" style:font-family-complex="OpenSymbol" style:font-family-generic-complex="system" style:font-charset-complex="x-symbol"/>
    </style:style>
    <style:style style:name="WW_5f_CharLFO14LVL4" style:display-name="WW_CharLFO14LVL4" style:family="text">
      <style:text-properties style:font-name-complex="Wingdings 21" style:font-family-complex="'Wingdings 2'" style:font-family-generic-complex="roman" style:font-pitch-complex="variable" style:font-charset-complex="x-symbol"/>
    </style:style>
    <style:style style:name="WW_5f_CharLFO14LVL5" style:display-name="WW_CharLFO14LVL5" style:family="text">
      <style:text-properties style:font-name-complex="OpenSymbol1" style:font-family-complex="OpenSymbol" style:font-family-generic-complex="system" style:font-charset-complex="x-symbol"/>
    </style:style>
    <style:style style:name="WW_5f_CharLFO14LVL6" style:display-name="WW_CharLFO14LVL6" style:family="text">
      <style:text-properties style:font-name-complex="OpenSymbol1" style:font-family-complex="OpenSymbol" style:font-family-generic-complex="system" style:font-charset-complex="x-symbol"/>
    </style:style>
    <style:style style:name="WW_5f_CharLFO14LVL7" style:display-name="WW_CharLFO14LVL7" style:family="text">
      <style:text-properties style:font-name-complex="Wingdings 21" style:font-family-complex="'Wingdings 2'" style:font-family-generic-complex="roman" style:font-pitch-complex="variable" style:font-charset-complex="x-symbol"/>
    </style:style>
    <style:style style:name="WW_5f_CharLFO14LVL8" style:display-name="WW_CharLFO14LVL8" style:family="text">
      <style:text-properties style:font-name-complex="OpenSymbol1" style:font-family-complex="OpenSymbol" style:font-family-generic-complex="system" style:font-charset-complex="x-symbol"/>
    </style:style>
    <style:style style:name="WW_5f_CharLFO14LVL9" style:display-name="WW_CharLFO14LVL9" style:family="text">
      <style:text-properties style:font-name-complex="OpenSymbol1" style:font-family-complex="OpenSymbol" style:font-family-generic-complex="system" style:font-charset-complex="x-symbol"/>
    </style:style>
    <style:style style:name="WW_5f_CharLFO15LVL1" style:display-name="WW_CharLFO15LVL1" style:family="text">
      <style:text-properties style:font-name-complex="Wingdings 21" style:font-family-complex="'Wingdings 2'" style:font-family-generic-complex="roman" style:font-pitch-complex="variable" style:font-charset-complex="x-symbol"/>
    </style:style>
    <style:style style:name="WW_5f_CharLFO15LVL2" style:display-name="WW_CharLFO15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5LVL3" style:display-name="WW_CharLFO15LVL3" style:family="text">
      <style:text-properties style:font-name-complex="OpenSymbol1" style:font-family-complex="OpenSymbol" style:font-family-generic-complex="system" style:font-charset-complex="x-symbol"/>
    </style:style>
    <style:style style:name="WW_5f_CharLFO15LVL4" style:display-name="WW_CharLFO15LVL4" style:family="text">
      <style:text-properties style:font-name-complex="Wingdings 21" style:font-family-complex="'Wingdings 2'" style:font-family-generic-complex="roman" style:font-pitch-complex="variable" style:font-charset-complex="x-symbol"/>
    </style:style>
    <style:style style:name="WW_5f_CharLFO15LVL5" style:display-name="WW_CharLFO15LVL5" style:family="text">
      <style:text-properties style:font-name-complex="OpenSymbol1" style:font-family-complex="OpenSymbol" style:font-family-generic-complex="system" style:font-charset-complex="x-symbol"/>
    </style:style>
    <style:style style:name="WW_5f_CharLFO15LVL6" style:display-name="WW_CharLFO15LVL6" style:family="text">
      <style:text-properties style:font-name-complex="OpenSymbol1" style:font-family-complex="OpenSymbol" style:font-family-generic-complex="system" style:font-charset-complex="x-symbol"/>
    </style:style>
    <style:style style:name="WW_5f_CharLFO15LVL7" style:display-name="WW_CharLFO15LVL7" style:family="text">
      <style:text-properties style:font-name-complex="Wingdings 21" style:font-family-complex="'Wingdings 2'" style:font-family-generic-complex="roman" style:font-pitch-complex="variable" style:font-charset-complex="x-symbol"/>
    </style:style>
    <style:style style:name="WW_5f_CharLFO15LVL8" style:display-name="WW_CharLFO15LVL8" style:family="text">
      <style:text-properties style:font-name-complex="OpenSymbol1" style:font-family-complex="OpenSymbol" style:font-family-generic-complex="system" style:font-charset-complex="x-symbol"/>
    </style:style>
    <style:style style:name="WW_5f_CharLFO15LVL9" style:display-name="WW_CharLFO15LVL9" style:family="text">
      <style:text-properties style:font-name-complex="OpenSymbol1" style:font-family-complex="OpenSymbol" style:font-family-generic-complex="system" style:font-charset-complex="x-symbol"/>
    </style:style>
    <style:style style:name="WW_5f_CharLFO16LVL1" style:display-name="WW_CharLFO16LVL1" style:family="text">
      <style:text-properties style:font-name-complex="Wingdings 21" style:font-family-complex="'Wingdings 2'" style:font-family-generic-complex="roman" style:font-pitch-complex="variable" style:font-charset-complex="x-symbol"/>
    </style:style>
    <style:style style:name="WW_5f_CharLFO16LVL2" style:display-name="WW_CharLFO16LVL2" style:family="text">
      <style:text-properties style:font-name-complex="OpenSymbol1" style:font-family-complex="OpenSymbol" style:font-family-generic-complex="system" style:font-charset-complex="x-symbol"/>
    </style:style>
    <style:style style:name="WW_5f_CharLFO16LVL3" style:display-name="WW_CharLFO16LVL3" style:family="text">
      <style:text-properties style:font-name-complex="OpenSymbol1" style:font-family-complex="OpenSymbol" style:font-family-generic-complex="system" style:font-charset-complex="x-symbol"/>
    </style:style>
    <style:style style:name="WW_5f_CharLFO16LVL4" style:display-name="WW_CharLFO16LVL4" style:family="text">
      <style:text-properties style:font-name-complex="Wingdings 21" style:font-family-complex="'Wingdings 2'" style:font-family-generic-complex="roman" style:font-pitch-complex="variable" style:font-charset-complex="x-symbol"/>
    </style:style>
    <style:style style:name="WW_5f_CharLFO16LVL5" style:display-name="WW_CharLFO16LVL5" style:family="text">
      <style:text-properties style:font-name-complex="OpenSymbol1" style:font-family-complex="OpenSymbol" style:font-family-generic-complex="system" style:font-charset-complex="x-symbol"/>
    </style:style>
    <style:style style:name="WW_5f_CharLFO16LVL6" style:display-name="WW_CharLFO16LVL6" style:family="text">
      <style:text-properties style:font-name-complex="OpenSymbol1" style:font-family-complex="OpenSymbol" style:font-family-generic-complex="system" style:font-charset-complex="x-symbol"/>
    </style:style>
    <style:style style:name="WW_5f_CharLFO16LVL7" style:display-name="WW_CharLFO16LVL7" style:family="text">
      <style:text-properties style:font-name-complex="Wingdings 21" style:font-family-complex="'Wingdings 2'" style:font-family-generic-complex="roman" style:font-pitch-complex="variable" style:font-charset-complex="x-symbol"/>
    </style:style>
    <style:style style:name="WW_5f_CharLFO16LVL8" style:display-name="WW_CharLFO16LVL8" style:family="text">
      <style:text-properties style:font-name-complex="OpenSymbol1" style:font-family-complex="OpenSymbol" style:font-family-generic-complex="system" style:font-charset-complex="x-symbol"/>
    </style:style>
    <style:style style:name="WW_5f_CharLFO16LVL9" style:display-name="WW_CharLFO16LVL9" style:family="text">
      <style:text-properties style:font-name-complex="OpenSymbol1" style:font-family-complex="OpenSymbol" style:font-family-generic-complex="system" style:font-charset-complex="x-symbol"/>
    </style:style>
    <style:style style:name="WW_5f_CharLFO17LVL1" style:display-name="WW_CharLFO17LVL1" style:family="text">
      <style:text-properties style:font-name-complex="Wingdings 21" style:font-family-complex="'Wingdings 2'" style:font-family-generic-complex="roman" style:font-pitch-complex="variable" style:font-charset-complex="x-symbol"/>
    </style:style>
    <style:style style:name="WW_5f_CharLFO17LVL2" style:display-name="WW_CharLFO17LVL2" style:family="text">
      <style:text-properties style:font-name-complex="OpenSymbol1" style:font-family-complex="OpenSymbol" style:font-family-generic-complex="system" style:font-charset-complex="x-symbol"/>
    </style:style>
    <style:style style:name="WW_5f_CharLFO17LVL3" style:display-name="WW_CharLFO17LVL3" style:family="text">
      <style:text-properties style:font-name-complex="OpenSymbol1" style:font-family-complex="OpenSymbol" style:font-family-generic-complex="system" style:font-charset-complex="x-symbol"/>
    </style:style>
    <style:style style:name="WW_5f_CharLFO17LVL4" style:display-name="WW_CharLFO17LVL4" style:family="text">
      <style:text-properties style:font-name-complex="Wingdings 21" style:font-family-complex="'Wingdings 2'" style:font-family-generic-complex="roman" style:font-pitch-complex="variable" style:font-charset-complex="x-symbol"/>
    </style:style>
    <style:style style:name="WW_5f_CharLFO17LVL5" style:display-name="WW_CharLFO17LVL5" style:family="text">
      <style:text-properties style:font-name-complex="OpenSymbol1" style:font-family-complex="OpenSymbol" style:font-family-generic-complex="system" style:font-charset-complex="x-symbol"/>
    </style:style>
    <style:style style:name="WW_5f_CharLFO17LVL6" style:display-name="WW_CharLFO17LVL6" style:family="text">
      <style:text-properties style:font-name-complex="OpenSymbol1" style:font-family-complex="OpenSymbol" style:font-family-generic-complex="system" style:font-charset-complex="x-symbol"/>
    </style:style>
    <style:style style:name="WW_5f_CharLFO17LVL7" style:display-name="WW_CharLFO17LVL7" style:family="text">
      <style:text-properties style:font-name-complex="Wingdings 21" style:font-family-complex="'Wingdings 2'" style:font-family-generic-complex="roman" style:font-pitch-complex="variable" style:font-charset-complex="x-symbol"/>
    </style:style>
    <style:style style:name="WW_5f_CharLFO17LVL8" style:display-name="WW_CharLFO17LVL8" style:family="text">
      <style:text-properties style:font-name-complex="OpenSymbol1" style:font-family-complex="OpenSymbol" style:font-family-generic-complex="system" style:font-charset-complex="x-symbol"/>
    </style:style>
    <style:style style:name="WW_5f_CharLFO17LVL9" style:display-name="WW_CharLFO17LVL9" style:family="text">
      <style:text-properties style:font-name-complex="OpenSymbol1" style:font-family-complex="OpenSymbol" style:font-family-generic-complex="system" style:font-charset-complex="x-symbol"/>
    </style:style>
    <style:style style:name="WW_5f_CharLFO18LVL1" style:display-name="WW_CharLFO18LVL1" style:family="text">
      <style:text-properties style:font-name-complex="Wingdings 21" style:font-family-complex="'Wingdings 2'" style:font-family-generic-complex="roman" style:font-pitch-complex="variable" style:font-charset-complex="x-symbol"/>
    </style:style>
    <style:style style:name="WW_5f_CharLFO18LVL2" style:display-name="WW_CharLFO18LVL2" style:family="text">
      <style:text-properties style:font-name-complex="OpenSymbol1" style:font-family-complex="OpenSymbol" style:font-family-generic-complex="system" style:font-charset-complex="x-symbol"/>
    </style:style>
    <style:style style:name="WW_5f_CharLFO18LVL3" style:display-name="WW_CharLFO18LVL3" style:family="text">
      <style:text-properties style:font-name-complex="OpenSymbol1" style:font-family-complex="OpenSymbol" style:font-family-generic-complex="system" style:font-charset-complex="x-symbol"/>
    </style:style>
    <style:style style:name="WW_5f_CharLFO18LVL4" style:display-name="WW_CharLFO18LVL4" style:family="text">
      <style:text-properties style:font-name-complex="Wingdings 21" style:font-family-complex="'Wingdings 2'" style:font-family-generic-complex="roman" style:font-pitch-complex="variable" style:font-charset-complex="x-symbol"/>
    </style:style>
    <style:style style:name="WW_5f_CharLFO18LVL5" style:display-name="WW_CharLFO18LVL5" style:family="text">
      <style:text-properties style:font-name-complex="OpenSymbol1" style:font-family-complex="OpenSymbol" style:font-family-generic-complex="system" style:font-charset-complex="x-symbol"/>
    </style:style>
    <style:style style:name="WW_5f_CharLFO18LVL6" style:display-name="WW_CharLFO18LVL6" style:family="text">
      <style:text-properties style:font-name-complex="OpenSymbol1" style:font-family-complex="OpenSymbol" style:font-family-generic-complex="system" style:font-charset-complex="x-symbol"/>
    </style:style>
    <style:style style:name="WW_5f_CharLFO18LVL7" style:display-name="WW_CharLFO18LVL7" style:family="text">
      <style:text-properties style:font-name-complex="Wingdings 21" style:font-family-complex="'Wingdings 2'" style:font-family-generic-complex="roman" style:font-pitch-complex="variable" style:font-charset-complex="x-symbol"/>
    </style:style>
    <style:style style:name="WW_5f_CharLFO18LVL8" style:display-name="WW_CharLFO18LVL8" style:family="text">
      <style:text-properties style:font-name-complex="OpenSymbol1" style:font-family-complex="OpenSymbol" style:font-family-generic-complex="system" style:font-charset-complex="x-symbol"/>
    </style:style>
    <style:style style:name="WW_5f_CharLFO18LVL9" style:display-name="WW_CharLFO18LVL9" style:family="text">
      <style:text-properties style:font-name-complex="OpenSymbol1" style:font-family-complex="OpenSymbol" style:font-family-generic-complex="system" style:font-charset-complex="x-symbol"/>
    </style:style>
    <style:style style:name="WW_5f_CharLFO19LVL1" style:display-name="WW_CharLFO19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9LVL2" style:display-name="WW_CharLFO19LVL2" style:family="text">
      <style:text-properties style:font-name-complex="OpenSymbol1" style:font-family-complex="OpenSymbol" style:font-family-generic-complex="system" style:font-charset-complex="x-symbol"/>
    </style:style>
    <style:style style:name="WW_5f_CharLFO19LVL3" style:display-name="WW_CharLFO19LVL3" style:family="text">
      <style:text-properties style:font-name-complex="OpenSymbol1" style:font-family-complex="OpenSymbol" style:font-family-generic-complex="system" style:font-charset-complex="x-symbol"/>
    </style:style>
    <style:style style:name="WW_5f_CharLFO19LVL4" style:display-name="WW_CharLFO19LVL4" style:family="text">
      <style:text-properties style:font-name-complex="Wingdings 21" style:font-family-complex="'Wingdings 2'" style:font-family-generic-complex="roman" style:font-pitch-complex="variable" style:font-charset-complex="x-symbol"/>
    </style:style>
    <style:style style:name="WW_5f_CharLFO19LVL5" style:display-name="WW_CharLFO19LVL5" style:family="text">
      <style:text-properties style:font-name-complex="OpenSymbol1" style:font-family-complex="OpenSymbol" style:font-family-generic-complex="system" style:font-charset-complex="x-symbol"/>
    </style:style>
    <style:style style:name="WW_5f_CharLFO19LVL6" style:display-name="WW_CharLFO19LVL6" style:family="text">
      <style:text-properties style:font-name-complex="OpenSymbol1" style:font-family-complex="OpenSymbol" style:font-family-generic-complex="system" style:font-charset-complex="x-symbol"/>
    </style:style>
    <style:style style:name="WW_5f_CharLFO19LVL7" style:display-name="WW_CharLFO19LVL7" style:family="text">
      <style:text-properties style:font-name-complex="Wingdings 21" style:font-family-complex="'Wingdings 2'" style:font-family-generic-complex="roman" style:font-pitch-complex="variable" style:font-charset-complex="x-symbol"/>
    </style:style>
    <style:style style:name="WW_5f_CharLFO19LVL8" style:display-name="WW_CharLFO19LVL8" style:family="text">
      <style:text-properties style:font-name-complex="OpenSymbol1" style:font-family-complex="OpenSymbol" style:font-family-generic-complex="system" style:font-charset-complex="x-symbol"/>
    </style:style>
    <style:style style:name="WW_5f_CharLFO19LVL9" style:display-name="WW_CharLFO19LVL9" style:family="text">
      <style:text-properties style:font-name-complex="OpenSymbol1" style:font-family-complex="OpenSymbol" style:font-family-generic-complex="system" style:font-charset-complex="x-symbol"/>
    </style:style>
    <style:style style:name="WW_5f_CharLFO20LVL1" style:display-name="WW_CharLFO20LVL1" style:family="text">
      <style:text-properties style:font-name-complex="Wingdings 21" style:font-family-complex="'Wingdings 2'" style:font-family-generic-complex="roman" style:font-pitch-complex="variable" style:font-charset-complex="x-symbol"/>
    </style:style>
    <style:style style:name="WW_5f_CharLFO20LVL2" style:display-name="WW_CharLFO20LVL2" style:family="text">
      <style:text-properties style:font-name-complex="OpenSymbol1" style:font-family-complex="OpenSymbol" style:font-family-generic-complex="system" style:font-charset-complex="x-symbol"/>
    </style:style>
    <style:style style:name="WW_5f_CharLFO20LVL3" style:display-name="WW_CharLFO20LVL3" style:family="text">
      <style:text-properties style:font-name-complex="OpenSymbol1" style:font-family-complex="OpenSymbol" style:font-family-generic-complex="system" style:font-charset-complex="x-symbol"/>
    </style:style>
    <style:style style:name="WW_5f_CharLFO20LVL4" style:display-name="WW_CharLFO20LVL4" style:family="text">
      <style:text-properties style:font-name-complex="Wingdings 21" style:font-family-complex="'Wingdings 2'" style:font-family-generic-complex="roman" style:font-pitch-complex="variable" style:font-charset-complex="x-symbol"/>
    </style:style>
    <style:style style:name="WW_5f_CharLFO20LVL5" style:display-name="WW_CharLFO20LVL5" style:family="text">
      <style:text-properties style:font-name-complex="OpenSymbol1" style:font-family-complex="OpenSymbol" style:font-family-generic-complex="system" style:font-charset-complex="x-symbol"/>
    </style:style>
    <style:style style:name="WW_5f_CharLFO20LVL6" style:display-name="WW_CharLFO20LVL6" style:family="text">
      <style:text-properties style:font-name-complex="OpenSymbol1" style:font-family-complex="OpenSymbol" style:font-family-generic-complex="system" style:font-charset-complex="x-symbol"/>
    </style:style>
    <style:style style:name="WW_5f_CharLFO20LVL7" style:display-name="WW_CharLFO20LVL7" style:family="text">
      <style:text-properties style:font-name-complex="Wingdings 21" style:font-family-complex="'Wingdings 2'" style:font-family-generic-complex="roman" style:font-pitch-complex="variable" style:font-charset-complex="x-symbol"/>
    </style:style>
    <style:style style:name="WW_5f_CharLFO20LVL8" style:display-name="WW_CharLFO20LVL8" style:family="text">
      <style:text-properties style:font-name-complex="OpenSymbol1" style:font-family-complex="OpenSymbol" style:font-family-generic-complex="system" style:font-charset-complex="x-symbol"/>
    </style:style>
    <style:style style:name="WW_5f_CharLFO20LVL9" style:display-name="WW_CharLFO20LVL9" style:family="text">
      <style:text-properties style:font-name-complex="OpenSymbol1" style:font-family-complex="OpenSymbol" style:font-family-generic-complex="system" style:font-charset-complex="x-symbol"/>
    </style:style>
    <style:style style:name="WW_5f_CharLFO21LVL1" style:display-name="WW_CharLFO21LVL1" style:family="text">
      <style:text-properties style:font-name-complex="Wingdings 21" style:font-family-complex="'Wingdings 2'" style:font-family-generic-complex="roman" style:font-pitch-complex="variable" style:font-charset-complex="x-symbol"/>
    </style:style>
    <style:style style:name="WW_5f_CharLFO21LVL2" style:display-name="WW_CharLFO21LVL2" style:family="text">
      <style:text-properties style:font-name-complex="OpenSymbol1" style:font-family-complex="OpenSymbol" style:font-family-generic-complex="system" style:font-charset-complex="x-symbol"/>
    </style:style>
    <style:style style:name="WW_5f_CharLFO21LVL3" style:display-name="WW_CharLFO21LVL3" style:family="text">
      <style:text-properties style:font-name-complex="OpenSymbol1" style:font-family-complex="OpenSymbol" style:font-family-generic-complex="system" style:font-charset-complex="x-symbol"/>
    </style:style>
    <style:style style:name="WW_5f_CharLFO21LVL4" style:display-name="WW_CharLFO21LVL4" style:family="text">
      <style:text-properties style:font-name-complex="Wingdings 21" style:font-family-complex="'Wingdings 2'" style:font-family-generic-complex="roman" style:font-pitch-complex="variable" style:font-charset-complex="x-symbol"/>
    </style:style>
    <style:style style:name="WW_5f_CharLFO21LVL5" style:display-name="WW_CharLFO21LVL5" style:family="text">
      <style:text-properties style:font-name-complex="OpenSymbol1" style:font-family-complex="OpenSymbol" style:font-family-generic-complex="system" style:font-charset-complex="x-symbol"/>
    </style:style>
    <style:style style:name="WW_5f_CharLFO21LVL6" style:display-name="WW_CharLFO21LVL6" style:family="text">
      <style:text-properties style:font-name-complex="OpenSymbol1" style:font-family-complex="OpenSymbol" style:font-family-generic-complex="system" style:font-charset-complex="x-symbol"/>
    </style:style>
    <style:style style:name="WW_5f_CharLFO21LVL7" style:display-name="WW_CharLFO21LVL7" style:family="text">
      <style:text-properties style:font-name-complex="Wingdings 21" style:font-family-complex="'Wingdings 2'" style:font-family-generic-complex="roman" style:font-pitch-complex="variable" style:font-charset-complex="x-symbol"/>
    </style:style>
    <style:style style:name="WW_5f_CharLFO21LVL8" style:display-name="WW_CharLFO21LVL8" style:family="text">
      <style:text-properties style:font-name-complex="OpenSymbol1" style:font-family-complex="OpenSymbol" style:font-family-generic-complex="system" style:font-charset-complex="x-symbol"/>
    </style:style>
    <style:style style:name="WW_5f_CharLFO21LVL9" style:display-name="WW_CharLFO21LVL9" style:family="text">
      <style:text-properties style:font-name-complex="OpenSymbol1" style:font-family-complex="OpenSymbol" style:font-family-generic-complex="system" style:font-charset-complex="x-symbol"/>
    </style:style>
    <style:style style:name="WW_5f_CharLFO22LVL1" style:display-name="WW_CharLFO22LVL1" style:family="text">
      <style:text-properties style:font-name-complex="Wingdings 21" style:font-family-complex="'Wingdings 2'" style:font-family-generic-complex="roman" style:font-pitch-complex="variable" style:font-charset-complex="x-symbol"/>
    </style:style>
    <style:style style:name="WW_5f_CharLFO22LVL2" style:display-name="WW_CharLFO22LVL2" style:family="text">
      <style:text-properties style:font-name-complex="OpenSymbol1" style:font-family-complex="OpenSymbol" style:font-family-generic-complex="system" style:font-charset-complex="x-symbol"/>
    </style:style>
    <style:style style:name="WW_5f_CharLFO22LVL3" style:display-name="WW_CharLFO22LVL3" style:family="text">
      <style:text-properties style:font-name-complex="OpenSymbol1" style:font-family-complex="OpenSymbol" style:font-family-generic-complex="system" style:font-charset-complex="x-symbol"/>
    </style:style>
    <style:style style:name="WW_5f_CharLFO22LVL4" style:display-name="WW_CharLFO22LVL4" style:family="text">
      <style:text-properties style:font-name-complex="Wingdings 21" style:font-family-complex="'Wingdings 2'" style:font-family-generic-complex="roman" style:font-pitch-complex="variable" style:font-charset-complex="x-symbol"/>
    </style:style>
    <style:style style:name="WW_5f_CharLFO22LVL5" style:display-name="WW_CharLFO22LVL5" style:family="text">
      <style:text-properties style:font-name-complex="OpenSymbol1" style:font-family-complex="OpenSymbol" style:font-family-generic-complex="system" style:font-charset-complex="x-symbol"/>
    </style:style>
    <style:style style:name="WW_5f_CharLFO22LVL6" style:display-name="WW_CharLFO22LVL6" style:family="text">
      <style:text-properties style:font-name-complex="OpenSymbol1" style:font-family-complex="OpenSymbol" style:font-family-generic-complex="system" style:font-charset-complex="x-symbol"/>
    </style:style>
    <style:style style:name="WW_5f_CharLFO22LVL7" style:display-name="WW_CharLFO22LVL7" style:family="text">
      <style:text-properties style:font-name-complex="Wingdings 21" style:font-family-complex="'Wingdings 2'" style:font-family-generic-complex="roman" style:font-pitch-complex="variable" style:font-charset-complex="x-symbol"/>
    </style:style>
    <style:style style:name="WW_5f_CharLFO22LVL8" style:display-name="WW_CharLFO22LVL8" style:family="text">
      <style:text-properties style:font-name-complex="OpenSymbol1" style:font-family-complex="OpenSymbol" style:font-family-generic-complex="system" style:font-charset-complex="x-symbol"/>
    </style:style>
    <style:style style:name="WW_5f_CharLFO22LVL9" style:display-name="WW_CharLFO22LVL9" style:family="text">
      <style:text-properties style:font-name-complex="OpenSymbol1" style:font-family-complex="OpenSymbol" style:font-family-generic-complex="system" style:font-charset-complex="x-symbol"/>
    </style:style>
    <style:style style:name="WW_5f_CharLFO23LVL1" style:display-name="WW_CharLFO23LVL1" style:family="text">
      <style:text-properties style:font-name-complex="Wingdings 21" style:font-family-complex="'Wingdings 2'" style:font-family-generic-complex="roman" style:font-pitch-complex="variable" style:font-charset-complex="x-symbol"/>
    </style:style>
    <style:style style:name="WW_5f_CharLFO23LVL2" style:display-name="WW_CharLFO23LVL2" style:family="text">
      <style:text-properties style:font-name-complex="OpenSymbol1" style:font-family-complex="OpenSymbol" style:font-family-generic-complex="system" style:font-charset-complex="x-symbol"/>
    </style:style>
    <style:style style:name="WW_5f_CharLFO23LVL3" style:display-name="WW_CharLFO23LVL3" style:family="text">
      <style:text-properties style:font-name-complex="OpenSymbol1" style:font-family-complex="OpenSymbol" style:font-family-generic-complex="system" style:font-charset-complex="x-symbol"/>
    </style:style>
    <style:style style:name="WW_5f_CharLFO23LVL4" style:display-name="WW_CharLFO23LVL4" style:family="text">
      <style:text-properties style:font-name-complex="Wingdings 21" style:font-family-complex="'Wingdings 2'" style:font-family-generic-complex="roman" style:font-pitch-complex="variable" style:font-charset-complex="x-symbol"/>
    </style:style>
    <style:style style:name="WW_5f_CharLFO23LVL5" style:display-name="WW_CharLFO23LVL5" style:family="text">
      <style:text-properties style:font-name-complex="OpenSymbol1" style:font-family-complex="OpenSymbol" style:font-family-generic-complex="system" style:font-charset-complex="x-symbol"/>
    </style:style>
    <style:style style:name="WW_5f_CharLFO23LVL6" style:display-name="WW_CharLFO23LVL6" style:family="text">
      <style:text-properties style:font-name-complex="OpenSymbol1" style:font-family-complex="OpenSymbol" style:font-family-generic-complex="system" style:font-charset-complex="x-symbol"/>
    </style:style>
    <style:style style:name="WW_5f_CharLFO23LVL7" style:display-name="WW_CharLFO23LVL7" style:family="text">
      <style:text-properties style:font-name-complex="Wingdings 21" style:font-family-complex="'Wingdings 2'" style:font-family-generic-complex="roman" style:font-pitch-complex="variable" style:font-charset-complex="x-symbol"/>
    </style:style>
    <style:style style:name="WW_5f_CharLFO23LVL8" style:display-name="WW_CharLFO23LVL8" style:family="text">
      <style:text-properties style:font-name-complex="OpenSymbol1" style:font-family-complex="OpenSymbol" style:font-family-generic-complex="system" style:font-charset-complex="x-symbol"/>
    </style:style>
    <style:style style:name="WW_5f_CharLFO23LVL9" style:display-name="WW_CharLFO23LVL9" style:family="text">
      <style:text-properties style:font-name-complex="OpenSymbol1" style:font-family-complex="OpenSymbol" style:font-family-generic-complex="system" style:font-charset-complex="x-symbol"/>
    </style:style>
    <style:style style:name="WW_5f_CharLFO24LVL1" style:display-name="WW_CharLFO24LVL1" style:family="text">
      <style:text-properties style:font-name-complex="Wingdings 21" style:font-family-complex="'Wingdings 2'" style:font-family-generic-complex="roman" style:font-pitch-complex="variable" style:font-charset-complex="x-symbol"/>
    </style:style>
    <style:style style:name="WW_5f_CharLFO24LVL2" style:display-name="WW_CharLFO24LVL2" style:family="text">
      <style:text-properties style:font-name-complex="OpenSymbol1" style:font-family-complex="OpenSymbol" style:font-family-generic-complex="system" style:font-charset-complex="x-symbol"/>
    </style:style>
    <style:style style:name="WW_5f_CharLFO24LVL3" style:display-name="WW_CharLFO24LVL3" style:family="text">
      <style:text-properties style:font-name-complex="OpenSymbol1" style:font-family-complex="OpenSymbol" style:font-family-generic-complex="system" style:font-charset-complex="x-symbol"/>
    </style:style>
    <style:style style:name="WW_5f_CharLFO24LVL4" style:display-name="WW_CharLFO24LVL4" style:family="text">
      <style:text-properties style:font-name-complex="Wingdings 21" style:font-family-complex="'Wingdings 2'" style:font-family-generic-complex="roman" style:font-pitch-complex="variable" style:font-charset-complex="x-symbol"/>
    </style:style>
    <style:style style:name="WW_5f_CharLFO24LVL5" style:display-name="WW_CharLFO24LVL5" style:family="text">
      <style:text-properties style:font-name-complex="OpenSymbol1" style:font-family-complex="OpenSymbol" style:font-family-generic-complex="system" style:font-charset-complex="x-symbol"/>
    </style:style>
    <style:style style:name="WW_5f_CharLFO24LVL6" style:display-name="WW_CharLFO24LVL6" style:family="text">
      <style:text-properties style:font-name-complex="OpenSymbol1" style:font-family-complex="OpenSymbol" style:font-family-generic-complex="system" style:font-charset-complex="x-symbol"/>
    </style:style>
    <style:style style:name="WW_5f_CharLFO24LVL7" style:display-name="WW_CharLFO24LVL7" style:family="text">
      <style:text-properties style:font-name-complex="Wingdings 21" style:font-family-complex="'Wingdings 2'" style:font-family-generic-complex="roman" style:font-pitch-complex="variable" style:font-charset-complex="x-symbol"/>
    </style:style>
    <style:style style:name="WW_5f_CharLFO24LVL8" style:display-name="WW_CharLFO24LVL8" style:family="text">
      <style:text-properties style:font-name-complex="OpenSymbol1" style:font-family-complex="OpenSymbol" style:font-family-generic-complex="system" style:font-charset-complex="x-symbol"/>
    </style:style>
    <style:style style:name="WW_5f_CharLFO24LVL9" style:display-name="WW_CharLFO24LVL9" style:family="text">
      <style:text-properties style:font-name-complex="OpenSymbol1" style:font-family-complex="OpenSymbol" style:font-family-generic-complex="system" style:font-charset-complex="x-symbol"/>
    </style:style>
    <style:style style:name="WW_5f_CharLFO25LVL1" style:display-name="WW_CharLFO25LVL1" style:family="text">
      <style:text-properties style:font-name-complex="Wingdings 21" style:font-family-complex="'Wingdings 2'" style:font-family-generic-complex="roman" style:font-pitch-complex="variable" style:font-charset-complex="x-symbol"/>
    </style:style>
    <style:style style:name="WW_5f_CharLFO25LVL2" style:display-name="WW_CharLFO25LVL2" style:family="text">
      <style:text-properties style:font-name-complex="OpenSymbol1" style:font-family-complex="OpenSymbol" style:font-family-generic-complex="system" style:font-charset-complex="x-symbol"/>
    </style:style>
    <style:style style:name="WW_5f_CharLFO25LVL3" style:display-name="WW_CharLFO25LVL3" style:family="text">
      <style:text-properties style:font-name-complex="OpenSymbol1" style:font-family-complex="OpenSymbol" style:font-family-generic-complex="system" style:font-charset-complex="x-symbol"/>
    </style:style>
    <style:style style:name="WW_5f_CharLFO25LVL4" style:display-name="WW_CharLFO25LVL4" style:family="text">
      <style:text-properties style:font-name-complex="Wingdings 21" style:font-family-complex="'Wingdings 2'" style:font-family-generic-complex="roman" style:font-pitch-complex="variable" style:font-charset-complex="x-symbol"/>
    </style:style>
    <style:style style:name="WW_5f_CharLFO25LVL5" style:display-name="WW_CharLFO25LVL5" style:family="text">
      <style:text-properties style:font-name-complex="OpenSymbol1" style:font-family-complex="OpenSymbol" style:font-family-generic-complex="system" style:font-charset-complex="x-symbol"/>
    </style:style>
    <style:style style:name="WW_5f_CharLFO25LVL6" style:display-name="WW_CharLFO25LVL6" style:family="text">
      <style:text-properties style:font-name-complex="OpenSymbol1" style:font-family-complex="OpenSymbol" style:font-family-generic-complex="system" style:font-charset-complex="x-symbol"/>
    </style:style>
    <style:style style:name="WW_5f_CharLFO25LVL7" style:display-name="WW_CharLFO25LVL7" style:family="text">
      <style:text-properties style:font-name-complex="Wingdings 21" style:font-family-complex="'Wingdings 2'" style:font-family-generic-complex="roman" style:font-pitch-complex="variable" style:font-charset-complex="x-symbol"/>
    </style:style>
    <style:style style:name="WW_5f_CharLFO25LVL8" style:display-name="WW_CharLFO25LVL8" style:family="text">
      <style:text-properties style:font-name-complex="OpenSymbol1" style:font-family-complex="OpenSymbol" style:font-family-generic-complex="system" style:font-charset-complex="x-symbol"/>
    </style:style>
    <style:style style:name="WW_5f_CharLFO25LVL9" style:display-name="WW_CharLFO25LVL9" style:family="text">
      <style:text-properties style:font-name-complex="OpenSymbol1" style:font-family-complex="OpenSymbol" style:font-family-generic-complex="system" style:font-charset-complex="x-symbol"/>
    </style:style>
    <style:style style:name="WW_5f_CharLFO27LVL1" style:display-name="WW_CharLFO27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2" style:display-name="WW_CharLFO27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3" style:display-name="WW_CharLFO27LVL3"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4" style:display-name="WW_CharLFO27LVL4"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5" style:display-name="WW_CharLFO27LVL5"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6" style:display-name="WW_CharLFO27LVL6"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7" style:display-name="WW_CharLFO27LVL7"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8" style:display-name="WW_CharLFO27LVL8"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9" style:display-name="WW_CharLFO27LVL9"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1" style:display-name="WW_CharLFO28LVL1"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2" style:display-name="WW_CharLFO28LVL2"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3" style:display-name="WW_CharLFO28LVL3"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4" style:display-name="WW_CharLFO28LVL4"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5" style:display-name="WW_CharLFO28LVL5"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6" style:display-name="WW_CharLFO28LVL6"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7" style:display-name="WW_CharLFO28LVL7"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8" style:display-name="WW_CharLFO28LVL8"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9" style:display-name="WW_CharLFO28LVL9"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1" style:display-name="WW_CharLFO29LVL1" style:family="text">
      <style:text-properties style:font-name="StarSymbol" fo:font-family="StarSymbol" style:font-family-generic="system"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2" style:display-name="WW_CharLFO2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3" style:display-name="WW_CharLFO2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4" style:display-name="WW_CharLFO2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5" style:display-name="WW_CharLFO2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6" style:display-name="WW_CharLFO2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7" style:display-name="WW_CharLFO2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8" style:display-name="WW_CharLFO2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9" style:display-name="WW_CharLFO2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1" style:display-name="WW_CharLFO30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2" style:display-name="WW_CharLFO30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3" style:display-name="WW_CharLFO30LVL3"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4" style:display-name="WW_CharLFO30LVL4"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5" style:display-name="WW_CharLFO30LVL5"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6" style:display-name="WW_CharLFO30LVL6"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7" style:display-name="WW_CharLFO30LVL7"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8" style:display-name="WW_CharLFO30LVL8"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9" style:display-name="WW_CharLFO30LVL9"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1" style:display-name="WW_CharLFO31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2" style:display-name="WW_CharLFO31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3" style:display-name="WW_CharLFO31LVL3"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4" style:display-name="WW_CharLFO31LVL4"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5" style:display-name="WW_CharLFO31LVL5"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6" style:display-name="WW_CharLFO31LVL6"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7" style:display-name="WW_CharLFO31LVL7"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8" style:display-name="WW_CharLFO31LVL8"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9" style:display-name="WW_CharLFO31LVL9"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WW_5f_CharLFO33LVL1" style:display-name="WW_CharLFO33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2" style:display-name="WW_CharLFO33LVL2"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3" style:display-name="WW_CharLFO33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4" style:display-name="WW_CharLFO33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5" style:display-name="WW_CharLFO33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6" style:display-name="WW_CharLFO33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7" style:display-name="WW_CharLFO33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8" style:display-name="WW_CharLFO33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9" style:display-name="WW_CharLFO33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6LVL1" style:display-name="WW_CharLFO36LVL1" style:family="text">
      <style:text-properties style:font-name="StarSymbol" fo:font-family="StarSymbol" style:font-family-generic="system"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2" style:display-name="WW_CharLFO3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3" style:display-name="WW_CharLFO3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4" style:display-name="WW_CharLFO3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5" style:display-name="WW_CharLFO3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6" style:display-name="WW_CharLFO3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7" style:display-name="WW_CharLFO3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8" style:display-name="WW_CharLFO3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9" style:display-name="WW_CharLFO3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Answers_20_text_20_-_20_italics" style:display-name="Answers text - italics" style:family="text">
      <style:text-properties fo:color="#000000" loext:opacity="100%" style:font-name="Andika4" fo:font-family="Andika" style:font-style-name="Regular" style:font-pitch="variable" fo:font-size="10pt" fo:language="en" fo:country="US" fo:font-style="italic" fo:font-weight="normal" fo:background-color="transparent" style:font-name-asian="ヒラギノ角ゴ Pro W3" style:font-family-asian="'ヒラギノ角ゴ Pro W3'" style:font-family-generic-asian="system" style:font-pitch-asian="variable" style:font-size-asian="10pt" style:language-asian="en" style:country-asian="US" style:font-style-asian="italic" style:font-weight-asian="normal" style:font-name-complex="Times New Roman2" style:font-family-complex="'Times New Roman'" style:font-family-generic-complex="system" style:font-pitch-complex="variable" style:font-size-complex="12pt" style:language-complex="hi" style:country-complex="IN" style:font-style-complex="italic" style:font-weight-complex="normal"/>
    </style:style>
    <style:style style:name="WW_5f_CharLFO34LVL1" style:display-name="WW_CharLFO34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2" style:display-name="WW_CharLFO34LVL2"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3" style:display-name="WW_CharLFO34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4" style:display-name="WW_CharLFO34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5" style:display-name="WW_CharLFO34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6" style:display-name="WW_CharLFO34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7" style:display-name="WW_CharLFO34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8" style:display-name="WW_CharLFO34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4LVL9" style:display-name="WW_CharLFO34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1" style:display-name="WW_CharLFO41LVL1"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2" style:display-name="WW_CharLFO41LVL2" style:family="text">
      <style:text-properties style:font-name="StarSymbol"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3" style:display-name="WW_CharLFO41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4" style:display-name="WW_CharLFO41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5" style:display-name="WW_CharLFO41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6" style:display-name="WW_CharLFO41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7" style:display-name="WW_CharLFO41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8" style:display-name="WW_CharLFO41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41LVL9" style:display-name="WW_CharLFO41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Graphics" style:family="graphic">
      <style:graphic-properties svg:width="1.1811in" fo:min-height="1.1811in" text:anchor-type="paragraph" svg:x="-0.0945in" svg:y="-0.028in" fo:margin-left="0in" fo:margin-right="0in" fo:margin-top="0in" fo:margin-bottom="0in"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Bible_5f_Story_5f_Box" style:display-name="Bible_Story_Box" style:family="graphic" style:parent-style-name="Frame">
      <style:graphic-properties svg:width="1.378in" fo:min-height="1.2055in" svg:x="-0.0181in" svg:y="0.0035in" fo:margin-left="0in" fo:margin-right="0.0398in" fo:margin-top="0in" fo:margin-bottom="0in"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in" fo:border="none" draw:wrap-influence-on-position="once-concurrent" loext:allow-overlap="false">
        <style:columns fo:column-count="1" fo:column-gap="0in"/>
      </style:graphic-properties>
    </style:style>
    <style:style style:name="Lesson_5f_Number" style:display-name="Lesson_Number" style:family="graphic" style:parent-style-name="Frame">
      <style:graphic-properties svg:width="1.052in" svg:height="0.9992in" svg:x="0in" svg:y="0.0984in" fo:margin-left="0in" fo:margin-right="0.0783in" fo:margin-top="0in" fo:margin-bottom="0in"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0591in" fo:border="none" style:flow-with-text="true" draw:wrap-influence-on-position="once-concurrent" loext:allow-overlap="false" draw:textarea-vertical-align="middle">
        <style:columns fo:column-count="1" fo:column-gap="0in"/>
      </style:graphic-properties>
    </style:style>
    <style:style style:name="Badge_20_Graphic" style:display-name="Badge Graphic" style:family="graphic" style:parent-style-name="Graphics">
      <style:graphic-properties svg:width="0.5516in" fo:min-height="0.0161in" text:anchor-type="as-char" svg:x="0in" svg:y="-0.4925in" style:vertical-pos="from-top" style:horizontal-pos="from-left" style:horizontal-rel="paragraph"/>
    </style:style>
    <style:style style:name="Bible_5f_Story_5f_Picture" style:display-name="Bible_Story_Picture" style:family="graphic" style:parent-style-name="Graphics">
      <style:graphic-properties svg:width="1.2917in" fo:min-height="0.9366in" svg:x="0in" svg:y="-0.9366in" fo:margin-left="0in" fo:margin-right="0in" fo:margin-top="0in" fo:margin-bottom="0in" style:vertical-pos="top" style:vertical-rel="paragraph" style:horizontal-pos="center" style:horizontal-rel="paragraph" fo:background-color="transparent" draw:fill="none" draw:fill-color="#729fcf" draw:textarea-vertical-align="bottom">
        <style:columns fo:column-count="1" fo:column-gap="0in"/>
      </style:graphic-properties>
    </style:style>
    <style:style style:name="Number_20_Graphic" style:display-name="Number Graphic" style:family="graphic" style:parent-style-name="Graphics">
      <style:graphic-properties svg:width="1.0752in" fo:min-height="1.0752in" svg:x="0in" svg:y="0.0161in" fo:margin-left="0in" fo:margin-right="0.0398in" fo:margin-top="0in" fo:margin-bottom="0in"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in"/>
      </style:graphic-properties>
    </style:style>
    <style:style style:name="Bullseye_20_graphic" style:display-name="Bullseye graphic" style:family="graphic" style:parent-style-name="Graphics">
      <style:graphic-properties svg:width="1.1811in" fo:min-height="1.1811in" svg:x="5.7091in" svg:y="-0.3937in" fo:margin-left="0.0984in" fo:margin-right="0in" fo:margin-top="0in" fo:margin-bottom="0in"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in"/>
      </style:graphic-properties>
    </style:style>
    <style:style style:name="Coloring_20_Page_20_picture" style:display-name="Coloring Page picture" style:family="graphic" style:parent-style-name="Graphics">
      <style:graphic-properties svg:width="5.2563in" fo:min-height="5.4283in" svg:x="0in" svg:y="-2.7138in" fo:margin-left="0in" fo:margin-right="0in" fo:margin-top="0in" fo:margin-bottom="0in"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Long_20_Jump_20_Graphic" style:display-name="Long Jump Graphic" style:family="graphic" style:parent-style-name="Graphics">
      <style:graphic-properties svg:width="1.9689in" fo:min-height="1.4335in" svg:x="4.9217in" svg:y="-0.3937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in"/>
      </style:graphic-properties>
    </style:style>
    <style:style style:name="Bowling_20_Pins_20_Graphic" style:display-name="Bowling Pins Graphic" style:family="graphic" style:parent-style-name="Graphics">
      <style:graphic-properties svg:width="1.3799in" fo:min-height="1.6654in" svg:x="5.5102in" svg:y="-0.3937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Tic-Tac-Toe_20_graphic" style:display-name="Tic-Tac-Toe graphic" style:family="graphic" style:parent-style-name="Graphics">
      <style:graphic-properties svg:width="1.1811in" fo:min-height="1.1811in" svg:x="5.7091in" svg:y="-0.1965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Front_20_matter_20_frames" style:display-name="Front matter frames" style:family="graphic" style:parent-style-name="Frame">
      <style:graphic-properties svg:width="6.8902in" style:rel-width="100%" fo:min-height="0.1965in" svg:x="0in" svg:y="0.6083in" fo:margin-left="0.0791in" fo:margin-right="0.0791in" fo:margin-top="0.0791in" fo:margin-bottom="0.0791in" style:wrap="parallel" style:number-wrapped-paragraphs="no-limit" style:wrap-contour="false" style:vertical-pos="middle" style:vertical-rel="page-content" style:horizontal-pos="center" style:horizontal-rel="paragraph" fo:background-color="transparent" draw:fill="none" draw:fill-color="#729fcf" fo:padding="0.0591in" fo:border="none" loext:rel-width-rel="paragraph"/>
    </style:style>
    <style:style style:name="CC_20_Logo" style:display-name="CC Logo" style:family="graphic" style:parent-style-name="Graphics">
      <style:graphic-properties svg:width="0.9362in" fo:min-height="0.3299in" svg:x="0in" svg:y="0.0591in" fo:margin-left="0in" fo:margin-right="0.1181in" fo:margin-top="0in" fo:margin-bottom="0.1965in"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Badge_20_Graphics" style:display-name="Badge Graphics" style:family="graphic" style:parent-style-name="Graphics">
      <style:graphic-properties svg:width="0.5516in" fo:min-height="0.0161in" text:anchor-type="as-char" svg:x="0in" svg:y="-0.4925in" style:vertical-pos="from-top"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1665in"/>
        </style:list-level-properties>
        <style:text-properties fo:font-family="StarSymbol" style:font-charset="x-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0.5in" fo:margin-left="0.1665in"/>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0.75in" fo:margin-left="0.1665in"/>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1in" fo:margin-left="0.1665in"/>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1.25in" fo:margin-left="0.1665in"/>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1.5in" fo:margin-left="0.1665in"/>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1.75in" fo:margin-left="0.1665in"/>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2in" fo:margin-left="0.1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25in" fo:margin-left="0.7957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1.0457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2957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5457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7957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0457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2957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5457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7957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25in" fo:margin-left="0.8937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0.75in"/>
        </style:list-level-properties>
        <style:text-properties fo:font-family="StarSymbol"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25in" fo:margin-left="0.7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5in"/>
        </style:list-level-properties>
        <style:text-properties fo:font-family="Arial" style:font-style-name="Regular" style:font-family-generic="swis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57in" fo:text-indent="-0.25in" fo:margin-left="1.0457in"/>
        </style:list-level-properties>
        <style:text-properties fo:font-family="Arial" style:font-style-name="Regular" style:font-family-generic="swis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57in" fo:text-indent="-0.25in" fo:margin-left="1.2957in"/>
        </style:list-level-properties>
        <style:text-properties fo:font-family="Arial" style:font-style-name="Regular" style:font-family-generic="swis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57in" fo:text-indent="-0.25in" fo:margin-left="1.5457in"/>
        </style:list-level-properties>
        <style:text-properties fo:font-family="Arial" style:font-style-name="Regular" style:font-family-generic="swis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57in" fo:text-indent="-0.25in" fo:margin-left="1.7957in"/>
        </style:list-level-properties>
        <style:text-properties fo:font-family="Arial" style:font-style-name="Regular" style:font-family-generic="swis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57in" fo:text-indent="-0.25in" fo:margin-left="2.0457in"/>
        </style:list-level-properties>
        <style:text-properties fo:font-family="Arial" style:font-style-name="Regular" style:font-family-generic="swis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57in" fo:text-indent="-0.25in" fo:margin-left="2.2957in"/>
        </style:list-level-properties>
        <style:text-properties fo:font-family="Arial" style:font-style-name="Regular" style:font-family-generic="swis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57in" fo:text-indent="-0.25in" fo:margin-left="2.5457in"/>
        </style:list-level-properties>
        <style:text-properties fo:font-family="Arial" style:font-style-name="Regular" style:font-family-generic="swis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57in" fo:text-indent="-0.25in" fo:margin-left="2.7957in"/>
        </style:list-level-properties>
        <style:text-properties fo:font-family="Arial" style:font-style-name="Regular" style:font-family-generic="swis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57in" fo:text-indent="-0.25in" fo:margin-left="3.0457in"/>
        </style:list-level-properties>
        <style:text-properties fo:font-family="Arial" style:font-style-name="Regular" style:font-family-generic="swiss"/>
      </text:list-level-style-bullet>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1965in" fo:text-indent="-0.1965in" fo:margin-left="0.196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Table_20_Bullet_20_-_20_checkmark_5f_1" style:display-name="Table Bullet - checkmark_1">
      <text:list-level-style-bullet text:level="1" text:style-name="WW_5f_CharLFO29LVL1" loext:num-list-format="%1%" text:bullet-char="✔">
        <style:list-level-properties/>
        <style:text-properties style:font-name="StarSymbol"/>
      </text:list-level-style-bullet>
      <text:list-level-style-bullet text:level="2" text:style-name="WW_5f_CharLFO29LVL2" loext:num-list-format="%2%" text:bullet-char="✔">
        <style:list-level-properties/>
        <style:text-properties style:font-name="StarSymbol"/>
      </text:list-level-style-bullet>
      <text:list-level-style-bullet text:level="3" text:style-name="WW_5f_CharLFO29LVL3" loext:num-list-format="%3%" text:bullet-char="✔">
        <style:list-level-properties/>
        <style:text-properties style:font-name="StarSymbol"/>
      </text:list-level-style-bullet>
      <text:list-level-style-bullet text:level="4" text:style-name="WW_5f_CharLFO29LVL4" loext:num-list-format="%4%" text:bullet-char="✔">
        <style:list-level-properties/>
        <style:text-properties style:font-name="StarSymbol"/>
      </text:list-level-style-bullet>
      <text:list-level-style-bullet text:level="5" text:style-name="WW_5f_CharLFO29LVL5" loext:num-list-format="%5%" text:bullet-char="✔">
        <style:list-level-properties/>
        <style:text-properties style:font-name="StarSymbol"/>
      </text:list-level-style-bullet>
      <text:list-level-style-bullet text:level="6" text:style-name="WW_5f_CharLFO29LVL6" loext:num-list-format="%6%" text:bullet-char="✔">
        <style:list-level-properties/>
        <style:text-properties style:font-name="StarSymbol"/>
      </text:list-level-style-bullet>
      <text:list-level-style-bullet text:level="7" text:style-name="WW_5f_CharLFO29LVL7" loext:num-list-format="%7%" text:bullet-char="✔">
        <style:list-level-properties/>
        <style:text-properties style:font-name="StarSymbol"/>
      </text:list-level-style-bullet>
      <text:list-level-style-bullet text:level="8" text:style-name="WW_5f_CharLFO29LVL8" loext:num-list-format="%8%" text:bullet-char="✔">
        <style:list-level-properties/>
        <style:text-properties style:font-name="StarSymbol"/>
      </text:list-level-style-bullet>
      <text:list-level-style-bullet text:level="9" text:style-name="WW_5f_CharLFO29LVL9" loext:num-list-format="%9%" text:bullet-char="✔">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Checkmark_5f_1" style:display-name="Bullet - Checkmark_1">
      <text:list-level-style-bullet text:level="1" text:style-name="WW_5f_CharLFO31LVL1" loext:num-list-format="%1%" text:bullet-char="✔">
        <style:list-level-properties/>
        <style:text-properties style:font-name="StarSymbol"/>
      </text:list-level-style-bullet>
      <text:list-level-style-bullet text:level="2" text:style-name="WW_5f_CharLFO31LVL2" loext:num-list-format="%2%" text:bullet-char="✔">
        <style:list-level-properties/>
        <style:text-properties style:font-name="StarSymbol"/>
      </text:list-level-style-bullet>
      <text:list-level-style-bullet text:level="3" text:style-name="WW_5f_CharLFO31LVL3" loext:num-list-format="%3%" text:bullet-char="✔">
        <style:list-level-properties/>
        <style:text-properties style:font-name="StarSymbol"/>
      </text:list-level-style-bullet>
      <text:list-level-style-bullet text:level="4" text:style-name="WW_5f_CharLFO31LVL4" loext:num-list-format="%4%" text:bullet-char="✔">
        <style:list-level-properties/>
        <style:text-properties style:font-name="StarSymbol"/>
      </text:list-level-style-bullet>
      <text:list-level-style-bullet text:level="5" text:style-name="WW_5f_CharLFO31LVL5" loext:num-list-format="%5%" text:bullet-char="✔">
        <style:list-level-properties/>
        <style:text-properties style:font-name="StarSymbol"/>
      </text:list-level-style-bullet>
      <text:list-level-style-bullet text:level="6" text:style-name="WW_5f_CharLFO31LVL6" loext:num-list-format="%6%" text:bullet-char="✔">
        <style:list-level-properties/>
        <style:text-properties style:font-name="StarSymbol"/>
      </text:list-level-style-bullet>
      <text:list-level-style-bullet text:level="7" text:style-name="WW_5f_CharLFO31LVL7" loext:num-list-format="%7%" text:bullet-char="✔">
        <style:list-level-properties/>
        <style:text-properties style:font-name="StarSymbol"/>
      </text:list-level-style-bullet>
      <text:list-level-style-bullet text:level="8" text:style-name="WW_5f_CharLFO31LVL8" loext:num-list-format="%8%" text:bullet-char="✔">
        <style:list-level-properties/>
        <style:text-properties style:font-name="StarSymbol"/>
      </text:list-level-style-bullet>
      <text:list-level-style-bullet text:level="9" text:style-name="WW_5f_CharLFO31LVL9" loext:num-list-format="%9%" text:bullet-char="✔">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Check_20_mark" style:display-name="Bullet - Check mark">
      <text:list-level-style-bullet text:level="1" text:style-name="Bullet_20_Symbols" loext:num-list-format="%1%" text:bullet-char="✔">
        <style:list-level-properties text:list-level-position-and-space-mode="label-alignment">
          <style:list-level-label-alignment text:label-followed-by="listtab" text:list-tab-stop-position="0.5118in" fo:text-indent="-0.25in" fo:margin-left="0.5118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618in" fo:text-indent="-0.25in" fo:margin-left="0.761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118in" fo:text-indent="-0.25in" fo:margin-left="1.01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618in" fo:text-indent="-0.25in" fo:margin-left="1.26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118in" fo:text-indent="-0.25in" fo:margin-left="1.511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618in" fo:text-indent="-0.25in" fo:margin-left="1.76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118in" fo:text-indent="-0.25in" fo:margin-left="2.0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618in" fo:text-indent="-0.25in" fo:margin-left="2.261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118in" fo:text-indent="-0.25in" fo:margin-left="2.51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618in" fo:text-indent="-0.25in" fo:margin-left="2.7618in"/>
        </style:list-level-properties>
      </text:list-level-style-bullet>
    </text:list-style>
    <text:list-style style:name="Bullet_20_-_20_Check_20_Mark" style:display-name="Bullet - Check Mark">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Lesson_20_Overview.1" style:display-name="Lesson Overview.1"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5" style:family="table">
      <style:table-properties table:align="margins" style:writing-mode="lr-tb"/>
    </style:style>
    <style:style style:name="Table5.A" style:family="table-column">
      <style:table-column-properties style:rel-column-width="9735*"/>
    </style:style>
    <style:style style:name="Table5.B" style:family="table-column">
      <style:table-column-properties style:rel-column-width="55800*"/>
    </style:style>
    <style:style style:name="Table5.A1" style:family="table-cell">
      <style:table-cell-properties fo:padding="0.0382in" fo:border="none"/>
    </style:style>
    <style:style style:name="MP1" style:family="paragraph" style:parent-style-name="M.T._20_Text">
      <style:text-properties officeooo:paragraph-rsid="029f899c"/>
    </style:style>
    <style:style style:name="MP2" style:family="paragraph" style:parent-style-name="Body">
      <style:text-properties fo:font-size="8pt" officeooo:paragraph-rsid="029f899c" style:font-size-asian="8pt" style:font-size-complex="8pt"/>
    </style:style>
    <style:style style:name="MP3" style:family="paragraph" style:parent-style-name="Coloring_20_Page_20_Footer">
      <style:text-properties officeooo:paragraph-rsid="02b4e089"/>
    </style:style>
    <style:style style:name="MT1" style:family="text">
      <style:text-properties fo:language="en" fo:country="US" style:language-asian="en" style:country-asian="US" style:language-complex="hi" style:country-complex="IN"/>
    </style:style>
    <style:style style:name="MT2"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3" style:family="text">
      <style:text-properties officeooo:rsid="0184d68b"/>
    </style:style>
    <style:style style:name="MT4" style:family="text">
      <style:text-properties officeooo:rsid="01d657ac"/>
    </style:style>
    <style:style style:name="MT5" style:family="text">
      <style:text-properties officeooo:rsid="01355e7d"/>
    </style:style>
    <style:style style:name="Mfr1" style:family="graphic" style:parent-style-name="CC_20_Logo">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756in" fo:margin-left="0in" fo:margin-right="0in" fo:margin-top="0.1575in" fo:background-color="transparent" style:dynamic-spacing="true" draw:fill="none" draw:fill-color="#729fcf"/>
      </style:footer-style>
    </style:page-layout>
    <style:page-layout style:name="Mpm3">
      <style:page-layout-properties fo:page-width="8.2634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0398in" fo:background-color="transparent" style:dynamic-spacing="true" draw:fill="none" draw:fill-color="#729fcf"/>
      </style:footer-style>
    </style:page-layout>
    <style:page-layout style:name="Mpm5" style:page-usage="left">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mirrored">
      <style:page-layout-properties fo:page-width="8.2681in" fo:page-height="11.6929in" style:num-format="1" style:print-orientation="portrait" fo:margin-top="0.5902in" fo:margin-bottom="0.5902in" fo:margin-left="0.689in" fo:margin-right="0.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11.6929in" fo:page-height="8.2681in" style:num-format="1" style:print-orientation="landscape" fo:margin-top="0.3937in" fo:margin-bottom="0.3937in" fo:margin-left="0.3937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3929in">
          <style:column-sep style:width="0.0035in" style:color="#000000" style:height="100%" style:style="none" style:vertical-align="middle"/>
          <style:column style:rel-width="32767*" fo:start-indent="0in" fo:end-indent="0.1965in"/>
          <style:column style:rel-width="32768*" fo:start-indent="0.196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0398in" fo:background-color="transparent" style:dynamic-spacing="false" draw:fill="none" draw:fill-color="#729fcf"/>
      </style:footer-style>
    </style:page-layout>
    <style:page-layout style:name="Mpm14">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965in" fo:background-color="transparent" style:dynamic-spacing="true" draw:fill="none" draw:fill-color="#729fcf"/>
      </style:footer-style>
    </style:page-layout>
    <style:page-layout style:name="Mpm15">
      <style:page-layout-properties fo:page-width="8.2681in" fo:page-height="11.6929in" style:num-format="1" style:print-orientation="portrait" fo:margin-top="0.3937in" fo:margin-bottom="0.5709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style:master-page style:name="First_20_Page" style:display-name="First Page" style:page-layout-name="Mpm2" draw:style-name="Mdp1" style:next-style-name="Lesson_20_Content">
      <style:footer>
        <table:table table:name="Table5" table:style-name="Table5">
          <table:table-column table:style-name="Table5.A"/>
          <table:table-column table:style-name="Table5.B"/>
          <table:table-row>
            <table:table-cell table:style-name="Table5.A1" office:value-type="string">
              <text:p text:style-name="Table_20_Contents"><draw:frame draw:style-name="Mfr1" draw:name="Image8" text:anchor-type="as-char" svg:width="0.9362in" svg:height="0.3299in" draw:z-index="0"><draw:image xlink:href="Pictures/10000001000000580000001F0BCB3E69.png" xlink:type="simple" xlink:show="embed" xlink:actuate="onLoad" draw:mime-type="image/png"/></draw:frame></text:p>
            </table:table-cell>
            <table:table-cell table:style-name="Table5.A1" office:value-type="string">
              <text:p text:style-name="MP1">Year of publication <text:s/>Publisher </text:p>
              <text:p text:style-name="MP2"><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Front_20_matter" style:display-name="Front matter" style:page-layout-name="Mpm4" draw:style-name="Mdp1">
      <style:footer>
        <text:p text:style-name="Front_20_Matter_20_footer"><text:title/><text:tab/><text:subject/> <text:s/>– <text:s/><text:span text:style-name="MT1">Quarter </text:span><text:s/><text:user-defined style:data-style-name="N0" text:name="Quarter"/><text:tab/>Page <text:page-number style:num-format="i" text:select-page="current" text:page-adjust="-1">vi</text:page-number></text:p>
      </style:footer>
    </style:master-page>
    <style:master-page style:name="Inside_20_cover" style:display-name="Inside cover" style:page-layout-name="Mpm5" draw:style-name="Mdp1" style:next-style-name="Front_20_matter"/>
    <style:master-page style:name="Footnote" style:page-layout-name="Mpm6" draw:style-name="Mdp1"/>
    <style:master-page style:name="Left_20_Page" style:display-name="Left Page" style:page-layout-name="Mpm7" draw:style-name="Mdp1" style:next-style-name="Right_20_Page"/>
    <style:master-page style:name="Right_20_Page" style:display-name="Right Page" style:page-layout-name="Mpm8" style:next-style-name="Left_20_Page"/>
    <style:master-page style:name="Envelope" style:page-layout-name="Mpm9" draw:style-name="Mdp1"/>
    <style:master-page style:name="Index" style:page-layout-name="Mpm10" draw:style-name="Mdp1"/>
    <style:master-page style:name="Endnote" style:page-layout-name="Mpm6" draw:style-name="Mdp1"/>
    <style:master-page style:name="Landscape" style:page-layout-name="Mpm11" draw:style-name="Mdp1"/>
    <style:master-page style:name="Body_20_Pages" loext:hidden="true" style:hidden="true" style:display-name="Body Pages" style:page-layout-name="Mpm12" draw:style-name="Mdp1"/>
    <style:master-page style:name="Coloring_20_Page" style:display-name="Coloring Page" style:page-layout-name="Mpm13" draw:style-name="Mdp2">
      <style:footer>
        <text:p text:style-name="MP3"><text:span text:style-name="MT2"><text:title/></text:span><text:s text:c="2"/><text:span text:style-name="MT2">Quarter <text:s/></text:span><text:span text:style-name="MT2"><text:user-defined style:data-style-name="N0" text:name="Quarter"/></text:span><text:span text:style-name="MT2"><text:s text:c="2"/>Lesson <text:s/></text:span><text:span text:style-name="MT2"><text:user-defined style:data-style-name="N0" text:name="Lesson"/></text:span><text:span text:style-name="MT3"><text:tab/></text:span><text:span text:style-name="MT2"><text:title/></text:span><text:span text:style-name="MT2"> <text:s/>Quarter <text:s/></text:span><text:span text:style-name="MT2"><text:user-defined style:data-style-name="N0" text:name="Quarter"/></text:span><text:span text:style-name="MT2"><text:s text:c="2"/>Lesson <text:s/></text:span><text:span text:style-name="MT2"><text:user-defined style:data-style-name="N0" text:name="Lesson"/></text:span></text:p>
      </style:footer>
    </style:master-page>
    <style:master-page style:name="Lesson_20_Content" style:display-name="Lesson Content" style:page-layout-name="Mpm14" draw:style-name="Mdp1">
      <style:footer>
        <text:p text:style-name="Footer"><text:span text:style-name="MT4">Quarter </text:span><text:span text:style-name="MT5"><text:s/></text:span><text:span text:style-name="MT5"><text:user-defined style:data-style-name="N0" text:name="Quarter"/></text:span><text:span text:style-name="MT5"><text:s text:c="2"/></text:span><text:span text:style-name="MT4">Lesson </text:span><text:span text:style-name="MT5"><text:s/></text:span><text:span text:style-name="MT5"><text:user-defined style:data-style-name="N0" text:name="Lesson"/></text:span><text:tab/><text:chapter text:display="name" text:outline-level="1">Review Lesson</text:chapter><text:tab/>Page <text:s/><text:page-number text:select-page="current">20</text:page-number></text:p>
      </style:footer>
    </style:master-page>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7T09:20:17.000105000</dc:date>
    <meta:editing-duration>PT2S</meta:editing-duration>
    <meta:editing-cycles>1</meta:editing-cycles>
    <meta:document-statistic meta:table-count="16" meta:image-count="63" meta:object-count="0" meta:page-count="30" meta:paragraph-count="2853" meta:word-count="49923" meta:character-count="258555" meta:non-whitespace-character-count="211442"/>
    <meta:generator>LibreOffice/25.8.3.2$MacOSX_AARCH64 LibreOffice_project/8ca8d55c161d602844f5428fa4b58097424e324e</meta:generator>
  </office:meta>
</office:document-meta>
</file>