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A7000000CAE8FA485C.png" manifest:media-type="image/png"/>
  <manifest:file-entry manifest:full-path="Pictures/1000000000000623000008B044EC96F9.jpg" manifest:media-type="image/jpeg"/>
  <manifest:file-entry manifest:full-path="Pictures/1000000000000623000008B05B08C826.jpg" manifest:media-type="image/jpeg"/>
  <manifest:file-entry manifest:full-path="Pictures/10000000000006230000045716250DF5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Back_20_cover">
      <style:table-properties style:width="19.076cm" style:page-number="auto" table:align="right"/>
    </style:style>
    <style:style style:name="Table1.A" style:family="table-column">
      <style:table-column-properties style:column-width="14.437cm"/>
    </style:style>
    <style:style style:name="Table1.B" style:family="table-column">
      <style:table-column-properties style:column-width="4.639cm"/>
    </style:style>
    <style:style style:name="Table1.1" style:family="table-row">
      <style:table-row-properties style:row-height="1.109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6.001cm" fo:keep-together="always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B2" style:family="table-cell">
      <style:table-cell-properties style:vertical-align="bottom" fo:background-color="#b00000" fo:padding="0.097cm" fo:border="none">
        <style:background-image/>
      </style:table-cell-properties>
    </style:style>
    <style:style style:name="Table1.3" style:family="table-row">
      <style:table-row-properties style:row-height="15.891cm" fo:keep-together="always"/>
    </style:style>
    <style:style style:name="Table1.4" style:family="table-row">
      <style:table-row-properties style:row-height="2.611cm" fo:keep-together="always"/>
    </style:style>
    <style:style style:name="Table1.A4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.B5" style:family="table-cell">
      <style:table-cell-properties fo:background-color="#b00000" fo:padding="0.097cm" fo:border="none">
        <style:background-image/>
      </style:table-cell-properties>
    </style:style>
    <style:style style:name="Table2" style:family="table">
      <style:table-properties style:width="21.001cm" table:align="margins"/>
    </style:style>
    <style:style style:name="Table2.A" style:family="table-column">
      <style:table-column-properties style:column-width="6.087cm" style:rel-column-width="18995*"/>
    </style:style>
    <style:style style:name="Table2.B" style:family="table-column">
      <style:table-column-properties style:column-width="14.914cm" style:rel-column-width="46540*"/>
    </style:style>
    <style:style style:name="Table2.1" style:family="table-row">
      <style:table-row-properties style:row-height="1.109cm" fo:keep-together="always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row-height="6.001cm" fo:keep-together="always"/>
    </style:style>
    <style:style style:name="Table2.A2" style:family="table-cell">
      <style:table-cell-properties fo:background-color="#b00000" fo:padding="0.097cm" fo:border="none">
        <style:background-image/>
      </style:table-cell-properties>
    </style:style>
    <style:style style:name="Table2.B2" style:family="table-cell">
      <style:table-cell-properties style:vertical-align="bottom" fo:background-color="#b00000" fo:padding="0.097cm" fo:border="none">
        <style:background-image/>
      </style:table-cell-properties>
    </style:style>
    <style:style style:name="Table2.3" style:family="table-row">
      <style:table-row-properties style:row-height="15.891cm" fo:keep-together="always"/>
    </style:style>
    <style:style style:name="Table2.4" style:family="table-row">
      <style:table-row-properties style:row-height="2.611cm" fo:keep-together="always"/>
    </style:style>
    <style:style style:name="Table2.A5" style:family="table-cell">
      <style:table-cell-properties style:vertical-align="middle" fo:background-color="#b00000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style:font-name="Andika1" fo:font-size="6pt" style:font-size-asian="5.25pt" style:font-size-complex="6pt"/>
    </style:style>
    <style:style style:name="P2" style:family="paragraph" style:parent-style-name="M.T._20_-_20_Cover_20_Title">
      <style:paragraph-properties fo:margin-top="0cm" fo:margin-bottom="0cm" style:contextual-spacing="false"/>
      <style:text-properties officeooo:paragraph-rsid="0044d8f1"/>
    </style:style>
    <style:style style:name="P3" style:family="paragraph" style:parent-style-name="Table_20_Contents">
      <style:paragraph-properties fo:text-align="left" style:justify-single-word="false"/>
      <style:text-properties style:font-name="Andika1" fo:font-size="6pt" style:text-underline-style="solid" style:text-underline-type="double" style:text-underline-width="auto" style:text-underline-color="font-color" style:font-size-asian="5.25pt" style:font-size-complex="6pt"/>
    </style:style>
    <style:style style:name="P4" style:family="paragraph" style:parent-style-name="Copyright_20_text">
      <style:text-properties officeooo:paragraph-rsid="005d45da"/>
    </style:style>
    <style:style style:name="P5" style:family="paragraph" style:parent-style-name="Copyright_20_text">
      <style:text-properties officeooo:rsid="006dec13" officeooo:paragraph-rsid="005d45da"/>
    </style:style>
    <style:style style:name="P6" style:family="paragraph" style:parent-style-name="Table_20_Contents">
      <style:paragraph-properties fo:text-align="left" style:justify-single-word="false"/>
      <style:text-properties style:font-name="Andika1" fo:font-size="6pt" officeooo:paragraph-rsid="0044d8f1" style:font-size-asian="5.25pt" style:font-size-complex="6pt"/>
    </style:style>
    <style:style style:name="P7" style:family="paragraph" style:parent-style-name="M.T._20_-_20_Cover_20_Title">
      <loext:graphic-properties draw:fill="none" draw:fill-color="#729fcf"/>
      <style:paragraph-properties fo:margin-left="0.199cm" fo:margin-right="1.6cm" fo:margin-top="0cm" fo:margin-bottom="0cm" style:contextual-spacing="false" fo:text-align="left" style:justify-single-word="false" fo:text-indent="0cm" style:auto-text-indent="false" fo:background-color="transparent"/>
      <style:text-properties fo:font-size="48pt" officeooo:rsid="005cc3cc" officeooo:paragraph-rsid="005cc3cc" style:font-size-asian="48pt" style:font-size-complex="48pt"/>
    </style:style>
    <style:style style:name="P8" style:family="paragraph" style:parent-style-name="M.T._20_-_20_Cover_20_subtitle">
      <style:text-properties officeooo:rsid="005c2707" officeooo:paragraph-rsid="005c2707"/>
    </style:style>
    <style:style style:name="P9" style:family="paragraph" style:parent-style-name="M.T._20_-_20_Cover_20_subtitle">
      <style:text-properties officeooo:paragraph-rsid="0044d8f1"/>
    </style:style>
    <style:style style:name="P10" style:family="paragraph" style:parent-style-name="Standard" style:master-page-name="">
      <style:paragraph-properties style:page-number="auto" fo:break-before="auto" fo:break-after="auto"/>
      <style:text-properties officeooo:paragraph-rsid="0044d8f1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cm" svg:y="1.72cm" svg:width="3.489cm" svg:height="4.83cm" draw:z-index="0">
        <draw:image xlink:href="Pictures/10000001000000A7000000CAE8FA485C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4" table:number-rows-spanned="2" office:value-type="string">
            <text:p text:style-name="P4">© <text:span text:style-name="T1">Year of Publication <text:s/>Publisher</text:span></text:p>
            <text:p text:style-name="P5">Publisher address</text:p>
            <text:p text:style-name="P5">City, Region</text:p>
            <text:p text:style-name="P5">Country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covered-table-cell table:style-name="Table1.A1"/>
          <table:table-cell table:style-name="Table1.B5" office:value-type="string">
            <text:p text:style-name="Text_20_body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Lessons from Luke</text:p>
          </table:table-cell>
        </table:table-row>
        <table:table-row table:style-name="Table2.3"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4">
          <table:table-cell table:style-name="Table2.A5" table:number-columns-spanned="2" office:value-type="string">
            <text:p text:style-name="P8">Guide moniteur</text:p>
            <text:p text:style-name="P9">Teacher’s Guide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fill-image draw:name="Q1_5f_background" draw:display-name="Q1_background" xlink:href="Pictures/10000000000006230000045716250DF5.jpg" xlink:type="simple" xlink:show="embed" xlink:actuate="onLoad"/>
    <draw:fill-image draw:name="Q2-back" xlink:href="Pictures/1000000000000623000008B05B08C826.jpg" xlink:type="simple" xlink:show="embed" xlink:actuate="onLoad"/>
    <draw:fill-image draw:name="Q2-front" xlink:href="Pictures/1000000000000623000008B044EC96F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ver_20_subtitle" style:display-name="Cover subtitle" style:family="paragraph" style:parent-style-name="Standard">
      <style:paragraph-properties fo:margin-right="1.499cm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Cover_20_Title" style:display-name="Cover Title" style:family="paragraph" style:parent-style-name="Standard">
      <loext:graphic-properties draw:fill="none" draw:fill-color="#729fcf"/>
      <style:paragraph-properties fo:margin-left="0.101cm" fo:margin-right="0cm" fo:margin-top="0cm" fo:margin-bottom="1cm" style:contextual-spacing="false" fo:text-align="left" style:justify-single-word="false" fo:text-indent="0cm" style:auto-text-indent="false" fo:background-color="transparent"/>
      <style:text-properties fo:color="#ffffff" loext:opacity="100%" style:font-name="Andika1" fo:font-family="Andika" style:font-style-name="Bold" style:font-pitch="variable" fo:font-size="44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/>
      <style:text-properties style:font-name="Andika2" fo:font-family="Andika" style:font-style-name="Regular" style:font-pitch="variable"/>
    </style:style>
    <style:style style:name="_36__20_pt_20_spacer" style:display-name="6 pt spacer" style:family="paragraph" style:parent-style-name="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 style:vertical-align="bottom"/>
      <style:text-properties fo:color="#ffffff" loext:opacity="100%" style:font-name="Andika1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M.T._20_-_20_Cover_20_subtitle" style:display-name="M.T. - Cover subtitle" style:family="paragraph" style:parent-style-name="M.T._20_-_20_Cover_20_Title">
      <style:paragraph-properties fo:margin-right="1.499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1_5f_background" draw:fill-image-width="100%" draw:fill-image-height="100%" style:repeat="no-repeat" draw:fill-image-ref-point="center" style:footnote-max-height="0cm" loext:margin-gutter="0cm">
        <style:background-image xlink:href="Pictures/10000000000006230000045716250DF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2-front" draw:fill-image-width="100%" draw:fill-image-height="100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623000008B044EC96F9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2-back" draw:fill-image-width="100%" draw:fill-image-height="100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623000008B05B08C826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1_5f_background" draw:fill-image-width="100%" draw:fill-image-height="100%" style:repeat="no-repeat" draw:fill-image-ref-point="center"/>
    </style:style>
    <style:style style:name="Mdp3" style:family="drawing-page">
      <style:drawing-page-properties draw:fill="bitmap" draw:background-size="full" draw:fill-color="#729fcf" draw:fill-image-name="Q2-front" draw:fill-image-width="100%" draw:fill-image-height="100%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draw:fill="bitmap" draw:background-size="full" draw:fill-color="#729fcf" draw:fill-image-name="Q2-back" draw:fill-image-width="100%" draw:fill-image-height="100%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ront_20_cover" style:display-name="Front cover" style:page-layout-name="Mpm3" draw:style-name="Mdp3" style:next-style-name="Back_20_cover"/>
    <style:master-page style:name="Back_20_cover" style:display-name="Back cover" style:page-layout-name="Mpm4" draw:style-name="Mdp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5T15:21:35.800933408</meta:creation-date>
    <dc:title>Default A4</dc:title>
    <meta:editing-duration>PT5M19S</meta:editing-duration>
    <meta:editing-cycles>6</meta:editing-cycles>
    <meta:generator>LibreOffice/26.2.1.2$MacOSX_AARCH64 LibreOffice_project/8399f6259d8c87f40e7255cdb3c9b958f5e08948</meta:generator>
    <meta:initial-creator>Chris Jackson</meta:initial-creator>
    <dc:date>2026-04-27T14:48:16.973559000</dc:date>
    <dc:creator>Chris Jackson</dc:creator>
    <meta:document-statistic meta:table-count="2" meta:image-count="1" meta:object-count="0" meta:page-count="2" meta:paragraph-count="7" meta:word-count="17" meta:character-count="114" meta:non-whitespace-character-count="103"/>
  </office:meta>
</office:document-meta>
</file>