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7D000000C7A9B33225.png" manifest:media-type="image/png"/>
  <manifest:file-entry manifest:full-path="Pictures/10000000000006230000045716250DF5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 style:master-page-name="Landscape">
      <style:table-properties style:width="41.91cm" fo:margin-left="0.088cm" fo:margin-right="0.002cm" style:page-number="auto" table:align="margins"/>
    </style:style>
    <style:style style:name="Table1.A" style:family="table-column">
      <style:table-column-properties style:column-width="1.997cm" style:rel-column-width="3122*"/>
    </style:style>
    <style:style style:name="Table1.B" style:family="table-column">
      <style:table-column-properties style:column-width="14.399cm" style:rel-column-width="22515*"/>
    </style:style>
    <style:style style:name="Table1.C" style:family="table-column">
      <style:table-column-properties style:column-width="10.506cm" style:rel-column-width="16427*"/>
    </style:style>
    <style:style style:name="Table1.D" style:family="table-column">
      <style:table-column-properties style:column-width="15.011cm" style:rel-column-width="23471*"/>
    </style:style>
    <style:style style:name="Table1.1" style:family="table-row">
      <style:table-row-properties style:row-height="1.111cm"/>
    </style:style>
    <style:style style:name="Table1.A1" style:family="table-cell">
      <style:table-cell-properties style:vertical-align="bottom" fo:background-color="transparent" fo:padding-left="0cm" fo:padding-right="2cm" fo:padding-top="0cm" fo:padding-bottom="0cm" fo:border="none">
        <style:background-image/>
      </style:table-cell-properties>
    </style:style>
    <style:style style:name="Table1.2" style:family="table-row">
      <style:table-row-properties style:row-height="6.001cm" fo:keep-together="always"/>
    </style:style>
    <style:style style:name="Table1.C2" style:family="table-cell">
      <style:table-cell-properties style:vertical-align="bottom" fo:background-color="#00b000" fo:padding-left="0cm" fo:padding-right="2cm" fo:padding-top="0cm" fo:padding-bottom="0cm" fo:border="none">
        <style:background-image/>
      </style:table-cell-properties>
    </style:style>
    <style:style style:name="Table1.3" style:family="table-row">
      <style:table-row-properties style:min-row-height="15.887cm"/>
    </style:style>
    <style:style style:name="Table1.A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-left="0cm" fo:padding-right="2cm" fo:padding-top="0cm" fo:padding-bottom="0cm" fo:border="none">
        <style:background-image/>
      </style:table-cell-properties>
    </style:style>
    <style:style style:name="Table1.C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4" style:family="table-row">
      <style:table-row-properties style:row-height="2.551cm" fo:keep-together="always"/>
    </style:style>
    <style:style style:name="Table1.A4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B4" style:family="table-cell">
      <style:table-cell-properties style:vertical-align="middle" fo:background-color="#ffffff" fo:padding-left="0cm" fo:padding-right="2cm" fo:padding-top="0cm" fo:padding-bottom="0cm" fo:border="none">
        <style:background-image/>
      </style:table-cell-properties>
    </style:style>
    <style:style style:name="Table1.C4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5" style:family="table-row">
      <style:table-row-properties style:row-height="2.611cm" fo:keep-together="always"/>
    </style:style>
    <style:style style:name="Table1.C5" style:family="table-cell">
      <style:table-cell-properties style:vertical-align="middle" fo:background-color="#00b000" fo:padding-left="0cm" fo:padding-right="2cm" fo:padding-top="0cm" fo:padding-bottom="0cm" fo:border="none">
        <style:background-image/>
      </style:table-cell-properties>
    </style:style>
    <style:style style:name="P1" style:family="paragraph" style:parent-style-name="Book_20_number">
      <style:text-properties officeooo:rsid="0040a2dd" officeooo:paragraph-rsid="0040a2dd"/>
    </style:style>
    <style:style style:name="P2" style:family="paragraph" style:parent-style-name="M.T._20_-_20_Cover_20_Title">
      <style:paragraph-properties fo:margin-top="0cm" fo:margin-bottom="0cm" style:contextual-spacing="false"/>
      <style:text-properties fo:font-size="48pt" officeooo:rsid="005f0870" officeooo:paragraph-rsid="005edc8a" style:font-size-asian="48pt" style:font-size-complex="48pt"/>
    </style:style>
    <style:style style:name="P3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4" style:family="paragraph" style:parent-style-name="Copyright_20_text">
      <style:text-properties officeooo:paragraph-rsid="00623356"/>
    </style:style>
    <style:style style:name="P5" style:family="paragraph" style:parent-style-name="Copyright_20_text">
      <style:text-properties officeooo:rsid="006dec13" officeooo:paragraph-rsid="00623356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2.999cm" svg:y="1.63cm" svg:width="3.26cm" svg:height="5.181cm" draw:z-index="0">
        <draw:image xlink:href="Pictures/100000010000007D000000C7A9B33225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</table:table-row>
        <table:table-row table:style-name="Table1.2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_36__20_pt_20_spacer"/>
          </table:table-cell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>Lessons from Luke</text:p>
          </table:table-cell>
        </table:table-row>
        <table:table-row table:style-name="Table1.3">
          <table:table-cell table:style-name="Table1.A3" table:number-rows-spanned="2" office:value-type="string">
            <text:p text:style-name="Text_20_body"/>
          </table:table-cell>
          <table:table-cell table:style-name="Table1.B3" office:value-type="string">
            <text:p text:style-name="_36__20_pt_20_spacer"/>
          </table:table-cell>
          <table:table-cell table:style-name="Table1.C3" table:number-rows-spanned="2" table:number-columns-spanned="2" office:value-type="string">
            <text:p text:style-name="P3"/>
          </table:table-cell>
          <table:covered-table-cell/>
        </table:table-row>
        <table:table-row table:style-name="Table1.4">
          <table:covered-table-cell table:style-name="Table1.A3"/>
          <table:table-cell table:style-name="Table1.B4" table:number-rows-spanned="2" office:value-type="string">
            <text:p text:style-name="P4">© <text:span text:style-name="T1">Year of Publication <text:s/>Publisher</text:span></text:p>
            <text:p text:style-name="P5">Publisher address</text:p>
            <text:p text:style-name="P5">City, Region</text:p>
            <text:p text:style-name="P5">Country</text:p>
          </table:table-cell>
          <table:covered-table-cell table:style-name="Table1.C4"/>
          <table:covered-table-cell/>
        </table:table-row>
        <table:table-row table:style-name="Table1.5">
          <table:table-cell table:style-name="Table1.B3" office:value-type="string">
            <text:p text:style-name="Text_20_body"/>
          </table:table-cell>
          <table:covered-table-cell table:style-name="Table1.B4"/>
          <table:table-cell table:style-name="Table1.C5" table:number-columns-spanned="2" office:value-type="string">
            <text:p text:style-name="M.T._20_-_20_Cover_20_subtitle">Teacher’s Guide</text:p>
          </table:table-cell>
          <table:covered-table-cell/>
        </table:table-row>
      </table:table>
      <text:p text:style-name="_36__20_pt_20_spac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fill-image draw:name="Q1_5f_background" draw:display-name="Q1_background" xlink:href="Pictures/10000000000006230000045716250DF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M.T._20_-_20_Cover_20_subtitle" style:display-name="M.T. - Cover subtitle" style:family="paragraph" style:parent-style-name="M.T._20_-_20_Cover_20_Title">
      <style:paragraph-properties fo:margin-right="0cm" fo:margin-top="0cm" fo:margin-bottom="0cm" style:contextual-spacing="false" fo:text-align="right" style:justify-single-word="false" style:vertical-align="middl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M.T._20_-_20_Cover_20_Title" style:display-name="M.T. - Cover Title" style:family="paragraph" style:parent-style-name="Standard" style:master-page-name="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style:page-number="auto" fo:background-color="transparent" style:vertical-align="bottom"/>
      <style:text-properties fo:color="#ffffff" loext:opacity="100%" style:font-name="Andika2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M.T._20_-_20_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 fo:margin-right="0.499cm"/>
      <style:text-properties style:font-name="Andika1" fo:font-family="Andika" style:font-family-generic="roman" style:font-pitch="variable" fo:font-size="11pt" fo:font-style="normal" fo:font-weight="normal" officeooo:rsid="003fe2b7" style:font-size-asian="11pt" style:font-style-asian="normal" style:font-weight-asian="normal"/>
    </style:style>
    <style:style style:name="_36__20_pt_20_spacer" style:display-name="6 pt spacer" style:family="paragraph" style:parent-style-name="M.T._20_-_20_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Body" style:family="paragraph" style:default-outline-level="" style:master-page-name="">
      <loext:graphic-properties draw:fill="none" draw:fill-color="#729fcf"/>
      <style:paragraph-properties fo:margin-left="0cm" fo:margin-right="0cm" fo:margin-top="0.049cm" fo:margin-bottom="0.101cm" style:contextual-spacing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color="#000000" loext:opacity="100%" style:font-name="Andika3" fo:font-family="Andika" style:font-style-name="Regular" style:font-pitch="variable" fo:font-size="10pt" fo:language="en" fo:country="US" fo:font-style="normal" fo:font-weight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2cm" fo:page-height="29.7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1_5f_background" draw:fill-image-width="100%" draw:fill-image-height="100%" style:repeat="no-repeat" draw:fill-image-ref-point="center" style:footnote-max-height="0cm" loext:margin-gutter="0cm">
        <style:background-image xlink:href="Pictures/10000000000006230000045716250DF5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1_5f_background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29T20:25:41.814837313</meta:creation-date>
    <dc:title>Default A4</dc:title>
    <meta:editing-duration>PT4H22M32S</meta:editing-duration>
    <meta:editing-cycles>65</meta:editing-cycles>
    <meta:generator>LibreOffice/26.2.1.2$MacOSX_AARCH64 LibreOffice_project/8399f6259d8c87f40e7255cdb3c9b958f5e08948</meta:generator>
    <meta:initial-creator>Chris Jackson</meta:initial-creator>
    <dc:date>2026-04-27T14:35:30.574314000</dc:date>
    <dc:creator>Chris Jackson</dc:creator>
    <meta:document-statistic meta:table-count="1" meta:image-count="1" meta:object-count="0" meta:page-count="1" meta:paragraph-count="6" meta:word-count="15" meta:character-count="100" meta:non-whitespace-character-count="90"/>
    <meta:template xlink:type="simple" xlink:actuate="onRequest" xlink:title="Default A4" xlink:href="../../../../../../Library/Application%20Support/LibreOffice/4/user/template/Default%20A4.ott" meta:date="2022-06-29T20:25:41.539340923"/>
  </office:meta>
</office:document-meta>
</file>