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B1300000B262DEFBB7858F1BB20.tif" manifest:media-type="image/tiff"/>
  <manifest:file-entry manifest:full-path="Pictures/10000000000000EC000000A3875D8CEC3005B53D.jpg" manifest:media-type="image/jpeg"/>
  <manifest:file-entry manifest:full-path="Pictures/10000000000000EC000000A38BA224D2DD8C1A3B.jpg" manifest:media-type="image/jpeg"/>
  <manifest:file-entry manifest:full-path="Pictures/10000000000000EC000000A3D9AFC515C5E5C9B0.jpg" manifest:media-type="image/jpeg"/>
  <manifest:file-entry manifest:full-path="Pictures/10000000000000EC000000A33264A3AD3CEA3CBF.jpg" manifest:media-type="image/jpeg"/>
  <manifest:file-entry manifest:full-path="Pictures/10000000000000EC000000A359981670E5FB3342.jpg" manifest:media-type="image/jpeg"/>
  <manifest:file-entry manifest:full-path="Pictures/10000001000000D8000000D86F2B4F4EF25946AD.png" manifest:media-type="image/png"/>
  <manifest:file-entry manifest:full-path="Pictures/10000001000000580000001FF4DBFF4432E2ED5C.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itle_26_Truth" style:display-name="Title&amp;Truth" style:family="table">
      <style:table-properties style:width="17.5cm" table:align="left" style:may-break-between-rows="true" style:writing-mode="lr-tb" table:border-model="collapsing"/>
    </style:style>
    <style:style style:name="Title_26_Truth.A" style:display-name="Title&amp;Truth.A" style:family="table-column">
      <style:table-column-properties style:column-width="2.701cm"/>
    </style:style>
    <style:style style:name="Title_26_Truth.B" style:display-name="Title&amp;Truth.B" style:family="table-column">
      <style:table-column-properties style:column-width="14.799cm"/>
    </style:style>
    <style:style style:name="Title_26_Truth.1" style:display-name="Title&amp;Truth.1" style:family="table-row">
      <style:table-row-properties fo:keep-together="auto"/>
    </style:style>
    <style:style style:name="Title_26_Truth.A1" style:display-name="Title&amp;Truth.A1" style:family="table-cell">
      <style:table-cell-properties style:vertical-align="middle" fo:background-color="#cccccc" fo:padding-left="0.102cm" fo:padding-right="0.102cm" fo:padding-top="0cm" fo:padding-bottom="0.051cm" fo:border-left="none" fo:border-right="none" fo:border-top="none" fo:border-bottom="1pt solid #000000" style:writing-mode="lr-tb">
        <style:background-image/>
      </style:table-cell-properties>
    </style:style>
    <style:style style:name="Title_26_Truth.B1" style:display-name="Title&amp;Truth.B1" style:family="table-cell">
      <style:table-cell-properties style:vertical-align="middle" fo:background-color="transparent" fo:padding-left="0.102cm" fo:padding-right="0.102cm" fo:padding-top="0cm" fo:padding-bottom="0.051cm" fo:border-left="none" fo:border-right="none" fo:border-top="none" fo:border-bottom="1pt solid #000000" style:writing-mode="lr-tb">
        <style:background-image/>
      </style:table-cell-properties>
    </style:style>
    <style:style style:name="P1" style:family="paragraph" style:parent-style-name="Coloring_20_Page_20_Footer">
      <style:text-properties officeooo:paragraph-rsid="02b4e089"/>
    </style:style>
    <style:style style:name="P2" style:family="paragraph" style:parent-style-name="M.T._20_Text">
      <style:text-properties officeooo:paragraph-rsid="029f899c"/>
    </style:style>
    <style:style style:name="P3" style:family="paragraph" style:parent-style-name="Body">
      <style:text-properties fo:font-size="8pt" officeooo:paragraph-rsid="029f899c" style:font-size-asian="8pt" style:font-size-complex="8pt"/>
    </style:style>
    <style:style style:name="P4" style:family="paragraph" style:parent-style-name="Bible_20_Story_20_-_20_Graphic_20_Number">
      <style:text-properties officeooo:rsid="017e3f1f"/>
    </style:style>
    <style:style style:name="P5" style:family="paragraph" style:parent-style-name="Bible_20_Story_20_-_20_Graphic_20_Number">
      <style:text-properties officeooo:rsid="017e3f1f" officeooo:paragraph-rsid="00b0d75b"/>
    </style:style>
    <style:style style:name="P6" style:family="paragraph" style:parent-style-name="Body">
      <style:text-properties officeooo:paragraph-rsid="00ccf328"/>
    </style:style>
    <style:style style:name="P7" style:family="paragraph" style:parent-style-name="Body_20_Inset">
      <style:text-properties officeooo:paragraph-rsid="00ccf328"/>
    </style:style>
    <style:style style:name="P8" style:family="paragraph" style:parent-style-name="English_20_Translation_20_-_20_Bible_20_story_20_inset">
      <style:text-properties officeooo:paragraph-rsid="00ccf328"/>
    </style:style>
    <style:style style:name="P9" style:family="paragraph" style:parent-style-name="English_20_Translation_20_-_20_Indented">
      <style:text-properties officeooo:paragraph-rsid="00ccf328"/>
    </style:style>
    <style:style style:name="P10" style:family="paragraph" style:parent-style-name="English_20_Translation_20_-_20_double_20_inset">
      <style:text-properties officeooo:paragraph-rsid="00ccf328"/>
    </style:style>
    <style:style style:name="P11" style:family="paragraph" style:parent-style-name="English_20_Translation_20_-_20_single_20_inset">
      <style:text-properties officeooo:paragraph-rsid="00ccf328"/>
    </style:style>
    <style:style style:name="P12" style:family="paragraph" style:parent-style-name="English_20_translation">
      <style:text-properties officeooo:paragraph-rsid="00ccf328"/>
    </style:style>
    <style:style style:name="P13" style:family="paragraph" style:parent-style-name="M.T._20_Text">
      <style:text-properties officeooo:paragraph-rsid="00ccf328"/>
    </style:style>
    <style:style style:name="P14" style:family="paragraph" style:parent-style-name="M.T._20_Text_20_-_20_Bible_20_story_20_inset">
      <style:text-properties officeooo:paragraph-rsid="00ccf328"/>
    </style:style>
    <style:style style:name="P15" style:family="paragraph" style:parent-style-name="M.T._20_Text_20_-_20_Indented">
      <style:text-properties officeooo:paragraph-rsid="00ccf328"/>
    </style:style>
    <style:style style:name="P16" style:family="paragraph" style:parent-style-name="M.T._20_Text_20_-_20_Single_20_Inset">
      <style:text-properties officeooo:paragraph-rsid="00ccf328"/>
    </style:style>
    <style:style style:name="P17" style:family="paragraph" style:parent-style-name="Section_20_Heading">
      <style:text-properties officeooo:paragraph-rsid="00ccf328"/>
    </style:style>
    <style:style style:name="P18" style:family="paragraph" style:parent-style-name="Sub-Head_20_-_20_Coloring_20_page_20_last_20_paragraph">
      <style:text-properties officeooo:paragraph-rsid="00ccf328"/>
    </style:style>
    <style:style style:name="P19" style:family="paragraph" style:parent-style-name="Sub-Head_20_1">
      <style:text-properties officeooo:paragraph-rsid="00ccf328"/>
    </style:style>
    <style:style style:name="P20" style:family="paragraph" style:parent-style-name="Sub-Head_20_1_20_No_20_follow">
      <style:text-properties officeooo:paragraph-rsid="00ccf328"/>
    </style:style>
    <style:style style:name="P21" style:family="paragraph" style:parent-style-name="Sub-Head_20_2">
      <style:text-properties officeooo:paragraph-rsid="00ccf328"/>
    </style:style>
    <style:style style:name="P22" style:family="paragraph" style:parent-style-name="Standard">
      <style:paragraph-properties fo:text-align="center" style:justify-single-word="false"/>
      <style:text-properties officeooo:paragraph-rsid="00b0d75b"/>
    </style:style>
    <style:style style:name="P23" style:family="paragraph" style:parent-style-name="M.T._20_Coloring_20_Page_20_-_20_Truth">
      <style:paragraph-properties fo:break-before="column"/>
    </style:style>
    <style:style style:name="P24" style:family="paragraph" style:parent-style-name="M.T._20_Coloring_20_Page_20_-_20_Truth" style:master-page-name="Coloring_20_Page">
      <style:paragraph-properties style:page-number="auto"/>
    </style:style>
    <style:style style:name="P25" style:family="paragraph" style:parent-style-name="Body_20_Bullet_20_-_20_Checkmark">
      <style:text-properties officeooo:paragraph-rsid="00ccf328"/>
    </style:style>
    <style:style style:name="P26" style:family="paragraph" style:parent-style-name="Body_20_Bullet_20_-_20_Checkmark_20_-_20_No_20_follow">
      <style:text-properties officeooo:paragraph-rsid="00ccf328"/>
    </style:style>
    <style:style style:name="P27" style:family="paragraph" style:parent-style-name="Body_20_Numbered_20_List">
      <style:text-properties officeooo:paragraph-rsid="00ccf328"/>
    </style:style>
    <style:style style:name="P28" style:family="paragraph" style:parent-style-name="M.T._20_Lesson_20_title_20_-_20_invisible" style:master-page-name="First_20_Page">
      <style:paragraph-properties style:page-number="auto"/>
    </style:style>
    <style:style style:name="P29" style:family="paragraph" style:parent-style-name="M.T._20_Text_20_-_20_Checkmark_20_bullet">
      <style:text-properties officeooo:paragraph-rsid="00ccf328"/>
    </style:style>
    <style:style style:name="P30" style:family="paragraph" style:parent-style-name="M.T._20_Text_20_-_20_Diamond_20_bullet">
      <style:text-properties officeooo:paragraph-rsid="00ccf328"/>
    </style:style>
    <style:style style:name="P31" style:family="paragraph" style:parent-style-name="M.T._20_Text_20_-_20_Numbered_20_List_20_Inset" style:list-style-name="L1">
      <style:text-properties officeooo:paragraph-rsid="00ccf328"/>
    </style:style>
    <style:style style:name="P32" style:family="paragraph" style:parent-style-name="M.T._20_Text_20_-_20_Numbered_20_List_20_Inset" style:list-style-name="L2">
      <style:text-properties officeooo:paragraph-rsid="00ccf328"/>
    </style:style>
    <style:style style:name="P33"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2" style:font-size-complex="18pt" style:font-style-complex="normal" style:font-weight-complex="normal" style:text-emphasize="none" style:font-relief="none" style:text-overline-style="none" style:text-overline-color="font-color"/>
    </style:style>
    <style:style style:name="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T2" style:family="text">
      <style:text-properties officeooo:rsid="0184d68b"/>
    </style:style>
    <style:style style:name="T3" style:family="text">
      <style:text-properties officeooo:rsid="01d657ac"/>
    </style:style>
    <style:style style:name="T4" style:family="text">
      <style:text-properties officeooo:rsid="01355e7d"/>
    </style:style>
    <style:style style:name="T5" style:family="text">
      <style:text-properties fo:language="en" fo:country="US" style:language-asian="en" style:country-asian="US" style:language-complex="hi" style:country-complex="IN"/>
    </style:style>
    <style:style style:name="fr1" style:family="graphic" style:parent-style-name="Bible_5f_Story_5f_Box">
      <style:graphic-properties style:vertical-pos="from-top" style:vertical-rel="paragraph" style:horizontal-pos="from-left" style:horizontal-rel="paragraph" draw:opacity="50%"/>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Number_20_Graphic">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28" text:outline-level="1"><draw:frame draw:style-name="fr3" draw:name="Image1" text:anchor-type="char" svg:x="0cm" svg:y="0.041cm" svg:width="2.731cm" svg:height="2.731cm" draw:z-index="2"><draw:image xlink:href="Pictures/10000001000000D8000000D86F2B4F4EF25946AD.png" xlink:type="simple" xlink:show="embed" xlink:actuate="onLoad" draw:mime-type="image/png"/></draw:frame>True Disciples of Jesus Love Their Enemies</text:h>
        </text:list-item>
      </text:list>
      <text:p text:style-name="M.T._20_Lesson_20_Title">True Disciples of Jesus Love Their Enemies</text:p>
      <text:p text:style-name="English_20_Translation_20_-_20_Lesson_20_title">True Disciples of Jesus Love Their Enemies</text:p>
      <text:p text:style-name="M.T._20_Text_20_-_20_Lesson_20_Title_20_Scrip_20_Reference">Luke <text:s/>6:27-38</text:p>
      <text:p text:style-name="Part_20_Heading">Lesson Overview</text:p>
      <table:table table:name="Title&amp;Truth" table:style-name="Title_26_Truth" table:template-name="Lesson Overview">
        <table:table-column table:style-name="Title_26_Truth.A"/>
        <table:table-column table:style-name="Title_26_Truth.B"/>
        <table:table-row table:style-name="Title_26_Truth.1">
          <table:table-cell table:style-name="Title_26_Truth.A1" office:value-type="string">
            <text:p text:style-name="Table_20_Left_20_headings">Today’s Truth</text:p>
          </table:table-cell>
          <table:table-cell table:style-name="Title_26_Truth.B1" office:value-type="string">
            <text:p text:style-name="M.T._20_Text">True disciples of Jesus love their enemies.</text:p>
            <text:p text:style-name="English_20_translation">True disciples of Jesus love their enemies.</text:p>
          </table:table-cell>
        </table:table-row>
        <table:table-row table:style-name="Title_26_Truth.1">
          <table:table-cell table:style-name="Title_26_Truth.A1" office:value-type="string">
            <text:p text:style-name="Table_20_Left_20_headings">Objective</text:p>
          </table:table-cell>
          <table:table-cell table:style-name="Title_26_Truth.B1" office:value-type="string">
            <text:p text:style-name="Body_20_Tight_20_lines"><text:span text:style-name="Body_20_Emphasized_20_-_20_Small">KNOW: <text:s/></text:span>We are to love all, even if they are our enemies.</text:p>
            <text:p text:style-name="Body_20_Tight_20_lines"><text:span text:style-name="Body_20_Emphasized_20_-_20_Small">DO:</text:span> <text:s/>The children will show you how they can too love one of their enemies.</text:p>
          </table:table-cell>
        </table:table-row>
        <table:table-row table:style-name="Title_26_Truth.1">
          <table:table-cell table:style-name="Title_26_Truth.A1" office:value-type="string">
            <text:p text:style-name="Table_20_Left_20_headings">Materials</text:p>
          </table:table-cell>
          <table:table-cell table:style-name="Title_26_Truth.B1" office:value-type="string">
            <text:list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5-10 different sized containers or cups (You can also use shoes or hats/caps)</text:p>
              </text:list-item>
              <text:list-item>
                <text:p text:style-name="Table_20_Bullet_20_-_20_Checkmark">5-10 strips of paper (One for each container). <text:s/>Write different amounts of points on each. (Have numbers as low as 1 and numbers as high as 100.)</text:p>
              </text:list-item>
              <text:list-item>
                <text:p text:style-name="Table_20_Bullet_20_-_20_Checkmark">2 bottle caps, stones, or other small things to throw</text:p>
              </text:list-item>
            </text:list>
          </table:table-cell>
        </table:table-row>
        <table:table-row table:style-name="Title_26_Truth.1">
          <table:table-cell table:style-name="Title_26_Truth.A1" office:value-type="string">
            <text:p text:style-name="Table_20_Left_20_headings">Memory Verse</text:p>
          </table:table-cell>
          <table:table-cell table:style-name="Title_26_Truth.B1" office:value-type="string">
            <text:p text:style-name="M.T._20_Text">Luke 6:27-28 But I tell you who hear me: Love your enemies, do good to those who hate you, bless those who curse you, pray for those who mistreat you.</text:p>
            <text:p text:style-name="English_20_translation">Luke 6:27-28 But I tell you who hear me: Love your enemies, do good to those who hate you, bless those who curse you, pray for those who mistreat you.</text:p>
          </table:table-cell>
        </table:table-row>
        <table:table-row table:style-name="Title_26_Truth.1">
          <table:table-cell table:style-name="Title_26_Truth.A1" office:value-type="string">
            <text:p text:style-name="Table_20_Left_20_headings">Homework</text:p>
          </table:table-cell>
          <table:table-cell table:style-name="Title_26_Truth.B1" office:value-type="string">
            <text:p text:style-name="M.T._20_Text">This week show love to someone who you do not get along with.</text:p>
            <text:p text:style-name="English_20_translation">This week show love to someone who you do not get along with.</text:p>
          </table:table-cell>
        </table:table-row>
      </table:table>
      <text:p text:style-name="Body_20_-_20_Small_20_Spacer"/>
      <text:p text:style-name="Part_20_Heading">Detailed Lesson Plan</text:p>
      <text:section text:style-name="Sect1" text:name="L-15 Detail Plan">
        <text:p text:style-name="P20">Song</text:p>
        <text:p text:style-name="P17">Opening</text:p>
        <text:p text:style-name="P19">Welcome</text:p>
        <text:list xml:id="list1445982475" text:style-name="Bullet_20_-_20_checkmark">
          <text:list-item>
            <text:p text:style-name="P25">Be sure the children know you are happy to see them!</text:p>
          </text:list-item>
          <text:list-item>
            <text:p text:style-name="P26">Introduce yourself and your helpers.</text:p>
          </text:list-item>
        </text:list>
        <text:p text:style-name="P19">Sharing Time</text:p>
        <text:list xml:id="list173913222866533" text:continue-numbering="true" text:style-name="Bullet_20_-_20_checkmark">
          <text:list-item>
            <text:p text:style-name="P25">Say the truth from the previous lesson together:</text:p>
          </text:list-item>
        </text:list>
        <text:p text:style-name="P16">A true disciple of Jesus follows him and his teachings.</text:p>
        <text:p text:style-name="P11">A true disciple of Jesus follows him and his teachings.</text:p>
        <text:list xml:id="list173913750166082" text:continue-numbering="true" text:style-name="Bullet_20_-_20_checkmark">
          <text:list-item>
            <text:p text:style-name="P25">Say the memory verse from the previous lesson together:</text:p>
          </text:list-item>
        </text:list>
        <text:p text:style-name="P16">Luke 6:13 When morning came, he called his disciples to him and chose twelve of them, whom he also designated apostles.</text:p>
        <text:p text:style-name="P11">Luke 6:13 When morning came, he called his disciples to him and chose twelve of them, whom he also designated apostles.</text:p>
        <text:list xml:id="list173912616372360" text:continue-numbering="true" text:style-name="Bullet_20_-_20_checkmark">
          <text:list-item>
            <text:p text:style-name="P25"><text:soft-page-break/>Review the homework from the previous lesson:</text:p>
          </text:list-item>
        </text:list>
        <text:p text:style-name="P16">Last week you were to show that you are a disciple of Jesus. What did you do to show that you are a disciple of Jesus?</text:p>
        <text:p text:style-name="P11">Last week you were to show that you are a disciple of Jesus. What did you do to show that you are a disciple of Jesus?</text:p>
        <text:p text:style-name="P7">(Give children time to share.)</text:p>
        <text:p text:style-name="P19">Prayer</text:p>
        <text:list xml:id="list173914228558073" text:continue-numbering="true" text:style-name="Bullet_20_-_20_checkmark">
          <text:list-item>
            <text:p text:style-name="P25">Let the children share praises and prayer requests.</text:p>
          </text:list-item>
          <text:list-item>
            <text:p text:style-name="P26">Keep a record of what the children are sharing so you can remember to thank God together for answered prayers.</text:p>
          </text:list-item>
          <text:list-item>
            <text:p text:style-name="P26">Spend time praying together. <text:s/>Let children pray out loud if they volunteer. <text:s/>Do not force anyone to pray out loud.</text:p>
          </text:list-item>
        </text:list>
        <text:p text:style-name="P20">Song</text:p>
        <text:p text:style-name="P17">Words to Discuss</text:p>
        <text:list xml:id="list173913324540081" text:continue-numbering="true" text:style-name="Bullet_20_-_20_checkmark">
          <text:list-item>
            <text:p text:style-name="P25">On the blackboard, write the “Words to Discuss” from the list below.</text:p>
          </text:list-item>
        </text:list>
        <text:p text:style-name="M.T._20_Text_20_-_20_Single_20_Inset">Let's discuss some words to help us better understand the Bible story for today.</text:p>
        <text:p text:style-name="P11">Let's discuss some words to help us better understand the Bible story for today.</text:p>
        <text:list xml:id="list2432160460" text:style-name="Bullet_20_-_20_Diamond">
          <text:list-item>
            <text:p text:style-name="P30"><text:span text:style-name="Body_20_Emphasized_20_-_20_Small">Disciple: <text:s/></text:span>Someone who follows Jesus and lives by His teachings.</text:p>
          </text:list-item>
        </text:list>
        <text:p text:style-name="P10">Disciple: <text:s/>Someone who follows Jesus and lives by His teachings.</text:p>
        <text:list xml:id="list173913677768658" text:continue-numbering="true" text:style-name="Bullet_20_-_20_Diamond">
          <text:list-item>
            <text:p text:style-name="P30"><text:span text:style-name="Body_20_Emphasized_20_-_20_Small">Love: <text:s/></text:span>Not just affection, but something that is shown through action.</text:p>
          </text:list-item>
        </text:list>
        <text:p text:style-name="P10">Love: <text:s/>Not just affection, but something that is shown through action.</text:p>
        <text:list xml:id="list173913843567837" text:continue-numbering="true" text:style-name="Bullet_20_-_20_Diamond">
          <text:list-item>
            <text:p text:style-name="P30"><text:span text:style-name="Body_20_Emphasized_20_-_20_Small">Enemy: <text:s/></text:span>Someone who is opposed to you and/or hostile toward you.</text:p>
          </text:list-item>
        </text:list>
        <text:p text:style-name="P10">Enemy: <text:s/>Someone who is opposed to you and/or hostile toward you.</text:p>
        <text:p text:style-name="P20">Song</text:p>
        <text:p text:style-name="P17">Bible Story / Lesson</text:p>
        <text:list xml:id="list173913440160385" text:continue-list="list173913324540081" text:style-name="Bullet_20_-_20_checkmark">
          <text:list-item>
            <text:p text:style-name="P29">Has there ever been someone who treated you badly?</text:p>
          </text:list-item>
        </text:list>
        <text:p text:style-name="P11">Has there ever been someone who treated you badly?</text:p>
        <text:list xml:id="list173913405236154" text:continue-numbering="true" text:style-name="Bullet_20_-_20_checkmark">
          <text:list-item>
            <text:p text:style-name="P29">How did you treat them?</text:p>
          </text:list-item>
        </text:list>
        <text:p text:style-name="P11">How did you treat them?</text:p>
        <text:list xml:id="list173914516047371" text:continue-numbering="true" text:style-name="Bullet_20_-_20_checkmark">
          <text:list-item>
            <text:p text:style-name="P29">God tells us that we are to love everyone. Even those who are mean to us.</text:p>
          </text:list-item>
        </text:list>
        <text:p text:style-name="P11">God tells us that we are to love everyone. Even those who are mean to us.</text:p>
        <text:list xml:id="list173912687637758" text:continue-numbering="true" text:style-name="Bullet_20_-_20_checkmark">
          <text:list-item>
            <text:p text:style-name="P29">Today we will be learning that a true disciple of Jesus loves their enemies.</text:p>
          </text:list-item>
        </text:list>
        <text:p text:style-name="P11">Today we will be learning that a true disciple of Jesus loves their enemies.</text:p>
        <text:p text:style-name="P19">Introduce Truth</text:p>
        <text:p text:style-name="P15">Our truth for today is: <text:s/>True disciples of Jesus love their enemies.</text:p>
        <text:p text:style-name="P9">Our truth for today is: <text:s/>True disciples of Jesus love their enemies.</text:p>
        <text:p text:style-name="P15">This reminds me of a story from the village.</text:p>
        <text:p text:style-name="P9">This reminds me of a story from the village.</text:p>
        <text:p text:style-name="P15">Jesus taught about the difference between people who were his true followers, and those who were not. Jesus taught the people that his true followers love everyone, including their enemies. Here is a story from the village that can help us better understand Jesus' teachings that say we should love our enemies. This is not a story from the Bible; it is a story from the village.</text:p>
        <text:p text:style-name="P9"><text:soft-page-break/>Jesus taught about the difference between people who were his true followers, and those who were not. Jesus taught the people that his true followers love everyone, including their enemies. Here is a story from the village that can help us better understand Jesus' teachings that say we should love our enemies. This is not a story from the Bible; it is a story from the village.</text:p>
        <text:p text:style-name="P19">Bible Story: <text:s/>A story from a village</text:p>
        <text:p text:style-name="P15">There were two families who lived not too far from each other in the same village. They were the Ngwa family, and the Mbeng family. Both of the families went to the same church, their children went to the same schools, and they saw each other almost every day. Everyone in the Ngwa family was happy. You could often hear them singing in their compound, or when they were going to their farm. For some unknown reason, the Mbeng family hated the Ngwa family. </text:p>
        <text:p text:style-name="P9">There were two families who lived not too far from each other in the same village. They were the Ngwa family, and the Mbeng family. Both of the families went to the same church, their children went to the same schools, and they saw each other almost every day. Everyone in the Ngwa family was happy. You could often hear them singing in their compound, or when they were going to their farm. For some unknown reason, the Mbeng family hated the Ngwa family.</text:p>
        <text:p text:style-name="P14"><draw:frame draw:style-name="fr1" draw:name="Frame2" text:anchor-type="paragraph" svg:x="-0.046cm" svg:y="0.009cm" svg:width="3.5cm" draw:z-index="3"><draw:text-box fo:min-height="3.062cm"><text:p text:style-name="P4">Picture <text:s/>15–1</text:p><text:p text:style-name="P22"><draw:frame text:anchor-type="as-char" draw:z-index="4" draw:name="Shape1_0" draw:style-name="gr1" draw:text-style-name="P33" svg:width="3.282cm" svg:height="2.53cm"><draw:image xlink:href="Pictures/10000000000000EC000000A33264A3AD3CEA3CBF.jpg" xlink:type="simple" xlink:show="embed" xlink:actuate="onLoad" draw:mime-type="image/jpeg"><text:p/></draw:image></draw:frame></text:p></draw:text-box></draw:frame>At the time of the year when everyone was preparing their farms, both the Mbeng and the Ngwa families had gone out to open new farms. The Mbeng family saw the Ngwa family working a plot along side their own. The Mbeng family did not want to share a boundary of their farm with the Ngwa family, so they became angry and drove the Ngwa family away with stones and chased them with their cutlasses.</text:p>
        <text:p text:style-name="P8">At the time of the year when everyone was preparing their farms, both the Mbeng and the Ngwa families had gone out to open new farms. The Mbeng family saw the Ngwa family working a plot along side their own. The Mbeng family did not want to share a boundary of their farm with the Ngwa family, so they became angry and drove the Ngwa family away with stones and chased them with their cutlasses.</text:p>
        <text:p text:style-name="P14"><draw:frame draw:style-name="fr1" draw:name="Frame1" text:anchor-type="paragraph" svg:x="-0.046cm" svg:y="0.009cm" svg:width="3.5cm" draw:z-index="5"><draw:text-box fo:min-height="3.062cm"><text:p text:style-name="P5">Picture <text:s/>15–2</text:p><text:p text:style-name="P22"><draw:frame text:anchor-type="as-char" draw:z-index="6" draw:name="Shape2_0" draw:style-name="gr1" draw:text-style-name="P33" svg:width="3.282cm" svg:height="2.271cm"><draw:image xlink:href="Pictures/10000000000000EC000000A359981670E5FB3342.jpg" xlink:type="simple" xlink:show="embed" xlink:actuate="onLoad" draw:mime-type="image/jpeg"><text:p/></draw:image></draw:frame></text:p></draw:text-box></draw:frame>Later on, the Ngwa family returned to their plot. They were able to prepare their farm in time for planting. They prepared the ground and the ridges so that they could plant their crops before the rains would come.</text:p>
        <text:p text:style-name="P8">Later on, the Ngwa family returned to their plot. They were able to prepare their farm in time for planting. They prepared the ground and the ridges so that they could plant their crops before the rains would come.</text:p>
        <text:p text:style-name="P14"><draw:frame draw:style-name="fr1" draw:name="Frame3" text:anchor-type="paragraph" svg:x="-0.046cm" svg:y="0.009cm" svg:width="3.5cm" draw:z-index="7"><draw:text-box fo:min-height="3.062cm"><text:p text:style-name="P5">Picture <text:s/>15–3</text:p><text:p text:style-name="P22"><draw:frame text:anchor-type="as-char" draw:z-index="8" draw:name="Shape3_0" draw:style-name="gr1" draw:text-style-name="P33" svg:width="3.282cm" svg:height="2.271cm"><draw:image xlink:href="Pictures/10000000000000EC000000A38BA224D2DD8C1A3B.jpg" xlink:type="simple" xlink:show="embed" xlink:actuate="onLoad" draw:mime-type="image/jpeg"><text:p/></draw:image></draw:frame></text:p></draw:text-box></draw:frame>A few days after this, the Mbeng family returned to work their own farm. They saw that the Ngwa family had prepared their own farm. This made them angry again. They entered the Ngwa farm and scattered all of the ridges making it so the farm would not be ready for planting.</text:p>
        <text:p text:style-name="P8">A few days after this, the Mbeng family returned to work their own farm. They saw that the Ngwa family had prepared their own farm. This made them angry again. They entered the Ngwa farm and scattered all of the ridges making it so the farm would not be ready for planting.</text:p>
        <text:p text:style-name="P14"><draw:frame draw:style-name="fr1" draw:name="Frame4" text:anchor-type="paragraph" svg:x="-0.046cm" svg:y="0.009cm" svg:width="3.5cm" draw:z-index="9"><draw:text-box fo:min-height="3.062cm"><text:p text:style-name="P5">Picture <text:s/>15–4</text:p><text:p text:style-name="P22"><draw:frame text:anchor-type="as-char" draw:z-index="10" draw:name="Shape4_0" draw:style-name="gr1" draw:text-style-name="P33" svg:width="3.282cm" svg:height="2.271cm"><draw:image xlink:href="Pictures/10000000000000EC000000A3D9AFC515C5E5C9B0.jpg" xlink:type="simple" xlink:show="embed" xlink:actuate="onLoad" draw:mime-type="image/jpeg"><text:p/></draw:image></draw:frame></text:p></draw:text-box></draw:frame>The Ngwa family did not return to their farm until it was time to plant. When they came to their farm to plant, they discovered that it had been scattered and that they could not plant. They had much work to do before they would be able to plant their crops.</text:p>
        <text:p text:style-name="P14">The children complained bitterly saying, “We know who did this; we should scatter the Mbeng family farm!” Their father said to them, “No, we will not do that! Jesus said that his true followers do not do harm to their enemies.” So, they returned to their farm, worked hard to prepare everything again, and planted their crops.</text:p>
        <text:p text:style-name="P8">The Ngwa family did not return to their farm until it was time to plant. When they came to their farm to plant, they discovered that it had been scattered and that they could not plant. They had much work to do before they would be able to plant their crops.</text:p>
        <text:p text:style-name="P8"><text:soft-page-break/>The children complained bitterly saying, “We know who did this; we should scatter the Mbeng family farm!” Their father said to them, “No, we will not do that! Jesus said that his true followers do not do harm to their enemies.” So, they returned to their farm, worked hard to prepare everything again, and planted their crops.</text:p>
        <text:p text:style-name="P14"><draw:frame draw:style-name="fr1" draw:name="Frame6" text:anchor-type="paragraph" svg:x="-0.046cm" svg:y="0.009cm" svg:width="3.5cm" draw:z-index="11"><draw:text-box fo:min-height="3.062cm"><text:p text:style-name="P4">Picture <text:s/>15–5</text:p><text:p text:style-name="Bible_20_Story_20_-_20_Graphic_20_Number"><draw:frame text:anchor-type="as-char" draw:z-index="12" draw:name="Shape5" draw:style-name="gr1" draw:text-style-name="P33" svg:width="3.282cm" svg:height="2.371cm"><draw:image xlink:href="Pictures/10000000000000EC000000A3875D8CEC3005B53D.jpg" xlink:type="simple" xlink:show="embed" xlink:actuate="onLoad" draw:mime-type="image/jpeg"><text:p/></draw:image></draw:frame></text:p></draw:text-box></draw:frame>Later on, during the weeding season, the Ngwa family were working in their farm. While they were weeding, they heard a scream come from inside the Mbeng family farm.</text:p>
        <text:p text:style-name="P14">Pa Ngwa rushed there and found one of the Mbeng boys on the ground crying and holding his leg. A snake had attacked him! None of his family were with him; he had come alone to finish the weeding.</text:p>
        <text:p text:style-name="P14">The oldest Ngwa boy, Bertrand, said, “Leave him. He's our enemy! This is God's judgment on the Mbeng's for all the evil they have done to us.”</text:p>
        <text:p text:style-name="P14">Pa Ngwa bent over to carry the boy and quietly said, “No, Jesus said that his true followers love even their enemies. We will take him to the hospital and care for him.”</text:p>
        <text:p text:style-name="P14">Pa Ngwa showed that he was a true follower of Jesus by loving everyone, even an enemy of his family.</text:p>
        <text:p text:style-name="P8">Later on, during the weeding season, the Ngwa family were working in their farm. While they were weeding, they heard a scream come from inside the Mbeng family farm.</text:p>
        <text:p text:style-name="P8">Pa Ngwa rushed there and found one of the Mbeng boys on the ground crying and holding his leg. A snake had attacked him! None of his family were with him; he had come alone to finish the weeding.</text:p>
        <text:p text:style-name="P8">The oldest Ngwa boy, Bertrand, said, “Leave him. He's our enemy! This is God's judgment on the Mbeng's for all the evil they have done to us.”</text:p>
        <text:p text:style-name="P8">Pa Ngwa bent over to carry the boy and quietly said, “No, Jesus said that his true followers love even their enemies. We will take him to the hospital and care for him.”</text:p>
        <text:p text:style-name="P8">Pa Ngwa showed that he was a true follower of Jesus by loving everyone, even an enemy of his family.</text:p>
        <text:p text:style-name="P19">Application</text:p>
        <text:p text:style-name="P15">Jesus said we are to love our enemies. In the story, the Ngwa family loved their enemies. Even though the Mbeng family over and over again caused problems and showed nothing but hate, the Ngwa family never returned the hatred. Next time you are around someone you do not like, or someone who is mean to you, pray and ask God to help you show love to them. Many times someone may hate you or be mean to you because they have a problem. Pray and ask God to show you how you can show love to that person.</text:p>
        <text:p text:style-name="P12">Jesus said we are to love our enemies. In the story, the Ngwa family loved their enemies. Even though the Mbeng family over and over again caused problems and showed nothing but hate, the Ngwa family never returned the hatred. Next time you are around someone you do not like, or someone who is mean to you, pray and ask God to help you show love to them. Many times someone may hate you or be mean to you because they have a problem. Pray and ask God to show you how you can show love to that person.</text:p>
        <text:p text:style-name="P13">True disciples of Jesus love their enemies.</text:p>
        <text:p text:style-name="P12">True disciples of Jesus love their enemies.</text:p>
        <text:p text:style-name="P21">Homework</text:p>
        <text:p text:style-name="P13">This week show love to someone who you do not get along with.</text:p>
        <text:p text:style-name="P12">This week show love to someone who you do not get along with.</text:p>
        <text:p text:style-name="P20">Prayer / Song</text:p>
        <text:p text:style-name="P17"><text:soft-page-break/>Review Game</text:p>
        <text:p text:style-name="P19">Throw Bottle Caps into Containers</text:p>
        <text:p text:style-name="P21">Materials</text:p>
        <text:list xml:id="list173913276556260" text:continue-numbering="true" text:style-name="Bullet_20_-_20_checkmark">
          <text:list-item>
            <text:p text:style-name="P25">Draw a line for the children to stand behind.</text:p>
          </text:list-item>
          <text:list-item>
            <text:p text:style-name="P26">Arrange 5-10 different sized containers or cups (you can also use shoes or hats/caps) into a group a distance from the line.</text:p>
          </text:list-item>
          <text:list-item>
            <text:p text:style-name="P26">Put one small paper with points written on it inside each container.</text:p>
          </text:list-item>
          <text:list-item>
            <text:p text:style-name="P26">Collect 2 bottle caps, stones, or other small things to throw and set them on the line that you drew for the children to stand behind.</text:p>
          </text:list-item>
        </text:list>
        <text:p text:style-name="P21">How to Play</text:p>
        <text:list xml:id="list173913095874372" text:continue-numbering="true" text:style-name="Bullet_20_-_20_checkmark">
          <text:list-item>
            <text:p text:style-name="P25">Divide the class into 2 teams.</text:p>
          </text:list-item>
          <text:list-item>
            <text:p text:style-name="P26">The first team tries to answer the first question. <text:s/>The teacher can use this time to explain what the children do not seem to understand.</text:p>
          </text:list-item>
          <text:list-item>
            <text:p text:style-name="P26">The child on the team that answers the question correctly comes to the front and stands behind the line. <text:s/>If the child only gets part of the question right, the teacher can fill in the rest.</text:p>
          </text:list-item>
          <text:list-item>
            <text:p text:style-name="P26">The child then tries to throw the bottle cap into the group of containers. <text:s/>Wherever the bottle cap enters, the points on the paper inside that container are what the team has.</text:p>
          </text:list-item>
          <text:list-item>
            <text:p text:style-name="P26">Record the points. <text:s/><text:span text:style-name="T5">The team with the most points wins.</text:span></text:p>
          </text:list-item>
          <text:list-item>
            <text:p text:style-name="P26">Be sure to clap for both sides. <text:s/>No name-calling. <text:s/>Encourage good sportsmanship.</text:p>
          </text:list-item>
        </text:list>
        <text:p text:style-name="P21">Questions for Review Game</text:p>
        <text:list xml:id="list4096372389" text:style-name="L1">
          <text:list-item>
            <text:p text:style-name="P31">What are disciples? (People who follow Jesus and live by his teachings)</text:p>
          </text:list-item>
        </text:list>
        <text:p text:style-name="P11">What are disciples? (People who follow Jesus and live by his teachings)</text:p>
        <text:list xml:id="list173913390539810" text:continue-numbering="true" text:style-name="L1">
          <text:list-item>
            <text:p text:style-name="P31">Who did Jesus say a true disciple of his loves? (Everyone, even their enemies)</text:p>
          </text:list-item>
        </text:list>
        <text:p text:style-name="P11">Who did Jesus say a true disciple of his loves? (Everyone, even their enemies)</text:p>
        <text:list xml:id="list173913318360610" text:continue-numbering="true" text:style-name="L1">
          <text:list-item>
            <text:p text:style-name="P31">From where did the story today come? (The story today came from a village somewhere. It is not from the Bible. The story is an example to help us understand the truth from the Bible, <text:s/>True disciples of Jesus love their enemies. <text:s/>)</text:p>
          </text:list-item>
        </text:list>
        <text:p text:style-name="P11">From where did the story today come? (The story today came from a village somewhere. It is not from the Bible. The story is an example to help us understand the truth from the Bible, <text:s/>True disciples of Jesus love their enemies. <text:s/>)</text:p>
        <text:list xml:id="list173913923092696" text:continue-numbering="true" text:style-name="L1">
          <text:list-item>
            <text:p text:style-name="P31">What was the first thing the Mbeng family did to the Ngwa family? (Drove them away from the farm with stones, and chased them with cutlasses.)</text:p>
          </text:list-item>
        </text:list>
        <text:p text:style-name="P11">What was the first thing the Mbeng family did to the Ngwa family? (Drove them away from the farm with stones, and chased them with cutlasses.)</text:p>
        <text:list xml:id="list173913638683702" text:continue-numbering="true" text:style-name="L1">
          <text:list-item>
            <text:p text:style-name="P31">What else did the Mbeng family do to the Ngwa family? (Scattered the Ngwa's family farm.)</text:p>
          </text:list-item>
        </text:list>
        <text:p text:style-name="P11">What else did the Mbeng family do to the Ngwa family? (Scattered the Ngwa's family farm.)</text:p>
        <text:list xml:id="list173912642297080" text:continue-numbering="true" text:style-name="L1">
          <text:list-item>
            <text:p text:style-name="P31">What did the Ngwa children want to do to the Mbeng family? (Scatter the Mbeng's farm, just like the Mbeng family had scattered their farm.)</text:p>
          </text:list-item>
        </text:list>
        <text:p text:style-name="P11">What did the Ngwa children want to do to the Mbeng family? (Scatter the Mbeng's farm, just like the Mbeng family had scattered their farm.)</text:p>
        <text:list xml:id="list173914464577237" text:continue-numbering="true" text:style-name="L1">
          <text:list-item>
            <text:p text:style-name="P31">What did the Ngwa's father say? (“No.” They would not scatter the Mbeng's farm because Jesus said that a true follower of Him will love their enemies.)</text:p>
          </text:list-item>
        </text:list>
        <text:p text:style-name="P11">What did the Ngwa's father say? (“No.” They would not scatter the Mbeng's farm because Jesus said that a true follower of Him will love their enemies.)</text:p>
        <text:list xml:id="list173914540039605" text:continue-numbering="true" text:style-name="L1">
          <text:list-item>
            <text:p text:style-name="P31"><text:soft-page-break/>What happened to one of the Mbeng boys during weeding season? (A snake bit one of the Mbeng boys.)</text:p>
          </text:list-item>
        </text:list>
        <text:p text:style-name="P11">What happened to one of the Mbeng boys during weeding season? (A snake bit one of the Mbeng boys.)<text:tab/></text:p>
        <text:list xml:id="list173914225746340" text:continue-numbering="true" text:style-name="L1">
          <text:list-item>
            <text:p text:style-name="P31">What did the oldest Ngwa boy say about the boy being bit by the snake? (It was God's judgment on the boy, and that they should leave him in the farm to die.)</text:p>
          </text:list-item>
        </text:list>
        <text:p text:style-name="P11">What did the oldest Ngwa boy say about the boy being bit by the snake? (It was God's judgment on the boy, and that they should leave him in the farm to die.)</text:p>
        <text:list xml:id="list173912585442610" text:continue-numbering="true" text:style-name="L1">
          <text:list-item>
            <text:p text:style-name="P31">What was the father's response to the oldest Ngwa boy? (A true disciple of Jesus loves his enemies, and that they would take the boy to the hospital and care for him.)</text:p>
          </text:list-item>
        </text:list>
        <text:p text:style-name="P11">What was the father's response to the oldest Ngwa boy? (A true disciple of Jesus loves his enemies, and that they would take the boy to the hospital and care for him.)</text:p>
        <text:list xml:id="list173912715915530" text:continue-numbering="true" text:style-name="L1">
          <text:list-item>
            <text:p text:style-name="P31">Who showed they were a true follower of Jesus? (The father, Pa Ngwa)</text:p>
          </text:list-item>
        </text:list>
        <text:p text:style-name="P11">Who showed they were a true follower of Jesus? (The father, Pa Ngwa)</text:p>
        <text:list xml:id="list173912915173661" text:continue-numbering="true" text:style-name="L1">
          <text:list-item>
            <text:p text:style-name="P31">How can you tell that Pa Ngwa was a true follower of Jesus? (He showed love to his enemy.)</text:p>
          </text:list-item>
        </text:list>
        <text:p text:style-name="P11">How can you tell that Pa Ngwa was a true follower of Jesus? (He showed love to his enemy.)</text:p>
        <text:p text:style-name="P20">Song</text:p>
        <text:p text:style-name="P17">Memory Verse</text:p>
        <text:p text:style-name="P21">Materials and Preparations</text:p>
        <text:list xml:id="list173913426997843" text:continue-list="list173913095874372" text:style-name="Bullet_20_-_20_checkmark">
          <text:list-item>
            <text:p text:style-name="P25">Put a bookmark in <text:s/>Luke 6:27-28</text:p>
          </text:list-item>
          <text:list-item>
            <text:p text:style-name="P25">Write memory verse on the blackboard.</text:p>
          </text:list-item>
        </text:list>
        <text:p text:style-name="P16">Luke 6:27-28 But I tell you who hear me: Love your enemies, do good to those who hate you, bless those who curse you, pray for those who mistreat you.</text:p>
        <text:p text:style-name="P11">Luke 6:27-28 But I tell you who hear me: Love your enemies, do good to those who hate you, bless those who curse you, pray for those who mistreat you.</text:p>
        <text:p text:style-name="P19">Teach and Explain</text:p>
        <text:p text:style-name="P15">Our memory verse is in the Gospel of Luke. <text:s/>That is in the New Testament, a part of the Bible.</text:p>
        <text:p text:style-name="English_20_Translation_20_-_20_Indented">Our memory verse is in the Gospel of Luke. <text:s/>That is in the New Testament, a part of the Bible.</text:p>
        <text:list xml:id="list3796496353" text:style-name="WWNum1">
          <text:list-item text:start-value="1">
            <text:p text:style-name="P27">Read the verse from your Bible.</text:p>
          </text:list-item>
          <text:list-item>
            <text:p text:style-name="P27">Read the verse by yourself as you point to the words.</text:p>
          </text:list-item>
          <text:list-item>
            <text:p text:style-name="P27">Read the verse with the children as you point to the words.</text:p>
          </text:list-item>
          <text:list-item>
            <text:p text:style-name="P27">Explain the verse:</text:p>
          </text:list-item>
        </text:list>
        <text:list xml:id="list173912904838077" text:continue-list="list173913426997843" text:style-name="Bullet_20_-_20_checkmark">
          <text:list-item>
            <text:p text:style-name="P29">Our memory verse comes from today’s Bible story.</text:p>
          </text:list-item>
        </text:list>
        <text:p text:style-name="P11">Our memory verse comes from today’s Bible story.</text:p>
        <text:list xml:id="list173912614324109" text:continue-numbering="true" text:style-name="Bullet_20_-_20_checkmark">
          <text:list-item>
            <text:p text:style-name="P25">As you read the verse, circle the words shown below. <text:s/>Explain each of these words.</text:p>
          </text:list-item>
        </text:list>
        <text:list xml:id="list173913259585386" text:continue-list="list173913843567837" text:style-name="Bullet_20_-_20_Diamond">
          <text:list-item>
            <text:p text:style-name="P30"><text:span text:style-name="Body_20_Emphasized_20_-_20_Small">Hear: <text:s/></text:span>Jesus was getting ready to teach those who really wanted to learn from him.</text:p>
          </text:list-item>
        </text:list>
        <text:p text:style-name="P10">Hear: <text:s/>Jesus was getting ready to teach those who really wanted to learn from him.</text:p>
        <text:list xml:id="list173914202418536" text:continue-numbering="true" text:style-name="Bullet_20_-_20_Diamond">
          <text:list-item>
            <text:p text:style-name="P30"><text:span text:style-name="Body_20_Emphasized_20_-_20_Small">Love: <text:s/></text:span>Jesus teaches us that we are to love everyone, even our enemies. Jesus was not talking about having affection for enemies; he was talking about a conscious effort.</text:p>
          </text:list-item>
        </text:list>
        <text:p text:style-name="P10">Love: <text:s/>Jesus teaches us that we are to love everyone, even our enemies. Jesus was not talking about having affection for enemies; he was talking about a conscious effort.</text:p>
        <text:list xml:id="list173913910804585" text:continue-numbering="true" text:style-name="Bullet_20_-_20_Diamond">
          <text:list-item>
            <text:p text:style-name="P30"><text:span text:style-name="Body_20_Emphasized_20_-_20_Small">Do good: <text:s/></text:span>One way to show love to our enemies is to think of ways to help them.</text:p>
          </text:list-item>
        </text:list>
        <text:p text:style-name="P10">Do good: <text:s/>One way to show love to our enemies is to think of ways to help them.</text:p>
        <text:list xml:id="list173912614084682" text:continue-numbering="true" text:style-name="Bullet_20_-_20_Diamond">
          <text:list-item>
            <text:p text:style-name="P30"><text:soft-page-break/><text:span text:style-name="Body_20_Emphasized_20_-_20_Small">Bless: <text:s/></text:span>When someone speaks badly about us, or to us, we often want to argue or say something bad back to that person. Jesus said however, that we are to use words of blessing instead.</text:p>
          </text:list-item>
        </text:list>
        <text:p text:style-name="P10">Bless: <text:s/>When someone speaks badly about us, or to us, we often want to argue or say something bad back to that person. Jesus said however, that we are to use words of blessing instead.</text:p>
        <text:list xml:id="list173913254752979" text:continue-numbering="true" text:style-name="Bullet_20_-_20_Diamond">
          <text:list-item>
            <text:p text:style-name="P30"><text:span text:style-name="Body_20_Emphasized_20_-_20_Small">Pray: <text:s/></text:span>Instead of thinking of ways to get back at someone who treats us poorly, we are to pray for them.</text:p>
          </text:list-item>
        </text:list>
        <text:p text:style-name="P10">Pray: <text:s/>Instead of thinking of ways to get back at someone who treats us poorly, we are to pray for them.</text:p>
        <text:list xml:id="list173914401917491" text:continue-list="list3796496353" text:style-name="WWNum1">
          <text:list-item>
            <text:p text:style-name="P27">Read the verse again by yourself as you point to the words.</text:p>
          </text:list-item>
          <text:list-item>
            <text:p text:style-name="P27">Read the verse again with the children as you point to the words.</text:p>
          </text:list-item>
        </text:list>
        <text:p text:style-name="P13">Remember our truth for the day? <text:s/>Let’s all say it together:</text:p>
        <text:p text:style-name="P12">Remember our truth for the day? <text:s/>Let’s all say it together:</text:p>
        <text:p text:style-name="P13">True disciples of Jesus love their enemies.</text:p>
        <text:p text:style-name="P12">True disciples of Jesus love their enemies.</text:p>
        <text:p text:style-name="P17">Memory Verse Review</text:p>
        <text:p text:style-name="P19">Children Repeat the Verse by Using Movements</text:p>
        <text:list xml:id="list173913756454230" text:continue-list="list173912614324109" text:style-name="Bullet_20_-_20_checkmark">
          <text:list-item>
            <text:p text:style-name="P25">Talk about different movements with our bodies: Your hands on your head, standing on one foot, jumping up and down, touching your toes....</text:p>
          </text:list-item>
          <text:list-item>
            <text:p text:style-name="P26">Ask the children the first question.</text:p>
          </text:list-item>
          <text:list-item>
            <text:p text:style-name="P26">When a question is answered correctly, that child chooses one of the movements listed above or chooses their own movement.</text:p>
          </text:list-item>
          <text:list-item>
            <text:p text:style-name="P26">The verse is said out loud together while doing the movement.</text:p>
          </text:list-item>
          <text:list-item>
            <text:p text:style-name="P26">Then the next question is asked.</text:p>
          </text:list-item>
          <text:list-item>
            <text:p text:style-name="P26">When that question is answered correctly, another child chooses one of the movements.</text:p>
          </text:list-item>
          <text:list-item>
            <text:p text:style-name="P26">The verse is said aloud again while doing the movement.</text:p>
          </text:list-item>
          <text:list-item>
            <text:p text:style-name="P26">Do this until all the questions are asked.</text:p>
          </text:list-item>
        </text:list>
        <text:p text:style-name="P21">Questions for Memory Verse</text:p>
        <text:list xml:id="list1517460803" text:style-name="L2">
          <text:list-item text:start-value="1">
            <text:p text:style-name="P32">Where is today's memory verse found? <text:s/>( <text:s/>Luke 6:27-28 <text:s/>)</text:p>
          </text:list-item>
        </text:list>
        <text:p text:style-name="P11">Where is today's memory verse found? <text:s/>( <text:s/>Luke 6:27-28 <text:s/>)</text:p>
        <text:list xml:id="list173913791435095" text:continue-numbering="true" text:style-name="L2">
          <text:list-item>
            <text:p text:style-name="P32">Should we hate our enemies because they deserve it? (No)</text:p>
          </text:list-item>
        </text:list>
        <text:p text:style-name="P11">Should we hate our enemies because they deserve it? (No)</text:p>
        <text:list xml:id="list173913193180077" text:continue-numbering="true" text:style-name="L2">
          <text:list-item>
            <text:p text:style-name="P32">What did Jesus say we should do to our enemies? (Love our enemies)</text:p>
          </text:list-item>
        </text:list>
        <text:p text:style-name="P11">What did Jesus say we should do to our enemies? (Love our enemies)</text:p>
        <text:list xml:id="list173913889411033" text:continue-numbering="true" text:style-name="L2">
          <text:list-item>
            <text:p text:style-name="P32">What should we do to those who hate us? (Do good to those who hate us)</text:p>
          </text:list-item>
        </text:list>
        <text:p text:style-name="P11">What should we do to those who hate us? (Do good to those who hate us)</text:p>
        <text:list xml:id="list173914219041420" text:continue-numbering="true" text:style-name="L2">
          <text:list-item>
            <text:p text:style-name="P32">What should we do when someone curses us? (Bless them)</text:p>
          </text:list-item>
        </text:list>
        <text:p text:style-name="P11">What should we do when someone curses us? (Bless them)</text:p>
        <text:p text:style-name="P20">Song</text:p>
        <text:p text:style-name="P17">Closing and Homework</text:p>
        <text:list xml:id="list173914508141994" text:continue-list="list173913756454230" text:style-name="Bullet_20_-_20_checkmark">
          <text:list-item>
            <text:p text:style-name="P25">Say the truth together:</text:p>
          </text:list-item>
        </text:list>
        <text:p text:style-name="P16">True disciples of Jesus love their enemies.</text:p>
        <text:p text:style-name="P11">True disciples of Jesus love their enemies.</text:p>
        <text:list xml:id="list173913833794992" text:continue-numbering="true" text:style-name="Bullet_20_-_20_checkmark">
          <text:list-item>
            <text:p text:style-name="P25"><text:soft-page-break/>Say the memory verse together:</text:p>
          </text:list-item>
        </text:list>
        <text:p text:style-name="P16">Luke 6:27-28 But I tell you who hear me: Love your enemies, do good to those who hate you, bless those who curse you, pray for those who mistreat you.</text:p>
        <text:p text:style-name="P11">Luke 6:27-28 But I tell you who hear me: Love your enemies, do good to those who hate you, bless those who curse you, pray for those who mistreat you.</text:p>
        <text:list xml:id="list173912999724258" text:continue-numbering="true" text:style-name="Bullet_20_-_20_checkmark">
          <text:list-item>
            <text:p text:style-name="P25">Review the homework:</text:p>
          </text:list-item>
        </text:list>
        <text:p text:style-name="P16">This week show love to someone who you do not get along with.</text:p>
        <text:p text:style-name="P11">This week show love to someone who you do not get along with.</text:p>
        <text:list xml:id="list173914106259474" text:continue-numbering="true" text:style-name="Bullet_20_-_20_checkmark">
          <text:list-item>
            <text:p text:style-name="P25">Give any needed announcements.</text:p>
          </text:list-item>
        </text:list>
        <text:p text:style-name="P19">Closing Prayer</text:p>
        <text:p text:style-name="P6"><text:span text:style-name="Body_20_Emphasized_20_-_20_Small">Thank God <text:s/></text:span>that He is a forgiving God, and that He is always there for us.</text:p>
        <text:p text:style-name="P6"><text:span text:style-name="Body_20_Emphasized_20_-_20_Small">Ask God <text:s/></text:span>that the children will remember to show love to someone who they do not get along with.</text:p>
        <text:p text:style-name="P18">Colouring page to colour and take home!</text:p>
      </text:section>
      <text:p text:style-name="Body"/>
      <text:p text:style-name="P24">True disciples of Jesus love their enemies.</text:p>
      <text:p text:style-name="Bible_20_Story_20_-_20_Graphic_20_Number"><draw:frame draw:style-name="fr2" draw:name="Image2" text:anchor-type="as-char" svg:width="12.637cm" svg:height="12.571cm" draw:z-index="0"><draw:image xlink:href="Pictures/1000000100000B1300000B262DEFBB7858F1BB20.tif" xlink:type="simple" xlink:show="embed" xlink:actuate="onLoad" draw:mime-type="image/tiff"/></draw:frame></text:p>
      <text:p text:style-name="M.T._20_Coloring_20_Page_20_-_20_Memory_20_Verse">Luke 6:27-28 But I tell you who hear me: Love your enemies, do good to those who hate you, bless those who curse you, pray for those who mistreat you.</text:p>
      <text:p text:style-name="P23">True disciples of Jesus love their enemies.</text:p>
      <text:p text:style-name="Bible_20_Story_20_-_20_Graphic_20_Number"><draw:frame draw:style-name="fr2" draw:name="Image3" text:anchor-type="as-char" svg:width="12.637cm" svg:height="12.571cm" draw:z-index="1"><draw:image xlink:href="Pictures/1000000100000B1300000B262DEFBB7858F1BB20.tif" xlink:type="simple" xlink:show="embed" xlink:actuate="onLoad" draw:mime-type="image/tiff"/></draw:frame></text:p>
      <text:p text:style-name="M.T._20_Coloring_20_Page_20_-_20_Memory_20_Verse">Luke 6:27-28 But I tell you who hear me: Love your enemies, do good to those who hate you, bless those who curse you, pray for those who mistreat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14" draw:display-name="Gradient 14" draw:style="linear" draw:start-color="#000000" draw:end-color="#b3b3b3" draw:start-intensity="100%" draw:end-intensity="100%" draw:angle="90deg" draw:border="0%"/>
    <draw:gradient draw:name="Gradient_20_15" draw:display-name="Gradient 15" draw:style="linear" draw:start-color="#b3b3b3" draw:end-color="#ffffff" draw:start-intensity="100%" draw:end-intensity="100%" draw:angle="9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orphans="2" fo:widows="2" fo:hyphenation-ladder-count="no-limit" style:writing-mode="lr-tb">
        <style:tab-stops>
          <style:tab-stop style:position="1.134cm"/>
        </style:tab-stops>
      </style:paragraph-properties>
      <style:text-properties fo:color="#000000" loext:opacity="100%" style:font-name="Andika4" fo:font-family="Andika" style:font-style-name="Regular" style:font-pitch="variable" fo:font-size="10pt" fo:language="en" fo:country="US" style:font-name-asian="ヒラギノ角ゴ Pro W3" style:font-family-asian="'ヒラギノ角ゴ Pro W3'" style:font-family-generic-asian="system" style:font-pitch-asian="variable" style:font-size-asian="8.80000019073486pt" style:language-asian="en" style:country-asian="US"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style:contextual-spacing="false" fo:text-indent="-0.762cm"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loext:hidden="true" style:hidden="true" style:parent-style-name="Text_20_body" style:default-outline-level="" style:class="list">
      <style:text-properties style:font-size-asian="12pt" style:font-name-complex="Lucida Sans" style:font-family-complex="'Lucida Sans'"/>
    </style:style>
    <style:style style:name="Caption" style:family="paragraph" loext:hidden="true" style:hidden="true"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size-complex="12pt" style:font-style-complex="italic"/>
    </style:style>
    <style:style style:name="Index" style:family="paragraph" loext:hidden="true" style:hidden="true" style:parent-style-name="Standard" style:default-outline-level="" style:class="index">
      <style:paragraph-properties text:number-lines="false" text:line-number="0"/>
      <style:text-properties style:font-size-asian="12pt" style:font-name-complex="Lucida Sans" style:font-family-complex="'Lucida Sans'"/>
    </style:style>
    <style:style style:name="Heading_20_1" style:display-name="Heading 1" style:family="paragraph" loext:hidden="true" style:hidden="true" style:parent-style-name="Heading" style:next-style-name="Body_20_Tight_20_lines" style:class="text" style:master-page-name="">
      <loext:graphic-properties draw:fill="solid" draw:fill-color="#b3b3b3" draw:opacity="100%"/>
      <style:paragraph-properties fo:margin-left="-0.182cm" fo:margin-right="0cm" fo:margin-top="0.381cm" fo:margin-bottom="0.203cm" style: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loext:opacity="1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 style:display-name="Heading 2" style:family="paragraph" loext:hidden="true"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style: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loext:opacity="1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loext:hidden="true"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style:contextual-spacing="false" fo:orphans="2" fo:widows="2" fo:hyphenation-ladder-count="no-limit" fo:text-indent="-0.801cm" style:auto-text-indent="false" style:page-number="auto" fo:background-color="#ffffff" fo:keep-with-next="auto" style:writing-mode="lr-tb">
        <style:tab-stops/>
      </style:paragraph-properties>
      <style:text-properties fo:color="#000000" loext:opacity="1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2" style:font-family-complex="'Times New Roman'" style:font-family-generic-complex="system" style:font-pitch-complex="variable"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Body" style:family="paragraph" style:default-outline-level="" style:master-page-name="">
      <loext:graphic-properties draw:fill="none" draw:fill-color="#729fcf"/>
      <style:paragraph-properties fo:margin-left="0cm" fo:margin-right="0cm" fo:margin-top="0.049cm" fo:margin-bottom="0.101cm" style:contextual-spacing="false" fo:orphans="2" fo:widows="2" fo:hyphenation-ladder-count="no-limit" fo:text-indent="0cm" style:auto-text-indent="false" style:page-number="auto" fo:background-color="transparent" style:writing-mode="lr-tb">
        <style:tab-stops>
          <style:tab-stop style:position="1.27cm"/>
        </style:tab-stops>
      </style:paragraph-properties>
      <style:text-properties fo:color="#000000" loext:opacity="100%" style:font-name="Andika4" fo:font-family="Andika"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top="0cm" fo:margin-bottom="0cm" style: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loext:opacity="100%" style:font-name="Arial1"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ody_20_Numbered_20_List" style:display-name="Body Numbered List" style:family="paragraph" style:parent-style-name="Body" style:default-outline-level="" style:list-style-name="WWNum1">
      <loext:graphic-properties draw:fill="none" draw:fill-color="#729fcf"/>
      <style:paragraph-properties fo:margin-left="1cm" fo:margin-right="0cm" fo:margin-top="0cm" fo:margin-bottom="0cm" style:contextual-spacing="false" fo:orphans="0" fo:widows="0" fo:hyphenation-ladder-count="no-limit" fo:text-indent="-0.499cm" style:auto-text-indent="false" fo:background-color="transparent" fo:keep-with-next="auto" text:number-lines="true" text:line-number="0" style:writing-mode="lr-tb">
        <style:tab-stops/>
      </style:paragraph-properties>
      <style:text-properties style:font-name="Andika4" fo:font-family="Andika" style:font-style-name="Regular" style:font-pitch="variable" fo:font-size="10pt" style:font-size-asian="10pt" fo:hyphenate="false" fo:hyphenation-remain-char-count="2" fo:hyphenation-push-char-count="2" loext:hyphenation-no-caps="false" loext:hyphenation-no-last-word="false" loext:hyphenation-word-char-count="no-limit" loext:hyphenation-zone="no-limit"/>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style: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loext:hidden="true" style:hidden="true" style:parent-style-name="Standard" style:default-outline-level="" style:class="extra">
      <style:paragraph-properties fo:margin-left="0cm" fo:margin-right="0cm" fo:margin-top="0cm" fo:margin-bottom="0.102cm" style: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9.525cm" style:type="center"/>
          <style:tab-stop style:position="17.394cm" style:type="right"/>
        </style:tab-stops>
      </style:paragraph-properties>
      <style:text-properties style:font-name="Andika4" fo:font-family="Andika" style:font-style-name="Regular" style:font-pitch="variable" fo:font-size="10pt" style:font-size-asian="10pt" style:font-weight-asian="normal"/>
    </style:style>
    <style:style style:name="Balloon_20_Text" style:display-name="Balloon Text" style:family="paragraph" style:parent-style-name="Standard" style:default-outline-level="">
      <style:text-properties style:font-name="Lucida Grande1" fo:font-family="'Lucida Grande'" style:font-family-generic="roman" style:font-pitch="variable" fo:font-size="9pt" style:font-size-asian="9pt" style:font-name-complex="Lucida Grande2" style:font-family-complex="'Lucida Grande'" style:font-family-generic-complex="system" style:font-pitch-complex="variable" style:font-size-complex="9pt"/>
    </style:style>
    <style:style style:name="Body_20_Bold" style:display-name="Body Bold" style:family="paragraph" style:parent-style-name="Standard" style:default-outline-level="">
      <style:paragraph-properties fo:margin-left="0cm" fo:margin-right="0cm" fo:margin-top="0.152cm" fo:margin-bottom="0.152cm" style:contextual-spacing="false" fo:text-align="start" style:justify-single-word="false" fo:text-indent="0cm"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top="0cm" fo:margin-bottom="0.101cm" style:contextual-spacing="true" fo:text-align="start" style:justify-single-word="false" style:page-number="auto" style:shadow="none">
        <style:tab-stops/>
      </style:paragraph-properties>
      <style:text-properties style:font-name="Andika3" fo:font-family="Andika"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style: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4"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1" fo:font-family="Andika"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style:contextual-spacing="false" fo:orphans="2" fo:widows="2" fo:text-indent="0cm" style:auto-text-indent="false">
        <style:tab-stops>
          <style:tab-stop style:position="2.522cm"/>
        </style:tab-stops>
      </style:paragraph-properties>
      <style:text-properties fo:color="#000000" loext:opacity="1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style: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loext:hyphenation-no-caps="false" loext:hyphenation-no-last-word="false" loext:hyphenation-word-char-count="no-limit" loext:hyphenation-zone="no-limit"/>
    </style:style>
    <style:style style:name="Part_20_Heading" style:display-name="Part Heading" style:family="paragraph" style:parent-style-name="Standard" style:default-outline-level="" style:list-style-name="" style:master-page-name="">
      <loext:graphic-properties draw:fill="gradient" draw:fill-color="#000000" draw:fill-gradient-name="Gradient_20_14" draw:gradient-step-count="0" draw:opacity="100%"/>
      <style:paragraph-properties fo:margin-left="0cm" fo:margin-right="0cm" fo:margin-top="0cm" fo:margin-bottom="0cm" style:contextual-spacing="false" fo:text-align="start" style:justify-single-word="false" fo:orphans="2" fo:widows="2" fo:hyphenation-ladder-count="no-limit" fo:text-indent="0.199cm" style:auto-text-indent="false" style:page-number="auto" fo:break-before="auto" fo:break-after="auto" fo:background-color="#5a5a5a" fo:padding="0cm" fo:border="none" style:shadow="none" fo:keep-with-next="always" style:vertical-align="bottom" style:writing-mode="lr-tb">
        <style:tab-stops/>
      </style:paragraph-properties>
      <style:text-properties fo:color="#ffffff" loext:opacity="100%" style:text-outline="false" style:font-name="Andika1" fo:font-family="Andika" style:font-style-name="Bold" style:font-pitch="variable" fo:font-size="16pt" fo:font-weight="bold"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style: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style:contextual-spacing="false" fo:text-align="end" style:justify-single-word="false" fo:text-indent="0cm"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style:contextual-spacing="false" fo:text-indent="-1.016cm" style:auto-text-indent="false">
        <style:tab-stops/>
      </style:paragraph-properties>
    </style:style>
    <style:style style:name="Table_20_Column_20_Heading" style:display-name="Table Column Heading" style:family="paragraph" style:parent-style-name="Table_20_Contents" style:master-page-name="">
      <style:paragraph-properties fo:margin-left="0.014cm" fo:margin-right="-0.009cm" fo:margin-top="0cm" fo:margin-bottom="0cm" style:contextual-spacing="false" fo:text-align="center" style:justify-single-word="false" fo:text-indent="0cm"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style: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style: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Review_20_Game" style:display-name="M.T. Review Game" style:family="paragraph" style:list-style-name="WWNum2" style:master-page-name="">
      <style:paragraph-properties style:page-number="auto"/>
      <style:text-properties style:font-name="Andika4" fo:font-family="Andika" style:font-style-name="Regular" style:font-pitch="variable" fo:font-size="10pt" style:font-size-asian="10.5pt"/>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cm" fo:margin-bottom="0cm" style:contextual-spacing="true" style:page-number="auto" fo:background-color="#ffffcc" fo:keep-with-next="auto">
        <style:tab-stops>
          <style:tab-stop style:position="6.366cm"/>
        </style:tab-stops>
      </style:paragraph-properties>
      <style:text-properties style:font-name="Andika4" fo:font-family="Andika" style:font-style-name="Regular" style:font-pitch="variable" fo:language="en" fo:country="GB"/>
    </style:style>
    <style:style style:name="First_20_Page_20_Footer" style:display-name="First Page Footer" style:family="paragraph" style:parent-style-name="Footer" style:default-outline-level="" style:class="extra">
      <style:paragraph-properties fo:margin-left="2.401cm" fo:margin-right="0cm" fo:margin-top="0cm" fo:margin-bottom="0cm" style: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2" fo:font-family="'Andika New Basic'" style:font-style-name="Regular" style:font-pitch="variable" fo:font-size="6pt" officeooo:rsid="009839a1" style:font-size-asian="6pt" style:font-weight-asian="normal" style:font-size-complex="6pt" fo:hyphenate="false" fo:hyphenation-remain-char-count="2" fo:hyphenation-push-char-count="2" loext:hyphenation-no-caps="false" loext:hyphenation-no-last-word="false" loext:hyphenation-word-char-count="no-limit" loext:hyphenation-zone="no-limit"/>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Body_20_Bullet_20_-_20_Checkmark" style:display-name="Body Bullet - Checkmark" style:family="paragraph" style:parent-style-name="Body" style:next-style-name="Body_20_Bullet_20_-_20_Checkmark_20_-_20_No_20_follow" style:default-outline-level="" style:list-style-name="Bullet_20_-_20_checkmark" style:master-page-name="">
      <loext:graphic-properties draw:fill="none" draw:fill-color="#ffffff"/>
      <style:paragraph-properties fo:margin-left="1.199cm" fo:margin-right="0cm" fo:margin-top="0cm" fo:margin-bottom="0cm" style:contextual-spacing="true" fo:orphans="2" fo:widows="2" fo:hyphenation-ladder-count="no-limit" fo:text-indent="-0.499cm" style:auto-text-indent="false" style:page-number="auto" fo:background-color="transparent" fo:keep-with-next="always" style:writing-mode="lr-tb">
        <style:tab-stops>
          <style:tab-stop style:position="1.203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fo:hyphenate="false" fo:hyphenation-remain-char-count="2" fo:hyphenation-push-char-count="2" loext:hyphenation-no-caps="false" loext:hyphenation-no-last-word="false" loext:hyphenation-word-char-count="no-limit" loext:hyphenation-zone="no-limit"/>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style:contextual-spacing="false" fo:text-align="end" style:justify-single-word="false" fo:text-indent="0cm" style:auto-text-indent="false" style:page-number="auto" style:vertical-align="bottom"/>
      <style:text-properties style:text-outline="false" style:font-name="Andika1" fo:font-family="Andika"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style:contextual-spacing="false" fo:text-align="center" style:justify-single-word="false" fo:text-indent="0cm" style:auto-text-indent="false">
        <style:tab-stops/>
      </style:paragraph-properties>
      <style:text-properties fo:font-weight="bold" style:font-weight-asian="bold" style:font-weight-complex="bold"/>
    </style:style>
    <style:style style:name="Body_20_Translated" style:display-name="Body Translated" style:family="paragraph" style:parent-style-name="Body" style:auto-update="true">
      <style:paragraph-properties fo:margin-top="0.152cm" fo:margin-bottom="0cm" style:contextual-spacing="false"/>
      <style:text-properties fo:font-weight="normal" style:font-weight-asian="normal" style:font-weight-complex="normal"/>
    </style:style>
    <style:style style:name="M.T._20_Text_20_-_20_Checkmark_20_bullet" style:display-name="M.T. Text - Checkmark bullet" style:family="paragraph" style:parent-style-name="M.T._20_Text" style:default-outline-level="" style:list-style-name="Bullet_20_-_20_checkmark" style:master-page-name="">
      <loext:graphic-properties draw:opacity="100%"/>
      <style:paragraph-properties fo:margin-left="1.3cm" fo:margin-right="0cm" fo:margin-top="0cm" fo:margin-bottom="0cm" style:contextual-spacing="tru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Diamond_20_bullet" style:display-name="M.T. Text - Diamond bullet" style:family="paragraph" style:parent-style-name="M.T._20_Text" style:default-outline-level="" style:list-style-name="Bullet_20_-_20_Diamond" style:master-page-name="">
      <loext:graphic-properties draw:opacity="100%"/>
      <style:paragraph-properties fo:margin-left="1.799cm" fo:margin-right="0cm" fo:margin-top="0cm" fo:margin-bottom="0cm" style:contextual-spacing="fals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Numbered_20_List" style:display-name="M.T. Text - Numbered List" style:family="paragraph" style:parent-style-name="M.T._20_Text" style:list-style-name="" style:master-page-name="">
      <style:paragraph-properties style:page-number="auto" fo:keep-with-next="always"/>
    </style:style>
    <style:style style:name="English_20_Translation_20_-_20_double_20_inset" style:display-name="English Translation - double inset" style:family="paragraph" style:parent-style-name="English_20_translation" style:default-outline-level="" style:master-page-name="">
      <style:paragraph-properties fo:margin-left="1.7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single_20_inset" style:display-name="English Translation - single inset" style:family="paragraph" style:parent-style-name="English_20_translation" style:default-outline-level="" style:master-page-name="">
      <style:paragraph-properties fo:margin-left="1.3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eader_20_right" style:display-name="Head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style:contextual-spacing="false" fo:text-align="center" style:justify-single-word="false" fo:orphans="0" fo:widows="0" style:page-number="auto" style:vertical-align="top"/>
      <style:text-properties fo:font-size="10pt" fo:font-style="italic" fo:font-weight="bold" style:font-size-asian="10pt" style:font-style-asian="italic" style:font-weight-asian="bold" style:font-size-complex="10pt" style:font-style-complex="italic"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1" fo:font-family="Andika" style:font-style-name="Bold" style:font-pitch="variable"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Section_20_Heading" style:display-name="Section Heading" style:family="paragraph" style:parent-style-name="Standard" style:default-outline-level="" style:master-page-name="">
      <loext:graphic-properties draw:fill="gradient" draw:fill-color="#cccccc" draw:fill-gradient-name="Gradient_20_15" draw:gradient-step-count="0" draw:opacity="100%"/>
      <style:paragraph-properties fo:margin-left="0cm" fo:margin-right="0cm" fo:margin-top="0.3cm" fo:margin-bottom="0.199cm" style:contextual-spacing="true" fo:orphans="2" fo:widows="2" fo:hyphenation-ladder-count="no-limit" fo:text-indent="0.199cm" style:auto-text-indent="false" style:page-number="auto" fo:background-color="#d9d9d9" fo:keep-with-next="always" style:writing-mode="lr-tb">
        <style:tab-stops>
          <style:tab-stop style:position="1.134cm"/>
        </style:tab-stops>
      </style:paragraph-properties>
      <style:text-properties style:text-outline="false" style:font-name="Andika1" fo:font-family="Andika" style:font-style-name="Bold" style:font-pitch="variable" fo:font-size="16pt" fo:font-weight="bold" officeooo:rsid="00de704f"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Sub-Head_20_2" style:display-name="Sub-Head 2" style:family="paragraph" style:parent-style-name="Sub-Head_20_1">
      <style:paragraph-properties fo:margin-left="0cm" fo:margin-right="0cm" fo:margin-top="0.101cm" fo:margin-bottom="0cm" style:contextual-spacing="false" fo:text-indent="0cm" style:auto-text-indent="false"/>
      <style:text-properties style:text-outline="false" fo:font-size="10pt" fo:font-style="italic" fo:font-weight="bold"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loext:hidden="true" style:hidden="true" style:parent-style-name="Standard"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Header_20_left" style:display-name="Head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30000019073486pt" style:font-size-complex="6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loext:hidden="true" style:hidden="true" style:parent-style-name="Heading" style:next-style-name="Text_20_body" style:default-outline-level="4" style:list-style-name="Outline"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loext:hidden="true" style:hidden="true"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loext:hidden="true" style:hidden="true" style:parent-style-name="Text_20_body" style:class="text">
      <style:paragraph-properties fo:margin-left="4.001cm" fo:margin-right="0cm" fo:text-indent="0cm" style:auto-text-indent="false"/>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Bullet_20_-_20_Checkmark" style:display-name="Table Bullet - Checkmark" style:family="paragraph" style:parent-style-name="Table_20_Contents" style:default-outline-level="" style:list-style-name="Table_20_Bullet_20_-_20_checkmark">
      <loext:graphic-properties draw:fill="none" draw:fill-color="#ffffff"/>
      <style:paragraph-properties fo:margin-left="0.499cm" fo:margin-right="0cm" fo:margin-top="0cm" fo:margin-bottom="0cm" style:contextual-spacing="false" fo:orphans="2" fo:widows="2" fo:hyphenation-ladder-count="no-limit" fo:text-indent="-0.499cm" style:auto-text-indent="false" fo:background-color="transparent" fo:keep-with-next="always" style:writing-mode="lr-tb">
        <style:tab-stops>
          <style:tab-stop style:position="1.203cm"/>
        </style:tab-stops>
      </style:paragraph-properties>
      <style:text-properties style:font-name="Andika4" fo:font-family="Andika" style:font-style-name="Regular" style:font-pitch="variable" fo:hyphenate="false" fo:hyphenation-remain-char-count="2" fo:hyphenation-push-char-count="2" loext:hyphenation-no-caps="false" loext:hyphenation-no-last-word="false" loext:hyphenation-word-char-count="no-limit" loext:hyphenation-zone="no-limit"/>
    </style:style>
    <style:style style:name="M.T._20_Text_20_-_20_Table_20_Single_20_Inset" style:display-name="M.T. Text - Table Single Inset" style:family="paragraph" style:parent-style-name="M.T._20_Text" style:master-page-name="">
      <style:paragraph-properties fo:margin-left="0.499cm" fo:margin-right="0cm" fo:text-indent="0cm" style:auto-text-indent="false" style:page-number="auto"/>
    </style:style>
    <style:style style:name="M.T._20_Text_20_-_20_Single_20_Inset" style:display-name="M.T. Text - Single Inset" style:family="paragraph" style:parent-style-name="M.T._20_Text" style:master-page-name="">
      <loext:graphic-properties draw:fill="solid" draw:fill-color="#ffffcc"/>
      <style:paragraph-properties fo:margin-left="1.251cm" fo:margin-right="0cm" fo:text-indent="0cm" style:auto-text-indent="false" style:page-number="auto" fo:background-color="#ffffcc" fo:keep-with-next="always"/>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Table_20_single_20_inset" style:display-name="English Translation - Table single inset" style:family="paragraph" style:parent-style-name="English_20_translation" style:default-outline-level="" style:master-page-name="">
      <style:paragraph-properties fo:margin-left="0.4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Table_20_Bullet_20_Checkmark" style:display-name="M.T. Text - Table Bullet Checkmark" style:family="paragraph" style:parent-style-name="M.T._20_Text" style:list-style-name="Table_20_Bullet_20_-_20_checkmark" style:master-page-name="">
      <loext:graphic-properties draw:opacity="100%"/>
      <style:paragraph-properties style:page-number="auto" fo:keep-with-next="always"/>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reak-before="auto" fo:break-after="auto" fo:background-color="transparent" style:vertical-align="bottom" style:writing-mode="lr-tb">
        <style:tab-stops>
          <style:tab-stop style:position="1.134cm"/>
        </style:tab-stops>
      </style:paragraph-properties>
      <style:text-properties style:use-window-font-color="true" loext:opacity="0%" style:font-name="Arial Black" fo:font-family="'Arial Black'" style:font-pitch="variable" fo:font-size="44pt" fo:language="en" fo:country="US" fo:font-weight="900" officeooo:rsid="01a034e0" style:font-name-asian="ヒラギノ角ゴ Pro W3" style:font-family-asian="'ヒラギノ角ゴ Pro W3'" style:font-family-generic-asian="system" style:font-pitch-asian="variable" style:font-size-asian="38.5pt" style:language-asian="en" style:country-asian="US" style:font-weight-asian="normal" style:font-name-complex="Times New Roman2" style:font-family-complex="'Times New Roman'" style:font-family-generic-complex="system" style:font-pitch-complex="variable" style:font-size-complex="44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Lesson_20_Title_20_Scrip_20_Reference" style:display-name="Lesson Title Scrip Reference" style:family="paragraph" style:parent-style-name="Body" style:default-outline-level="" style:master-page-name="">
      <loext:graphic-properties draw:fill="none" draw:fill-color="#729fcf"/>
      <style:paragraph-properties fo:margin-left="0cm" fo:margin-right="0cm" fo:margin-top="0cm" fo:margin-bottom="0.3cm" style:contextual-spacing="false" fo:text-align="start" style:justify-single-word="false" fo:orphans="2" fo:widows="2" fo:hyphenation-ladder-count="no-limit" fo:text-indent="0cm" style:auto-text-indent="false" style:page-number="auto" fo:background-color="transparent" fo:keep-with-next="always"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style: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style:master-page-name="">
      <loext:graphic-properties draw:opacity="100%"/>
      <style:paragraph-properties fo:margin-top="0cm" fo:margin-bottom="0cm" style:contextual-spacing="tru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Inset" style:display-name="Body Inset" style:family="paragraph" style:parent-style-name="Body" style:default-outline-level="">
      <style:paragraph-properties fo:margin-left="0.751cm" fo:margin-right="0cm" fo:margin-top="0cm" fo:margin-bottom="0cm" style:contextual-spacing="false" fo:text-indent="0cm" style:auto-text-indent="false"/>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M.T._20_Text_20_-_20_Bullet" style:display-name="M.T. Text - Bullet" style:family="paragraph" style:parent-style-name="M.T._20_Text" style:auto-update="true" style:master-page-name="">
      <style:paragraph-properties style:page-number="auto" fo:keep-with-next="always"/>
      <style:text-properties fo:background-color="transparent"/>
    </style:style>
    <style:style style:name="M.T._20_Text_20_-_20_Bullet_20_Dot" style:display-name="M.T. Text - Bullet Dot" style:family="paragraph" style:parent-style-name="M.T._20_Text" style:next-style-name="English_20_translation" style:list-style-name="Bullet_20_-_20_Dot" style:master-page-name="">
      <loext:graphic-properties draw:opacity="100%"/>
      <style:paragraph-properties style:page-number="auto" fo:keep-with-next="always"/>
    </style:style>
    <style:style style:name="Body_20_-_20_Large_20_Spacer" style:display-name="Body - Large Spacer" style:family="paragraph" style:parent-style-name="Body" style:class="text">
      <style:paragraph-properties fo:margin-top="0.499cm" fo:margin-bottom="0cm" style:contextual-spacing="false"/>
    </style:style>
    <style:style style:name="Body_20_-_20_1st_20_Line_20_Indent" style:display-name="Body - 1st Line Indent" style:family="paragraph" style:parent-style-name="Body" style:default-outline-level="">
      <style:paragraph-properties fo:margin-left="0cm" fo:margin-right="0cm" fo:margin-top="0.049cm" fo:margin-bottom="0.199cm" style: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Head_20_1_20_No_20_follow" style:display-name="Sub-Head 1 No follow" style:family="paragraph" style:parent-style-name="Sub-Head_20_1" style:auto-update="true"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uto" style:writing-mode="lr-tb">
        <style:tab-stops>
          <style:tab-stop style:position="1.134cm"/>
        </style:tab-stops>
      </style:paragraph-properties>
      <style:text-properties fo:color="#000000" loext:opacity="100%" style:text-outline="false" style:font-name="Andika1" fo:font-family="Andika" style:font-style-name="Bold" style:font-pitch="variable" fo:font-size="14pt" fo:language="en" fo:country="US" fo:font-weight="bold" style:font-name-asian="ヒラギノ角ゴ Pro W3" style:font-family-asian="'ヒラギノ角ゴ Pro W3'"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Footer" style:display-name="Coloring Page Footer" style:family="paragraph" style:parent-style-name="Footer" style:default-outline-level="">
      <loext:graphic-properties draw:fill="none" draw:fill-color="#729fcf"/>
      <style:paragraph-properties fo:margin-left="0.499cm" fo:margin-right="0cm" fo:margin-top="0cm" fo:margin-bottom="0cm" style:contextual-spacing="false" fo:orphans="2" fo:widows="2" fo:hyphenation-ladder-count="no-limit" fo:text-indent="0cm" style:auto-text-indent="false" fo:background-color="transparent" style:writing-mode="lr-tb">
        <style:tab-stops>
          <style:tab-stop style:position="14.91cm"/>
        </style:tab-stops>
      </style:paragraph-properties>
      <style:text-properties style:font-name="Andika4" fo:font-family="Andika" style:font-style-name="Regular" style:font-pitch="variable"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cm" fo:margin-right="0cm" fo:margin-top="0.101cm" fo:margin-bottom="0cm" style: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loext:hyphenation-no-caps="false" loext:hyphenation-no-last-word="false" loext:hyphenation-word-char-count="no-limit" loext:hyphenation-zone="no-limit"/>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style: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Body_20_Italics" style:display-name="Body Italics" style:family="paragraph" style:parent-style-name="Body">
      <style:text-properties fo:font-size="8pt" fo:font-style="italic" style:font-weight-asian="250"/>
    </style:style>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M.T._20_Text_20_-_20_Indented" style:display-name="M.T. Text - Indented" style:family="paragraph" style:parent-style-name="M.T._20_Text" style:next-style-name="English_20_Translation_20_-_20_Indented" style:default-outline-level="" style:master-page-name="">
      <style:paragraph-properties fo:margin-left="0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Indented" style:display-name="English Translation - Indented" style:family="paragraph" style:parent-style-name="English_20_translation" style:default-outline-level="" style:master-page-name="">
      <loext:graphic-properties draw:fill="none" draw:fill-color="#729fcf"/>
      <style:paragraph-properties fo:margin-left="0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officeooo:rsid="015eaa71" fo:hyphenate="false" fo:hyphenation-remain-char-count="2" fo:hyphenation-push-char-count="2" loext:hyphenation-no-caps="false" loext:hyphenation-no-last-word="false" loext:hyphenation-word-char-count="no-limit" loext:hyphenation-zone="no-limit"/>
    </style:style>
    <style:style style:name="Body_20_Bullet_20_-_20_Checkmark_20_-_20_Flush_20_left" style:display-name="Body Bullet - Checkmark - Flush left" style:family="paragraph" style:parent-style-name="Body_20_Bullet_20_-_20_Checkmark" style:default-outline-level="" style:list-style-name="Bullet_20_-_20_checkmark">
      <loext:graphic-properties draw:fill="solid" draw:fill-color="#ffffff" draw:opacity="100%"/>
      <style:paragraph-properties fo:margin-left="0.635cm" fo:margin-right="0cm" fo:margin-top="0cm" fo:margin-bottom="0cm" style:contextual-spacing="false" fo:orphans="2" fo:widows="2" fo:hyphenation-ladder-count="no-limit" fo:text-indent="-0.635cm" style:auto-text-indent="false" fo:background-color="#ffffff" fo:keep-with-next="always" style:writing-mode="lr-tb">
        <style:tab-stops>
          <style:tab-stop style:position="0.6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Bible_20_story_20_inset" style:display-name="M.T. Text - Bible story inset" style:family="paragraph" style:parent-style-name="M.T._20_Text_20_-_20_Indented" style:default-outline-level="" style:master-page-name="">
      <loext:graphic-properties draw:opacity="100%" draw:fill-image-width="0cm" draw:fill-image-height="0cm"/>
      <style:paragraph-properties fo:margin-left="3.6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Bible_20_story_20_inset" style:display-name="English Translation - Bible story inset" style:family="paragraph" style:parent-style-name="English_20_Translation_20_-_20_Indented" style:default-outline-level="" style:master-page-name="">
      <loext:graphic-properties draw:fill="none" draw:fill-color="#729fcf"/>
      <style:paragraph-properties fo:margin-left="3.6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Bible_20_Story" style:display-name="M.T Bible Story" style:family="paragraph" style:parent-style-name="English_20_translation">
      <style:paragraph-properties fo:margin-left="0cm" fo:margin-right="0cm" fo:margin-top="0cm" fo:margin-bottom="0cm" style:contextual-spacing="false" fo:text-indent="0cm" style:auto-text-indent="false"/>
      <style:text-properties fo:font-size="10pt" fo:font-style="normal" style:font-size-asian="10pt" style:font-style-asian="normal" style:font-size-complex="10pt" style:font-style-complex="normal"/>
    </style:style>
    <style:style style:name="M.T._20_Application" style:display-name="M.T. Application" style:family="paragraph" style:parent-style-name="English_20_translation">
      <style:paragraph-properties fo:margin-left="0cm" fo:margin-right="0cm" fo:margin-top="0cm" fo:margin-bottom="0cm" style:contextual-spacing="false" fo:text-indent="0cm" style:auto-text-indent="false"/>
      <style:text-properties fo:font-size="10pt" fo:font-style="normal" fo:font-weight="normal" style:font-size-asian="10pt" style:font-style-asian="normal" style:font-weight-asian="bold" style:font-size-complex="10pt" style:font-style-complex="normal" style:font-weight-complex="bold"/>
    </style:style>
    <style:style style:name="Sub-Head_20_-_20_Coloring_20_page_20_last_20_paragraph" style:display-name="Sub-Head - Coloring page last paragraph" style:family="paragraph" style:parent-style-name="Sub-Head_20_1_20_No_20_follow">
      <style:paragraph-properties fo:margin-top="0.3cm" fo:margin-bottom="0cm" style:contextual-spacing="false"/>
    </style:style>
    <style:style style:name="M.T._20_Text_20_-_20_Lesson_20_Title_20_Scrip_20_Reference" style:display-name="M.T. Text - Lesson Title Scrip Reference" style:family="paragraph" style:parent-style-name="M.T._20_Text" style:default-outline-level="">
      <style:paragraph-properties fo:margin-left="0cm" fo:margin-right="0cm" fo:margin-top="0cm" fo:margin-bottom="0.3cm" style:contextual-spacing="false" fo:text-align="start" style:justify-single-word="false" fo:orphans="2" fo:widows="2" fo:hyphenation-ladder-count="no-limit" fo:text-indent="0cm" style:auto-text-indent="fals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Centered" style:display-name="M.T. Text - Centered" style:family="paragraph" style:parent-style-name="M.T._20_Text" style:master-page-name="">
      <style:paragraph-properties fo:text-align="center" style:justify-single-word="false" style:page-number="auto" fo:keep-with-next="always"/>
    </style:style>
    <style:style style:name="Page_20_breaker" style:display-name="Page breaker" style:family="paragraph" style:parent-style-name="Body_20_-_20_Small_20_Spacer" style:master-page-name="">
      <style:paragraph-properties style:page-number="auto" fo:break-before="page"/>
      <style:text-properties fo:font-size="4pt" style:font-size-asian="3.5pt" style:font-size-complex="4pt"/>
    </style:style>
    <style:style style:name="M.T._20_Front_20_matter_20_Title" style:display-name="M.T. Front matter Title" style:family="paragraph" style:parent-style-name="M.T._20_Text">
      <style:paragraph-properties fo:text-align="center" style:justify-single-word="false"/>
      <style:text-properties style:text-outline="false" style:font-name="Andika" fo:font-family="Andika" style:font-pitch="variable" fo:font-size="30pt" fo:font-weight="bold" fo:background-color="transparent" style:font-size-asian="30pt" style:font-weight-asian="normal" style:font-size-complex="30pt" style:font-weight-complex="normal"/>
    </style:style>
    <style:style style:name="Body_20_Centered" style:display-name="Body Centered" style:family="paragraph" style:parent-style-name="Body">
      <style:paragraph-properties fo:text-align="center" style:justify-single-word="false"/>
      <style:text-properties officeooo:rsid="00059c2d" fo:background-color="transparen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default-outline-level="">
      <style:paragraph-properties fo:margin-left="0cm" fo:margin-right="0cm" fo:margin-top="0cm" fo:margin-bottom="0cm" style:contextual-spacing="false" fo:text-align="start"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default-outline-level="">
      <style:paragraph-properties fo:margin-left="0cm" fo:margin-right="0cm" fo:margin-top="0cm" fo:margin-bottom="0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default-outline-level="">
      <style:paragraph-properties fo:margin-left="0cm" fo:margin-right="0.199cm" fo:margin-top="0.101cm" fo:margin-bottom="0.101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ray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ody_20_Emphasized_20_-_20_Small" style:display-name="Body Emphasized - Small" style:family="paragraph" style:default-outline-level="">
      <style:paragraph-properties fo:text-align="start" style:justify-single-word="false" fo:orphans="2" fo:widows="2" style:writing-mode="lr-tb"/>
      <style:text-properties fo:color="#00000a" loext:opacity="100%" style:font-name="Andika4" fo:font-family="Andika" style:font-style-name="Regular" style:font-pitch="variable" fo:font-size="10pt" fo:font-style="normal" fo:font-weight="normal" style:font-name-asian="Tahoma" style:font-family-asian="Tahoma" style:font-family-generic-asian="system" style:font-pitch-asian="variable" style:font-size-asian="10pt" style:font-style-asian="normal" style:font-weight-asian="bold" style:font-name-complex="Liberation Sans1" style:font-family-complex="'Liberation Sans'" style:font-family-generic-complex="system" style:font-pitch-complex="variable" style:font-size-complex="12pt"/>
    </style:style>
    <style:style style:name="Body_20_Emphasized_20_-_20_Big" style:display-name="Body Emphasized - Big" style:family="paragraph" style:default-outline-level="">
      <style:paragraph-properties fo:text-align="start" style:justify-single-word="false" fo:orphans="2" fo:widows="2" style:writing-mode="lr-tb"/>
      <style:text-properties fo:color="#000000" loext:opacity="100%" style:font-name="Andika2" fo:font-family="Andika" style:font-style-name="Bold Italic" style:font-pitch="variable" fo:font-size="16pt" fo:font-style="italic" fo:font-weight="bold" style:font-name-asian="Tahoma" style:font-family-asian="Tahoma"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OpenSymbol2" fo:font-family="OpenSymbol, 'Arial Unicode MS'"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Wingdings 2" fo:font-family="'Wingdings 2'"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TF_5f_Num_20_3_20_1" style:display-name="RTF_Num 3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TF_5f_Num_20_2_20_1" style:display-name="RTF_Num 2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2" fo:font-family="OpenSymbol, 'Arial Unicode MS'"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4pt" fo:font-style="normal" fo:font-weight="normal" style:font-name-asian="Tahoma" style:font-family-asian="Tahom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fo:color="#000000" loext:opacity="100%" style:font-name="Lucida Grande" fo:font-family="'Lucida Grande'" style:font-family-generic="roman" fo:font-size="9pt" style:font-name-asian="Tahoma"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Arial" fo:font-family="Arial"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2pt" fo:font-style="italic" fo:font-weight="bold" style:font-name-asian="Tahoma"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22pt" style:font-name-asian="Tahoma" style:font-family-asian="Tahoma" style:font-family-generic-asian="system" style:font-pitch-asian="variable" style:font-size-asian="22pt" style:font-name-complex="Liberation Sans1" style:font-family-complex="'Liberation Sans'" style:font-family-generic-complex="system" style:font-pitch-complex="variable" style:font-size-complex="12pt"/>
    </style:style>
    <style:style style:name="Table_20_of_20_Lessons" style:display-name="Table of Lessons" style:family="paragraph" style:parent-style-name="Body">
      <style:paragraph-properties fo:text-align="center" style:justify-single-word="false"/>
      <style:text-properties fo:font-size="10pt" style:font-size-asian="10pt" style:font-size-complex="10pt"/>
    </style:style>
    <style:style style:name="Table_20_of_20_Contents" style:display-name="Table of Contents" style:family="paragraph" style:parent-style-name="Table_20_of_20_Lessons">
      <style:paragraph-properties fo:margin-left="0.1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Front_20_matter_20_subtitle" style:display-name="M.T. Front matter subtitle" style:family="paragraph" style:parent-style-name="M.T._20_Front_20_matter_20_Title">
      <style:text-properties fo:font-size="18pt" fo:background-color="transparent" style:font-size-asian="18pt" style:font-size-complex="18pt"/>
    </style:style>
    <style:style style:name="Publisher_20_info" style:display-name="Publisher info" style:family="paragraph" style:parent-style-name="Body_20_Centered">
      <style:text-properties style:font-name="Andika New Basic2" fo:font-family="'Andika New Basic'" style:font-style-name="Regular" style:font-pitch="variable" fo:background-color="#ffffcc"/>
    </style:style>
    <style:style style:name="Example_20_text" style:display-name="Example text" style:family="paragraph" style:parent-style-name="M.T._20_Text">
      <style:paragraph-properties fo:margin-left="0cm" fo:margin-right="0cm" fo:margin-top="0.101cm" fo:margin-bottom="0cm" style:contextual-spacing="false" fo:orphans="2" fo:widows="2" fo:hyphenation-ladder-count="no-limit" fo:text-indent="0cm" style:auto-text-indent="false" style:writing-mode="lr-tb">
        <style:tab-stops>
          <style:tab-stop style:position="6.366cm"/>
        </style:tab-stops>
      </style:paragraph-properties>
      <style:text-properties fo:background-color="transparent" fo:hyphenate="false" fo:hyphenation-remain-char-count="2" fo:hyphenation-push-char-count="2" loext:hyphenation-no-caps="false" loext:hyphenation-no-last-word="false" loext:hyphenation-word-char-count="no-limit" loext:hyphenation-zone="no-limit"/>
    </style:style>
    <style:style style:name="Table_20_of_20_Lessons_20_-_20_Numbers" style:display-name="Table of Lessons - Numbers" style:family="paragraph" style:parent-style-name="Table_20_of_20_Lessons">
      <style:paragraph-properties fo:margin-top="0cm" fo:margin-bottom="0cm" style:contextual-spacing="false" fo:text-align="center" style:justify-single-word="false"/>
      <style:text-properties fo:color="#000000" loext:opacity="100%" fo:font-size="15pt" fo:font-weight="bold" fo:background-color="transparent" style:font-size-asian="15pt" style:font-weight-asian="bold" style:font-size-complex="15pt" style:font-weight-complex="bold"/>
    </style:style>
    <style:style style:name="M.T._20_Table_20_of_20_Contents" style:display-name="M.T. Table of Contents" style:family="paragraph" style:parent-style-name="M.T._20_Text" style:next-style-name="English_20_Translation_20_-_20_Table_20_of_20_contents" style:master-page-name="">
      <style:paragraph-properties fo:margin-left="0.199cm" fo:margin-right="0cm" fo:margin-top="0cm" fo:margin-bottom="0cm" style:contextual-spacing="false" fo:text-align="start" style:justify-single-word="false" fo:orphans="2" fo:widows="2" fo:hyphenation-ladder-count="no-limit" fo:text-indent="0cm" style:auto-text-indent="false" style:page-number="auto" style:writing-mode="lr-tb">
        <style:tab-stops>
          <style:tab-stop style:position="1.3cm"/>
        </style:tab-stops>
      </style:paragraph-properties>
      <style:text-properties style:font-name="Andika4" fo:font-family="Andika" style:font-style-name="Regular" style:font-pitch="variable" fo:background-color="transparent" fo:hyphenate="false" fo:hyphenation-remain-char-count="2" fo:hyphenation-push-char-count="2" loext:hyphenation-no-caps="false" loext:hyphenation-no-last-word="false" loext:hyphenation-word-char-count="no-limit" loext:hyphenation-zone="no-limit"/>
    </style:style>
    <style:style style:name="English_20_Translation_20_-_20_Table_20_of_20_contents" style:display-name="English Translation - Table of contents" style:family="paragraph" style:parent-style-name="English_20_Translation_20_-_20_Table_20_single_20_inset" style:default-outline-level="">
      <loext:graphic-properties draw:fill="none" draw:fill-color="#729fcf"/>
      <style:paragraph-properties fo:margin-left="0.199cm" fo:margin-right="0cm" fo:margin-top="0cm" fo:margin-bottom="0.101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style:font-name="Andika3" fo:font-family="Andika" style:font-style-name="Italic" style:font-pitch="variable" officeooo:rsid="00786fef" fo:hyphenate="false" fo:hyphenation-remain-char-count="2" fo:hyphenation-push-char-count="2" loext:hyphenation-no-caps="false" loext:hyphenation-no-last-word="false" loext:hyphenation-word-char-count="no-limit" loext:hyphenation-zone="no-limit"/>
    </style:style>
    <style:style style:name="Table_20_of_20_Contents_20_-_20_Table_20_heading" style:display-name="Table of Contents - Table heading" style:family="paragraph" style:parent-style-name="Table_20_Heading"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fo:keep-with-next="always" text:number-lines="false" text:line-number="0" style:writing-mode="lr-tb">
        <style:tab-stops>
          <style:tab-stop style:position="1.27cm"/>
        </style:tab-stops>
      </style:paragraph-properties>
      <style:text-properties style:font-name="Andika1" fo:font-family="Andika" style:font-style-name="Bold" style:font-pitch="variable" fo:font-size="14pt"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Front_20_Matter_20_footer" style:display-name="Front Matter footer" style:family="paragraph" style:parent-style-name="Footer" style:master-page-name="">
      <style:paragraph-properties style:page-number="auto">
        <style:tab-stops>
          <style:tab-stop style:position="9.188cm" style:type="center"/>
          <style:tab-stop style:position="17.394cm" style:type="right"/>
        </style:tab-stops>
      </style:paragraph-properties>
    </style:style>
    <style:style style:name="Drawing"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font-name="Lucida Sans1" fo:font-family="'Lucida Sans'" style:font-family-generic="roman"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cripture_20_References" style:display-name="Scripture References" style:family="paragraph" style:parent-style-name="Table_20_of_20_Lessons"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25pt" style:font-size-complex="6pt"/>
    </style:style>
    <style:style style:name="English_20_translation_20_-_20_indent" style:display-name="English translation - indent" style:family="paragraph" style:parent-style-name="English_20_translation" style:default-outline-level="">
      <style:paragraph-properties fo:margin-left="1.3cm" fo:margin-right="0cm" fo:margin-top="0cm" fo:margin-bottom="0.101cm" style:contextual-spacing="false" fo:text-align="start" style:justify-single-word="false" fo:orphans="2" fo:widows="2" fo:hyphenation-ladder-count="no-limit" fo:text-indent="0cm" style:auto-text-indent="false" style:writing-mode="lr-tb">
        <style:tab-stops/>
      </style:paragraph-properties>
      <style:text-properties style:font-name="Andika" fo:font-family="Andika" style:font-pitch="variable" fo:font-size="8pt" fo:font-style="italic" fo:font-weight="normal" officeooo:rsid="00eb45c2" style:font-size-asian="8pt" style:font-style-asian="italic" style:font-weight-asian="normal" style:font-size-complex="8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M.T._20_Lesson_20_Title" style:display-name="M.T. Lesson Title" style:family="paragraph" style:parent-style-name="M.T._20_Text" style:default-outline-level="" style:master-page-name="">
      <loext:graphic-properties draw:fill-image-width="0cm" draw:fill-image-height="0cm"/>
      <style:paragraph-properties fo:margin-left="0cm" fo:margin-right="0cm" fo:margin-top="0.3cm" fo:margin-bottom="0cm" style:contextual-spacing="false" fo:orphans="0" fo:widows="0" fo:hyphenation-ladder-count="no-limit" fo:text-indent="0cm" style:auto-text-indent="false" style:page-number="auto" style:shadow="none" style:vertical-align="auto" style:writing-mode="lr-tb">
        <style:tab-stops>
          <style:tab-stop style:position="1.134cm"/>
        </style:tab-stops>
      </style:paragraph-properties>
      <style:text-properties style:text-outline="false" style:font-name="Andika1" fo:font-family="Andika" style:font-style-name="Bold" style:font-pitch="variable" fo:font-size="18pt" fo:font-weight="bold" fo:background-color="transparent" style:font-size-asian="22pt" style:font-weight-asian="bold" style:font-size-complex="22pt" style:font-weight-complex="bold" fo:hyphenate="false" fo:hyphenation-remain-char-count="2" fo:hyphenation-push-char-count="2" loext:hyphenation-no-caps="false" loext:hyphenation-no-last-word="false" loext:hyphenation-word-char-count="no-limit" loext:hyphenation-zone="no-limit"/>
    </style:style>
    <style:style style:name="M.T._20_Lesson_20_title_20_-_20_invisible" style:display-name="M.T. Lesson title - invisible" style:family="paragraph" style:parent-style-name="M.T._20_Text" style:next-style-name="Part_20_Heading" style:auto-update="true" style:default-outline-level="1" style:list-style-name="Outline" style:master-page-name="">
      <loext:graphic-properties draw:fill="none" draw:fill-color="#729fcf"/>
      <style:paragraph-properties fo:text-align="end" style:justify-single-word="false" style:page-number="auto" fo:break-before="page" fo:background-color="transparent" text:number-lines="false" text:line-number="0"/>
      <style:text-properties fo:color="#ffffff" loext:opacity="100%" fo:font-size="6pt" officeooo:rsid="0189809f"/>
    </style:style>
    <style:style style:name="M.T._20_Text_20_-_20_Cover_20_title" style:display-name="M.T. Text - Cover title" style:family="paragraph" style:parent-style-name="M.T._20_Text" style:next-style-name="English_20_Translation_20_-_20_cover_20_title">
      <loext:graphic-properties draw:fill="solid" draw:fill-color="#ffffcc"/>
      <style:paragraph-properties fo:margin-left="0cm" fo:margin-right="0cm" fo:text-indent="0cm" style:auto-text-indent="false" fo:background-color="#ffffcc"/>
      <style:text-properties style:text-outline="true" style:font-name="Andika" fo:font-family="Andika" style:font-pitch="variable" fo:font-size="36pt" fo:font-weight="bold" officeooo:rsid="002cd037" style:font-size-asian="36pt" style:font-weight-asian="bold" style:font-size-complex="36pt" style:font-weight-complex="bold"/>
    </style:style>
    <style:style style:name="M.T._20_Text_20_-_20_Cover_20_subtitle" style:display-name="M.T. Text - Cover subtitle" style:family="paragraph" style:parent-style-name="M.T._20_Text_20_-_20_Cover_20_title" style:next-style-name="English_20_Translation_20_-_20_cover_20_subtitle">
      <loext:graphic-properties draw:fill="solid" draw:fill-color="#ffffcc"/>
      <style:paragraph-properties fo:margin-left="0cm" fo:margin-right="0cm" fo:text-align="end" style:justify-single-word="false" fo:text-indent="0cm" style:auto-text-indent="false" fo:background-color="#ffffcc"/>
      <style:text-properties style:text-outline="true" style:font-name="Andika New Basic" fo:font-family="'Andika New Basic'" style:font-pitch="variable" fo:font-size="36pt" fo:font-weight="bold" style:font-size-asian="36pt" style:font-weight-asian="bold" style:font-size-complex="36pt" style:font-weight-complex="bold"/>
    </style:style>
    <style:style style:name="English_20_Translation_20_-_20_cover_20_subtitle" style:display-name="English Translation - cover subtitle" style:family="paragraph" style:parent-style-name="English_20_translation" style:default-outline-level="">
      <loext:graphic-properties draw:fill="none" draw:fill-color="#729fcf"/>
      <style:paragraph-properties fo:margin-left="0cm" fo:margin-right="0cm" fo:margin-top="0cm" fo:margin-bottom="0.049cm" style:contextual-spacing="true" fo:text-align="end"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English_20_Translation_20_-_20_cover_20_title" style:display-name="English Translation - cover title" style:family="paragraph" style:parent-style-name="English_20_translation" style:default-outline-level="">
      <loext:graphic-properties draw:fill="none" draw:fill-color="#729fcf"/>
      <style:paragraph-properties fo:margin-left="0cm" fo:margin-right="0cm" fo:margin-top="0cm" fo:margin-bottom="0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M.T._20_Coloring_20_Page_20_-_20_Truth" style:display-name="M.T. Coloring Page - Truth" style:family="paragraph" style:parent-style-name="M.T._20_Text" style:master-page-name="">
      <style:paragraph-properties fo:text-align="center" style:justify-single-word="false" style:page-number="auto"/>
      <style:text-properties style:font-name="Andika1" fo:font-family="Andika" style:font-style-name="Bold" style:font-pitch="variable" fo:font-size="18pt" fo:font-weight="bold" officeooo:rsid="00135fa9" style:font-size-asian="18pt" style:font-weight-asian="bold" style:font-size-complex="18pt" style:font-weight-complex="bold"/>
    </style:style>
    <style:style style:name="M.T._20_Coloring_20_Page_20_-_20_Memory_20_Verse" style:display-name="M.T. Coloring Page - Memory Verse" style:family="paragraph" style:parent-style-name="M.T._20_Coloring_20_Page_20_-_20_Truth" style:default-outline-level="">
      <style:paragraph-properties fo:margin-left="0.4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27cm"/>
        </style:tab-stops>
      </style:paragraph-properties>
      <style:text-properties style:font-name="Andika4" fo:font-family="Andika" style:font-style-name="Regular" style:font-pitch="variable" fo:font-size="12pt" fo:font-weight="normal"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loext:opacity="1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loext:opacity="1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2"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loext:opacity="100%" style:font-name="Arial1"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page_20_number" style:display-name="page number" style:family="text">
      <style:text-properties style:font-name="Arial1" fo:font-family="Arial" style:font-family-generic="roman" style:font-pitch="variable"/>
    </style:style>
    <style:style style:name="Balloon_20_Text_20_Char" style:display-name="Balloon Text Char" style:family="text" style:parent-style-name="Default_20_Paragraph_20_Font">
      <style:text-properties fo:color="#000000" loext:opacity="100%" style:font-name="Lucida Grande1"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2"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loext:opacity="100%" style:font-name="Andika4"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2"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loext:opacity="100%" style:font-name="Andika" fo:font-family="Andika"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loext:opacity="100%" style:font-name="Andika4"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2" style:font-family-complex="'Times New Roman'" style:font-family-generic-complex="system" style:font-pitch-complex="variable" style:font-size-complex="8pt" style:language-complex="hi" style:country-complex="IN" style:font-style-complex="normal" style:font-weight-complex="bold"/>
    </style:style>
    <style:style style:name="Body_20_Emphasized_20_-_20_Underline" style:display-name="Body Emphasized - Underline" style:family="text">
      <style:text-properties fo:color="#000000" loext:opacity="100%" style:font-name="Andika4"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ody_20_Emphasized_20_-_20_Super_20_big_20_underlined" style:display-name="Body Emphasized - Super big underlined" style:family="text">
      <style:text-properties fo:color="#000000" loext:opacity="100%" style:font-name="Andika New Basic2" fo:font-family="'Andika New Basic'" style:font-style-name="Regular" style:font-pitch="variable" fo:font-size="24pt" fo:language="en" fo:country="GB" fo:font-style="normal" style:text-underline-style="none" fo:font-weight="bold" officeooo:rsid="01760947" style:font-name-asian="ヒラギノ角ゴ Pro W3" style:font-family-asian="'ヒラギノ角ゴ Pro W3'" style:font-family-generic-asian="system" style:font-pitch-asian="variable" style:font-size-asian="24pt" style:language-asian="en" style:country-asian="US" style:font-style-asian="normal" style:font-weight-asian="bold" style:font-name-complex="Times New Roman2" style:font-family-complex="'Times New Roman'" style:font-family-generic-complex="system" style:font-pitch-complex="variable" style:font-size-complex="24pt" style:language-complex="hi" style:country-complex="IN" style:font-style-complex="normal" style:font-weight-complex="bold"/>
    </style:style>
    <style:style style:name="Lesson_20_number" style:display-name="Lesson number" style:family="text">
      <style:text-properties fo:color="#ffffff" loext:opacity="100%" style:text-outline="false" style:text-line-through-style="none" style:text-line-through-type="none" style:font-name="Andika Compact" fo:font-family="'Andika Compact'" style:font-pitch="variable" fo:font-size="48pt" fo:language="en" fo:country="US" fo:font-style="normal" fo:text-shadow="none" style:text-underline-style="none" fo:font-weight="bold" officeooo:rsid="018f45e1" fo:background-color="transparent" style:font-name-asian="ヒラギノ角ゴ Pro W3" style:font-family-asian="'ヒラギノ角ゴ Pro W3'" style:font-family-generic-asian="system" style:font-pitch-asian="variable" style:font-size-asian="48pt" style:language-asian="en" style:country-asian="US" style:font-style-asian="normal" style:font-weight-asian="bold" style:font-name-complex="Times New Roman2" style:font-family-complex="'Times New Roman'" style:font-family-generic-complex="system" style:font-pitch-complex="variable" style:font-size-complex="48pt" style:language-complex="hi" style:country-complex="IN" style:font-style-complex="normal" style:font-weight-complex="normal" style:text-overline-style="none" style:text-overline-color="font-color" loext:padding-left="0.199cm" loext:padding-right="0.349cm" loext:padding-top="0.349cm" loext:padding-bottom="0.199cm" loext:border="none"/>
    </style:style>
    <style:style style:name="Numbered_20_List" style:display-name="Numbered List" style:family="text">
      <style:text-properties fo:color="#000000" loext:opacity="100%" style:font-name="Andika New Basic2" fo:font-family="'Andika New Basic'" style:font-style-name="Regular" style:font-pitch="variable" fo:font-size="10pt" fo:language="en" fo:country="GB"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8_20_pt" style:display-name="Body 8 pt" style:family="text">
      <style:text-properties fo:color="#000000" loext:opacity="100%" style:font-name="Andika4" fo:font-family="Andika" style:font-style-name="Regular" style:font-pitch="variable" fo:font-size="8pt" fo:language="en" fo:country="US" fo:font-style="normal" fo:font-weight="normal" style:font-name-asian="ヒラギノ角ゴ Pro W3" style:font-family-asian="'ヒラギノ角ゴ Pro W3'" style:font-family-generic-asian="system" style:font-pitch-asian="variable" style:font-size-asian="8pt" style:language-asian="en" style:country-asian="US" style:font-style-asian="normal" style:font-weight-asian="normal" style:font-name-complex="Times New Roman2" style:font-family-complex="'Times New Roman'" style:font-family-generic-complex="system" style:font-pitch-complex="variable" style:font-size-complex="8pt" style:language-complex="hi" style:country-complex="IN" style:font-style-complex="normal" style:font-weight-complex="normal"/>
    </style:style>
    <style:style style:name="Graphics" style:family="graphic">
      <style:graphic-properties svg:width="3cm" fo:min-height="3cm" text:anchor-type="paragraph" svg:x="-0.24cm" svg:y="-0.071cm"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Bible_5f_Story_5f_Box" style:display-name="Bible_Story_Box" style:family="graphic" style:parent-style-name="Frame">
      <style:graphic-properties svg:width="3.5cm" fo:min-height="3.062cm" svg:x="-0.046cm" svg:y="0.009cm" fo:margin-left="0cm" fo:margin-right="0.101cm" fo:margin-top="0cm" fo:margin-bottom="0cm" style:run-through="foreground" style:wrap="dynamic" style:number-wrapped-paragraphs="no-limit" style:wrap-contour="true" style:wrap-contour-mode="full" style:vertical-pos="from-top" style:vertical-rel="paragraph" style:horizontal-pos="from-left" style:horizontal-rel="paragraph" fo:background-color="transparent" draw:fill="none" draw:fill-color="#729fcf" draw:opacity="50%" fo:padding="0cm" fo:border="none" draw:wrap-influence-on-position="once-concurrent" loext:allow-overlap="false">
        <style:columns fo:column-count="1" fo:column-gap="0cm"/>
      </style:graphic-properties>
    </style:style>
    <style:style style:name="Badge_20_Graphic" style:display-name="Badge Graphic" style:family="graphic" style:parent-style-name="Graphics">
      <style:graphic-properties svg:width="1.401cm" fo:min-height="0.041cm" text:anchor-type="as-char" svg:x="0cm" svg:y="-1.251cm" style:vertical-pos="from-top" style:horizontal-pos="from-left" style:horizontal-rel="paragraph"/>
    </style:style>
    <style:style style:name="Bible_5f_Story_5f_Picture" style:display-name="Bible_Story_Picture" style:family="graphic" style:parent-style-name="Graphics">
      <style:graphic-properties svg:width="3.281cm" fo:min-height="2.379cm" svg:x="0cm" svg:y="-2.379cm" fo:margin-left="0cm" fo:margin-right="0cm" fo:margin-top="0cm" fo:margin-bottom="0cm"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Lesson_5f_Number" style:display-name="Lesson_Number" style:family="graphic" style:parent-style-name="Frame">
      <style:graphic-properties svg:width="2.672cm" svg:height="2.538cm" svg:x="0cm" svg:y="0.25cm" fo:margin-left="0cm" fo:margin-right="0.199cm" fo:margin-top="0cm" fo:margin-bottom="0cm" style:run-through="foreground" style:protect="size" style:wrap="right" style:number-wrapped-paragraphs="no-limit" style:wrap-contour="false" style:vertical-pos="from-top" style:vertical-rel="page-content" style:horizontal-pos="left" style:horizontal-rel="page-content" fo:background-color="#000000" style:background-transparency="0%" draw:fill="solid" draw:fill-color="#000000" draw:opacity="100%" fo:padding="0.15cm" fo:border="none" style:flow-with-text="true" draw:wrap-influence-on-position="once-concurrent" loext:allow-overlap="false" draw:textarea-vertical-align="middle">
        <style:columns fo:column-count="1" fo:column-gap="0cm"/>
      </style:graphic-properties>
    </style:style>
    <style:style style:name="Number_20_Graphic" style:display-name="Number Graphic" style:family="graphic" style:parent-style-name="Graphics">
      <style:graphic-properties svg:width="2.731cm" fo:min-height="2.731cm" svg:x="0cm" svg:y="0.041cm" fo:margin-left="0cm" fo:margin-right="0.101cm" fo:margin-top="0cm" fo:margin-bottom="0cm" style:run-through="foreground" style:protect="none"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top">
        <style:columns fo:column-count="1" fo:column-gap="0cm"/>
      </style:graphic-properties>
    </style:style>
    <style:style style:name="Bullseye_20_graphic" style:display-name="Bullseye graphic" style:family="graphic" style:parent-style-name="Graphics">
      <style:graphic-properties svg:width="3cm" fo:min-height="3cm" svg:x="14.501cm" svg:y="-1cm" fo:margin-left="0.25cm" fo:margin-right="0cm" fo:margin-top="0cm" fo:margin-bottom="0cm" style:run-through="foreground" style:wrap="left" style:number-wrapped-paragraphs="no-limit" style:wrap-contour="true" style:wrap-contour-mode="full"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Coloring_20_Page_20_picture" style:display-name="Coloring Page picture" style:family="graphic" style:parent-style-name="Graphics">
      <style:graphic-properties svg:width="13.351cm" fo:min-height="13.788cm" svg:x="0cm" svg:y="-6.893cm" fo:margin-left="0cm" fo:margin-right="0cm" fo:margin-top="0cm" fo:margin-bottom="0cm" style:vertical-pos="middle"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Long_20_Jump_20_Graphic" style:display-name="Long Jump Graphic" style:family="graphic" style:parent-style-name="Graphics">
      <style:graphic-properties svg:width="5.001cm" fo:min-height="3.641cm" svg:x="12.501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Bowling_20_Pins_20_Graphic" style:display-name="Bowling Pins Graphic" style:family="graphic" style:parent-style-name="Graphics">
      <style:graphic-properties svg:width="3.505cm" fo:min-height="4.23cm" svg:x="13.996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Tic-Tac-Toe_20_graphic" style:display-name="Tic-Tac-Toe graphic" style:family="graphic" style:parent-style-name="Graphics">
      <style:graphic-properties svg:width="3cm" fo:min-height="3cm" svg:x="14.501cm" svg:y="-0.499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Front_20_matter_20_frames" style:display-name="Front matter frames" style:family="graphic" style:parent-style-name="Frame">
      <style:graphic-properties svg:width="17.501cm" style:rel-width="100%" fo:min-height="0.499cm" svg:x="0cm" svg:y="1.545cm" fo:margin-left="0.201cm" fo:margin-right="0.201cm" fo:margin-top="0.201cm" fo:margin-bottom="0.201cm" style:wrap="parallel" style:number-wrapped-paragraphs="no-limit" style:wrap-contour="false" style:vertical-pos="middle" style:vertical-rel="page-content" style:horizontal-pos="center" style:horizontal-rel="paragraph" fo:background-color="transparent" draw:fill="none" draw:fill-color="#729fcf" fo:padding="0.15cm" fo:border="none" loext:rel-width-rel="paragraph"/>
    </style:style>
    <style:style style:name="CC_20_Logo" style:display-name="CC Logo" style:family="graphic" style:parent-style-name="Graphics">
      <style:graphic-properties svg:width="2.378cm" fo:min-height="0.838cm" svg:x="0cm" svg:y="0.15cm" fo:margin-left="0cm" fo:margin-right="0.3cm" fo:margin-top="0cm" fo:margin-bottom="0.499cm" style:run-through="foreground" style:wrap="right" style:number-wrapped-paragraphs="no-limit" style:wrap-contour="false" style:vertical-pos="top" style:vertical-rel="paragraph-content"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loext:hidden="true" style:hidden="true">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Num1">
      <text:list-level-style-number text:level="1" text:style-name="Numbered_20_List"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loext:num-list-format="%2%."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loext:num-list-format="%2%.%3%."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loext:num-list-format="%2%.%3%.%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loext:num-list-format="%2%.%3%.%4%.%5%."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loext:num-list-format="%2%.%3%.%4%.%5%.%6%."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loext:num-list-format="%2%.%3%.%4%.%5%.%6%.%7%."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loext:num-list-format="%2%.%3%.%4%.%5%.%6%.%7%.%8%."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loext:num-list-format="%2%.%3%.%4%.%5%.%6%.%7%.%8%.%9%."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loext:num-list-format="%1%"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loext:num-list-format="%1%"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loext:num-list-format="%1%"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List" style:display-name="Numbered List">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1.27cm"/>
        </style:list-level-properties>
        <style:text-properties style:font-name="Aria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56cm" fo:text-indent="-0.635cm" fo:margin-left="2.656cm"/>
        </style:list-level-properties>
        <style:text-properties style:font-name="Aria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91cm" fo:text-indent="-0.635cm" fo:margin-left="3.291cm"/>
        </style:list-level-properties>
        <style:text-properties style:font-name="Aria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26cm" fo:text-indent="-0.635cm" fo:margin-left="3.926cm"/>
        </style:list-level-properties>
        <style:text-properties style:font-name="Aria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61cm" fo:text-indent="-0.635cm" fo:margin-left="4.561cm"/>
        </style:list-level-properties>
        <style:text-properties style:font-name="Aria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96cm" fo:text-indent="-0.635cm" fo:margin-left="5.196cm"/>
        </style:list-level-properties>
        <style:text-properties style:font-name="Aria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31cm" fo:text-indent="-0.635cm" fo:margin-left="5.831cm"/>
        </style:list-level-properties>
        <style:text-properties style:font-name="Aria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66cm" fo:text-indent="-0.635cm" fo:margin-left="6.466cm"/>
        </style:list-level-properties>
        <style:text-properties style:font-name="Aria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01cm" fo:text-indent="-0.635cm" fo:margin-left="7.101cm"/>
        </style:list-level-properties>
        <style:text-properties style:font-name="Aria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36cm" fo:text-indent="-0.635cm" fo:margin-left="7.736cm"/>
        </style:list-level-properties>
        <style:text-properties style:font-name="Arial2"/>
      </text:list-level-style-bullet>
    </text:list-style>
    <text:list-style style:name="Table_20_Bullet_20_-_20_checkmark" style:display-name="Table Bullet - checkmark">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ot" style:display-name="Bullet - Dot">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esson_20_Overview.1" style:display-name="Lesson Overview.1"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2" style:display-name="Lesson Overview.2"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3" style:display-name="Lesson Overview.3"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4" style:display-name="Lesson Overview.4"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5" style:display-name="Lesson Overview.5"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6" style:display-name="Lesson Overview.6"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7" style:display-name="Lesson Overview.7"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8" style:display-name="Lesson Overview.8"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9" style:display-name="Lesson Overview.9"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0" style:display-name="Lesson Overview.10"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1" style:display-name="Lesson Overview.11"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2" style:display-name="Lesson Overview.12"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3" style:display-name="Lesson Overview.13"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4" style:display-name="Lesson Overview.14"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5" style:display-name="Lesson Overview.15"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6" style:display-name="Lesson Overview.16"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table:table-template table:name="Lesson Overview" table:first-row-end-column="row" table:first-row-start-column="column" table:last-row-end-column="row" table:last-row-start-column="column">
      <table:first-row table:style-name="Lesson_20_Overview.1"/>
      <table:last-row table:style-name="Lesson_20_Overview.2"/>
      <table:first-column table:style-name="Lesson_20_Overview.3"/>
      <table:last-column table:style-name="Lesson_20_Overview.4"/>
      <table:body table:style-name="Lesson_20_Overview.9"/>
      <table:even-rows table:style-name="Lesson_20_Overview.5"/>
      <table:odd-rows table:style-name="Lesson_20_Overview.6"/>
      <table:even-columns table:style-name="Lesson_20_Overview.7"/>
      <table:odd-columns table:style-name="Lesson_20_Overview.8"/>
      <table:background table:style-name="Lesson_20_Overview.10"/>
      <loext:first-row-even-column table:style-name="Lesson_20_Overview.15"/>
      <loext:last-row-even-column table:style-name="Lesson_20_Overview.16"/>
      <loext:first-row-end-column table:style-name="Lesson_20_Overview.12"/>
      <loext:first-row-start-column table:style-name="Lesson_20_Overview.11"/>
      <loext:last-row-end-column table:style-name="Lesson_20_Overview.14"/>
      <loext:last-row-start-column table:style-name="Lesson_20_Overview.13"/>
    </table:table-template>
    <style:default-page-layout>
      <style:page-layout-properties style:writing-mode="lr-tb" style:layout-grid-standard-mode="true"/>
    </style:default-page-layout>
  </office:styles>
  <office:automatic-styles>
    <style:style style:name="Table4" style:family="table">
      <style:table-properties style:width="17.501cm" table:align="margins" style:writing-mode="lr-tb"/>
    </style:style>
    <style:style style:name="Table4.A" style:family="table-column">
      <style:table-column-properties style:column-width="2.6cm" style:rel-column-width="9735*"/>
    </style:style>
    <style:style style:name="Table4.B" style:family="table-column">
      <style:table-column-properties style:column-width="14.901cm" style:rel-column-width="55800*"/>
    </style:style>
    <style:style style:name="Table4.A1" style:family="table-cell">
      <style:table-cell-properties fo:padding="0.097cm" fo:border="none"/>
    </style:style>
    <style:style style:name="MP1" style:family="paragraph" style:parent-style-name="Coloring_20_Page_20_Footer">
      <style:text-properties officeooo:paragraph-rsid="02b4e089"/>
    </style:style>
    <style:style style:name="MP2" style:family="paragraph" style:parent-style-name="M.T._20_Text">
      <style:text-properties officeooo:paragraph-rsid="029f899c"/>
    </style:style>
    <style:style style:name="MP3" style:family="paragraph" style:parent-style-name="Body">
      <style:text-properties fo:font-size="8pt" officeooo:paragraph-rsid="029f899c" style:font-size-asian="8pt" style:font-size-complex="8pt"/>
    </style:style>
    <style:style style:name="M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MT2" style:family="text">
      <style:text-properties officeooo:rsid="0184d68b"/>
    </style:style>
    <style:style style:name="MT3" style:family="text">
      <style:text-properties officeooo:rsid="01d657ac"/>
    </style:style>
    <style:style style:name="MT4" style:family="text">
      <style:text-properties officeooo:rsid="01355e7d"/>
    </style:style>
    <style:style style:name="MT5" style:family="text">
      <style:text-properties fo:language="en" fo:country="US" style:language-asian="en" style:country-asian="US" style:language-complex="hi" style:country-complex="IN"/>
    </style:style>
    <style:style style:name="MT6" style:family="text"/>
    <style:style style:name="Mfr1"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cm" fo:margin-left="0cm" fo:margin-right="0cm" fo:margin-top="0.4cm" fo:background-color="transparent" style:dynamic-spacing="tru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2" fo:column-gap="0.998cm">
          <style:column-sep style:width="0.009cm" style:color="#000000" style:height="0%" style:style="none"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101cm" fo:background-color="transparent" style:dynamic-spacing="false" draw:fill="none" draw:fill-color="#729fcf"/>
      </style:footer-style>
    </style:page-layout>
    <style:page-layout style:name="Mpm1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499cm" fo:background-color="transparent" style:dynamic-spacing="true" draw:fill="none" draw:fill-color="#729fcf"/>
      </style:footer-style>
    </style:page-layout>
    <style:page-layout style:name="Mpm12">
      <style:page-layout-properties fo:page-width="21.001cm" fo:page-height="29.7cm" style:num-format="i"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101cm" fo:background-color="transparent" style:dynamic-spacing="true" draw:fill="none" draw:fill-color="#729fcf"/>
      </style:footer-style>
    </style:page-layout>
    <style:page-layout style:name="Mpm13" style:page-usage="left">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1cm" fo:margin-bottom="1.4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Lesson_20_Content">
      <style:footer>
        <table:table table:name="Table4" table:style-name="Table4">
          <table:table-column table:style-name="Table4.A"/>
          <table:table-column table:style-name="Table4.B"/>
          <table:table-row>
            <table:table-cell table:style-name="Table4.A1" office:value-type="string">
              <text:p text:style-name="Table_20_Contents"><draw:frame draw:style-name="Mfr1" draw:name="Image8" text:anchor-type="as-char" svg:width="2.378cm" svg:height="0.838cm" draw:z-index="13"><draw:image xlink:href="Pictures/10000001000000580000001FF4DBFF4432E2ED5C.png" xlink:type="simple" xlink:show="embed" xlink:actuate="onLoad" draw:mime-type="image/png"/></draw:frame></text:p>
            </table:table-cell>
            <table:table-cell table:style-name="Table4.A1" office:value-type="string">
              <text:p text:style-name="MP2">Year of publication <text:s/>Publisher</text:p>
              <text:p text:style-name="MP3"><text:span text:style-name="Body_20_8_20_pt">This work is licensed under the Creative Commons Attribution-NonCommercial-ShareAlike 4.0 International License. To view a copy of this license, visit http://creativecommons.org/licenses/by-nc-sa/4.0/deed.en_US.</text:span></text:p>
            </table:table-cell>
          </table:table-row>
        </table:table>
        <text:p text:style-name="Body_20_-_20_Small_20_Spacer"/>
      </style:footer>
    </style:master-page>
    <style:master-page style:name="HTML" style:page-layout-name="Mpm3" draw:style-name="Mdp1"/>
    <style:master-page style:name="Index" style:page-layout-name="Mpm4" draw:style-name="Mdp1"/>
    <style:master-page style:name="Envelope"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Left_20_Page" style:display-name="Left Page" style:page-layout-name="Mpm8" draw:style-name="Mdp1" style:next-style-name="Right_20_Page"/>
    <style:master-page style:name="Right_20_Page" style:display-name="Right Page" style:page-layout-name="Mpm9" draw:style-name="Mdp1" style:next-style-name="Left_20_Page"/>
    <style:master-page style:name="Coloring_20_Page" style:display-name="Coloring Page" style:page-layout-name="Mpm10" draw:style-name="Mdp2">
      <style:footer>
        <text:p text:style-name="MP1"><text:span text:style-name="MT1"><text:title>Lessons from Luke</text:title></text:span><text:s text:c="2"/><text:span text:style-name="MT1">Quarter <text:s/></text:span><text:span text:style-name="MT1"><text:user-defined style:data-style-name="N0" text:name="Quarter">2</text:user-defined></text:span><text:span text:style-name="MT1"><text:s text:c="2"/>Lesson <text:s/></text:span><text:span text:style-name="MT1"><text:user-defined style:data-style-name="N0" text:name="Lesson">15</text:user-defined></text:span><text:span text:style-name="MT2"><text:tab/></text:span><text:span text:style-name="MT1"><text:title>Lessons from Luke</text:title></text:span><text:span text:style-name="MT1"> <text:s/>Quarter <text:s/></text:span><text:span text:style-name="MT1"><text:user-defined style:data-style-name="N0" text:name="Quarter">2</text:user-defined></text:span><text:span text:style-name="MT1"><text:s text:c="2"/>Lesson <text:s/></text:span><text:span text:style-name="MT1"><text:user-defined style:data-style-name="N0" text:name="Lesson">15</text:user-defined></text:span></text:p>
      </style:footer>
    </style:master-page>
    <style:master-page style:name="Lesson_20_Content" style:display-name="Lesson Content" style:page-layout-name="Mpm11" draw:style-name="Mdp1">
      <style:footer>
        <text:p text:style-name="Footer"><text:span text:style-name="MT3">Quarter</text:span><text:span text:style-name="MT4"> <text:s/></text:span><text:span text:style-name="MT4"><text:user-defined style:data-style-name="N0" text:name="Quarter">2</text:user-defined></text:span><text:span text:style-name="MT4"><text:s text:c="2"/></text:span><text:span text:style-name="MT3">Lesson</text:span><text:span text:style-name="MT4"> <text:s/></text:span><text:span text:style-name="MT4"><text:user-defined style:data-style-name="N0" text:name="Lesson">15</text:user-defined></text:span><text:tab/><text:chapter text:display="name" text:outline-level="1">True Disciples of Jesus Love Their Enemies</text:chapter><text:tab/>Page <text:s/><text:page-number text:select-page="current">8</text:page-number></text:p>
      </style:footer>
    </style:master-page>
    <style:master-page style:name="Front_20_matter" style:display-name="Front matter" style:page-layout-name="Mpm12" draw:style-name="Mdp1">
      <style:footer>
        <text:p text:style-name="Front_20_Matter_20_footer"><text:title>Lessons from Luke</text:title><text:tab/><text:subject>True Disciples of Jesus Love Their Enemies</text:subject> <text:s/>– <text:s/><text:span text:style-name="MT5">Quarter </text:span><text:s/><text:user-defined style:data-style-name="N0" text:name="Quarter #"/><text:tab/>Page <text:page-number text:select-page="current" text:page-adjust="-3"/></text:p>
      </style:footer>
    </style:master-page>
    <style:master-page style:name="Inside_20_cover" style:display-name="Inside cover" style:page-layout-name="Mpm13" draw:style-name="Mdp1" style:next-style-name="Front_20_matter"/>
    <style:master-page style:name="Body_20_Pages" loext:hidden="true" style:hidden="true" style:display-name="Body Pages" style:page-layout-name="Mpm14" draw:style-name="Mdp1"/>
    <style:master-page style:name="Cover_20_pages" style:display-name="Cover pages" style:page-layout-name="Mpm1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10-12T02:08:30.030000000</meta:creation-date>
    <meta:editing-cycles>184</meta:editing-cycles>
    <meta:editing-duration>P6DT1H59M12S</meta:editing-duration>
    <meta:generator>LibreOffice/7.4.0.3$MacOSX_AARCH64 LibreOffice_project/f85e47c08ddd19c015c0114a68350214f7066f5a</meta:generator>
    <dc:date>2022-10-25T17:39:12.229273866</dc:date>
    <meta:print-date>2014-04-03T11:41:17.252775000</meta:print-date>
    <dc:subject>True Disciples of Jesus Love Their Enemies</dc:subject>
    <dc:title>Lessons from Luke</dc:title>
    <dc:creator>Chris Jackson</dc:creator>
    <meta:document-statistic meta:table-count="2" meta:image-count="4" meta:object-count="0" meta:page-count="9" meta:paragraph-count="235" meta:word-count="3950" meta:character-count="20943" meta:non-whitespace-character-count="17223"/>
    <meta:user-defined meta:name="Lesson" meta:value-type="float">15</meta:user-defined>
    <meta:user-defined meta:name="Quarter" meta:value-type="float">2</meta:user-defined>
  </office:meta>
</office:document-meta>
</file>