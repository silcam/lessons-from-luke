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99000000CCD19ED5C7.png" manifest:media-type="image/png"/>
  <manifest:file-entry manifest:full-path="Pictures/1000000000000623000008B0DBD930C7.jpg" manifest:media-type="image/jpeg"/>
  <manifest:file-entry manifest:full-path="Pictures/1000000000000623000008B07026C2C5.jpg" manifest:media-type="image/jpeg"/>
  <manifest:file-entry manifest:full-path="Pictures/10000000000006230000045716250DF5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ika" svg:font-family="Andika" style:font-pitch="variable"/>
    <style:font-face style:name="Andika1" svg:font-family="Andika" style:font-adornments="Bold" style:font-pitch="variable"/>
    <style:font-face style:name="Andika2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Back_20_cover">
      <style:table-properties style:width="19.076cm" style:page-number="auto" table:align="right"/>
    </style:style>
    <style:style style:name="Table1.A" style:family="table-column">
      <style:table-column-properties style:column-width="14.437cm"/>
    </style:style>
    <style:style style:name="Table1.B" style:family="table-column">
      <style:table-column-properties style:column-width="4.639cm"/>
    </style:style>
    <style:style style:name="Table1.1" style:family="table-row">
      <style:table-row-properties style:row-height="1.109cm" fo:keep-together="always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6.001cm" fo:keep-together="always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B2" style:family="table-cell">
      <style:table-cell-properties style:vertical-align="bottom" fo:background-color="#e47200" fo:padding="0.097cm" fo:border="none">
        <style:background-image/>
      </style:table-cell-properties>
    </style:style>
    <style:style style:name="Table1.3" style:family="table-row">
      <style:table-row-properties style:row-height="15.891cm" fo:keep-together="always"/>
    </style:style>
    <style:style style:name="Table1.4" style:family="table-row">
      <style:table-row-properties style:row-height="2.611cm" fo:keep-together="always"/>
    </style:style>
    <style:style style:name="Table1.A4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1.B5" style:family="table-cell">
      <style:table-cell-properties fo:background-color="#e47200" fo:padding="0.097cm" fo:border="none">
        <style:background-image/>
      </style:table-cell-properties>
    </style:style>
    <style:style style:name="Table2" style:family="table" style:master-page-name="">
      <style:table-properties style:width="21.001cm" style:page-number="auto" table:align="margins"/>
    </style:style>
    <style:style style:name="Table2.A" style:family="table-column">
      <style:table-column-properties style:column-width="5.676cm" style:rel-column-width="3218*"/>
    </style:style>
    <style:style style:name="Table2.B" style:family="table-column">
      <style:table-column-properties style:column-width="15.325cm" style:rel-column-width="8688*"/>
    </style:style>
    <style:style style:name="Table2.1" style:family="table-row">
      <style:table-row-properties style:row-height="1.109cm" fo:keep-together="always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row-height="6.001cm" fo:keep-together="always"/>
    </style:style>
    <style:style style:name="Table2.A2" style:family="table-cell">
      <style:table-cell-properties fo:background-color="#e47200" fo:padding="0.097cm" fo:border="none">
        <style:background-image/>
      </style:table-cell-properties>
    </style:style>
    <style:style style:name="Table2.B2" style:family="table-cell">
      <style:table-cell-properties style:vertical-align="bottom" fo:background-color="#e47200" fo:padding="0.097cm" fo:border="none">
        <style:background-image/>
      </style:table-cell-properties>
    </style:style>
    <style:style style:name="Table2.3" style:family="table-row">
      <style:table-row-properties style:row-height="15.891cm" fo:keep-together="always"/>
    </style:style>
    <style:style style:name="Table2.4" style:family="table-row">
      <style:table-row-properties style:row-height="2.611cm" fo:keep-together="always"/>
    </style:style>
    <style:style style:name="Table2.A5" style:family="table-cell">
      <style:table-cell-properties style:vertical-align="middle" fo:background-color="#e47200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left" style:justify-single-word="false"/>
      <style:text-properties style:font-name="Andika1" fo:font-size="6pt" style:font-size-asian="5.25pt" style:font-size-complex="6pt"/>
    </style:style>
    <style:style style:name="P2" style:family="paragraph" style:parent-style-name="M.T._20_-_20_Cover_20_Title">
      <style:paragraph-properties fo:margin-top="0cm" fo:margin-bottom="0cm" style:contextual-spacing="false"/>
      <style:text-properties officeooo:paragraph-rsid="0044d8f1"/>
    </style:style>
    <style:style style:name="P3" style:family="paragraph" style:parent-style-name="Copyright_20_text">
      <style:text-properties officeooo:paragraph-rsid="0057337d"/>
    </style:style>
    <style:style style:name="P4" style:family="paragraph" style:parent-style-name="Copyright_20_text">
      <style:text-properties officeooo:rsid="006dec13" officeooo:paragraph-rsid="0057337d"/>
    </style:style>
    <style:style style:name="P5" style:family="paragraph" style:parent-style-name="Table_20_Contents">
      <style:paragraph-properties fo:text-align="left" style:justify-single-word="false"/>
      <style:text-properties style:font-name="Andika1" fo:font-size="6pt" officeooo:paragraph-rsid="0044d8f1" style:font-size-asian="5.25pt" style:font-size-complex="6pt"/>
    </style:style>
    <style:style style:name="P6" style:family="paragraph" style:parent-style-name="M.T._20_-_20_Cover_20_Title">
      <loext:graphic-properties draw:fill="none" draw:fill-color="#729fcf"/>
      <style:paragraph-properties fo:margin-left="0.199cm" fo:margin-right="1.7cm" fo:margin-top="0cm" fo:margin-bottom="0cm" style:contextual-spacing="false" fo:text-align="left" style:justify-single-word="false" fo:text-indent="0cm" style:auto-text-indent="false" fo:background-color="transparent"/>
      <style:text-properties fo:font-size="48pt" officeooo:rsid="0057337d" officeooo:paragraph-rsid="0057337d" style:font-size-asian="48pt" style:font-size-complex="48pt"/>
    </style:style>
    <style:style style:name="P7" style:family="paragraph" style:parent-style-name="M.T._20_-_20_Cover_20_subtitle">
      <style:text-properties officeooo:rsid="0055adff" officeooo:paragraph-rsid="0055adff"/>
    </style:style>
    <style:style style:name="P8" style:family="paragraph" style:parent-style-name="M.T._20_-_20_Cover_20_subtitle">
      <style:text-properties officeooo:paragraph-rsid="0044d8f1"/>
    </style:style>
    <style:style style:name="P9" style:family="paragraph" style:parent-style-name="Standard" style:master-page-name="">
      <style:paragraph-properties style:page-number="auto" fo:break-before="auto" fo:break-after="auto"/>
      <style:text-properties officeooo:paragraph-rsid="0044d8f1"/>
    </style:style>
    <style:style style:name="T1" style:family="text">
      <style:text-properties officeooo:rsid="006dec13"/>
    </style:style>
    <style:style style:name="fr1" style:family="graphic" style:parent-style-name="Graphics">
      <style:graphic-properties style:run-through="foreground" style:protect="content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2cm" svg:y="1.499cm" svg:width="3.448cm" svg:height="5.339cm" draw:z-index="0">
        <draw:image xlink:href="Pictures/1000000100000099000000CCD19ED5C7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table-cell table:style-name="Table1.A4" table:number-rows-spanned="2" office:value-type="string">
            <text:p text:style-name="P3">© <text:span text:style-name="T1">Year of Publication <text:s/>Publisher</text:span></text:p>
            <text:p text:style-name="P4">Publisher address</text:p>
            <text:p text:style-name="P4">City, Region</text:p>
            <text:p text:style-name="P4">Country</text:p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covered-table-cell table:style-name="Table1.A1"/>
          <table:table-cell table:style-name="Table1.B5" office:value-type="string">
            <text:p text:style-name="Text_20_body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6">Lessons from Luke</text:p>
          </table:table-cell>
        </table:table-row>
        <table:table-row table:style-name="Table2.3"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4">
          <table:table-cell table:style-name="Table2.A5" table:number-columns-spanned="2" office:value-type="string">
            <text:p text:style-name="P7">Guide moniteur</text:p>
            <text:p text:style-name="P8">Teacher’s Guide</text:p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ika" svg:font-family="Andika" style:font-pitch="variable"/>
    <style:font-face style:name="Andika1" svg:font-family="Andika" style:font-adornments="Bold" style:font-pitch="variable"/>
    <style:font-face style:name="Andika2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draw:fill-image draw:name="Q1_5f_background" draw:display-name="Q1_background" xlink:href="Pictures/10000000000006230000045716250DF5.jpg" xlink:type="simple" xlink:show="embed" xlink:actuate="onLoad"/>
    <draw:fill-image draw:name="Q4-back" xlink:href="Pictures/1000000000000623000008B07026C2C5.jpg" xlink:type="simple" xlink:show="embed" xlink:actuate="onLoad"/>
    <draw:fill-image draw:name="Q4-front" xlink:href="Pictures/1000000000000623000008B0DBD930C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ver_20_subtitle" style:display-name="Cover subtitle" style:family="paragraph" style:parent-style-name="Standard">
      <style:paragraph-properties fo:margin-right="1.499cm" fo:text-align="right" style:justify-single-word="fals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Cover_20_Title" style:display-name="Cover Title" style:family="paragraph" style:parent-style-name="Standard">
      <loext:graphic-properties draw:fill="none" draw:fill-color="#729fcf"/>
      <style:paragraph-properties fo:margin-left="0.101cm" fo:margin-right="0cm" fo:margin-top="0cm" fo:margin-bottom="1cm" style:contextual-spacing="false" fo:text-align="left" style:justify-single-word="false" fo:text-indent="0cm" style:auto-text-indent="false" fo:background-color="transparent"/>
      <style:text-properties fo:color="#ffffff" loext:opacity="100%" style:font-name="Andika1" fo:font-family="Andika" style:font-style-name="Bold" style:font-pitch="variable" fo:font-size="44pt" fo:text-shadow="1pt 1pt" fo:font-weight="bold" officeooo:rsid="002f627f" style:font-size-asian="44pt" style:font-weight-asian="bold" style:font-size-complex="44pt" style:font-weight-complex="bold"/>
    </style:style>
    <style:style style:name="Text_20_spacer" style:display-name="Text spacer" style:family="paragraph" style:parent-style-name="Cover_20_Title">
      <style:paragraph-properties fo:text-align="right" style:justify-single-word="false"/>
      <style:text-properties fo:font-size="24pt" style:font-size-asian="21pt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pyright_20_text" style:display-name="Copyright text" style:family="paragraph" style:parent-style-name="Standard">
      <style:paragraph-properties fo:margin-left="1cm"/>
      <style:text-properties style:font-name="Andika2" fo:font-family="Andika" style:font-style-name="Regular" style:font-pitch="variable"/>
    </style:style>
    <style:style style:name="_36__20_pt_20_spacer" style:display-name="6 pt spacer" style:family="paragraph" style:parent-style-name="Cover_20_Title">
      <loext:graphic-properties draw:fill="none" draw:fill-color="#729fcf"/>
      <style:paragraph-properties fo:margin-left="-0.101cm" fo:margin-right="0cm" fo:text-align="left" style:justify-single-word="false" fo:text-indent="0cm" style:auto-text-indent="false" fo:background-color="transparent"/>
      <style:text-properties fo:color="#ffffff" loext:opacity="100%" fo:font-size="6pt" fo:background-color="transparent" style:font-size-asian="5.25pt" style:font-size-complex="6pt"/>
    </style:style>
    <style:style style:name="Book_20_number" style:display-name="Book number" style:family="paragraph" style:parent-style-name="Table_20_Contents">
      <style:paragraph-properties fo:margin-right="0.199cm" fo:text-align="right" style:justify-single-word="false"/>
      <style:text-properties fo:color="#ffffff" loext:opacity="100%" style:font-name="Arial Black" fo:font-family="'Arial Black'" style:font-style-name="Regular" style:font-pitch="variable" fo:font-size="130pt" fo:text-shadow="1pt 1pt" fo:font-weight="900" officeooo:rsid="0033c200" style:font-size-asian="130pt" style:font-size-complex="13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.T._20_-_20_Cover_20_Title" style:display-name="M.T. - Cover Title" style:family="paragraph" style:parent-style-name="Standard">
      <loext:graphic-properties draw:fill="none" draw:fill-color="#729fcf"/>
      <style:paragraph-properties fo:margin-left="0.101cm" fo:margin-right="0cm" fo:margin-top="0cm" fo:margin-bottom="0cm" style:contextual-spacing="false" fo:text-align="left" style:justify-single-word="false" fo:text-indent="0cm" style:auto-text-indent="false" fo:background-color="transparent" style:vertical-align="bottom"/>
      <style:text-properties fo:color="#ffffff" loext:opacity="100%" style:font-name="Andika1" fo:font-family="Andika" style:font-style-name="Bold" style:font-pitch="variable" fo:font-size="48pt" fo:text-shadow="1pt 1pt" fo:font-weight="bold" officeooo:rsid="002f627f" style:font-size-asian="44pt" style:font-weight-asian="bold" style:font-size-complex="44pt" style:font-weight-complex="bold"/>
    </style:style>
    <style:style style:name="M.T._20_-_20_Cover_20_subtitle" style:display-name="M.T. - Cover subtitle" style:family="paragraph" style:parent-style-name="M.T._20_-_20_Cover_20_Title">
      <style:paragraph-properties fo:margin-right="1.499cm" fo:margin-top="0cm" fo:margin-bottom="0cm" style:contextual-spacing="false" fo:text-align="right" style:justify-single-word="fals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Q1_5f_background" draw:fill-image-width="100%" draw:fill-image-height="100%" style:repeat="no-repeat" draw:fill-image-ref-point="center" style:footnote-max-height="0cm" loext:margin-gutter="0cm">
        <style:background-image xlink:href="Pictures/10000000000006230000045716250DF5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Q4-front" draw:fill-image-width="100%" draw:fill-image-height="100%" style:repeat="no-repeat" draw:fill-image-ref-point="center" style:footnote-max-height="0cm" loext:margin-gutter="0cm">
        <style:background-image xlink:href="Pictures/1000000000000623000008B0DBD930C7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Q4-back" draw:fill-image-width="100%" draw:fill-image-height="100%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000000623000008B07026C2C5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Q1_5f_background" draw:fill-image-width="100%" draw:fill-image-height="100%" style:repeat="no-repeat" draw:fill-image-ref-point="center"/>
    </style:style>
    <style:style style:name="Mdp3" style:family="drawing-page">
      <style:drawing-page-properties draw:fill="bitmap" draw:background-size="full" draw:fill-color="#729fcf" draw:fill-image-name="Q4-front" draw:fill-image-width="100%" draw:fill-image-height="100%" style:repeat="no-repeat" draw:fill-image-ref-point="center"/>
    </style:style>
    <style:style style:name="Mdp4" style:family="drawing-page">
      <style:drawing-page-properties draw:fill="bitmap" draw:background-size="full" draw:fill-color="#729fcf" draw:fill-image-name="Q4-back" draw:fill-image-width="100%" draw:fill-image-height="100%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  <style:master-page style:name="Front_20_cover" style:display-name="Front cover" style:page-layout-name="Mpm3" draw:style-name="Mdp3" style:next-style-name="Back_20_cover"/>
    <style:master-page style:name="Back_20_cover" style:display-name="Back cover" style:page-layout-name="Mpm4" draw:style-name="Mdp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5T15:28:23.089743796</meta:creation-date>
    <dc:title>Default A4</dc:title>
    <meta:editing-duration>PT3M42S</meta:editing-duration>
    <meta:editing-cycles>5</meta:editing-cycles>
    <meta:generator>LibreOffice/26.2.1.2$MacOSX_AARCH64 LibreOffice_project/8399f6259d8c87f40e7255cdb3c9b958f5e08948</meta:generator>
    <meta:initial-creator>Chris Jackson</meta:initial-creator>
    <dc:date>2026-04-27T14:47:02.684188000</dc:date>
    <dc:creator>Chris Jackson</dc:creator>
    <meta:document-statistic meta:table-count="2" meta:image-count="1" meta:object-count="0" meta:page-count="2" meta:paragraph-count="7" meta:word-count="17" meta:character-count="114" meta:non-whitespace-character-count="103"/>
  </office:meta>
</office:document-meta>
</file>