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5F000000FE1EE9BBB6EC67CA3E.jpg" manifest:media-type="image/jpeg"/>
  <manifest:file-entry manifest:full-path="Pictures/10000001000000D8000000D8EF153596ED0BE1FD.png" manifest:media-type="image/png"/>
  <manifest:file-entry manifest:full-path="Pictures/100000000000015F000000FE22E6056B59D1308D.jpg" manifest:media-type="image/jpeg"/>
  <manifest:file-entry manifest:full-path="Pictures/10000001000000580000001FF4DBFF4432E2ED5C.png" manifest:media-type="image/png"/>
  <manifest:file-entry manifest:full-path="Pictures/100000000000015F000000FE1C859849356A008C.jpg" manifest:media-type="image/jpeg"/>
  <manifest:file-entry manifest:full-path="Pictures/100000000000033B000002C2651EABA1379956B0.jpg" manifest:media-type="image/jpeg"/>
  <manifest:file-entry manifest:full-path="Pictures/100000000000015F000000FECA4587559DE43666.jpg" manifest:media-type="image/jpe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itle_26_Truth" style:display-name="Title&amp;Truth" style:family="table">
      <style:table-properties style:width="17.5cm" table:align="left" style:may-break-between-rows="true" style:writing-mode="lr-tb" table:border-model="collapsing"/>
    </style:style>
    <style:style style:name="Title_26_Truth.A" style:display-name="Title&amp;Truth.A" style:family="table-column">
      <style:table-column-properties style:column-width="2.701cm"/>
    </style:style>
    <style:style style:name="Title_26_Truth.B" style:display-name="Title&amp;Truth.B" style:family="table-column">
      <style:table-column-properties style:column-width="14.799cm"/>
    </style:style>
    <style:style style:name="Title_26_Truth.1" style:display-name="Title&amp;Truth.1" style:family="table-row">
      <style:table-row-properties fo:keep-together="auto"/>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writing-mode="lr-tb">
        <style:background-image/>
      </style:table-cell-properties>
    </style:style>
    <style:style style:name="Title_26_Truth.B1" style:display-name="Title&amp;Truth.B1" style:family="table-cell">
      <style:table-cell-properties style:vertical-align="middle" fo:background-color="transparent" fo:padding-left="0.102cm" fo:padding-right="0.102cm" fo:padding-top="0cm" fo:padding-bottom="0.051cm" fo:border-left="none" fo:border-right="none" fo:border-top="none" fo:border-bottom="1pt solid #000000" style:writing-mode="lr-tb">
        <style:background-image/>
      </style:table-cell-properties>
    </style:style>
    <style:style style:name="P1" style:family="paragraph" style:parent-style-name="Frame_20_contents">
      <style:paragraph-properties fo:text-align="center" style:justify-single-word="false"/>
      <style:text-properties officeooo:paragraph-rsid="017f89e8"/>
    </style:style>
    <style:style style:name="P2" style:family="paragraph" style:parent-style-name="Bible_20_Story_20_-_20_Graphic_20_Number">
      <style:text-properties officeooo:rsid="017e3f1f" officeooo:paragraph-rsid="00a1aaa5"/>
    </style:style>
    <style:style style:name="P3" style:family="paragraph" style:parent-style-name="Body">
      <style:text-properties officeooo:paragraph-rsid="00ba31ff"/>
    </style:style>
    <style:style style:name="P4" style:family="paragraph" style:parent-style-name="Body_20_Inset">
      <style:text-properties officeooo:paragraph-rsid="00ba31ff"/>
    </style:style>
    <style:style style:name="P5" style:family="paragraph" style:parent-style-name="Body_20_Tight_20_lines">
      <style:text-properties officeooo:paragraph-rsid="00ba31ff"/>
    </style:style>
    <style:style style:name="P6" style:family="paragraph" style:parent-style-name="English_20_Translation_20_-_20_Bible_20_story_20_inset">
      <style:text-properties officeooo:paragraph-rsid="00ba31ff"/>
    </style:style>
    <style:style style:name="P7" style:family="paragraph" style:parent-style-name="English_20_Translation_20_-_20_Indented">
      <style:text-properties officeooo:paragraph-rsid="00ba31ff"/>
    </style:style>
    <style:style style:name="P8" style:family="paragraph" style:parent-style-name="English_20_Translation_20_-_20_double_20_inset">
      <style:text-properties officeooo:paragraph-rsid="00ba31ff"/>
    </style:style>
    <style:style style:name="P9" style:family="paragraph" style:parent-style-name="English_20_Translation_20_-_20_single_20_inset">
      <style:text-properties officeooo:paragraph-rsid="00ba31ff"/>
    </style:style>
    <style:style style:name="P10" style:family="paragraph" style:parent-style-name="English_20_translation">
      <style:text-properties officeooo:paragraph-rsid="00ba31ff"/>
    </style:style>
    <style:style style:name="P11" style:family="paragraph" style:parent-style-name="M.T._20_Text">
      <style:text-properties officeooo:paragraph-rsid="00ba31ff"/>
    </style:style>
    <style:style style:name="P12" style:family="paragraph" style:parent-style-name="M.T._20_Text_20_-_20_Bible_20_story_20_inset">
      <style:text-properties officeooo:paragraph-rsid="00ba31ff"/>
    </style:style>
    <style:style style:name="P13" style:family="paragraph" style:parent-style-name="M.T._20_Text_20_-_20_Indented">
      <style:text-properties officeooo:paragraph-rsid="00ba31ff"/>
    </style:style>
    <style:style style:name="P14" style:family="paragraph" style:parent-style-name="M.T._20_Text_20_-_20_Single_20_Inset">
      <style:text-properties officeooo:paragraph-rsid="00ba31ff"/>
    </style:style>
    <style:style style:name="P15" style:family="paragraph" style:parent-style-name="Section_20_Heading">
      <style:text-properties officeooo:paragraph-rsid="00ba31ff"/>
    </style:style>
    <style:style style:name="P16" style:family="paragraph" style:parent-style-name="Standard">
      <style:text-properties officeooo:paragraph-rsid="00ba31ff"/>
    </style:style>
    <style:style style:name="P17" style:family="paragraph" style:parent-style-name="Sub-Head_20_-_20_Coloring_20_page_20_last_20_paragraph">
      <style:text-properties officeooo:paragraph-rsid="00ba31ff"/>
    </style:style>
    <style:style style:name="P18" style:family="paragraph" style:parent-style-name="Sub-Head_20_1">
      <style:text-properties officeooo:paragraph-rsid="00ba31ff"/>
    </style:style>
    <style:style style:name="P19" style:family="paragraph" style:parent-style-name="Sub-Head_20_1_20_No_20_follow">
      <style:text-properties officeooo:paragraph-rsid="00ba31ff"/>
    </style:style>
    <style:style style:name="P20" style:family="paragraph" style:parent-style-name="Sub-Head_20_2">
      <style:text-properties officeooo:paragraph-rsid="00ba31ff"/>
    </style:style>
    <style:style style:name="P21" style:family="paragraph" style:parent-style-name="Coloring_20_Page_20_Footer">
      <style:text-properties officeooo:paragraph-rsid="02b4e089"/>
    </style:style>
    <style:style style:name="P22" style:family="paragraph" style:parent-style-name="M.T._20_Text">
      <style:text-properties officeooo:paragraph-rsid="029f899c"/>
    </style:style>
    <style:style style:name="P23" style:family="paragraph" style:parent-style-name="Body">
      <style:text-properties fo:font-size="8pt" officeooo:paragraph-rsid="029f899c" style:font-size-asian="8pt" style:font-size-complex="8pt"/>
    </style:style>
    <style:style style:name="P24" style:family="paragraph" style:parent-style-name="M.T._20_Coloring_20_Page_20_-_20_Truth" style:master-page-name="Coloring_20_Page">
      <style:paragraph-properties style:page-number="auto"/>
    </style:style>
    <style:style style:name="P25" style:family="paragraph" style:parent-style-name="M.T._20_Coloring_20_Page_20_-_20_Truth">
      <style:paragraph-properties fo:break-before="column"/>
    </style:style>
    <style:style style:name="P26" style:family="paragraph" style:parent-style-name="M.T._20_Lesson_20_title_20_-_20_invisible" style:master-page-name="First_20_Page">
      <style:paragraph-properties style:page-number="auto"/>
    </style:style>
    <style:style style:name="P27" style:family="paragraph" style:parent-style-name="Body_20_Bullet_20_-_20_Checkmark">
      <style:text-properties officeooo:paragraph-rsid="00ba31ff"/>
    </style:style>
    <style:style style:name="P28" style:family="paragraph" style:parent-style-name="Body_20_Bullet_20_-_20_Checkmark_20_-_20_No_20_follow">
      <style:text-properties officeooo:paragraph-rsid="00ba31ff"/>
    </style:style>
    <style:style style:name="P29" style:family="paragraph" style:parent-style-name="Body_20_Numbered_20_List">
      <style:text-properties officeooo:paragraph-rsid="00ba31ff"/>
    </style:style>
    <style:style style:name="P30" style:family="paragraph" style:parent-style-name="M.T._20_Text_20_-_20_Checkmark_20_bullet">
      <style:text-properties officeooo:paragraph-rsid="00ba31ff"/>
    </style:style>
    <style:style style:name="P31" style:family="paragraph" style:parent-style-name="M.T._20_Text_20_-_20_Diamond_20_bullet">
      <style:text-properties officeooo:paragraph-rsid="00ba31ff"/>
    </style:style>
    <style:style style:name="P32" style:family="paragraph" style:parent-style-name="M.T._20_Text_20_-_20_Numbered_20_List_20_Inset" style:list-style-name="L1">
      <style:text-properties officeooo:paragraph-rsid="00ba31ff"/>
    </style:style>
    <style:style style:name="P33" style:family="paragraph" style:parent-style-name="M.T._20_Text_20_-_20_Numbered_20_List_20_Inset" style:list-style-name="L2">
      <style:text-properties officeooo:paragraph-rsid="00ba31ff"/>
    </style:style>
    <style:style style:name="P34" style:family="paragraph" style:parent-style-name="Table_20_Bullet_20_-_20_Checkmark">
      <style:text-properties officeooo:paragraph-rsid="00ba31ff"/>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1d657ac"/>
    </style:style>
    <style:style style:name="T4" style:family="text">
      <style:text-properties officeooo:rsid="01355e7d"/>
    </style:style>
    <style:style style:name="T5" style:family="text">
      <style:text-properties fo:language="en" fo:country="US" style:language-asian="en" style:country-asian="US" style:language-complex="hi" style:country-complex="IN"/>
    </style:style>
    <style:style style:name="fr1" style:family="graphic" style:parent-style-name="Bible_5f_Story_5f_Box">
      <style:graphic-properties style:vertical-pos="from-top" style:vertical-rel="paragraph" style:horizontal-pos="from-left" style:horizontal-rel="paragraph" draw:opacity="50%"/>
    </style:style>
    <style:style style:name="fr2" style:family="graphic" style:parent-style-name="Bible_5f_Story_5f_Box">
      <style:graphic-properties style:wrap="right" style:number-wrapped-paragraphs="no-limit" style:vertical-pos="from-top" style:vertical-rel="paragraph" style:horizontal-pos="from-left" style:horizontal-rel="paragraph" draw:opacity="50%"/>
    </style:style>
    <style:style style:name="fr3"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Bible_5f_Story_5f_Picture">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26" text:outline-level="1"><draw:frame draw:style-name="fr6" draw:name="Image3" text:anchor-type="char" svg:x="0cm" svg:y="0.041cm" svg:width="2.731cm" svg:height="2.731cm" draw:z-index="2"><draw:image xlink:href="Pictures/10000001000000D8000000D8EF153596ED0BE1FD.png" xlink:type="simple" xlink:show="embed" xlink:actuate="onLoad" draw:mime-type="image/png"/></draw:frame>The Twelve Apostles</text:h>
        </text:list-item>
      </text:list>
      <text:p text:style-name="M.T._20_Lesson_20_Title">The Twelve Apostles</text:p>
      <text:p text:style-name="English_20_Translation_20_-_20_Lesson_20_title">The Twelve Apostles</text:p>
      <text:p text:style-name="M.T._20_Text_20_-_20_Lesson_20_Title_20_Scrip_20_Reference">Luke <text:s/>6:12-16</text:p>
      <text:p text:style-name="Part_20_Heading">Lesson Overview</text:p>
      <table:table table:name="Title&amp;Truth" table:style-name="Title_26_Truth" table:template-name="Lesson Overview">
        <table:table-column table:style-name="Title_26_Truth.A"/>
        <table:table-column table:style-name="Title_26_Truth.B"/>
        <table:table-row table:style-name="Title_26_Truth.1">
          <table:table-cell table:style-name="Title_26_Truth.A1" office:value-type="string">
            <text:p text:style-name="Table_20_Left_20_headings">Today’s Truth</text:p>
          </table:table-cell>
          <table:table-cell table:style-name="Title_26_Truth.B1" office:value-type="string">
            <text:p text:style-name="M.T._20_Text">A true disciple of Jesus follows him and his teachings.</text:p>
            <text:p text:style-name="English_20_translation">A true disciple of Jesus follows him and his teachings.</text:p>
          </table:table-cell>
        </table:table-row>
        <table:table-row table:style-name="Title_26_Truth.1">
          <table:table-cell table:style-name="Title_26_Truth.A1" office:value-type="string">
            <text:p text:style-name="Table_20_Left_20_headings">Objective</text:p>
          </table:table-cell>
          <table:table-cell table:style-name="Title_26_Truth.B1" office:value-type="string">
            <text:p text:style-name="Body_20_Tight_20_lines"><text:span text:style-name="Body_20_Emphasized_20_-_20_Small">KNOW:</text:span> <text:s/>The children will learn how to be a true follower of Jesus.</text:p>
            <text:p text:style-name="Body_20_Tight_20_lines"><text:span text:style-name="Body_20_Emphasized_20_-_20_Small">DO:</text:span> <text:s/>The children will show that they are true disciples of Jesus.</text:p>
          </table:table-cell>
        </table:table-row>
        <table:table-row table:style-name="Title_26_Truth.1">
          <table:table-cell table:style-name="Title_26_Truth.A1" office:value-type="string">
            <text:p text:style-name="Table_20_Left_20_headings">Materials</text:p>
          </table:table-cell>
          <table:table-cell table:style-name="Title_26_Truth.B1" office:value-type="string">
            <text:list xml:id="list3082535504"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Cooking pot with a lid</text:p>
              </text:list-item>
              <text:list-item>
                <text:p text:style-name="Table_20_Bullet_20_-_20_Checkmark">Rope, string, or yarn cut into 10 pieces that are all different sizes</text:p>
              </text:list-item>
            </text:list>
          </table:table-cell>
        </table:table-row>
        <table:table-row table:style-name="Title_26_Truth.1">
          <table:table-cell table:style-name="Title_26_Truth.A1" office:value-type="string">
            <text:p text:style-name="Table_20_Left_20_headings">Memory Verse</text:p>
          </table:table-cell>
          <table:table-cell table:style-name="Title_26_Truth.B1" office:value-type="string">
            <text:p text:style-name="M.T._20_Text">Luke 6:13 When morning came, he called his disciples to him and chose twelve of them, whom he also designated apostles.</text:p>
            <text:p text:style-name="English_20_translation">Luke 6:13 When morning came, he called his disciples to him and chose twelve of them, whom he also designated apostles.</text:p>
          </table:table-cell>
        </table:table-row>
        <table:table-row table:style-name="Title_26_Truth.1">
          <table:table-cell table:style-name="Title_26_Truth.A1" office:value-type="string">
            <text:p text:style-name="Table_20_Left_20_headings">Homework</text:p>
          </table:table-cell>
          <table:table-cell table:style-name="Title_26_Truth.B1" office:value-type="string">
            <text:p text:style-name="M.T._20_Text">What can you do this week to show that you are a disciple of Jesus?</text:p>
            <text:p text:style-name="English_20_translation">What can you do this week to show that you are a disciple of Jesus?</text:p>
          </table:table-cell>
        </table:table-row>
      </table:table>
      <text:p text:style-name="Body_20_-_20_Small_20_Spacer"/>
      <text:p text:style-name="Part_20_Heading">Detailed Lesson Plan</text:p>
      <text:section text:style-name="Sect1" text:name="L-14 Detail Plan">
        <text:p text:style-name="P19">Song</text:p>
        <text:p text:style-name="P15">Opening</text:p>
        <text:p text:style-name="P18">Welcome</text:p>
        <text:list xml:id="list841294179" text:style-name="Bullet_20_-_20_checkmark">
          <text:list-item>
            <text:p text:style-name="P27">Be sure the children know you are happy to see them!</text:p>
          </text:list-item>
          <text:list-item>
            <text:p text:style-name="P27">Introduce yourself and your helpers.</text:p>
          </text:list-item>
        </text:list>
        <text:p text:style-name="P18">Sharing Time</text:p>
        <text:list xml:id="list152819330594446" text:continue-numbering="true" text:style-name="Bullet_20_-_20_checkmark">
          <text:list-item>
            <text:p text:style-name="P30">Do you remember any truths from the last lessons?</text:p>
          </text:list-item>
        </text:list>
        <text:p text:style-name="P9">Do you remember any truths from the last lessons?</text:p>
        <text:p text:style-name="P4">(Give children time to share.)</text:p>
        <text:list xml:id="list152819152623043" text:continue-numbering="true" text:style-name="Bullet_20_-_20_checkmark">
          <text:list-item>
            <text:p text:style-name="P30">What truth have you continued to do even though it is not homework?</text:p>
          </text:list-item>
        </text:list>
        <text:p text:style-name="P9">What truth have you continued to do even though it is not homework?</text:p>
        <text:p text:style-name="P4">(Give children time to share.)</text:p>
        <text:list xml:id="list152819942441012" text:continue-numbering="true" text:style-name="Bullet_20_-_20_checkmark">
          <text:list-item>
            <text:p text:style-name="P30">It is important to follow these truths, even if they are not homework. All of the truths are the way we should be living.</text:p>
          </text:list-item>
        </text:list>
        <text:p text:style-name="P9">It is important to follow these truths, even if they are not homework. All of the truths are the way we should be living.</text:p>
        <text:p text:style-name="P18"><text:soft-page-break/>Prayer</text:p>
        <text:list xml:id="list152819112076881" text:continue-numbering="true" text:style-name="Bullet_20_-_20_checkmark">
          <text:list-item>
            <text:p text:style-name="P27">Let the children share praises and prayer requests.</text:p>
          </text:list-item>
          <text:list-item>
            <text:p text:style-name="P28">Keep a record of what the children are sharing so you can remember to thank God together for answered prayers.</text:p>
          </text:list-item>
          <text:list-item>
            <text:p text:style-name="P28">Spend time praying together. <text:s/>Let children pray out loud if they volunteer. <text:s/>Do not force anyone to pray out loud.</text:p>
          </text:list-item>
        </text:list>
        <text:p text:style-name="P19">Song</text:p>
        <text:p text:style-name="P15">Words to Discuss</text:p>
        <text:list xml:id="list152819971617171" text:continue-numbering="true" text:style-name="Bullet_20_-_20_checkmark">
          <text:list-item>
            <text:p text:style-name="P27">On the blackboard, write the “Words to Discuss” from the list below.</text:p>
          </text:list-item>
          <text:list-item>
            <text:p text:style-name="P30">Let's discuss some words to help us better understand the Bible story for today.</text:p>
          </text:list-item>
        </text:list>
        <text:p text:style-name="P9">Let's discuss some words to help us better understand the Bible story for today.</text:p>
        <text:list xml:id="list1325206837" text:style-name="Bullet_20_-_20_Diamond">
          <text:list-item>
            <text:p text:style-name="P31"><text:span text:style-name="Body_20_Emphasized_20_-_20_Small">Disciple:</text:span> <text:s/>Someone who follows Jesus and lives by His teachings.</text:p>
          </text:list-item>
        </text:list>
        <text:p text:style-name="P8">Disciple: <text:s/>Someone who follows Jesus and lives by His teachings.</text:p>
        <text:list xml:id="list152818884128272" text:continue-numbering="true" text:style-name="Bullet_20_-_20_Diamond">
          <text:list-item>
            <text:p text:style-name="P31"><text:span text:style-name="Body_20_Emphasized_20_-_20_Small">Mountainside:</text:span> <text:s/>The part of the mountain that begins to slope up.</text:p>
          </text:list-item>
        </text:list>
        <text:p text:style-name="P8">Mountainside: <text:s/>The part of the mountain that begins to slope up.</text:p>
        <text:list xml:id="list152819493018924" text:continue-numbering="true" text:style-name="Bullet_20_-_20_Diamond">
          <text:list-item>
            <text:p text:style-name="P31"><text:span text:style-name="Body_20_Emphasized_20_-_20_Small">Apostles:</text:span> <text:s/>Twelve men who were chosen by Jesus to be his chief disciples to carry his teachings to others.</text:p>
          </text:list-item>
        </text:list>
        <text:p text:style-name="P8">Apostles: <text:s/>Twelve men who were chosen by Jesus to be his chief disciples to carry his teachings to others.</text:p>
        <text:list xml:id="list152820704371687" text:continue-numbering="true" text:style-name="Bullet_20_-_20_Diamond">
          <text:list-item>
            <text:p text:style-name="P31"><text:span text:style-name="Body_20_Emphasized_20_-_20_Small">Traitor:</text:span> <text:s/>Someone who gives up a friend to the enemy because they want some benefit from it.</text:p>
          </text:list-item>
        </text:list>
        <text:p text:style-name="P8">Traitor: <text:s/>Someone who gives up a friend to the enemy because they want some benefit from it.</text:p>
        <text:p text:style-name="P19">Song</text:p>
        <text:p text:style-name="P15">Bible Story / Lesson</text:p>
        <text:p text:style-name="P5"><text:span text:style-name="Body_20_Emphasized_20_-_20_Small">Game:</text:span> <text:s/>Follow Me</text:p>
        <text:list xml:id="list152819037644725" text:continue-list="list3082535504" text:style-name="Table_20_Bullet_20_-_20_checkmark">
          <text:list-item>
            <text:p text:style-name="P34">Ask children to stand up and copy your movements. Start out simple. Raise your right hand, raise your left hand, etc.</text:p>
          </text:list-item>
          <text:list-item>
            <text:p text:style-name="P34">Add more and more difficult maneuvers using facial expressions and sounds. Enjoy the confusion as it becomes harder and harder to copy your actions. (The point is not to trick the children into making mistakes, but to make it humorous and difficult to follow.)</text:p>
          </text:list-item>
        </text:list>
        <text:list xml:id="list152820377923155" text:continue-list="list152819971617171" text:style-name="Bullet_20_-_20_checkmark">
          <text:list-item>
            <text:p text:style-name="P30">Was it easy or hard to imitate the teacher?</text:p>
          </text:list-item>
        </text:list>
        <text:p text:style-name="P9">Was it easy or hard to imitate the teacher?</text:p>
        <text:list xml:id="list152820677639694" text:continue-numbering="true" text:style-name="Bullet_20_-_20_checkmark">
          <text:list-item>
            <text:p text:style-name="P30">What made it easier?</text:p>
          </text:list-item>
        </text:list>
        <text:p text:style-name="P9">What made it easier?</text:p>
        <text:list xml:id="list152820642979216" text:continue-numbering="true" text:style-name="Bullet_20_-_20_checkmark">
          <text:list-item>
            <text:p text:style-name="P30">What made it more difficult?</text:p>
          </text:list-item>
        </text:list>
        <text:p text:style-name="P9">What made it more difficult?</text:p>
        <text:list xml:id="list152818627354791" text:continue-numbering="true" text:style-name="Bullet_20_-_20_checkmark">
          <text:list-item>
            <text:p text:style-name="P30">Today we will be learning that we are true disciples of Jesus if we follow him and his teachings.</text:p>
          </text:list-item>
        </text:list>
        <text:p text:style-name="P9">Today we will be learning that we are true disciples of Jesus if we follow him and his teachings.</text:p>
        <text:p text:style-name="P18">Introduce Truth</text:p>
        <text:p text:style-name="P11">Our truth for today is: <text:s/>A true disciple of Jesus follows him and his teachings.</text:p>
        <text:p text:style-name="P10">Our truth for today is: <text:s/>A true disciple of Jesus follows him and his teachings.</text:p>
        <text:p text:style-name="P11">This reminds me of a true story from the Bible.</text:p>
        <text:p text:style-name="P10">This reminds me of a true story from the Bible.</text:p>
        <text:p text:style-name="P18"><text:soft-page-break/>Bible Story: <text:s/>Luke <text:s/>6:12-16</text:p>
        <text:p text:style-name="P13">[ <text:s/>As Jesus went around preaching, the people who followed him and lived by his teachings were called “disciples.” <text:s/>]</text:p>
        <text:p text:style-name="P7">[ <text:s/>As Jesus went around preaching, the people who followed him and lived by his teachings were called “disciples.” <text:s/>]</text:p>
        <text:p text:style-name="P12"><draw:frame draw:style-name="fr1" draw:name="Frame2" text:anchor-type="paragraph" svg:x="-0.131cm" svg:y="0.021cm" svg:width="3.5cm" draw:z-index="3"><draw:text-box fo:min-height="3.062cm"><text:p text:style-name="P2">Picture <text:s/>14–1</text:p><text:p text:style-name="P1"><draw:frame draw:style-name="fr5" draw:name="Image1" text:anchor-type="as-char" svg:width="3.281cm" svg:height="2.379cm" draw:z-index="7"><draw:image xlink:href="Pictures/100000000000015F000000FECA4587559DE43666.jpg" xlink:type="simple" xlink:show="embed" xlink:actuate="onLoad" draw:mime-type="image/jpeg"/></draw:frame></text:p></draw:text-box></draw:frame>Luke 6:12 One day, Jesus left the group of people that were following him and he went up the mountainside to pray. He spent the whole night praying because he was about to make a very important decision.</text:p>
        <text:p text:style-name="English_20_Translation_20_-_20_Bible_20_story_20_inset">Luke 6:12 One day, Jesus left the group of people that were following him and he went up the mountainside to pray. He spent the whole night praying because he was about to make a very important decision.</text:p>
        <text:p text:style-name="P12"><draw:frame draw:style-name="fr1" draw:name="Frame1" text:anchor-type="paragraph" svg:x="-0.131cm" svg:y="0.021cm" svg:width="3.5cm" draw:z-index="4"><draw:text-box fo:min-height="3.062cm"><text:p text:style-name="P2">Picture <text:s/>14–2</text:p><text:p text:style-name="P1"><draw:frame draw:style-name="fr5" draw:name="Image7" text:anchor-type="as-char" svg:width="3.281cm" svg:height="2.379cm" draw:z-index="8"><draw:image xlink:href="Pictures/100000000000015F000000FE1C859849356A008C.jpg" xlink:type="simple" xlink:show="embed" xlink:actuate="onLoad" draw:mime-type="image/jpeg"/></draw:frame></text:p></draw:text-box></draw:frame>Luke 6:13-16 When morning came, he called his disciples to him and chose twelve of them, whom he also designated apostles: Simon (whom he named Peter), his brother Andrew, James, John, Philip, Bartholomew, Matthew, Thomas, James son of Alphaeus, Simon who was called the Zealot, Judas son of James, and Judas Iscariot, who became a traitor. </text:p>
        <text:p text:style-name="P12">[ <text:s/>These twelve men were the closest to Jesus and went everywhere with him. Two of them men wrote about their time spent with Jesus. They are in the books of the Bible called “Matthew” and “John”. Later on, Peter wrote two letters to the new followers of Jesus in two books of the Bible called First and Second Peter. All of these men abandoned Jesus at one time, or another because they were afraid. <text:s/>]</text:p>
        <text:p text:style-name="P6">Luke 6:13-16 When morning came, he called his disciples to him and chose twelve of them, whom he also designated apostles: Simon (whom he named Peter), his brother Andrew, James, John, Philip, Bartholomew, Matthew, Thomas, James son of Alphaeus, Simon who was called the Zealot, Judas son of James, and Judas Iscariot, who became a traitor.</text:p>
        <text:p text:style-name="P6">[ <text:s/>These twelve men were the closest to Jesus and went everywhere with him. Two of them men wrote about their time spent with Jesus. They are in the books of the Bible called “Matthew” and “John”. Later on, Peter wrote two letters to the new followers of Jesus in two books of the Bible called First and Second Peter. All of these men abandoned Jesus at one time, or another because they were afraid. <text:s/>]</text:p>
        <text:p text:style-name="P12"><draw:frame draw:style-name="fr2" draw:name="Frame3" text:anchor-type="paragraph" svg:x="-0.131cm" svg:y="0.019cm" svg:width="3.5cm" draw:z-index="5"><draw:text-box fo:min-height="3.062cm"><text:p text:style-name="P2">Picture <text:s/>14–3</text:p><text:p text:style-name="P1"><draw:frame draw:style-name="fr5" draw:name="Image9" text:anchor-type="as-char" svg:width="3.281cm" svg:height="2.379cm" draw:z-index="9"><draw:image xlink:href="Pictures/100000000000015F000000FE22E6056B59D1308D.jpg" xlink:type="simple" xlink:show="embed" xlink:actuate="onLoad" draw:mime-type="image/jpeg"/></draw:frame></text:p></draw:text-box></draw:frame>[ <text:s/>In the end, most of these men returned to follow Jesus. Some even ended up being killed because they chose to follow Jesus. <text:s/>]</text:p>
        <text:p text:style-name="P6">[ <text:s/>In the end, most of these men returned to follow Jesus. Some even ended up being killed because they chose to follow Jesus. <text:s/>]</text:p>
        <text:p text:style-name="P6"/>
        <text:p text:style-name="P6"/>
        <text:p text:style-name="P6"/>
        <text:p text:style-name="P12"><draw:frame draw:style-name="fr1" draw:name="Frame4" text:anchor-type="paragraph" svg:x="-0.131cm" svg:y="0.021cm" svg:width="3.5cm" draw:z-index="6"><draw:text-box fo:min-height="3.062cm"><text:p text:style-name="P2">Picture <text:s/>14–4</text:p><text:p text:style-name="P1"><draw:frame draw:style-name="fr5" draw:name="Image8" text:anchor-type="as-char" svg:width="3.281cm" svg:height="2.379cm" draw:z-index="10"><draw:image xlink:href="Pictures/100000000000015F000000FE1EE9BBB6EC67CA3E.jpg" xlink:type="simple" xlink:show="embed" xlink:actuate="onLoad" draw:mime-type="image/jpeg"/></draw:frame></text:p></draw:text-box></draw:frame>[ <text:s/>We can learn how to be disciples, or followers of Jesus by obeying his teachings, imitating him, and learning about how his disciples learned to follow Jesus. <text:s/>]</text:p>
        <text:p text:style-name="P6">[ <text:s/>We can learn how to be disciples, or followers of Jesus by obeying his teachings, imitating him, and learning about how his disciples learned to follow Jesus. <text:s/>]</text:p>
        <text:p text:style-name="P6"/>
        <text:p text:style-name="P6"/>
        <text:p text:style-name="P6"/>
        <text:p text:style-name="P18">Application</text:p>
        <text:p text:style-name="P13">We can all be disciples for Jesus. One thing that we need to remember is that it will not be easy. To be a disciple for Christ we need to remember to resist Satan, and the temptation that he brings. We need to always remember to obey Jesus' teachings, and live the way that He lived. Jesus lived a life for others, he always showed love and compassion to everyone, even to those who were his enemies.</text:p>
        <text:p text:style-name="P10"><text:soft-page-break/>We can all be disciples for Jesus. One thing that we need to remember is that it will not be easy. To be a disciple for Christ we need to remember to resist Satan, and the temptation that he brings. We need to always remember to obey Jesus' teachings, and live the way that He lived. Jesus lived a life for others, he always showed love and compassion to everyone, even to those who were his enemies.</text:p>
        <text:p text:style-name="P13">A true disciple of Jesus follows him and his teachings.</text:p>
        <text:p text:style-name="P7">A true disciple of Jesus follows him and his teachings.</text:p>
        <text:p text:style-name="P20">Homework</text:p>
        <text:p text:style-name="P13">What can you do this week to show that you are a disciple of Jesus?</text:p>
        <text:p text:style-name="P7">What can you do this week to show that you are a disciple of Jesus?</text:p>
        <text:p text:style-name="P19">Prayer / Song</text:p>
        <text:p text:style-name="P15">Review Game</text:p>
        <text:p text:style-name="P18">Spaghetti Game</text:p>
        <text:p text:style-name="P20">Materials</text:p>
        <text:list xml:id="list152820472045210" text:continue-numbering="true" text:style-name="Bullet_20_-_20_checkmark">
          <text:list-item>
            <text:p text:style-name="P27">Cooking pot with a lid</text:p>
          </text:list-item>
          <text:list-item>
            <text:p text:style-name="P28">Rope, string, or yarn cut into 10 pieces that are all different sizes</text:p>
          </text:list-item>
        </text:list>
        <text:p text:style-name="P20">How to Play</text:p>
        <text:list xml:id="list152819479349438" text:continue-numbering="true" text:style-name="Bullet_20_-_20_checkmark">
          <text:list-item>
            <text:p text:style-name="P27">Put the rope, string, or yarn in the pot with some of it hanging out. <text:s/>Put the lid on the pot over the ropes.</text:p>
          </text:list-item>
          <text:list-item>
            <text:p text:style-name="P28">Divide the children into two teams.</text:p>
          </text:list-item>
          <text:list-item>
            <text:p text:style-name="P28">When someone on the team answers the question correctly, they come to the front and choose one of the ropes. (They never know if they will get a long or short rope.)</text:p>
          </text:list-item>
          <text:list-item>
            <text:p text:style-name="P28">The ropes that each team gets are tied together into one long rope.</text:p>
          </text:list-item>
          <text:list-item>
            <text:p text:style-name="P28">At the end, measure the ropes from the two teams side by side.</text:p>
          </text:list-item>
          <text:list-item>
            <text:p text:style-name="P28">The teams with the longest rope wins.</text:p>
          </text:list-item>
        </text:list>
        <text:p text:style-name="P20">Questions for Review Game</text:p>
        <text:list xml:id="list3237922586" text:style-name="L1">
          <text:list-item>
            <text:p text:style-name="P32">What are disciples? (People that follow Jesus and live by his teachings)</text:p>
          </text:list-item>
        </text:list>
        <text:p text:style-name="P9">What are disciples? (People that follow Jesus and live by his teachings)</text:p>
        <text:list xml:id="list152820419605756" text:continue-numbering="true" text:style-name="L1">
          <text:list-item>
            <text:p text:style-name="P32">What did Jesus do on the mountainside? (Prayed)</text:p>
          </text:list-item>
        </text:list>
        <text:p text:style-name="P9">What did Jesus do on the mountainside? (Prayed)</text:p>
        <text:list xml:id="list152819918380807" text:continue-numbering="true" text:style-name="L1">
          <text:list-item>
            <text:p text:style-name="P32">How long did Jesus stay on the mountainside? (A whole night)</text:p>
          </text:list-item>
        </text:list>
        <text:p text:style-name="P9">How long did Jesus stay on the mountainside? (A whole night)</text:p>
        <text:list xml:id="list152819347912134" text:continue-numbering="true" text:style-name="L1">
          <text:list-item>
            <text:p text:style-name="P32">Why was Jesus praying? (He had an important decision to make)</text:p>
          </text:list-item>
        </text:list>
        <text:p text:style-name="P9">Why was Jesus praying? (He had an important decision to make)</text:p>
        <text:list xml:id="list152820467002569" text:continue-numbering="true" text:style-name="L1">
          <text:list-item>
            <text:p text:style-name="P32">What was the important decision he was making? (Choosing 12 men to be his chief disciples)</text:p>
          </text:list-item>
        </text:list>
        <text:p text:style-name="P9">What was the important decision he was making? (Choosing 12 men to be his chief disciples)</text:p>
        <text:list xml:id="list152819563055539" text:continue-numbering="true" text:style-name="L1">
          <text:list-item>
            <text:p text:style-name="P32">What did Jesus call those twelve men? (Jesus called the twelve men his apostles.)</text:p>
          </text:list-item>
        </text:list>
        <text:p text:style-name="P9">What did Jesus call those twelve men? (Jesus called the twelve men his apostles.)</text:p>
        <text:list xml:id="list152820033340247" text:continue-numbering="true" text:style-name="L1">
          <text:list-item>
            <text:p text:style-name="P32">What was the Apostles' job? (Carry the teachings of Jesus to others)</text:p>
          </text:list-item>
        </text:list>
        <text:p text:style-name="P9">What was the Apostles' job? (Carry the teachings of Jesus to others)</text:p>
        <text:list xml:id="list152820614487307" text:continue-numbering="true" text:style-name="L1">
          <text:list-item>
            <text:p text:style-name="P32">What is the new name that Jesus gave Simon? (Jesus gave Simon the name Peter.)</text:p>
          </text:list-item>
        </text:list>
        <text:p text:style-name="P9">What is the new name that Jesus gave Simon? (Jesus gave Simon the name Peter.)<text:tab/></text:p>
        <text:list xml:id="list152820143239346" text:continue-numbering="true" text:style-name="L1">
          <text:list-item>
            <text:p text:style-name="P32">How can we be disciples of Jesus? (By following his teachings, and by trying to imitate him in the way we live.)</text:p>
          </text:list-item>
        </text:list>
        <text:p text:style-name="P9">How can we be disciples of Jesus? (By following his teachings, and by trying to imitate him in the way we live.)</text:p>
        <text:list xml:id="list152819645483878" text:continue-numbering="true" text:style-name="L1">
          <text:list-item>
            <text:p text:style-name="P32"><text:soft-page-break/>What happened to many of the apostles? (Many of the apostles were killed for being followers of Jesus.)</text:p>
          </text:list-item>
        </text:list>
        <text:p text:style-name="P9">What happened to many of the apostles? (Many of the apostles were killed for being followers of Jesus.)</text:p>
        <text:p text:style-name="P19">Song</text:p>
        <text:p text:style-name="P15">Memory Verse</text:p>
        <text:p text:style-name="P20">Materials and Preparations</text:p>
        <text:list xml:id="list152819095231735" text:continue-list="list152819479349438" text:style-name="Bullet_20_-_20_checkmark">
          <text:list-item>
            <text:p text:style-name="P27">Put a bookmark in <text:s/>Luke 6:13</text:p>
          </text:list-item>
          <text:list-item>
            <text:p text:style-name="P27">Write memory verse on the blackboard.</text:p>
          </text:list-item>
        </text:list>
        <text:p text:style-name="P14">Luke 6:13 When morning came, he called his disciples to him and chose twelve of them, whom he also designated apostles.</text:p>
        <text:p text:style-name="P9">Luke 6:13 When morning came, he called his disciples to him and chose twelve of them, whom he also designated apostles.</text:p>
        <text:p text:style-name="P18">Teach and Explain</text:p>
        <text:p text:style-name="P13">Our memory verse is in the Gospel of Luke. <text:s/>That is in the New Testament, a part of the Bible.</text:p>
        <text:p text:style-name="P7">Our memory verse is in the Gospel of Luke. <text:s/>That is in the New Testament, a part of the Bible.</text:p>
        <text:list xml:id="list3392406029" text:style-name="WWNum1">
          <text:list-item text:start-value="1">
            <text:p text:style-name="P29">Read the verse from your Bible.</text:p>
          </text:list-item>
          <text:list-item>
            <text:p text:style-name="P29">Read the verse by yourself as you point to the words.</text:p>
          </text:list-item>
          <text:list-item>
            <text:p text:style-name="P29">Read the verse with the children as you point to the words.</text:p>
          </text:list-item>
          <text:list-item>
            <text:p text:style-name="P29">Explain the verse:</text:p>
          </text:list-item>
        </text:list>
        <text:p text:style-name="P14">Our memory verse comes from today’s Bible story.</text:p>
        <text:p text:style-name="P9">Our memory verse comes from today’s Bible story.</text:p>
        <text:list xml:id="list152819653082822" text:continue-list="list152819095231735" text:style-name="Bullet_20_-_20_checkmark">
          <text:list-item>
            <text:p text:style-name="P27">As you read the verse, circle the words shown below. <text:s/>Explain each of these words.</text:p>
          </text:list-item>
        </text:list>
        <text:list xml:id="list152820417951110" text:continue-list="list152820704371687" text:style-name="Bullet_20_-_20_Diamond">
          <text:list-item>
            <text:p text:style-name="P31"><text:span text:style-name="Body_20_Emphasized_20_-_20_Small">Morning:</text:span> <text:s/>Jesus had been praying all night because he had a very important decision to make. He had the decision in the morning.</text:p>
          </text:list-item>
        </text:list>
        <text:p text:style-name="P8">Morning: <text:s/>Jesus had been praying all night because he had a very important decision to make. He had the decision in the morning.</text:p>
        <text:list xml:id="list152819016055350" text:continue-numbering="true" text:style-name="Bullet_20_-_20_Diamond">
          <text:list-item>
            <text:p text:style-name="P31"><text:span text:style-name="Body_20_Emphasized_20_-_20_Small">Disciple:</text:span> <text:s/>Jesus had many disciples following him wherever he went. A disciple is someone who follows the teachings of Jesus.</text:p>
          </text:list-item>
        </text:list>
        <text:p text:style-name="P8">Disciple: <text:s/>Jesus had many disciples following him wherever he went. A disciple is someone who follows the teachings of Jesus.</text:p>
        <text:list xml:id="list152819235608082" text:continue-numbering="true" text:style-name="Bullet_20_-_20_Diamond">
          <text:list-item>
            <text:p text:style-name="P31"><text:span text:style-name="Body_20_Emphasized_20_-_20_Small">Twelve:</text:span> <text:s/>Jesus chose twelve men to be his chief disciples. Let's count to twelve together.</text:p>
          </text:list-item>
        </text:list>
        <text:p text:style-name="P8">Twelve: <text:s/>Jesus chose twelve men to be his chief disciples. Let's count to twelve together.</text:p>
        <text:list xml:id="list152819231008255" text:continue-numbering="true" text:style-name="Bullet_20_-_20_Diamond">
          <text:list-item>
            <text:p text:style-name="P31"><text:span text:style-name="Body_20_Emphasized_20_-_20_Small">Apostles:</text:span> <text:s/>Jesus called the special twelve men he chose apostles. They are special because they followed the teachings of Jesus and took His teachings to others.</text:p>
          </text:list-item>
        </text:list>
        <text:p text:style-name="P8">Apostles: <text:s/>Jesus called the special twelve men he chose apostles. They are special because they followed the teachings of Jesus and took His teachings to others.</text:p>
        <text:list xml:id="list152820459987898" text:continue-list="list3392406029" text:style-name="WWNum1">
          <text:list-item>
            <text:p text:style-name="P29">Read the verse again by yourself as you point to the words.</text:p>
          </text:list-item>
          <text:list-item>
            <text:p text:style-name="P29">Read the verse again with the children as you point to the words.</text:p>
          </text:list-item>
        </text:list>
        <text:p text:style-name="P11">Remember our truth for the day? <text:s/>Let’s all say it together:</text:p>
        <text:p text:style-name="P10">Remember our truth for the day? <text:s/>Let’s all say it together:</text:p>
        <text:p text:style-name="P11">A true disciple of Jesus follows him and his teachings.</text:p>
        <text:p text:style-name="P10">A true disciple of Jesus follows him and his teachings.</text:p>
        <text:p text:style-name="P15"><text:soft-page-break/>Memory Verse Review</text:p>
        <text:p text:style-name="P18">Children Repeat the Verse by Using Movements</text:p>
        <text:list xml:id="list152819787600743" text:continue-list="list152819653082822" text:style-name="Bullet_20_-_20_checkmark">
          <text:list-item>
            <text:p text:style-name="P27">Talk about different movements with our bodies: Your hands on your head, standing on one foot, jumping up and down, touching your toes....</text:p>
          </text:list-item>
          <text:list-item>
            <text:p text:style-name="P28">Ask the children the first question.</text:p>
          </text:list-item>
          <text:list-item>
            <text:p text:style-name="P28">When a question is answered correctly, that child chooses one of the movements listed above or chooses their own movement.</text:p>
          </text:list-item>
          <text:list-item>
            <text:p text:style-name="P28">The verse is said out loud together while doing the movement.</text:p>
          </text:list-item>
          <text:list-item>
            <text:p text:style-name="P28">Then the next question is asked.</text:p>
          </text:list-item>
          <text:list-item>
            <text:p text:style-name="P28">When that question is answered correctly, another child chooses one of the movements.</text:p>
          </text:list-item>
          <text:list-item>
            <text:p text:style-name="P28">The verse is said aloud again while doing the movement.</text:p>
          </text:list-item>
          <text:list-item>
            <text:p text:style-name="P28">Do this until all the questions are asked.</text:p>
          </text:list-item>
        </text:list>
        <text:p text:style-name="P20">Questions for Memory Verse</text:p>
        <text:list xml:id="list380562421" text:style-name="L2">
          <text:list-item text:start-value="1">
            <text:p text:style-name="P33">Where is today's memory verse found? <text:s/>( <text:s/>Luke 6:13 <text:s/>)</text:p>
          </text:list-item>
        </text:list>
        <text:p text:style-name="P9">Where is today's memory verse found? <text:s/>( <text:s/>Luke 6:13 <text:s/>)</text:p>
        <text:list xml:id="list152819392619892" text:continue-numbering="true" text:style-name="L2">
          <text:list-item>
            <text:p text:style-name="P33">What had Jesus been doing all night before he made his big decision? (Praying)</text:p>
          </text:list-item>
        </text:list>
        <text:p text:style-name="P9">What had Jesus been doing all night before he made his big decision? (Praying)</text:p>
        <text:list xml:id="list152818688547164" text:continue-numbering="true" text:style-name="L2">
          <text:list-item>
            <text:p text:style-name="P33">What is a disciple? (Someone who follows the teachings of Jesus)</text:p>
          </text:list-item>
        </text:list>
        <text:p text:style-name="P9">What is a disciple? (Someone who follows the teachings of Jesus)</text:p>
        <text:list xml:id="list152820606586103" text:continue-numbering="true" text:style-name="L2">
          <text:list-item>
            <text:p text:style-name="P33">How many men did Jesus choose? (12)</text:p>
          </text:list-item>
        </text:list>
        <text:p text:style-name="P9">How many men did Jesus choose? (12)</text:p>
        <text:list xml:id="list152819038696738" text:continue-numbering="true" text:style-name="L2">
          <text:list-item>
            <text:p text:style-name="P33">Who can count to twelve? (Have them count to twelve.)</text:p>
          </text:list-item>
        </text:list>
        <text:p text:style-name="P9"><text:s/>Who can count to twelve? (Have them count to twelve.)</text:p>
        <text:list xml:id="list152820408520213" text:continue-numbering="true" text:style-name="L2">
          <text:list-item>
            <text:p text:style-name="P33">What is an apostle? (A special disciple that Jesus chose to take his teachings to others)</text:p>
          </text:list-item>
        </text:list>
        <text:p text:style-name="P9">What is an apostle? (A special disciple that Jesus chose to take his teachings to others)</text:p>
        <text:p text:style-name="P19">Song</text:p>
        <text:p text:style-name="P15">Closing and Homework</text:p>
        <text:list xml:id="list152819219586178" text:continue-list="list152819787600743" text:style-name="Bullet_20_-_20_checkmark">
          <text:list-item>
            <text:p text:style-name="P27">Say the truth together:</text:p>
          </text:list-item>
        </text:list>
        <text:p text:style-name="P14">A true disciple of Jesus follows him and his teachings.<text:tab/></text:p>
        <text:p text:style-name="P9">A true disciple of Jesus follows him and his teachings.</text:p>
        <text:list xml:id="list152820661146089" text:continue-numbering="true" text:style-name="Bullet_20_-_20_checkmark">
          <text:list-item>
            <text:p text:style-name="P27">Say the memory verse together:</text:p>
          </text:list-item>
        </text:list>
        <text:p text:style-name="P14">Luke 6:13 When morning came, he called his disciples to him and chose twelve of them, whom he also designated apostles.</text:p>
        <text:p text:style-name="P9">Luke 6:13 When morning came, he called his disciples to him and chose twelve of them, whom he also designated apostles.</text:p>
        <text:list xml:id="list152818754629220" text:continue-numbering="true" text:style-name="Bullet_20_-_20_checkmark">
          <text:list-item>
            <text:p text:style-name="P27">Review the homework:</text:p>
          </text:list-item>
        </text:list>
        <text:p text:style-name="P14">What can you do this week to show that you are a disciple of Jesus?</text:p>
        <text:p text:style-name="P9">What can you do this week to show that you are a disciple of Jesus?</text:p>
        <text:list xml:id="list152819593801808" text:continue-numbering="true" text:style-name="Bullet_20_-_20_checkmark">
          <text:list-item>
            <text:p text:style-name="P27">Give any needed announcements.</text:p>
          </text:list-item>
        </text:list>
        <text:p text:style-name="P18">Closing Prayer</text:p>
        <text:p text:style-name="P3"><text:span text:style-name="Body_20_Emphasized_20_-_20_Small">Thank God</text:span> <text:s/>that we are called to be disciples of Jesus.</text:p>
        <text:p text:style-name="P3"><text:span text:style-name="Body_20_Emphasized_20_-_20_Small">Ask God</text:span> <text:s/>that the children will remember to think of a way to show that they are a disciple of Jesus.</text:p>
        <text:p text:style-name="P17"><text:soft-page-break/>Colouring page to colour and take home!</text:p>
        <text:p text:style-name="P16"/>
      </text:section>
      <text:p text:style-name="Body"/>
      <text:p text:style-name="P24">A true disciple of Jesus follows him and his teachings.</text:p>
      <text:p text:style-name="Bible_20_Story_20_-_20_Graphic_20_Number"><draw:frame draw:style-name="fr4" draw:name="Image2" text:anchor-type="as-char" svg:width="13.351cm" svg:height="11.396cm" draw:z-index="0"><draw:image xlink:href="Pictures/100000000000033B000002C2651EABA1379956B0.jpg" xlink:type="simple" xlink:show="embed" xlink:actuate="onLoad" draw:mime-type="image/jpeg"/></draw:frame></text:p>
      <text:p text:style-name="Bible_20_Story_20_-_20_Graphic_20_Number"/>
      <text:p text:style-name="M.T._20_Coloring_20_Page_20_-_20_Memory_20_Verse">Luke 6:13 When morning came, he called his disciples to him and chose twelve of them, whom he also designated apostles.</text:p>
      <text:p text:style-name="Standard"/>
      <text:p text:style-name="P25">A true disciple of Jesus follows him and his teachings.</text:p>
      <text:p text:style-name="Bible_20_Story_20_-_20_Graphic_20_Number"><draw:frame draw:style-name="fr4" draw:name="Image4" text:anchor-type="as-char" svg:width="13.351cm" svg:height="11.396cm" draw:z-index="1"><draw:image xlink:href="Pictures/100000000000033B000002C2651EABA1379956B0.jpg" xlink:type="simple" xlink:show="embed" xlink:actuate="onLoad" draw:mime-type="image/jpeg"/></draw:frame></text:p>
      <text:p text:style-name="Bible_20_Story_20_-_20_Graphic_20_Number"/>
      <text:p text:style-name="M.T._20_Coloring_20_Page_20_-_20_Memory_20_Verse">Luke 6:13 When morning came, he called his disciples to him and chose twelve of them, whom he also designated apost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Review_20_Game" style:display-name="M.T. Review Game" style:family="paragraph" style:list-style-name="WWNum2" style:master-page-name="">
      <style:paragraph-properties style:page-number="auto"/>
      <style:text-properties style:font-name="Andika4" fo:font-family="Andika" style:font-style-name="Regular" style:font-pitch="variable" fo:font-size="10pt" style:font-size-asian="10.5p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152cm" fo:margin-bottom="0cm" style: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Lesson_20_Title_20_Scrip_20_Reference" style:display-name="Lesson Title Scrip Reference" style:family="paragraph" style:parent-style-name="Body" style:default-outline-level="" style:master-page-name="">
      <loext:graphic-properties draw:fill="none" draw:fill-color="#729fcf"/>
      <style:paragraph-properties fo:margin-left="0cm" fo:margin-right="0cm" fo:margin-top="0cm" fo:margin-bottom="0.3cm" style:contextual-spacing="false" fo:text-align="start" style:justify-single-word="false" fo:orphans="2" fo:widows="2" fo:hyphenation-ladder-count="no-limit" fo:text-indent="0cm" style:auto-text-indent="false" style:page-number="auto" fo:background-color="transparent" fo:keep-with-next="always"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_20_Large_20_Spacer" style:display-name="Body - Large Spacer" style:family="paragraph" style:parent-style-name="Body" style:class="text">
      <style:paragraph-properties fo:margin-top="0.499cm" fo:margin-bottom="0cm" style:contextual-spacing="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esson_20_Overview.1" style:display-name="Lesson Overview.1"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5" text:anchor-type="as-char" svg:width="2.378cm" svg:height="0.838cm" draw:z-index="11"><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text:p>
              <text:p text:style-name="MP3"><text:span text:style-name="Body_20_8_20_pt">This work is licensed under the Creative Commons Attribution-NonCommercial-ShareAlike 4.0 International License. To view a copy of this license, visit http://creativecommons.org/licenses/by-nc-sa/4.0/deed.en_US.</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14</text:user-defined></text:span><text:span text:style-name="MT2"><text:tab/></text:span><text:span text:style-name="MT1"><text:title>Lessons from Luke</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14</text:user-defined></text:span></text:p>
      </style:footer>
    </style:master-page>
    <style:master-page style:name="Lesson_20_Content" style:display-name="Lesson Content" style:page-layout-name="Mpm11" draw:style-name="Mdp1">
      <style:footer>
        <text:p text:style-name="Footer"><text:span text:style-name="MT3">Quarter</text:span><text:span text:style-name="MT4"> <text:s/></text:span><text:span text:style-name="MT4"><text:user-defined style:data-style-name="N0" text:name="Quarter">2</text:user-defined></text:span><text:span text:style-name="MT4"><text:s text:c="2"/></text:span><text:span text:style-name="MT3">Lesson</text:span><text:span text:style-name="MT4"> <text:s/></text:span><text:span text:style-name="MT4"><text:user-defined style:data-style-name="N0" text:name="Lesson">14</text:user-defined></text:span><text:tab/><text:chapter text:display="name" text:outline-level="1">The Twelve Apostles</text:chapter><text:tab/>Page <text:s/><text:page-number text:select-page="current">7</text:page-number></text:p>
      </style:footer>
    </style:master-page>
    <style:master-page style:name="Front_20_matter" style:display-name="Front matter" style:page-layout-name="Mpm12" draw:style-name="Mdp1">
      <style:footer>
        <text:p text:style-name="Front_20_Matter_20_footer"><text:title>Lessons from Luke</text:title><text:tab/><text:subject>The Twelve Apostles</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05T06:01:52.940000000</meta:creation-date>
    <meta:editing-cycles>154</meta:editing-cycles>
    <meta:editing-duration>P1DT10H24M41S</meta:editing-duration>
    <meta:generator>LibreOffice/7.4.0.3$MacOSX_AARCH64 LibreOffice_project/f85e47c08ddd19c015c0114a68350214f7066f5a</meta:generator>
    <dc:date>2022-10-25T15:28:18.309893254</dc:date>
    <dc:subject>The Twelve Apostles</dc:subject>
    <dc:title>Lessons from Luke</dc:title>
    <dc:creator>Chris Jackson</dc:creator>
    <meta:document-statistic meta:table-count="2" meta:image-count="8" meta:object-count="0" meta:page-count="8" meta:paragraph-count="217" meta:word-count="2814" meta:character-count="15262" meta:non-whitespace-character-count="12649"/>
    <meta:user-defined meta:name="Lesson" meta:value-type="float">14</meta:user-defined>
    <meta:user-defined meta:name="Quarter" meta:value-type="float">2</meta:user-defined>
  </office:meta>
</office:document-meta>
</file>