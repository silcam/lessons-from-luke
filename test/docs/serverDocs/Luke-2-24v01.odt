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9EC000009980425AB3FA190A9D5.tif" manifest:media-type="image/tiff"/>
  <manifest:file-entry manifest:full-path="Pictures/10000000000000EC000000A48A4AD9525D575784.jpg" manifest:media-type="image/jpeg"/>
  <manifest:file-entry manifest:full-path="Pictures/10000000000000EC000000A27F65DCB3158BAC40.jpg" manifest:media-type="image/jpeg"/>
  <manifest:file-entry manifest:full-path="Pictures/10000001000000D8000000D869919741A8F05D33.png" manifest:media-type="image/png"/>
  <manifest:file-entry manifest:full-path="Pictures/10000000000000EC000000A46690379B5A4A600A.jpg" manifest:media-type="image/jpeg"/>
  <manifest:file-entry manifest:full-path="Pictures/10000001000000580000001FF4DBFF4432E2ED5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itle_26_Truth" style:display-name="Title&amp;Truth" style:family="table">
      <style:table-properties style:width="17.5cm" table:align="left" style:may-break-between-rows="true" style:writing-mode="lr-tb" table:border-model="collapsing"/>
    </style:style>
    <style:style style:name="Title_26_Truth.A" style:display-name="Title&amp;Truth.A" style:family="table-column">
      <style:table-column-properties style:column-width="2.701cm"/>
    </style:style>
    <style:style style:name="Title_26_Truth.B" style:display-name="Title&amp;Truth.B" style:family="table-column">
      <style:table-column-properties style:column-width="14.799cm"/>
    </style:style>
    <style:style style:name="Title_26_Truth.1" style:display-name="Title&amp;Truth.1" style:family="table-row">
      <style:table-row-properties fo:keep-together="auto"/>
    </style:style>
    <style:style style:name="Title_26_Truth.A1" style:display-name="Title&amp;Truth.A1" style:family="table-cell">
      <style:table-cell-properties style:vertical-align="middle" fo:background-color="#cccccc" fo:padding-left="0.102cm" fo:padding-right="0.102cm" fo:padding-top="0cm" fo:padding-bottom="0.051cm" fo:border-left="none" fo:border-right="none" fo:border-top="none" fo:border-bottom="1pt solid #000000" style:writing-mode="lr-tb">
        <style:background-image/>
      </style:table-cell-properties>
    </style:style>
    <style:style style:name="Title_26_Truth.B1" style:display-name="Title&amp;Truth.B1" style:family="table-cell">
      <style:table-cell-properties style:vertical-align="middle" fo:background-color="transparent" fo:padding-left="0.102cm" fo:padding-right="0.102cm" fo:padding-top="0cm" fo:padding-bottom="0.051cm" fo:border-left="none" fo:border-right="none" fo:border-top="none" fo:border-bottom="1pt solid #000000" style:writing-mode="lr-tb">
        <style:background-image/>
      </style:table-cell-properties>
    </style:style>
    <style:style style:name="P1" style:family="paragraph" style:parent-style-name="Sub-Head_20_1" style:master-page-name="">
      <style:paragraph-properties style:page-number="auto" fo:keep-with-next="auto"/>
      <style:text-properties officeooo:paragraph-rsid="00a7adc2"/>
    </style:style>
    <style:style style:name="P2" style:family="paragraph" style:parent-style-name="English_20_Translation_20_-_20_single_20_inset">
      <style:text-properties officeooo:paragraph-rsid="00a7adc2"/>
    </style:style>
    <style:style style:name="P3" style:family="paragraph" style:parent-style-name="Sub-Head_20_1">
      <style:text-properties officeooo:paragraph-rsid="00a7adc2"/>
    </style:style>
    <style:style style:name="P4" style:family="paragraph" style:parent-style-name="Sub-Head_20_2">
      <style:text-properties officeooo:paragraph-rsid="00a7adc2"/>
    </style:style>
    <style:style style:name="P5" style:family="paragraph" style:parent-style-name="English_20_translation">
      <style:text-properties officeooo:paragraph-rsid="00a7adc2"/>
    </style:style>
    <style:style style:name="P6" style:family="paragraph" style:parent-style-name="M.T._20_Text">
      <style:text-properties officeooo:paragraph-rsid="00a7adc2"/>
    </style:style>
    <style:style style:name="P7" style:family="paragraph" style:parent-style-name="Sub-Head_20_1">
      <style:paragraph-properties fo:keep-with-next="always"/>
      <style:text-properties officeooo:paragraph-rsid="00a7adc2"/>
    </style:style>
    <style:style style:name="P8" style:family="paragraph" style:parent-style-name="Body">
      <style:text-properties officeooo:paragraph-rsid="00a7adc2"/>
    </style:style>
    <style:style style:name="P9" style:family="paragraph" style:parent-style-name="Body_20_Inset">
      <style:text-properties officeooo:paragraph-rsid="00a7adc2"/>
    </style:style>
    <style:style style:name="P10" style:family="paragraph" style:parent-style-name="English_20_Translation_20_-_20_Bible_20_story_20_inset">
      <style:text-properties officeooo:paragraph-rsid="00a7adc2"/>
    </style:style>
    <style:style style:name="P11" style:family="paragraph" style:parent-style-name="English_20_Translation_20_-_20_Indented">
      <style:text-properties officeooo:paragraph-rsid="00a7adc2"/>
    </style:style>
    <style:style style:name="P12" style:family="paragraph" style:parent-style-name="English_20_Translation_20_-_20_double_20_inset">
      <style:text-properties officeooo:paragraph-rsid="00a7adc2"/>
    </style:style>
    <style:style style:name="P13" style:family="paragraph" style:parent-style-name="M.T._20_Text_20_-_20_Bible_20_story_20_inset">
      <style:text-properties officeooo:paragraph-rsid="00a7adc2"/>
    </style:style>
    <style:style style:name="P14" style:family="paragraph" style:parent-style-name="M.T._20_Text_20_-_20_Indented">
      <style:text-properties officeooo:paragraph-rsid="00a7adc2"/>
    </style:style>
    <style:style style:name="P15" style:family="paragraph" style:parent-style-name="M.T._20_Text_20_-_20_Single_20_Inset">
      <style:text-properties officeooo:paragraph-rsid="00a7adc2"/>
    </style:style>
    <style:style style:name="P16" style:family="paragraph" style:parent-style-name="Section_20_Heading">
      <style:text-properties officeooo:paragraph-rsid="00a7adc2"/>
    </style:style>
    <style:style style:name="P17" style:family="paragraph" style:parent-style-name="Sub-Head_20_-_20_Coloring_20_page_20_last_20_paragraph">
      <style:text-properties officeooo:paragraph-rsid="00a7adc2"/>
    </style:style>
    <style:style style:name="P18" style:family="paragraph" style:parent-style-name="Sub-Head_20_1_20_No_20_follow">
      <style:text-properties officeooo:paragraph-rsid="00a7adc2"/>
    </style:style>
    <style:style style:name="P19" style:family="paragraph" style:parent-style-name="Sub-Head_20_1">
      <style:text-properties fo:language="en" fo:country="US" officeooo:paragraph-rsid="00a7adc2" style:language-asian="en" style:country-asian="US" style:language-complex="hi" style:country-complex="IN"/>
    </style:style>
    <style:style style:name="P20" style:family="paragraph" style:parent-style-name="Sub-Head_20_2">
      <style:text-properties fo:color="#000000" loext:opacity="100%" style:text-outline="false" style:font-name="Andika New Basic1" fo:font-size="12pt" fo:language="en" fo:country="US" fo:font-style="italic" fo:font-weight="bold" officeooo:rsid="008b5e76" officeooo:paragraph-rsid="00a7adc2" style:font-name-asian="ヒラギノ角ゴ Pro W3" style:font-size-asian="16pt" style:language-asian="en" style:country-asian="US" style:font-weight-asian="bold" style:font-name-complex="Times New Roman2" style:font-size-complex="16pt" style:language-complex="hi" style:country-complex="IN" style:font-weight-complex="bold"/>
    </style:style>
    <style:style style:name="P21" style:family="paragraph" style:parent-style-name="M.T._20_Text">
      <style:text-properties officeooo:rsid="01301848" officeooo:paragraph-rsid="00a7adc2"/>
    </style:style>
    <style:style style:name="P22" style:family="paragraph" style:parent-style-name="Bible_20_Story_20_-_20_Graphic_20_Number">
      <style:text-properties officeooo:paragraph-rsid="0093be13"/>
    </style:style>
    <style:style style:name="P23" style:family="paragraph" style:parent-style-name="Bible_20_Story_20_-_20_Graphic_20_Number">
      <style:text-properties officeooo:rsid="017e3f1f" officeooo:paragraph-rsid="0093be13"/>
    </style:style>
    <style:style style:name="P24" style:family="paragraph" style:parent-style-name="Sub-Head_20_2">
      <style:text-properties officeooo:paragraph-rsid="00a97fd4"/>
    </style:style>
    <style:style style:name="P25" style:family="paragraph" style:parent-style-name="Coloring_20_Page_20_Footer">
      <style:text-properties officeooo:paragraph-rsid="02b4e089"/>
    </style:style>
    <style:style style:name="P26" style:family="paragraph" style:parent-style-name="M.T._20_Text">
      <style:text-properties officeooo:paragraph-rsid="029f899c"/>
    </style:style>
    <style:style style:name="P27" style:family="paragraph" style:parent-style-name="Body">
      <style:text-properties fo:font-size="8pt" officeooo:paragraph-rsid="029f899c" style:font-size-asian="8pt" style:font-size-complex="8pt"/>
    </style:style>
    <style:style style:name="P28" style:family="paragraph" style:parent-style-name="M.T._20_Lesson_20_title_20_-_20_invisible" style:master-page-name="First_20_Page">
      <style:paragraph-properties style:page-number="auto"/>
    </style:style>
    <style:style style:name="P29" style:family="paragraph" style:parent-style-name="M.T._20_Coloring_20_Page_20_-_20_Truth" style:master-page-name="Coloring_20_Page">
      <style:paragraph-properties style:page-number="auto"/>
    </style:style>
    <style:style style:name="P30" style:family="paragraph" style:parent-style-name="M.T._20_Coloring_20_Page_20_-_20_Truth">
      <style:paragraph-properties fo:break-before="column"/>
    </style:style>
    <style:style style:name="P31" style:family="paragraph" style:parent-style-name="Body_20_Bullet_20_-_20_Checkmark">
      <style:text-properties officeooo:paragraph-rsid="00a7adc2"/>
    </style:style>
    <style:style style:name="P32" style:family="paragraph" style:parent-style-name="Body_20_Bullet_20_-_20_Checkmark">
      <style:text-properties fo:color="#000000" loext:opacity="100%" style:font-name="Andika New Basic2" fo:font-size="10pt" fo:language="en" fo:country="US" fo:font-style="normal" fo:font-weight="normal" officeooo:rsid="008b5e76" officeooo:paragraph-rsid="00a7adc2"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style:style>
    <style:style style:name="P33" style:family="paragraph" style:parent-style-name="Body_20_Bullet_20_-_20_Checkmark">
      <style:text-properties officeooo:paragraph-rsid="00a97fd4"/>
    </style:style>
    <style:style style:name="P34" style:family="paragraph" style:parent-style-name="Body_20_Bullet_20_-_20_Checkmark_20_-_20_No_20_follow">
      <style:text-properties officeooo:paragraph-rsid="00a7adc2"/>
    </style:style>
    <style:style style:name="P35" style:family="paragraph" style:parent-style-name="Body_20_Bullet_20_-_20_Checkmark_20_-_20_No_20_follow">
      <style:text-properties officeooo:paragraph-rsid="00a97fd4"/>
    </style:style>
    <style:style style:name="P36" style:family="paragraph" style:parent-style-name="Body_20_Numbered_20_List">
      <style:text-properties officeooo:paragraph-rsid="00a7adc2"/>
    </style:style>
    <style:style style:name="P37" style:family="paragraph" style:parent-style-name="M.T._20_Text_20_-_20_Checkmark_20_bullet">
      <style:text-properties officeooo:paragraph-rsid="00a7adc2"/>
    </style:style>
    <style:style style:name="P38" style:family="paragraph" style:parent-style-name="M.T._20_Text_20_-_20_Diamond_20_bullet">
      <style:text-properties officeooo:paragraph-rsid="00a7adc2"/>
    </style:style>
    <style:style style:name="P39" style:family="paragraph" style:parent-style-name="M.T._20_Text_20_-_20_Numbered_20_List_20_Inset" style:list-style-name="L1">
      <style:text-properties officeooo:paragraph-rsid="00a7adc2"/>
    </style:style>
    <style:style style:name="P40" style:family="paragraph" style:parent-style-name="M.T._20_Text_20_-_20_Numbered_20_List_20_Inset" style:list-style-name="L2">
      <style:text-properties officeooo:paragraph-rsid="00a7adc2"/>
    </style:style>
    <style:style style:name="P41"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style:font-name="Andika New Basic2" fo:font-size="10pt" fo:language="en" fo:country="US" fo:font-style="normal" fo:font-weight="normal" officeooo:rsid="00a97fd4"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style:style>
    <style:style style:name="T2" style:family="text">
      <style:text-properties fo:color="#000000" loext:opacity="100%" style:font-name="Andika New Basic2" fo:font-size="10pt" fo:language="en" fo:country="US" fo:font-style="normal" fo:font-weight="normal" officeooo:rsid="008f5c58"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style:style>
    <style:style style:name="T3"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T4" style:family="text">
      <style:text-properties officeooo:rsid="0184d68b"/>
    </style:style>
    <style:style style:name="T5" style:family="text">
      <style:text-properties officeooo:rsid="008b5e76"/>
    </style:style>
    <style:style style:name="T6" style:family="text">
      <style:text-properties officeooo:rsid="017e3f1f"/>
    </style:style>
    <style:style style:name="T7" style:family="text">
      <style:text-properties officeooo:rsid="01d657ac"/>
    </style:style>
    <style:style style:name="T8" style:family="text">
      <style:text-properties officeooo:rsid="01355e7d"/>
    </style:style>
    <style:style style:name="T9" style:family="text">
      <style:text-properties fo:language="en" fo:country="US" style:language-asian="en" style:country-asian="US" style:language-complex="hi" style:country-complex="IN"/>
    </style:style>
    <style:style style:name="fr1" style:family="graphic" style:parent-style-name="Bible_5f_Story_5f_Box">
      <style:graphic-properties style:vertical-pos="from-top" style:vertical-rel="paragraph" style:horizontal-pos="from-left" style:horizontal-rel="paragraph" draw:opacity="50%"/>
    </style:style>
    <style:style style:name="fr2"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Number_20_Graphic">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28" text:outline-level="1"><draw:frame draw:style-name="fr4" draw:name="Image1" text:anchor-type="char" svg:x="0cm" svg:y="0.041cm" svg:width="2.731cm" svg:height="2.731cm" draw:z-index="2"><draw:image xlink:href="Pictures/10000001000000D8000000D869919741A8F05D33.png" xlink:type="simple" xlink:show="embed" xlink:actuate="onLoad" draw:mime-type="image/png"/></draw:frame>Jesus Calms a Storm</text:h>
        </text:list-item>
      </text:list>
      <text:p text:style-name="M.T._20_Lesson_20_Title">Jesus Calms a Storm</text:p>
      <text:p text:style-name="English_20_Translation_20_-_20_Lesson_20_title">Jesus Calms a Storm</text:p>
      <text:p text:style-name="M.T._20_Text_20_-_20_Lesson_20_Title_20_Scrip_20_Reference">Luke <text:s/>8:22-25</text:p>
      <text:p text:style-name="Part_20_Heading">Lesson Overview</text:p>
      <table:table table:name="Title&amp;Truth" table:style-name="Title_26_Truth" table:template-name="Lesson Overview">
        <table:table-column table:style-name="Title_26_Truth.A"/>
        <table:table-column table:style-name="Title_26_Truth.B"/>
        <table:table-row table:style-name="Title_26_Truth.1">
          <table:table-cell table:style-name="Title_26_Truth.A1" office:value-type="string">
            <text:p text:style-name="Table_20_Left_20_headings">Today’s Truth</text:p>
          </table:table-cell>
          <table:table-cell table:style-name="Title_26_Truth.B1" office:value-type="string">
            <text:p text:style-name="M.T._20_Text">Jesus has true power over nature.</text:p>
            <text:p text:style-name="English_20_translation">Jesus has true power over nature.</text:p>
          </table:table-cell>
        </table:table-row>
        <table:table-row table:style-name="Title_26_Truth.1">
          <table:table-cell table:style-name="Title_26_Truth.A1" office:value-type="string">
            <text:p text:style-name="Table_20_Left_20_headings">Objective</text:p>
          </table:table-cell>
          <table:table-cell table:style-name="Title_26_Truth.B1" office:value-type="string">
            <text:p text:style-name="Body_20_Tight_20_lines"><text:span text:style-name="Body_20_Emphasized_20_-_20_Small">KNOW: <text:s/></text:span>The children will know that Jesus has power over nature.</text:p>
            <text:p text:style-name="Body_20_Tight_20_lines"><text:span text:style-name="Body_20_Emphasized_20_-_20_Small">DO:</text:span> <text:s/>The children will look for things in nature and thank Jesus for his power over everything.</text:p>
          </table:table-cell>
        </table:table-row>
        <table:table-row table:style-name="Title_26_Truth.1">
          <table:table-cell table:style-name="Title_26_Truth.A1" office:value-type="string">
            <text:p text:style-name="Table_20_Left_20_headings">Materials</text:p>
          </table:table-cell>
          <table:table-cell table:style-name="Title_26_Truth.B1" office:value-type="string">
            <text:list xml:id="list2056697836"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text:span text:style-name="T1">Ball</text:span> <text:s/>(Make a ball by tying wrappen (plastic bag) into knots many times, or fill an old sock with scrap material.)</text:p>
              </text:list-item>
              <text:list-item>
                <text:p text:style-name="Table_20_Bullet_20_-_20_Checkmark">A drum, shaker, or anything to make music with.</text:p>
              </text:list-item>
            </text:list>
          </table:table-cell>
        </table:table-row>
        <table:table-row table:style-name="Title_26_Truth.1">
          <table:table-cell table:style-name="Title_26_Truth.A1" office:value-type="string">
            <text:p text:style-name="Table_20_Left_20_headings">Memory Verse</text:p>
          </table:table-cell>
          <table:table-cell table:style-name="Title_26_Truth.B1" office:value-type="string">
            <text:p text:style-name="M.T._20_Text">Luke 8:25 In fear and amazement they asked one another, “Who is this? He commands even the winds and the water, and they obey him.”</text:p>
            <text:p text:style-name="English_20_translation">Luke 8:25 In fear and amazement they asked one another, “Who is this? He commands even the winds and the water, and they obey him.”</text:p>
          </table:table-cell>
        </table:table-row>
        <table:table-row table:style-name="Title_26_Truth.1">
          <table:table-cell table:style-name="Title_26_Truth.A1" office:value-type="string">
            <text:p text:style-name="Table_20_Left_20_headings">Homework</text:p>
          </table:table-cell>
          <table:table-cell table:style-name="Title_26_Truth.B1" office:value-type="string">
            <text:p text:style-name="M.T._20_Text">As you go through the week, look around and see the beauty of everything God created. Thank him for this beauty. Give thanks also that Jesus showed us that he is God and that he has power over everything. Tell Jesus you trust him even in bad times because he is truly powerful.</text:p>
            <text:p text:style-name="English_20_translation">As you go through the week, look around and see the beauty of everything God created. Thank him for this beauty. Give thanks also that Jesus showed us that he is God and that he has power over everything. Tell Jesus you trust him even in bad times because he is truly powerful.</text:p>
          </table:table-cell>
        </table:table-row>
      </table:table>
      <text:p text:style-name="Body_20_-_20_Small_20_Spacer"/>
      <text:p text:style-name="Part_20_Heading">Detailed Lesson Plan</text:p>
      <text:section text:style-name="Sect1" text:name="L-24 Detail Plan">
        <text:p text:style-name="P18">Song</text:p>
        <text:p text:style-name="P16">Opening</text:p>
        <text:p text:style-name="P3">Welcome</text:p>
        <text:list xml:id="list92519798" text:style-name="Bullet_20_-_20_checkmark">
          <text:list-item>
            <text:p text:style-name="P31">Be sure the children know you are happy to see them!</text:p>
          </text:list-item>
          <text:list-item>
            <text:p text:style-name="P31">Introduce yourself and your helpers.</text:p>
          </text:list-item>
        </text:list>
        <text:p text:style-name="P3">Sharing Time</text:p>
        <text:list xml:id="list162048248557444" text:continue-numbering="true" text:style-name="Bullet_20_-_20_checkmark">
          <text:list-item>
            <text:p text:style-name="P31">Say the truth from the previous lesson together:</text:p>
          </text:list-item>
        </text:list>
        <text:p text:style-name="P15">Jesus shines through us.</text:p>
        <text:p text:style-name="P2">Jesus shines through us.</text:p>
        <text:list xml:id="list162047110703955" text:continue-numbering="true" text:style-name="Bullet_20_-_20_checkmark">
          <text:list-item>
            <text:p text:style-name="P32"><text:soft-page-break/>Say the memory verse from the previous lesson together:</text:p>
          </text:list-item>
        </text:list>
        <text:p text:style-name="P15">Luke 8:16 No one lights a lamp and hides it in with a jar or puts it under a bed. Instead, he puts it on a stand so that those who come in can see the light.</text:p>
        <text:p text:style-name="P2">Luke 8:16 No one lights a lamp and hides it in with a jar or puts it under a bed. Instead, he puts it on a stand so that those who come in can see the light.</text:p>
        <text:list xml:id="list162048159404185" text:continue-numbering="true" text:style-name="Bullet_20_-_20_checkmark">
          <text:list-item>
            <text:p text:style-name="P31">Review the homework from the previous lesson:</text:p>
          </text:list-item>
        </text:list>
        <text:p text:style-name="P15">Did anyone notice your light this last week? Did you share with someone about the love that Jesus has for them?</text:p>
        <text:p text:style-name="P2">Did anyone notice your light this last week? Did you share with someone about the love that Jesus has for them?</text:p>
        <text:p text:style-name="P9">(Give children time to share.)</text:p>
        <text:p text:style-name="P3">Prayer</text:p>
        <text:list xml:id="list162048234282356" text:continue-numbering="true" text:style-name="Bullet_20_-_20_checkmark">
          <text:list-item>
            <text:p text:style-name="P31">Let the children share praises and prayer requests.</text:p>
          </text:list-item>
          <text:list-item>
            <text:p text:style-name="P34">Keep a record of what the children are sharing so you can remember to thank God together for answered prayers.</text:p>
          </text:list-item>
          <text:list-item>
            <text:p text:style-name="P34">Spend time praying together. <text:s/>Let children pray out loud if they volunteer. <text:s/>Do not force anyone to pray out loud.</text:p>
          </text:list-item>
        </text:list>
        <text:p text:style-name="P18">Song</text:p>
        <text:p text:style-name="P16">Words to Discuss</text:p>
        <text:list xml:id="list162047945308450" text:continue-numbering="true" text:style-name="Bullet_20_-_20_checkmark">
          <text:list-item>
            <text:p text:style-name="P31">On the blackboard, write the “Words to Discuss” from the list below.</text:p>
          </text:list-item>
          <text:list-item>
            <text:p text:style-name="P37">Let's discuss some words to help us better understand the Bible story for today.</text:p>
          </text:list-item>
        </text:list>
        <text:p text:style-name="P2">Let's discuss some words to help us better understand the Bible story for today.</text:p>
        <text:list xml:id="list2495496179" text:style-name="Bullet_20_-_20_Diamond">
          <text:list-item>
            <text:p text:style-name="P38"><text:span text:style-name="Body_20_Emphasized_20_-_20_Small">Lake: <text:s/></text:span>A large body of water.</text:p>
          </text:list-item>
        </text:list>
        <text:p text:style-name="P12">Lake: <text:s/>A large body of water.</text:p>
        <text:list xml:id="list162046568495603" text:continue-numbering="true" text:style-name="Bullet_20_-_20_Diamond">
          <text:list-item>
            <text:p text:style-name="P38"><text:span text:style-name="Body_20_Emphasized_20_-_20_Small">Storm/Squall: <text:s/></text:span>A heavy storm with a lot of wind that makes large waves on a lake.</text:p>
          </text:list-item>
        </text:list>
        <text:p text:style-name="P12">Storm/Squall: <text:s/>A heavy storm with a lot of wind that makes large waves on a lake.</text:p>
        <text:list xml:id="list162048000746048" text:continue-numbering="true" text:style-name="Bullet_20_-_20_Diamond">
          <text:list-item>
            <text:p text:style-name="P38"><text:span text:style-name="Body_20_Emphasized_20_-_20_Small">Rebuke: <text:s/></text:span>To speak with strong disapproval.</text:p>
          </text:list-item>
        </text:list>
        <text:p text:style-name="P12">Rebuke: <text:s/>To speak with strong disapproval.</text:p>
        <text:list xml:id="list162048365375383" text:continue-numbering="true" text:style-name="Bullet_20_-_20_Diamond">
          <text:list-item>
            <text:p text:style-name="P38"><text:span text:style-name="Body_20_Emphasized_20_-_20_Small">Faith: <text:s/></text:span>Having confidence in someone, to trust them.</text:p>
          </text:list-item>
        </text:list>
        <text:p text:style-name="P12">Faith: <text:s/>Having confidence in someone, to trust them.</text:p>
        <text:list xml:id="list162046978873462" text:continue-numbering="true" text:style-name="Bullet_20_-_20_Diamond">
          <text:list-item>
            <text:p text:style-name="P38"><text:span text:style-name="Body_20_Emphasized_20_-_20_Small">Amazement: <text:s/></text:span>A feeling of surprise or wonder.</text:p>
          </text:list-item>
        </text:list>
        <text:p text:style-name="P12">Amazement: <text:s/>A feeling of surprise or wonder.</text:p>
        <text:p text:style-name="P1">Song</text:p>
        <text:p text:style-name="P16">Bible Story / Lesson</text:p>
        <text:p text:style-name="P14">Have you ever met someone with great strength?</text:p>
        <text:p text:style-name="P11">Have you ever met someone with great strength?</text:p>
        <text:p text:style-name="P14">What did they do that showed you how strong they are?</text:p>
        <text:p text:style-name="P11">What did they do that showed you how strong they are?</text:p>
        <text:p text:style-name="P14">Were you amazed by what you saw? Were you afraid of them because of their power?</text:p>
        <text:p text:style-name="P11">Were you amazed by what you saw? Were you afraid of them because of their power?</text:p>
        <text:p text:style-name="P14">Today we will be learning how Jesus has power over nature.</text:p>
        <text:p text:style-name="P11">Today we will be learning how Jesus has power over nature.</text:p>
        <text:p text:style-name="P3"><text:soft-page-break/>Introduce Truth</text:p>
        <text:p text:style-name="P6">Our truth for today is: <text:s/>Jesus has true power over nature.</text:p>
        <text:p text:style-name="P5">Our truth for today is: <text:s/>Jesus has true power over nature.</text:p>
        <text:p text:style-name="P6">This reminds me of a true story from the Bible.</text:p>
        <text:p text:style-name="P5">This reminds me of a true story from the Bible.</text:p>
        <text:p text:style-name="P19">Bible Story: <text:s/>Luke <text:s/>8:22-25</text:p>
        <text:p text:style-name="P13"><draw:frame draw:style-name="fr1" draw:name="Frame2" text:anchor-type="paragraph" svg:x="-0.046cm" svg:y="0.219cm" svg:width="3.5cm" draw:z-index="3"><draw:text-box fo:min-height="3.062cm"><text:p text:style-name="P22"><text:span text:style-name="T6">Picture <text:s/></text:span>24–1</text:p><text:p text:style-name="P22"><draw:frame text:anchor-type="as-char" draw:z-index="4" draw:name="Shape1_0" draw:style-name="gr1" draw:text-style-name="P41" svg:width="3.282cm" svg:height="2.102cm"><draw:image xlink:href="Pictures/10000000000000EC000000A27F65DCB3158BAC40.jpg" xlink:type="simple" xlink:show="embed" xlink:actuate="onLoad" draw:mime-type="image/jpeg"><text:p/></draw:image></draw:frame></text:p></draw:text-box></draw:frame>Luke 8:22 One day Jesus said to his disciples, “Let’s go over to the other side of the lake.” So they got into a boat and set out.</text:p>
        <text:p text:style-name="P10">Luke 8:22 One day Jesus said to his disciples, “Let’s go over to the other side of the lake.” So they got into a boat and set out.</text:p>
        <text:p text:style-name="P10"/>
        <text:p text:style-name="P10"/>
        <text:p text:style-name="P10"/>
        <text:p text:style-name="P13"><draw:frame draw:style-name="fr1" draw:name="Frame1" text:anchor-type="paragraph" svg:x="-0.046cm" svg:y="0.219cm" svg:width="3.5cm" draw:z-index="5"><draw:text-box fo:min-height="3.062cm"><text:p text:style-name="P23">Picture <text:s/>24–2</text:p><text:p text:style-name="P22"><draw:frame text:anchor-type="as-char" draw:z-index="6" draw:name="Shape2_0" draw:style-name="gr1" draw:text-style-name="P41" svg:width="3.282cm" svg:height="2.281cm"><draw:image xlink:href="Pictures/10000000000000EC000000A46690379B5A4A600A.jpg" xlink:type="simple" xlink:show="embed" xlink:actuate="onLoad" draw:mime-type="image/jpeg"><text:p/></draw:image></draw:frame></text:p></draw:text-box></draw:frame>Luke 8:23 As they sailed, he fell asleep. A squall came down on the lake, so that the boat was being swamped, and they were in great danger.</text:p>
        <text:p text:style-name="P10">Luke 8:23 As they sailed, he fell asleep. A squall came down on the lake, so that the boat was being swamped, and they were in great danger.</text:p>
        <text:p text:style-name="P10"/>
        <text:p text:style-name="P10"/>
        <text:p text:style-name="P10"/>
        <text:p text:style-name="P13"><draw:frame draw:style-name="fr1" draw:name="Frame3" text:anchor-type="paragraph" svg:x="-0.046cm" svg:y="0.219cm" svg:width="3.5cm" draw:z-index="7"><draw:text-box fo:min-height="3.062cm"><text:p text:style-name="P23">Picture <text:s/>24–3</text:p><text:p text:style-name="P22"><draw:frame text:anchor-type="as-char" draw:z-index="8" draw:name="Shape3_0" draw:style-name="gr1" draw:text-style-name="P41" svg:width="3.282cm" svg:height="2.281cm"><draw:image xlink:href="Pictures/10000000000000EC000000A48A4AD9525D575784.jpg" xlink:type="simple" xlink:show="embed" xlink:actuate="onLoad" draw:mime-type="image/jpeg"><text:p/></draw:image></draw:frame></text:p></draw:text-box></draw:frame>Luke 8:24-25 The disciples went and woke him, saying, “Master, Master, we’re going to drown!” He got up and rebuked the wind and the raging waters; the storm subsided, and all was calm. “Where is your faith?” he asked his disciples. In fear and amazement they asked one another, “Who is this? He commands even the winds and the water, and they obey him.”</text:p>
        <text:p text:style-name="P10">Luke 8:24-25 The disciples went and woke him, saying, “Master, Master, we’re going to drown!” He got up and rebuked the wind and the raging waters; the storm subsided, and all was calm. “Where is your faith?” he asked his disciples. In fear and amazement they asked one another, “Who is this? He commands even the winds and the water, and they obey him.”</text:p>
        <text:p text:style-name="P3">Application</text:p>
        <text:p text:style-name="P14">The stories about Jesus in the Bible show us how powerful he is. In this story, the disciples were afraid in the big storm. They did not believe that Jesus was in control. They did not believe they would reach the other side of the lake safely. They thought their ship would sink and they would all die! Storms and bad things happen in our lives, but Jesus is always in control.</text:p>
        <text:p text:style-name="P11">The stories about Jesus in the Bible show us how powerful he is. In this story, the disciples were afraid in the big storm. They did not believe that Jesus was in control. They did not believe they would reach the other side of the lake safely. They thought their ship would sink and they would all die! Storms and bad things happen in our lives, but Jesus is always in control.</text:p>
        <text:p text:style-name="P14">These Bible stories also teach us that Jesus is truly God; he has power over everything. Only God can do things like calm the wind and the sea with only a word. Some people say they have the power to call for rain, or thunder, but they are using counterfeit that is not from God; it is evil power. The power Jesus has is the true power that only comes from God, because he is God. These stories help us have more faith in Jesus. We can have confidence that He is able to do everything He promises because He has shown us His great power. The disciples were amazed at the power they saw in Jesus; they had never seen anyt. We should be amazed as well. Jesus is God! He is powerful. We can put our faith in him!</text:p>
        <text:p text:style-name="P5">These Bible stories also teach us that Jesus is truly God; he has power over everything. Only God can do things like calm the wind and the sea with only a word. Some people say they have the power to call for rain, or thunder, but they are using counterfeit that is not from God; it is evil power. The power Jesus has is the true power that only comes from God, because he is God. These stories help us have more faith in Jesus. We can have confidence that He is able to do everything He promises because He has shown us His great power. The disciples were amazed at the power they saw in Jesus; they had never seen anyt. We should be amazed as well. Jesus is God! He is powerful. We can put our faith in him! <text:soft-page-break/></text:p>
        <text:p text:style-name="P6">Jesus has true power over nature.</text:p>
        <text:p text:style-name="P5">Jesus has true power over nature.</text:p>
        <text:p text:style-name="P20">Homework:</text:p>
        <text:p text:style-name="P14">As you go through the week, look around and see the beauty of everything God created. Thank him for this beauty. Give thanks also that Jesus showed us that he is God and that he has power over everything. Tell Jesus you trust him even in bad times because he is truly powerful.</text:p>
        <text:p text:style-name="P11">As you go through the week, look around and see the beauty of everything God created. Thank him for this beauty. Give thanks also that Jesus showed us that he is God and that he has power over everything. Tell Jesus you trust him even in bad times because he is truly powerful.</text:p>
        <text:p text:style-name="P18">Prayer / Song</text:p>
        <text:p text:style-name="P16">Review Game</text:p>
        <text:p text:style-name="P7">Team Hot Potato</text:p>
        <text:p text:style-name="P24">Materials</text:p>
        <text:list xml:id="list162047341074672" text:continue-list="list162047945308450" text:style-name="Bullet_20_-_20_checkmark">
          <text:list-item>
            <text:p text:style-name="P33"><text:span text:style-name="T2">Ball</text:span> <text:s/>(Make a ball by tying wrappen (plastic bag) into knots many times, or fill an old sock with scrap material.)</text:p>
          </text:list-item>
          <text:list-item>
            <text:p text:style-name="P35">A drum, shaker, or anything to make music with.</text:p>
          </text:list-item>
        </text:list>
        <text:p text:style-name="P24">How to Play</text:p>
        <text:list xml:id="list162047330370214" text:continue-numbering="true" text:style-name="Bullet_20_-_20_checkmark">
          <text:list-item>
            <text:p text:style-name="P33">Divide the class into 2 teams. <text:s/>Pick 3 volunteers from each team.</text:p>
          </text:list-item>
          <text:list-item>
            <text:p text:style-name="P35">The 6 children will stand in a circle at the front of the room.</text:p>
          </text:list-item>
          <text:list-item>
            <text:p text:style-name="P35">The children will pass the ball from person to person in the circle as quickly as possible.</text:p>
          </text:list-item>
          <text:list-item>
            <text:p text:style-name="P35">Have a drummer not face the children and drum for a short time.</text:p>
          </text:list-item>
          <text:list-item>
            <text:p text:style-name="P35">When the drummer stops, the student holding the ball answers a question. <text:s/>If the answer is correct, that team gets a point.</text:p>
          </text:list-item>
          <text:list-item>
            <text:p text:style-name="P35">The drummer then starts to play again and the game continues.</text:p>
          </text:list-item>
          <text:list-item>
            <text:p text:style-name="P35">After playing 2 or 3 times, you can change the children in the circle. <text:s/>Have the chidren at the front sit down. <text:s/>Then, pick 3 different voluteers from each team.</text:p>
          </text:list-item>
          <text:list-item>
            <text:p text:style-name="P35">Continue playing the game.</text:p>
          </text:list-item>
          <text:list-item>
            <text:p text:style-name="P35">Record the points. <text:s/>The team with the most points wins.</text:p>
          </text:list-item>
          <text:list-item>
            <text:p text:style-name="P35">Be sure to clap for both sides. <text:s/>No name-calling. <text:s/>Encourage good sportsmanship.</text:p>
          </text:list-item>
        </text:list>
        <text:p text:style-name="P4">Questions for Review Game</text:p>
        <text:list xml:id="list124013956" text:style-name="L1">
          <text:list-item>
            <text:p text:style-name="P39">What did Jesus want to do with his disciples? (Cross the Sea of Galilee, a very large sea in Israel)</text:p>
          </text:list-item>
        </text:list>
        <text:p text:style-name="P2">What did Jesus want to do with his disciples? (Cross the Sea of Galilee, a very large sea in Israel)</text:p>
        <text:list xml:id="list162047725631306" text:continue-numbering="true" text:style-name="L1">
          <text:list-item>
            <text:p text:style-name="P39">What happened on their way across the sea? (A strong storm came on them with heavy winds, and large waves filled the boat with water.)</text:p>
          </text:list-item>
        </text:list>
        <text:p text:style-name="P2">What happened on their way across the sea? (A strong storm came on them with heavy winds, and large waves filled the boat with water.)</text:p>
        <text:list xml:id="list162046663698510" text:continue-numbering="true" text:style-name="L1">
          <text:list-item>
            <text:p text:style-name="P39">What was Jesus doing during the storm? (Jesus was sleeping.)</text:p>
          </text:list-item>
        </text:list>
        <text:p text:style-name="P2">What was Jesus doing during the storm? (Jesus was sleeping.)</text:p>
        <text:list xml:id="list162046563939452" text:continue-numbering="true" text:style-name="L1">
          <text:list-item>
            <text:p text:style-name="P39">How did the disciples feel? (Afraid)</text:p>
          </text:list-item>
        </text:list>
        <text:p text:style-name="P2">How did the disciples feel? (Afraid)</text:p>
        <text:list xml:id="list162046587960122" text:continue-numbering="true" text:style-name="L1">
          <text:list-item>
            <text:p text:style-name="P39"><text:soft-page-break/>What did the disciples do? (They woke Jesus up and told him that they were afraid.)</text:p>
          </text:list-item>
        </text:list>
        <text:p text:style-name="P2">What did the disciples do? (They woke Jesus up and told him that they were afraid.)</text:p>
        <text:list xml:id="list162048409164180" text:continue-numbering="true" text:style-name="L1">
          <text:list-item>
            <text:p text:style-name="P39">What did Jesus do? (Jesus commanded the storm to stop, and it did.)</text:p>
          </text:list-item>
        </text:list>
        <text:p text:style-name="P2">What did Jesus do? (Jesus commanded the storm to stop, and it did.)</text:p>
        <text:list xml:id="list162047290625305" text:continue-numbering="true" text:style-name="L1">
          <text:list-item>
            <text:p text:style-name="P39">Why do you think the disciples were afraid of the power that Jesus had? (They had never known anyone who had the power to control the wind and the sea.)</text:p>
          </text:list-item>
        </text:list>
        <text:p text:style-name="P2">Why do you think the disciples were afraid of the power that Jesus had? (They had never known anyone who had the power to control the wind and the sea.)</text:p>
        <text:list xml:id="list162046987780820" text:continue-numbering="true" text:style-name="L1">
          <text:list-item>
            <text:p text:style-name="P39">Jesus asked the disciples if they had no faith in him. What do you think it means, “to have faith?” (To trust, or have confidence in someone)</text:p>
          </text:list-item>
        </text:list>
        <text:p text:style-name="P2">Jesus asked the disciples if they had no faith in him. What do you think it means, “to have faith?” (To trust, or have confidence in someone)</text:p>
        <text:list xml:id="list162046799043563" text:continue-numbering="true" text:style-name="L1">
          <text:list-item>
            <text:p text:style-name="P39">If the disciples had faith in Jesus, how would they have reacted to the storm? (They would have not been afraid if they had faith. They would have rested just like Jesus was resting.)</text:p>
          </text:list-item>
        </text:list>
        <text:p text:style-name="P2">If the disciples had faith in Jesus, how would they have reacted to the storm? (They would have not been afraid if they had faith. They would have rested just like Jesus was resting.)</text:p>
        <text:list xml:id="list162047416804516" text:continue-numbering="true" text:style-name="L1">
          <text:list-item>
            <text:p text:style-name="P39">Is there something in your life that makes you afraid? If so, do you have faith that Jesus is in control, and that He has the power to overcome whatever that is? Let's pray now and tell Jesus what makes us afraid.</text:p>
          </text:list-item>
        </text:list>
        <text:p text:style-name="P2">Is there something in your life that makes you afraid? If so, do you have faith that Jesus is in control, and that He has the power to overcome whatever that is? Let's pray now and tell Jesus what makes us afraid.</text:p>
        <text:p text:style-name="P18">Song</text:p>
        <text:p text:style-name="P16">Memory Verse</text:p>
        <text:p text:style-name="P4">Materials and Preparations</text:p>
        <text:list xml:id="list162048016427456" text:continue-list="list162047330370214" text:style-name="Bullet_20_-_20_checkmark">
          <text:list-item>
            <text:p text:style-name="P31">Put a bookmark in <text:s/>Luke 8:25</text:p>
          </text:list-item>
          <text:list-item>
            <text:p text:style-name="P31">Write memory verse on the blackboard.</text:p>
          </text:list-item>
        </text:list>
        <text:p text:style-name="P15">Luke 8:25 In fear and amazement they asked one another, “Who is this? He commands even the winds and the water, and they obey him.”</text:p>
        <text:p text:style-name="P2">Luke 8:25 In fear and amazement they asked one another, “Who is this? He commands even the winds and the water, and they obey him.”</text:p>
        <text:p text:style-name="P3">Teach and Explain</text:p>
        <text:p text:style-name="P21">Our memory verse is in the Gospel of Luke. <text:s/>That is in the New Testament, a part of the Bible.</text:p>
        <text:p text:style-name="P5">Our memory verse is in the Gospel of Luke. <text:s/>That is in the New Testament, a part of the Bible.</text:p>
        <text:list xml:id="list2684085558" text:style-name="WWNum1">
          <text:list-item text:start-value="1">
            <text:p text:style-name="P36">Read the verse from your Bible.</text:p>
          </text:list-item>
          <text:list-item>
            <text:p text:style-name="P36">Read the verse by yourself as you point to the words.</text:p>
          </text:list-item>
          <text:list-item>
            <text:p text:style-name="P36">Read the verse with the children as you point to the words.</text:p>
          </text:list-item>
          <text:list-item>
            <text:p text:style-name="P36">Explain the verse:</text:p>
          </text:list-item>
        </text:list>
        <text:list xml:id="list162047798798809" text:continue-list="list162048016427456" text:style-name="Bullet_20_-_20_checkmark">
          <text:list-item>
            <text:p text:style-name="P37">Our memory verse comes from today’s Bible story.</text:p>
          </text:list-item>
        </text:list>
        <text:p text:style-name="P2">Our memory verse comes from today’s Bible story.</text:p>
        <text:list xml:id="list162048351255354" text:continue-numbering="true" text:style-name="Bullet_20_-_20_checkmark">
          <text:list-item>
            <text:p text:style-name="P31"><text:soft-page-break/>As you read the verse, circle the words shown below. <text:s/>Explain each of these words.</text:p>
          </text:list-item>
        </text:list>
        <text:list xml:id="list162048346614423" text:continue-list="list162046978873462" text:style-name="Bullet_20_-_20_Diamond">
          <text:list-item>
            <text:p text:style-name="P38"><text:span text:style-name="Body_20_Emphasized_20_-_20_Small">Fear and amazement: <text:s/></text:span>When we see great power at work, it makes us have feelings of fear because we know that we are weak. We also feel amazement because it is not normal to see that kind of power at work.</text:p>
          </text:list-item>
        </text:list>
        <text:p text:style-name="P12">Fear and amazement: <text:s/>When we see great power at work, it makes us have feelings of fear because we know that we are weak. We also feel amazement because it is not normal to see that kind of power at work.</text:p>
        <text:list xml:id="list162048392636621" text:continue-numbering="true" text:style-name="Bullet_20_-_20_Diamond">
          <text:list-item>
            <text:p text:style-name="P38"><text:span text:style-name="Body_20_Emphasized_20_-_20_Small">Who is this?: <text:s/></text:span>I would ask this too if I saw someone who could control the wind and the sea! Would you?</text:p>
          </text:list-item>
        </text:list>
        <text:p text:style-name="P12">Who is this?: <text:s/>I would ask this too if I saw someone who could control the wind and the sea! Would you?</text:p>
        <text:list xml:id="list162048022512795" text:continue-numbering="true" text:style-name="Bullet_20_-_20_Diamond">
          <text:list-item>
            <text:p text:style-name="P38"><text:span text:style-name="Body_20_Emphasized_20_-_20_Small">Command: <text:s/></text:span>This is like how a general commands an army. Jesus is in charge of everything; he commands everything.</text:p>
          </text:list-item>
        </text:list>
        <text:p text:style-name="P12">Command: <text:s/>This is like how a general commands an army. Jesus is in charge of everything; he commands everything.</text:p>
        <text:list xml:id="list162046601909140" text:continue-numbering="true" text:style-name="Bullet_20_-_20_Diamond">
          <text:list-item>
            <text:p text:style-name="P38"><text:span text:style-name="Body_20_Emphasized_20_-_20_Small">Obey: <text:s/></text:span>Because Jesus commands the wind and the sea, they must do what He says, they obey Him.</text:p>
          </text:list-item>
        </text:list>
        <text:p text:style-name="P12">Obey: <text:s/>Because Jesus commands the wind and the sea, they must do what He says, they obey Him.</text:p>
        <text:list xml:id="list162047355939919" text:continue-list="list2684085558" text:style-name="WWNum1">
          <text:list-item>
            <text:p text:style-name="P36">Read the verse again by yourself as you point to the words.</text:p>
          </text:list-item>
          <text:list-item>
            <text:p text:style-name="P36">Read the verse again with the children as you point to the words.</text:p>
          </text:list-item>
        </text:list>
        <text:p text:style-name="P6">Remember our truth for the day? <text:s/><text:span text:style-name="T5">Let’s all say it together:</text:span></text:p>
        <text:p text:style-name="P5">Remember our truth for the day? <text:s/>Let’s all say it together:</text:p>
        <text:p text:style-name="P6">Jesus has true power over nature.</text:p>
        <text:p text:style-name="P5">Jesus has true power over nature.</text:p>
        <text:p text:style-name="P16">Memory Verse Review</text:p>
        <text:p text:style-name="P3">Children Repeat the Verse by Playing “Groupings”</text:p>
        <text:list xml:id="list162048305409412" text:continue-list="list162048351255354" text:style-name="Bullet_20_-_20_checkmark">
          <text:list-item>
            <text:p text:style-name="P31">Talk about different ways to group people. (All boys, all girls, all children who ate fufu corn this week, all the children wearing read, all the children in class 2, etc.)</text:p>
          </text:list-item>
          <text:list-item>
            <text:p text:style-name="P34">Ask the children the first question.</text:p>
          </text:list-item>
          <text:list-item>
            <text:p text:style-name="P34">When a question is answered correctly, that child chooses one of the groups listed above or chooses their own group.</text:p>
          </text:list-item>
          <text:list-item>
            <text:p text:style-name="P34">The verse is said out loud together by the group chosen.</text:p>
          </text:list-item>
          <text:list-item>
            <text:p text:style-name="P34">Then the next question is asked.</text:p>
          </text:list-item>
          <text:list-item>
            <text:p text:style-name="P34">When that question is answered correctly, another child chooses one of the groups.</text:p>
          </text:list-item>
          <text:list-item>
            <text:p text:style-name="P34">The verse is said aloud again by the group chosen.</text:p>
          </text:list-item>
          <text:list-item>
            <text:p text:style-name="P34">Do this until all the questions are asked.</text:p>
          </text:list-item>
        </text:list>
        <text:p text:style-name="P4">Questions for Memory Verse</text:p>
        <text:list xml:id="list3267224290" text:style-name="L2">
          <text:list-item text:start-value="1">
            <text:p text:style-name="P40">What was the disciples reaction to the power that they saw when Jesus commanded the wind and the sea to be still? (Fear and amazement)</text:p>
          </text:list-item>
        </text:list>
        <text:p text:style-name="P2">What was the disciples reaction to the power that they saw when Jesus commanded the wind and the sea to be still? (Fear and amazement)</text:p>
        <text:list xml:id="list162048427380315" text:continue-numbering="true" text:style-name="L2">
          <text:list-item>
            <text:p text:style-name="P40">What question did the disciples ask when they saw that power? (“Who is this?”)</text:p>
          </text:list-item>
        </text:list>
        <text:p text:style-name="P2">What question did the disciples ask when they saw that power? (“Who is this?”)</text:p>
        <text:list xml:id="list162047020658049" text:continue-numbering="true" text:style-name="L2">
          <text:list-item>
            <text:p text:style-name="P40">What does it mean to “command” something? (To have control over something, like a general has control over an army)</text:p>
          </text:list-item>
        </text:list>
        <text:p text:style-name="P2">What does it mean to “command” something? (To have control over something, like a general has control over an army)</text:p>
        <text:list xml:id="list162047869101289" text:continue-numbering="true" text:style-name="L2">
          <text:list-item>
            <text:p text:style-name="P40"><text:soft-page-break/>When a general commands his army, what must they do? (Obey the general's commands)</text:p>
          </text:list-item>
        </text:list>
        <text:p text:style-name="P2">When a general commands his army, what must they do? (Obey the general's commands)</text:p>
        <text:list xml:id="list162047773789956" text:continue-numbering="true" text:style-name="L2">
          <text:list-item>
            <text:p text:style-name="P40">When Jesus commands us to do something, what must we do? (Obey what Jesus commands us to do)</text:p>
          </text:list-item>
        </text:list>
        <text:p text:style-name="P2">When Jesus commands us to do something, what must we do? (Obey what Jesus commands us to do)</text:p>
        <text:list xml:id="list162047845592802" text:continue-numbering="true" text:style-name="L2">
          <text:list-item>
            <text:p text:style-name="P40">When we read the stories in the Bible that show Jesus' great power, what should grow in us? (Faith in Jesus)</text:p>
          </text:list-item>
        </text:list>
        <text:p text:style-name="P2">When we read the stories in the Bible that show Jesus' great power, what should grow in us? (Faith in Jesus)</text:p>
        <text:p text:style-name="P18">Song</text:p>
        <text:p text:style-name="P16">Closing and Homework</text:p>
        <text:list xml:id="list162048135469422" text:continue-list="list162048305409412" text:style-name="Bullet_20_-_20_checkmark">
          <text:list-item>
            <text:p text:style-name="P31">Say the truth together:</text:p>
          </text:list-item>
        </text:list>
        <text:p text:style-name="P15">Jesus has true power over nature.</text:p>
        <text:p text:style-name="P2">Jesus has true power over nature.</text:p>
        <text:list xml:id="list162046691047652" text:continue-numbering="true" text:style-name="Bullet_20_-_20_checkmark">
          <text:list-item>
            <text:p text:style-name="P31">Say the memory verse together:</text:p>
          </text:list-item>
        </text:list>
        <text:p text:style-name="P15">Luke 8:25 In fear and amazement they asked one another, “Who is this? He commands even the winds and the water, and they obey him.”</text:p>
        <text:p text:style-name="P2">Luke 8:25 In fear and amazement they asked one another, “Who is this? He commands even the winds and the water, and they obey him.”</text:p>
        <text:list xml:id="list162048556383266" text:continue-numbering="true" text:style-name="Bullet_20_-_20_checkmark">
          <text:list-item>
            <text:p text:style-name="P31">Review the homework:</text:p>
          </text:list-item>
        </text:list>
        <text:p text:style-name="P15">As you go through the week, look around and see the beauty of everything God created. Thank him for this beauty. Give thanks also that Jesus showed us that he is God and that he has power over everything. Tell Jesus you trust him even in bad times because he is truly powerful.</text:p>
        <text:p text:style-name="P2">As you go through the week, look around and see the beauty of everything God created. Thank him for this beauty. Give thanks also that Jesus showed us that he is God and that he has power over everything. Tell Jesus you trust him even in bad times because he is truly powerful.</text:p>
        <text:list xml:id="list162047150203796" text:continue-numbering="true" text:style-name="Bullet_20_-_20_checkmark">
          <text:list-item>
            <text:p text:style-name="P31">Give any needed announcements.</text:p>
          </text:list-item>
        </text:list>
        <text:p text:style-name="P3">Closing Prayer</text:p>
        <text:p text:style-name="P8"><text:span text:style-name="Body_20_Emphasized_20_-_20_Small">Thank God <text:s/></text:span>that He has great power, including power over nature.</text:p>
        <text:p text:style-name="P8"><text:span text:style-name="Body_20_Emphasized_20_-_20_Small">Ask God <text:s/></text:span>that the children will remember to look for things in nature that remind them of this truth and thank Jesus for his power over everything.</text:p>
        <text:p text:style-name="P17">Colouring page to colour and take home!</text:p>
      </text:section>
      <text:p text:style-name="Body"/>
      <text:p text:style-name="P29">Jesus has true power over nature.</text:p>
      <text:p text:style-name="Bible_20_Story_20_-_20_Graphic_20_Number"><draw:frame draw:style-name="fr3" draw:name="Image2" text:anchor-type="as-char" svg:width="13.039cm" svg:height="12.839cm" draw:z-index="0"><draw:image xlink:href="Pictures/10000001000009EC000009980425AB3FA190A9D5.tif" xlink:type="simple" xlink:show="embed" xlink:actuate="onLoad" draw:mime-type="image/tiff"/></draw:frame></text:p>
      <text:p text:style-name="M.T._20_Coloring_20_Page_20_-_20_Memory_20_Verse">Luke 8:25 In fear and amazement they asked one another, “Who is this? He commands even the winds and the water, and they obey him.”</text:p>
      <text:p text:style-name="P30">Jesus has true power over nature.</text:p>
      <text:p text:style-name="Bible_20_Story_20_-_20_Graphic_20_Number"><draw:frame draw:style-name="fr3" draw:name="Image3" text:anchor-type="as-char" svg:width="13.039cm" svg:height="12.839cm" draw:z-index="1"><draw:image xlink:href="Pictures/10000001000009EC000009980425AB3FA190A9D5.tif" xlink:type="simple" xlink:show="embed" xlink:actuate="onLoad" draw:mime-type="image/tiff"/></draw:frame></text:p>
      <text:p text:style-name="M.T._20_Coloring_20_Page_20_-_20_Memory_20_Verse">Luke 8:25 In fear and amazement they asked one another, “Who is this? He commands even the winds and the water, and they obey hi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draw:gradient draw:name="Gradient_20_15" draw:display-name="Gradient 15" draw:style="linear" draw:start-color="#b3b3b3" draw:end-color="#ffffff" draw:start-intensity="100%" draw:end-intensity="100%" draw:angle="9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orphans="2" fo:widows="2" fo:hyphenation-ladder-count="no-limit" style:writing-mode="lr-tb">
        <style:tab-stops>
          <style:tab-stop style:position="1.134cm"/>
        </style:tab-stops>
      </style:paragraph-properties>
      <style:text-properties fo:color="#000000" loext:opacity="100%" style:font-name="Andika4" fo:font-family="Andika" style:font-style-name="Regular" style:font-pitch="variable" fo:font-size="10pt" fo:language="en" fo:country="US" style:font-name-asian="ヒラギノ角ゴ Pro W3" style:font-family-asian="'ヒラギノ角ゴ Pro W3'" style:font-family-generic-asian="system" style:font-pitch-asian="variable" style:font-size-asian="8.80000019073486pt" style:language-asian="en" style:country-asian="US"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style: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loext:hidden="true" style:hidden="true" style:parent-style-name="Text_20_body" style:default-outline-level="" style:class="list">
      <style:text-properties style:font-size-asian="12pt" style:font-name-complex="Lucida Sans" style:font-family-complex="'Lucida Sans'"/>
    </style:style>
    <style:style style:name="Caption" style:family="paragraph" loext:hidden="true" style:hidden="true"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loext:hidden="true" style:hidden="true" style:parent-style-name="Standard" style:default-outline-level="" style:class="index">
      <style:paragraph-properties text:number-lines="false" text:line-number="0"/>
      <style:text-properties style:font-size-asian="12pt" style:font-name-complex="Lucida Sans" style:font-family-complex="'Lucida Sans'"/>
    </style:style>
    <style:style style:name="Heading_20_1" style:display-name="Heading 1" style:family="paragraph" loext:hidden="true" style:hidden="true" style:parent-style-name="Heading" style:next-style-name="Body_20_Tight_20_lines" style:class="text" style:master-page-name="">
      <loext:graphic-properties draw:fill="solid" draw:fill-color="#b3b3b3" draw:opacity="100%"/>
      <style:paragraph-properties fo:margin-left="-0.182cm" fo:margin-right="0cm" fo:margin-top="0.381cm" fo:margin-bottom="0.203cm" style: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style: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loext:hidden="true"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style:contextual-spacing="false" fo:orphans="2" fo:widows="2" fo:hyphenation-ladder-count="no-limit" fo:text-indent="-0.801cm"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Body" style:family="paragraph" style:default-outline-level="" style:master-page-name="">
      <loext:graphic-properties draw:fill="none" draw:fill-color="#729fcf"/>
      <style:paragraph-properties fo:margin-left="0cm" fo:margin-right="0cm" fo:margin-top="0.049cm" fo:margin-bottom="0.101cm" style:contextual-spacing="false" fo:orphans="2" fo:widows="2" fo:hyphenation-ladder-count="no-limit" fo:text-indent="0cm" style:auto-text-indent="false" style:page-number="auto" fo:background-color="transparent" style:writing-mode="lr-tb">
        <style:tab-stops>
          <style:tab-stop style:position="1.27cm"/>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top="0cm" fo:margin-bottom="0cm" style: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1cm" fo:margin-right="0cm" fo:margin-top="0cm" fo:margin-bottom="0cm" style:contextual-spacing="false" fo:orphans="0" fo:widows="0" fo:hyphenation-ladder-count="no-limit" fo:text-indent="-0.499cm"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loext:hyphenation-no-last-word="false" loext:hyphenation-word-char-count="no-limit" loext:hyphenation-zone="no-limi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style: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loext:hidden="true" style:hidden="true" style:parent-style-name="Standard" style:default-outline-level="" style:class="extra">
      <style:paragraph-properties fo:margin-left="0cm" fo:margin-right="0cm" fo:margin-top="0cm" fo:margin-bottom="0.102cm" style: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9.525cm" style:type="center"/>
          <style:tab-stop style:position="17.394cm" style:type="right"/>
        </style:tab-stops>
      </style:paragraph-properties>
      <style:text-properties style:font-name="Andika4"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style:contextual-spacing="false" fo:text-indent="0cm" style:auto-text-indent="false"/>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style: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cm" fo:margin-bottom="0.101cm"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style:contextual-spacing="false" fo:orphans="2" fo:widows="2" fo:text-indent="0cm" style:auto-text-indent="false">
        <style:tab-stops>
          <style:tab-stop style:position="2.522cm"/>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style: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loext:hyphenation-no-last-word="false" loext:hyphenation-word-char-count="no-limit" loext:hyphenation-zone="no-limit"/>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cm" fo:margin-right="0cm" fo:margin-top="0cm" fo:margin-bottom="0cm" style:contextual-spacing="false" fo:text-align="start" style:justify-single-word="false" fo:orphans="2" fo:widows="2" fo:hyphenation-ladder-count="no-limit" fo:text-indent="0.199cm" style:auto-text-indent="false" style:page-number="auto" fo:break-before="auto" fo:break-after="auto" fo:background-color="#5a5a5a" fo:padding="0cm"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style: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style: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style: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style: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style: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style: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cm" fo:margin-bottom="0cm" style:contextual-spacing="true" style:page-number="auto" fo:background-color="#ffffcc" fo:keep-with-next="auto">
        <style:tab-stops>
          <style:tab-stop style:position="6.366cm"/>
        </style:tab-stops>
      </style:paragraph-properties>
      <style:text-properties style:font-name="Andika4" fo:font-family="Andika"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style: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loext:hyphenation-no-last-word="false" loext:hyphenation-word-char-count="no-limit" loext:hyphenation-zone="no-limi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ody_20_Bullet_20_-_20_Checkmark" style:display-name="Body Bullet - Checkmark" style:family="paragraph" style:parent-style-name="Body" style:next-style-name="Body_20_Bullet_20_-_20_Checkmark_20_-_20_No_20_follow" style:default-outline-level="" style:list-style-name="Bullet_20_-_20_checkmark" style:master-page-name="">
      <loext:graphic-properties draw:fill="none" draw:fill-color="#ffffff"/>
      <style:paragraph-properties fo:margin-left="1.199cm" fo:margin-right="0cm" fo:margin-top="0cm" fo:margin-bottom="0cm" style:contextual-spacing="true" fo:orphans="2" fo:widows="2" fo:hyphenation-ladder-count="no-limit" fo:text-indent="-0.499cm" style:auto-text-indent="false" style:page-number="auto" fo:background-color="transparent" fo:keep-with-next="always" style:writing-mode="lr-tb">
        <style:tab-stops>
          <style:tab-stop style:position="1.203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loext:hyphenation-no-last-word="false" loext:hyphenation-word-char-count="no-limit" loext:hyphenation-zone="no-limit"/>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style:contextual-spacing="false" fo:text-align="end" style:justify-single-word="false" fo:text-indent="0cm"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style:contextual-spacing="false" fo:text-align="center" style:justify-single-word="false" fo:text-indent="0cm" style:auto-text-indent="false">
        <style:tab-stops/>
      </style:paragraph-properties>
      <style:text-properties fo:font-weight="bold" style:font-weight-asian="bold" style:font-weight-complex="bold"/>
    </style:style>
    <style:style style:name="Body_20_Translated" style:display-name="Body Translated" style:family="paragraph" style:parent-style-name="Body" style:auto-update="true">
      <style:paragraph-properties fo:margin-top="0.152cm" fo:margin-bottom="0cm" style:contextual-spacing="false"/>
      <style:text-properties fo:font-weight="normal" style:font-weight-asian="normal" style:font-weight-complex="normal"/>
    </style:style>
    <style:style style:name="M.T._20_Text_20_-_20_Checkmark_20_bullet" style:display-name="M.T. Text - Checkmark bullet" style:family="paragraph" style:parent-style-name="M.T._20_Text" style:default-outline-level="" style:list-style-name="Bullet_20_-_20_checkmark" style:master-page-name="">
      <loext:graphic-properties draw:opacity="100%"/>
      <style:paragraph-properties fo:margin-left="1.3cm" fo:margin-right="0cm" fo:margin-top="0cm" fo:margin-bottom="0cm" style:contextual-spacing="tru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1.799cm" fo:margin-right="0cm" fo:margin-top="0cm" fo:margin-bottom="0cm" style:contextual-spacing="fals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 style:display-name="M.T. Text - Numbered List" style:family="paragraph" style:parent-style-name="M.T._20_Text" style:list-style-name="" style:master-page-name="">
      <style:paragraph-properties style:page-number="auto" fo:keep-with-next="always"/>
    </style:style>
    <style:style style:name="English_20_Translation_20_-_20_double_20_inset" style:display-name="English Translation - double inset" style:family="paragraph" style:parent-style-name="English_20_translation" style:default-outline-level="" style:master-page-name="">
      <style:paragraph-properties fo:margin-left="1.7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single_20_inset" style:display-name="English Translation - single inset" style:family="paragraph" style:parent-style-name="English_20_translation" style:default-outline-level="" style:master-page-name="">
      <style:paragraph-properties fo:margin-left="1.3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cm" fo:margin-right="0cm" fo:margin-top="0.3cm" fo:margin-bottom="0.199cm" style:contextual-spacing="true" fo:orphans="2" fo:widows="2" fo:hyphenation-ladder-count="no-limit" fo:text-indent="0.199cm" style:auto-text-indent="false" style:page-number="auto" fo:background-color="#d9d9d9" fo:keep-with-next="always" style:writing-mode="lr-tb">
        <style:tab-stops>
          <style:tab-stop style:position="1.134cm"/>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Sub-Head_20_2" style:display-name="Sub-Head 2" style:family="paragraph" style:parent-style-name="Sub-Head_20_1">
      <style:paragraph-properties fo:margin-left="0cm" fo:margin-right="0cm" fo:margin-top="0.101cm" fo:margin-bottom="0cm" style:contextual-spacing="false" fo:text-indent="0cm"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30000019073486pt" style:font-size-complex="6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list-style-name="Outline"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499cm" fo:margin-right="0cm" fo:margin-top="0cm" fo:margin-bottom="0cm" style:contextual-spacing="false" fo:orphans="2" fo:widows="2" fo:hyphenation-ladder-count="no-limit" fo:text-indent="-0.499cm" style:auto-text-indent="false" fo:background-color="transparent" fo:keep-with-next="always" style:writing-mode="lr-tb">
        <style:tab-stops>
          <style:tab-stop style:position="1.203cm"/>
        </style:tab-stops>
      </style:paragraph-properties>
      <style:text-properties style:font-name="Andika4" fo:font-family="Andika" style:font-style-name="Regular" style:font-pitch="variable" fo:hyphenate="false" fo:hyphenation-remain-char-count="2" fo:hyphenation-push-char-count="2" loext:hyphenation-no-caps="false" loext:hyphenation-no-last-word="false" loext:hyphenation-word-char-count="no-limit" loext:hyphenation-zone="no-limit"/>
    </style:style>
    <style:style style:name="M.T._20_Text_20_-_20_Table_20_Single_20_Inset" style:display-name="M.T. Text - Table Single Inset" style:family="paragraph" style:parent-style-name="M.T._20_Text" style:master-page-name="">
      <style:paragraph-properties fo:margin-left="0.499cm" fo:margin-right="0cm" fo:text-indent="0cm" style:auto-text-indent="false" style:page-number="auto"/>
    </style:style>
    <style:style style:name="M.T._20_Text_20_-_20_Single_20_Inset" style:display-name="M.T. Text - Single Inset" style:family="paragraph" style:parent-style-name="M.T._20_Text" style:master-page-name="">
      <loext:graphic-properties draw:fill="solid" draw:fill-color="#ffffcc"/>
      <style:paragraph-properties fo:margin-left="1.251cm" fo:margin-right="0cm" fo:text-indent="0cm" style:auto-text-indent="false" style:page-number="auto" fo:background-color="#ffffcc" fo:keep-with-next="always"/>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Table_20_single_20_inset" style:display-name="English Translation - Table single inset" style:family="paragraph" style:parent-style-name="English_20_translation" style:default-outline-level="" style:master-page-name="">
      <style:paragraph-properties fo:margin-left="0.4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reak-before="auto" fo:break-after="auto" fo:background-color="transparent" style:vertical-align="bottom" style:writing-mode="lr-tb">
        <style:tab-stops>
          <style:tab-stop style:position="1.134cm"/>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style: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style:master-page-name="">
      <loext:graphic-properties draw:opacity="100%"/>
      <style:paragraph-properties fo:margin-top="0cm" fo:margin-bottom="0cm" style:contextual-spacing="tru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M.T._20_Text_20_-_20_Bullet" style:display-name="M.T. Text - Bullet" style:family="paragraph" style:parent-style-name="M.T._20_Text" style:auto-update="true" style:master-page-name="">
      <style:paragraph-properties style:page-number="auto" fo:keep-with-next="always"/>
      <style:text-properties fo:background-color="transparent"/>
    </style:style>
    <style:style style:name="M.T._20_Text_20_-_20_Bullet_20_Dot" style:display-name="M.T. Text - Bullet Dot" style:family="paragraph" style:parent-style-name="M.T._20_Text" style:next-style-name="English_20_translation" style:list-style-name="Bullet_20_-_20_Dot" style:master-page-name="">
      <loext:graphic-properties draw:opacity="100%"/>
      <style:paragraph-properties style:page-number="auto" fo:keep-with-next="always"/>
    </style:style>
    <style:style style:name="Body_20_-_20_Large_20_Spacer" style:display-name="Body - Large Spacer" style:family="paragraph" style:parent-style-name="Body" style:class="text">
      <style:paragraph-properties fo:margin-top="0.499cm" fo:margin-bottom="0cm" style:contextual-spacing="false"/>
    </style:style>
    <style:style style:name="Body_20_-_20_1st_20_Line_20_Indent" style:display-name="Body - 1st Line Indent" style:family="paragraph" style:parent-style-name="Body" style:default-outline-level="">
      <style:paragraph-properties fo:margin-left="0cm" fo:margin-right="0cm" fo:margin-top="0.049cm" fo:margin-bottom="0.199cm" style: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1_20_No_20_follow" style:display-name="Sub-Head 1 No follow" style:family="paragraph" style:parent-style-name="Sub-Head_20_1" style:auto-update="true"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uto" style:writing-mode="lr-tb">
        <style:tab-stops>
          <style:tab-stop style:position="1.134cm"/>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Footer" style:display-name="Coloring Page Footer" style:family="paragraph" style:parent-style-name="Footer" style:default-outline-level="">
      <loext:graphic-properties draw:fill="none" draw:fill-color="#729fcf"/>
      <style:paragraph-properties fo:margin-left="0.499cm" fo:margin-right="0cm" fo:margin-top="0cm" fo:margin-bottom="0cm" style:contextual-spacing="false" fo:orphans="2" fo:widows="2" fo:hyphenation-ladder-count="no-limit" fo:text-indent="0cm" style:auto-text-indent="false" fo:background-color="transparent" style:writing-mode="lr-tb">
        <style:tab-stops>
          <style:tab-stop style:position="14.91cm"/>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cm" fo:margin-right="0cm" fo:margin-top="0.101cm" fo:margin-bottom="0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style: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Indented" style:display-name="English Translation - Indented" style:family="paragraph" style:parent-style-name="English_20_translation" style:default-outline-level="" style:master-page-name="">
      <loext:graphic-properties draw:fill="none" draw:fill-color="#729fcf"/>
      <style:paragraph-properties fo:margin-left="0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officeooo:rsid="015eaa71" fo:hyphenate="false" fo:hyphenation-remain-char-count="2" fo:hyphenation-push-char-count="2" loext:hyphenation-no-caps="false" loext:hyphenation-no-last-word="false" loext:hyphenation-word-char-count="no-limit" loext:hyphenation-zone="no-limit"/>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635cm" fo:margin-right="0cm" fo:margin-top="0cm" fo:margin-bottom="0cm" style:contextual-spacing="false" fo:orphans="2" fo:widows="2" fo:hyphenation-ladder-count="no-limit" fo:text-indent="-0.635cm" style:auto-text-indent="false" fo:background-color="#ffffff" fo:keep-with-next="always" style:writing-mode="lr-tb">
        <style:tab-stops>
          <style:tab-stop style:position="0.6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cm" draw:fill-image-height="0cm"/>
      <style:paragraph-properties fo:margin-left="3.6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3.6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Bible_20_Story" style:display-name="M.T Bible Story" style:family="paragraph" style:parent-style-name="English_20_translation">
      <style:paragraph-properties fo:margin-left="0cm" fo:margin-right="0cm" fo:margin-top="0cm" fo:margin-bottom="0cm" style:contextual-spacing="false" fo:text-indent="0cm" style:auto-text-indent="false"/>
      <style:text-properties fo:font-size="10pt" fo:font-style="normal" style:font-size-asian="10pt" style:font-style-asian="normal" style:font-size-complex="10pt" style:font-style-complex="normal"/>
    </style:style>
    <style:style style:name="M.T._20_Application" style:display-name="M.T. Application" style:family="paragraph" style:parent-style-name="English_20_translation">
      <style:paragraph-properties fo:margin-left="0cm" fo:margin-right="0cm" fo:margin-top="0cm" fo:margin-bottom="0cm" style:contextual-spacing="false" fo:text-indent="0cm" style:auto-text-indent="false"/>
      <style:text-properties fo:font-size="10pt" fo:font-style="normal" fo:font-weight="normal" style:font-size-asian="10pt" style:font-style-asian="normal" style:font-weight-asian="bold" style:font-size-complex="10pt" style:font-style-complex="normal" style:font-weight-complex="bold"/>
    </style:style>
    <style:style style:name="Sub-Head_20_-_20_Coloring_20_page_20_last_20_paragraph" style:display-name="Sub-Head - Coloring page last paragraph" style:family="paragraph" style:parent-style-name="Sub-Head_20_1_20_No_20_follow">
      <style:paragraph-properties fo:margin-top="0.3cm" fo:margin-bottom="0cm" style:contextual-spacing="false"/>
    </style:style>
    <style:style style:name="M.T._20_Text_20_-_20_Lesson_20_Title_20_Scrip_20_Reference" style:display-name="M.T. Text - Lesson Title Scrip Reference" style:family="paragraph" style:parent-style-name="M.T._20_Text" style:default-outline-level="">
      <style:paragraph-properties fo:margin-left="0cm" fo:margin-right="0cm" fo:margin-top="0cm" fo:margin-bottom="0.3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Centered" style:display-name="M.T. Text - Centered" style:family="paragraph" style:parent-style-name="M.T._20_Text" style:master-page-name="">
      <style:paragraph-properties fo:text-align="center" style:justify-single-word="false" style:page-number="auto" fo:keep-with-next="always"/>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cm" fo:margin-right="0cm" fo:margin-top="0cm" fo:margin-bottom="0cm" style:contextual-spacing="false" fo:text-align="start"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cm" fo:margin-right="0cm" fo:margin-top="0cm" fo:margin-bottom="0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cm" fo:margin-right="0.199cm" fo:margin-top="0.101cm" fo:margin-bottom="0.101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ray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1" style:font-family-complex="'Liberation Sans'" style:font-family-generic-complex="system" style:font-pitch-complex="variable" style:font-size-complex="12p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1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Example_20_text" style:display-name="Example text" style:family="paragraph" style:parent-style-name="M.T._20_Text">
      <style:paragraph-properties fo:margin-left="0cm" fo:margin-right="0cm" fo:margin-top="0.101cm" fo:margin-bottom="0cm" style:contextual-spacing="false" fo:orphans="2" fo:widows="2" fo:hyphenation-ladder-count="no-limit" fo:text-indent="0cm" style:auto-text-indent="false" style:writing-mode="lr-tb">
        <style:tab-stops>
          <style:tab-stop style:position="6.366cm"/>
        </style:tab-stops>
      </style:paragraph-properties>
      <style:text-properties fo:background-color="transparent" fo:hyphenate="false" fo:hyphenation-remain-char-count="2" fo:hyphenation-push-char-count="2" loext:hyphenation-no-caps="false" loext:hyphenation-no-last-word="false" loext:hyphenation-word-char-count="no-limit" loext:hyphenation-zone="no-limit"/>
    </style:style>
    <style:style style:name="Table_20_of_20_Lessons_20_-_20_Numbers" style:display-name="Table of Lessons - Numbers" style:family="paragraph" style:parent-style-name="Table_20_of_20_Lessons">
      <style:paragraph-properties fo:margin-top="0cm" fo:margin-bottom="0cm"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199cm" fo:margin-right="0cm" fo:margin-top="0cm" fo:margin-bottom="0cm" style:contextual-spacing="false" fo:text-align="start" style:justify-single-word="false" fo:orphans="2" fo:widows="2" fo:hyphenation-ladder-count="no-limit" fo:text-indent="0cm" style:auto-text-indent="false" style:page-number="auto" style:writing-mode="lr-tb">
        <style:tab-stops>
          <style:tab-stop style:position="1.3cm"/>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loext:hyphenation-no-last-word="false" loext:hyphenation-word-char-count="no-limit" loext:hyphenation-zone="no-limit"/>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199cm" fo:margin-right="0cm" fo:margin-top="0cm" fo:margin-bottom="0.101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loext:hyphenation-no-last-word="false" loext:hyphenation-word-char-count="no-limit" loext:hyphenation-zone="no-limit"/>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fo:keep-with-next="always" text:number-lines="false" text:line-number="0" style:writing-mode="lr-tb">
        <style:tab-stops>
          <style:tab-stop style:position="1.27cm"/>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Front_20_Matter_20_footer" style:display-name="Front Matter footer" style:family="paragraph" style:parent-style-name="Footer" style:master-page-name="">
      <style:paragraph-properties style:page-number="auto">
        <style:tab-stops>
          <style:tab-stop style:position="9.188cm" style:type="center"/>
          <style:tab-stop style:position="17.394cm" style:type="right"/>
        </style:tab-stops>
      </style:paragraph-properties>
    </style:style>
    <style:style style:name="Drawing"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font-name="Lucida Sans1" fo:font-family="'Lucida Sans'"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cripture_20_References" style:display-name="Scripture References" style:family="paragraph" style:parent-style-name="Table_20_of_20_Lessons"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25pt" style:font-size-complex="6pt"/>
    </style:style>
    <style:style style:name="English_20_translation_20_-_20_indent" style:display-name="English translation - indent" style:family="paragraph" style:parent-style-name="English_20_translation" style:default-outline-level="">
      <style:paragraph-properties fo:margin-left="1.3cm" fo:margin-right="0cm" fo:margin-top="0cm" fo:margin-bottom="0.101cm" style:contextual-spacing="false" fo:text-align="start" style:justify-single-word="false" fo:orphans="2" fo:widows="2" fo:hyphenation-ladder-count="no-limit" fo:text-indent="0cm"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M.T._20_Lesson_20_Title" style:display-name="M.T. Lesson Title" style:family="paragraph" style:parent-style-name="M.T._20_Text" style:default-outline-level="" style:master-page-name="">
      <loext:graphic-properties draw:fill-image-width="0cm" draw:fill-image-height="0cm"/>
      <style:paragraph-properties fo:margin-left="0cm" fo:margin-right="0cm" fo:margin-top="0.3cm" fo:margin-bottom="0cm" style:contextual-spacing="false" fo:orphans="0" fo:widows="0" fo:hyphenation-ladder-count="no-limit" fo:text-indent="0cm" style:auto-text-indent="false" style:page-number="auto" style:shadow="none" style:vertical-align="auto" style:writing-mode="lr-tb">
        <style:tab-stops>
          <style:tab-stop style:position="1.134cm"/>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M.T._20_Lesson_20_title_20_-_20_invisible" style:display-name="M.T. Lesson title - invisible" style:family="paragraph" style:parent-style-name="M.T._20_Text" style:next-style-name="Part_20_Heading" style:auto-update="true" style:default-outline-level="1" style:list-style-name="Outline"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0cm" fo:margin-right="0cm" fo:text-indent="0cm"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cm" fo:margin-right="0cm" fo:text-align="end" style:justify-single-word="false" fo:text-indent="0cm"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cm" fo:margin-right="0cm" fo:margin-top="0cm" fo:margin-bottom="0.049cm" style:contextual-spacing="true" fo:text-align="end"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0cm" fo:margin-right="0cm" fo:margin-top="0cm" fo:margin-bottom="0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M.T._20_Coloring_20_Page_20_-_20_Truth" style:display-name="M.T. Coloring Page - Truth" style:family="paragraph" style:parent-style-name="M.T._20_Text"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M.T._20_Coloring_20_Page_20_-_20_Memory_20_Verse" style:display-name="M.T. Coloring Page - Memory Verse" style:family="paragraph" style:parent-style-name="M.T._20_Coloring_20_Page_20_-_20_Truth" style:default-outline-level="">
      <style:paragraph-properties fo:margin-left="0.4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27cm"/>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199cm" loext:padding-right="0.349cm" loext:padding-top="0.349cm" loext:padding-bottom="0.199cm" loext:border="non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8_20_pt" style:display-name="Body 8 pt" style:family="text">
      <style:text-properties fo:color="#000000" loext:opacity="100%" style:font-name="Andika4" fo:font-family="Andika" style:font-style-name="Regular" style:font-pitch="variable" fo:font-size="8pt" fo:language="en" fo:country="US" fo:font-style="normal" fo:font-weight="normal" style:font-name-asian="ヒラギノ角ゴ Pro W3" style:font-family-asian="'ヒラギノ角ゴ Pro W3'" style:font-family-generic-asian="system" style:font-pitch-asian="variable" style:font-size-asian="8pt" style:language-asian="en" style:country-asian="US" style:font-style-asian="normal" style:font-weight-asian="normal" style:font-name-complex="Times New Roman2" style:font-family-complex="'Times New Roman'" style:font-family-generic-complex="system" style:font-pitch-complex="variable" style:font-size-complex="8pt" style:language-complex="hi" style:country-complex="IN" style:font-style-complex="normal" style:font-weight-complex="normal"/>
    </style:style>
    <style:style style:name="Graphics" style:family="graphic">
      <style:graphic-properties svg:width="3cm" fo:min-height="3cm" text:anchor-type="paragraph" svg:x="-0.24cm" svg:y="-0.071cm"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Badge_20_Graphic" style:display-name="Badge Graphic" style:family="graphic" style:parent-style-name="Graphics">
      <style:graphic-properties svg:width="1.401cm" fo:min-height="0.041cm" text:anchor-type="as-char" svg:x="0cm" svg:y="-1.251cm" style:vertical-pos="from-top" style:horizontal-pos="from-left"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ible_5f_Story_5f_Box" style:display-name="Bible_Story_Box" style:family="graphic" style:parent-style-name="Frame">
      <style:graphic-properties svg:width="3.5cm" fo:min-height="3.062cm" svg:x="-0.046cm" svg:y="0.009cm" fo:margin-left="0cm" fo:margin-right="0.101cm" fo:margin-top="0cm" fo:margin-bottom="0cm"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cm" fo:border="none" draw:wrap-influence-on-position="once-concurrent" loext:allow-overlap="false">
        <style:columns fo:column-count="1" fo:column-gap="0cm"/>
      </style:graphic-properties>
    </style:style>
    <style:style style:name="Bible_5f_Story_5f_Picture" style:display-name="Bible_Story_Picture" style:family="graphic" style:parent-style-name="Graphics">
      <style:graphic-properties svg:width="3.281cm" fo:min-height="2.379cm" svg:x="0cm" svg:y="-2.379cm" fo:margin-left="0cm" fo:margin-right="0cm" fo:margin-top="0cm" fo:margin-bottom="0cm"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Lesson_5f_Number" style:display-name="Lesson_Number" style:family="graphic" style:parent-style-name="Frame">
      <style:graphic-properties svg:width="2.672cm" svg:height="2.538cm" svg:x="0cm" svg:y="0.25cm" fo:margin-left="0cm" fo:margin-right="0.199cm" fo:margin-top="0cm" fo:margin-bottom="0cm"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15cm" fo:border="none" style:flow-with-text="true" draw:wrap-influence-on-position="once-concurrent" loext:allow-overlap="false" draw:textarea-vertical-align="middle">
        <style:columns fo:column-count="1" fo:column-gap="0cm"/>
      </style:graphic-properties>
    </style:style>
    <style:style style:name="Number_20_Graphic" style:display-name="Number Graphic" style:family="graphic" style:parent-style-name="Graphics">
      <style:graphic-properties svg:width="2.731cm" fo:min-height="2.731cm" svg:x="0cm" svg:y="0.041cm" fo:margin-left="0cm" fo:margin-right="0.101cm" fo:margin-top="0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cm"/>
      </style:graphic-properties>
    </style:style>
    <style:style style:name="Bullseye_20_graphic" style:display-name="Bullseye graphic" style:family="graphic" style:parent-style-name="Graphics">
      <style:graphic-properties svg:width="3cm" fo:min-height="3cm" svg:x="14.501cm" svg:y="-1cm" fo:margin-left="0.25cm" fo:margin-right="0cm" fo:margin-top="0cm" fo:margin-bottom="0cm"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Coloring_20_Page_20_picture" style:display-name="Coloring Page picture" style:family="graphic" style:parent-style-name="Graphics">
      <style:graphic-properties svg:width="13.351cm" fo:min-height="13.788cm" svg:x="0cm" svg:y="-6.893cm" fo:margin-left="0cm" fo:margin-right="0cm" fo:margin-top="0cm" fo:margin-bottom="0cm"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Long_20_Jump_20_Graphic" style:display-name="Long Jump Graphic" style:family="graphic" style:parent-style-name="Graphics">
      <style:graphic-properties svg:width="5.001cm" fo:min-height="3.641cm" svg:x="12.501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Bowling_20_Pins_20_Graphic" style:display-name="Bowling Pins Graphic" style:family="graphic" style:parent-style-name="Graphics">
      <style:graphic-properties svg:width="3.505cm" fo:min-height="4.23cm" svg:x="13.996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Tic-Tac-Toe_20_graphic" style:display-name="Tic-Tac-Toe graphic" style:family="graphic" style:parent-style-name="Graphics">
      <style:graphic-properties svg:width="3cm" fo:min-height="3cm" svg:x="14.501cm" svg:y="-0.499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Front_20_matter_20_frames" style:display-name="Front matter frames" style:family="graphic" style:parent-style-name="Frame">
      <style:graphic-properties svg:width="17.501cm" style:rel-width="100%" fo:min-height="0.499cm" svg:x="0cm" svg:y="1.545cm" fo:margin-left="0.201cm" fo:margin-right="0.201cm" fo:margin-top="0.201cm" fo:margin-bottom="0.201cm" style:wrap="parallel" style:number-wrapped-paragraphs="no-limit" style:wrap-contour="false" style:vertical-pos="middle" style:vertical-rel="page-content" style:horizontal-pos="center" style:horizontal-rel="paragraph" fo:background-color="transparent" draw:fill="none" draw:fill-color="#729fcf" fo:padding="0.15cm" fo:border="none" loext:rel-width-rel="paragraph"/>
    </style:style>
    <style:style style:name="CC_20_Logo" style:display-name="CC Logo" style:family="graphic" style:parent-style-name="Graphics">
      <style:graphic-properties svg:width="2.378cm" fo:min-height="0.838cm" svg:x="0cm" svg:y="0.15cm" fo:margin-left="0cm" fo:margin-right="0.3cm" fo:margin-top="0cm" fo:margin-bottom="0.499cm"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1.27cm"/>
        </style:list-level-properties>
        <style:text-properties style:font-name="Aria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6cm" fo:text-indent="-0.635cm" fo:margin-left="2.656cm"/>
        </style:list-level-properties>
        <style:text-properties style:font-name="Aria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91cm" fo:text-indent="-0.635cm" fo:margin-left="3.291cm"/>
        </style:list-level-properties>
        <style:text-properties style:font-name="Aria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6cm" fo:text-indent="-0.635cm" fo:margin-left="3.926cm"/>
        </style:list-level-properties>
        <style:text-properties style:font-name="Aria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61cm" fo:text-indent="-0.635cm" fo:margin-left="4.561cm"/>
        </style:list-level-properties>
        <style:text-properties style:font-name="Aria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6cm" fo:text-indent="-0.635cm" fo:margin-left="5.196cm"/>
        </style:list-level-properties>
        <style:text-properties style:font-name="Aria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31cm" fo:text-indent="-0.635cm" fo:margin-left="5.831cm"/>
        </style:list-level-properties>
        <style:text-properties style:font-name="Aria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6cm" fo:text-indent="-0.635cm" fo:margin-left="6.466cm"/>
        </style:list-level-properties>
        <style:text-properties style:font-name="Aria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01cm" fo:text-indent="-0.635cm" fo:margin-left="7.101cm"/>
        </style:list-level-properties>
        <style:text-properties style:font-name="Aria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6cm" fo:text-indent="-0.635cm" fo:margin-left="7.736cm"/>
        </style:list-level-properties>
        <style:text-properties style:font-name="Arial2"/>
      </text:list-level-style-bullet>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esson_20_Overview.1" style:display-name="Lesson Overview.1"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2" style:display-name="Lesson Overview.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3" style:display-name="Lesson Overview.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4" style:display-name="Lesson Overview.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5" style:display-name="Lesson Overview.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6" style:display-name="Lesson Overview.6"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7" style:display-name="Lesson Overview.7"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8" style:display-name="Lesson Overview.8"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9" style:display-name="Lesson Overview.9"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0" style:display-name="Lesson Overview.10"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1" style:display-name="Lesson Overview.11"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2" style:display-name="Lesson Overview.1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3" style:display-name="Lesson Overview.1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4" style:display-name="Lesson Overview.1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5" style:display-name="Lesson Overview.1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6" style:display-name="Lesson Overview.16"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table:table-template table:name="Lesson Overview" table:first-row-end-column="row" table:first-row-start-column="column" table:last-row-end-column="row" table:last-row-start-column="column">
      <table:first-row table:style-name="Lesson_20_Overview.1"/>
      <table:last-row table:style-name="Lesson_20_Overview.2"/>
      <table:first-column table:style-name="Lesson_20_Overview.3"/>
      <table:last-column table:style-name="Lesson_20_Overview.4"/>
      <table:body table:style-name="Lesson_20_Overview.9"/>
      <table:even-rows table:style-name="Lesson_20_Overview.5"/>
      <table:odd-rows table:style-name="Lesson_20_Overview.6"/>
      <table:even-columns table:style-name="Lesson_20_Overview.7"/>
      <table:odd-columns table:style-name="Lesson_20_Overview.8"/>
      <table:background table:style-name="Lesson_20_Overview.10"/>
      <loext:first-row-even-column table:style-name="Lesson_20_Overview.15"/>
      <loext:last-row-even-column table:style-name="Lesson_20_Overview.16"/>
      <loext:first-row-end-column table:style-name="Lesson_20_Overview.12"/>
      <loext:first-row-start-column table:style-name="Lesson_20_Overview.11"/>
      <loext:last-row-end-column table:style-name="Lesson_20_Overview.14"/>
      <loext:last-row-start-column table:style-name="Lesson_20_Overview.13"/>
    </table:table-template>
    <style:default-page-layout>
      <style:page-layout-properties style:writing-mode="lr-tb" style:layout-grid-standard-mode="true"/>
    </style:default-page-layout>
  </office:styles>
  <office:automatic-styles>
    <style:style style:name="Table4" style:family="table">
      <style:table-properties style:width="17.501cm" table:align="margins" style:writing-mode="lr-tb"/>
    </style:style>
    <style:style style:name="Table4.A" style:family="table-column">
      <style:table-column-properties style:column-width="2.6cm" style:rel-column-width="9735*"/>
    </style:style>
    <style:style style:name="Table4.B" style:family="table-column">
      <style:table-column-properties style:column-width="14.901cm" style:rel-column-width="55800*"/>
    </style:style>
    <style:style style:name="Table4.A1" style:family="table-cell">
      <style:table-cell-properties fo:padding="0.097cm" fo:border="none"/>
    </style:style>
    <style:style style:name="MP1" style:family="paragraph" style:parent-style-name="Coloring_20_Page_20_Footer">
      <style:text-properties officeooo:paragraph-rsid="02b4e089"/>
    </style:style>
    <style:style style:name="MP2" style:family="paragraph" style:parent-style-name="M.T._20_Text">
      <style:text-properties officeooo:paragraph-rsid="029f899c"/>
    </style:style>
    <style:style style:name="MP3" style:family="paragraph" style:parent-style-name="Body">
      <style:text-properties fo:font-size="8pt" officeooo:paragraph-rsid="029f899c" style:font-size-asian="8pt" style:font-size-complex="8pt"/>
    </style:style>
    <style:style style:name="M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2" style:family="text">
      <style:text-properties officeooo:rsid="0184d68b"/>
    </style:style>
    <style:style style:name="MT3" style:family="text">
      <style:text-properties officeooo:rsid="01d657ac"/>
    </style:style>
    <style:style style:name="MT4" style:family="text">
      <style:text-properties officeooo:rsid="01355e7d"/>
    </style:style>
    <style:style style:name="MT5" style:family="text">
      <style:text-properties fo:language="en" fo:country="US" style:language-asian="en" style:country-asian="US" style:language-complex="hi" style:country-complex="IN"/>
    </style:style>
    <style:style style:name="MT6" style:family="text"/>
    <style:style style:name="M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4cm" fo:background-color="transparent" style:dynamic-spacing="tru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2" fo:column-gap="0.998cm">
          <style:column-sep style:width="0.009cm" style:color="#000000" style:height="0%" style:style="none"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1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499cm" fo:background-color="transparent" style:dynamic-spacing="true" draw:fill="none" draw:fill-color="#729fcf"/>
      </style:footer-style>
    </style:page-layout>
    <style:page-layout style:name="Mpm12">
      <style:page-layout-properties fo:page-width="21.001cm" fo:page-height="29.7cm" style:num-format="i"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fo:background-color="transparent" style:dynamic-spacing="true" draw:fill="none" draw:fill-color="#729fcf"/>
      </style:footer-style>
    </style:page-layout>
    <style:page-layout style:name="Mpm13" style:page-usage="left">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cm" fo:margin-bottom="1.4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Lesson_20_Content">
      <style:footer>
        <table:table table:name="Table4" table:style-name="Table4">
          <table:table-column table:style-name="Table4.A"/>
          <table:table-column table:style-name="Table4.B"/>
          <table:table-row>
            <table:table-cell table:style-name="Table4.A1" office:value-type="string">
              <text:p text:style-name="Table_20_Contents"><draw:frame draw:style-name="Mfr1" draw:name="Image8" text:anchor-type="as-char" svg:width="2.378cm" svg:height="0.838cm" draw:z-index="9"><draw:image xlink:href="Pictures/10000001000000580000001FF4DBFF4432E2ED5C.png" xlink:type="simple" xlink:show="embed" xlink:actuate="onLoad" draw:mime-type="image/png"/></draw:frame></text:p>
            </table:table-cell>
            <table:table-cell table:style-name="Table4.A1" office:value-type="string">
              <text:p text:style-name="MP2">Year of publication  <text:s/>Publisher </text:p>
              <text:p text:style-name="MP3"><text:span text:style-name="Body_20_8_20_pt">This work is licensed under the Creative Commons Attribution-NonCommercial-ShareAlike 4.0 International License. To view a copy of this license, visit http://creativecommons.org/licenses/by-nc-sa/4.0/deed.en_US. </text:span></text:p>
            </table:table-cell>
          </table:table-row>
        </table:table>
        <text:p text:style-name="Body_20_-_20_Small_20_Spacer"/>
      </style:footer>
    </style:master-page>
    <style:master-page style:name="HTML" style:page-layout-name="Mpm3" draw:style-name="Mdp1"/>
    <style:master-page style:name="Index" style:page-layout-name="Mpm4" draw:style-name="Mdp1"/>
    <style:master-page style:name="Envelope"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Coloring_20_Page" style:display-name="Coloring Page" style:page-layout-name="Mpm10" draw:style-name="Mdp2">
      <style:footer>
        <text:p text:style-name="MP1"><text:span text:style-name="MT1"><text:title>Lessons from Luke </text:title></text:span><text:s text:c="2"/><text:span text:style-name="MT1">Quarter  <text:s/></text:span><text:span text:style-name="MT1"><text:user-defined style:data-style-name="N0" text:name="Quarter">2</text:user-defined></text:span><text:span text:style-name="MT1"><text:s text:c="2"/>Lesson  <text:s/></text:span><text:span text:style-name="MT1"><text:user-defined style:data-style-name="N0" text:name="Lesson">24</text:user-defined></text:span><text:span text:style-name="MT2"><text:tab/></text:span><text:span text:style-name="MT1"><text:title>Lessons from Luke </text:title></text:span><text:span text:style-name="MT1"> <text:s/>Quarter  <text:s/></text:span><text:span text:style-name="MT1"><text:user-defined style:data-style-name="N0" text:name="Quarter">2</text:user-defined></text:span><text:span text:style-name="MT1"><text:s text:c="2"/>Lesson  <text:s/></text:span><text:span text:style-name="MT1"><text:user-defined style:data-style-name="N0" text:name="Lesson">24</text:user-defined></text:span></text:p>
      </style:footer>
    </style:master-page>
    <style:master-page style:name="Lesson_20_Content" style:display-name="Lesson Content" style:page-layout-name="Mpm11" draw:style-name="Mdp1">
      <style:footer>
        <text:p text:style-name="Footer"><text:span text:style-name="MT3">Quarter </text:span><text:span text:style-name="MT4"> <text:s/></text:span><text:span text:style-name="MT4"><text:user-defined style:data-style-name="N0" text:name="Quarter">2</text:user-defined></text:span><text:span text:style-name="MT4"><text:s text:c="2"/></text:span><text:span text:style-name="MT3">Lesson </text:span><text:span text:style-name="MT4"> <text:s/></text:span><text:span text:style-name="MT4"><text:user-defined style:data-style-name="N0" text:name="Lesson">24</text:user-defined></text:span><text:tab/><text:chapter text:display="name" text:outline-level="1">Jesus Calms a Storm </text:chapter><text:tab/>Page  <text:s/><text:page-number text:select-page="current">7</text:page-number></text:p>
      </style:footer>
    </style:master-page>
    <style:master-page style:name="Front_20_matter" style:display-name="Front matter" style:page-layout-name="Mpm12" draw:style-name="Mdp1">
      <style:footer>
        <text:p text:style-name="Front_20_Matter_20_footer"><text:title>Lessons from Luke </text:title><text:tab/><text:subject>Jesus Calms a Storm </text:subject> <text:s/>–  <text:s/><text:span text:style-name="MT5">Quarter  </text:span><text:s/><text:user-defined style:data-style-name="N0" text:name="Quarter #"/><text:tab/>Page  <text:page-number text:select-page="current" text:page-adjust="-3"/></text:p>
      </style:footer>
    </style:master-page>
    <style:master-page style:name="Inside_20_cover" style:display-name="Inside cover" style:page-layout-name="Mpm13" draw:style-name="Mdp1" style:next-style-name="Front_20_matter"/>
    <style:master-page style:name="Body_20_Pages" loext:hidden="true" style:hidden="true" style:display-name="Body Pages" style:page-layout-name="Mpm14" draw:style-name="Mdp1"/>
    <style:master-page style:name="Cover_20_pages" style:display-name="Cover pages" style:page-layout-name="Mpm1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3-27T16:55:15.726716000</meta:creation-date>
    <meta:editing-cycles>90</meta:editing-cycles>
    <meta:editing-duration>P1DT5M53S</meta:editing-duration>
    <meta:generator>LibreOffice/7.4.0.3$MacOSX_AARCH64 LibreOffice_project/f85e47c08ddd19c015c0114a68350214f7066f5a</meta:generator>
    <dc:date>2022-10-25T16:20:46.248626444</dc:date>
    <meta:print-date>2014-09-10T13:13:02.221535000</meta:print-date>
    <dc:subject>Jesus Calms a Storm</dc:subject>
    <dc:title>Lessons from Luke</dc:title>
    <dc:creator>Chris Jackson</dc:creator>
    <meta:document-statistic meta:table-count="2" meta:image-count="4" meta:object-count="0" meta:page-count="8" meta:paragraph-count="216" meta:word-count="3405" meta:character-count="17863" meta:non-whitespace-character-count="14676"/>
    <meta:user-defined meta:name="Lesson" meta:value-type="float">24</meta:user-defined>
    <meta:user-defined meta:name="Quarter" meta:value-type="float">2</meta:user-defined>
  </office:meta>
</office:document-meta>
</file>