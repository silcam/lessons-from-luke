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B1200000B12BB2A0D2EA6C7D8E5.tif" manifest:media-type="image/tiff"/>
  <manifest:file-entry manifest:full-path="Pictures/100000000000015F000000FE606BDC1318B69364.jpg" manifest:media-type="image/jpeg"/>
  <manifest:file-entry manifest:full-path="Pictures/10000001000000D8000000D8A259A628CC1E469D.png" manifest:media-type="image/png"/>
  <manifest:file-entry manifest:full-path="Pictures/100000000000015F000000FEDA8CB35CC6A8BFE7.jpg" manifest:media-type="image/jpeg"/>
  <manifest:file-entry manifest:full-path="Pictures/100000000000015F000000FEA4DF133D846CF728.jpg" manifest:media-type="image/jpeg"/>
  <manifest:file-entry manifest:full-path="Pictures/100000000000015F000000FEBE66E99E081C6ADF.jpg" manifest:media-type="image/jpe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may-break-between-rows="true" style:writing-mode="lr-tb" table:border-model="collapsing"/>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1" style:display-name="Title&amp;Truth.1" style:family="table-row">
      <style:table-row-properties fo:keep-together="auto"/>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Title_26_Truth.B1" style:display-name="Title&amp;Truth.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Bible_20_Story_20_-_20_Graphic_20_Number">
      <style:text-properties officeooo:paragraph-rsid="008fe9c9"/>
    </style:style>
    <style:style style:name="P2" style:family="paragraph" style:parent-style-name="Bible_20_Story_20_-_20_Graphic_20_Number">
      <style:text-properties officeooo:rsid="017e3f1f" officeooo:paragraph-rsid="008fe9c9"/>
    </style:style>
    <style:style style:name="P3" style:family="paragraph" style:parent-style-name="Coloring_20_Page_20_Footer">
      <style:text-properties officeooo:paragraph-rsid="02b4e089"/>
    </style:style>
    <style:style style:name="P4" style:family="paragraph" style:parent-style-name="M.T._20_Text">
      <style:text-properties officeooo:paragraph-rsid="029f899c"/>
    </style:style>
    <style:style style:name="P5" style:family="paragraph" style:parent-style-name="Body">
      <style:text-properties fo:font-size="8pt" officeooo:paragraph-rsid="029f899c" style:font-size-asian="8pt" style:font-size-complex="8pt"/>
    </style:style>
    <style:style style:name="P6" style:family="paragraph" style:parent-style-name="M.T._20_Coloring_20_Page_20_-_20_Truth" style:master-page-name="Coloring_20_Page">
      <style:paragraph-properties style:page-number="auto"/>
    </style:style>
    <style:style style:name="P7" style:family="paragraph" style:parent-style-name="M.T._20_Coloring_20_Page_20_-_20_Truth">
      <style:paragraph-properties fo:break-before="column"/>
    </style:style>
    <style:style style:name="P8" style:family="paragraph" style:parent-style-name="M.T._20_Lesson_20_title_20_-_20_invisible" style:master-page-name="First_20_Page">
      <style:paragraph-properties style:page-number="auto"/>
    </style:style>
    <style:style style:name="P9" style:family="paragraph" style:parent-style-name="M.T._20_Text_20_-_20_Numbered_20_List_20_Inset" style:list-style-name="L1"/>
    <style:style style:name="P10" style:family="paragraph" style:parent-style-name="M.T._20_Text_20_-_20_Numbered_20_List_20_Inset" style:list-style-name="L2"/>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17e3f1f"/>
    </style:style>
    <style:style style:name="T4" style:family="text">
      <style:text-properties officeooo:rsid="0082a2ed"/>
    </style:style>
    <style:style style:name="T5" style:family="text">
      <style:text-properties fo:language="en" fo:country="US" style:language-asian="en" style:country-asian="US" style:language-complex="hi" style:country-complex="IN"/>
    </style:style>
    <style:style style:name="T6" style:family="text">
      <style:text-properties fo:language="en" fo:country="GB" style:language-asian="en" style:country-asian="US" style:language-complex="hi" style:country-complex="IN"/>
    </style:style>
    <style:style style:name="T7" style:family="text">
      <style:text-properties fo:background-color="transparent" loext:char-shading-value="0"/>
    </style:style>
    <style:style style:name="T8" style:family="text">
      <style:text-properties officeooo:rsid="01d657ac"/>
    </style:style>
    <style:style style:name="T9" style:family="text">
      <style:text-properties officeooo:rsid="01355e7d"/>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Bible_5f_Story_5f_Picture">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8" text:outline-level="1"><draw:frame draw:style-name="fr5" draw:name="Image3" text:anchor-type="char" svg:x="0cm" svg:y="0.041cm" svg:width="2.731cm" svg:height="2.731cm" draw:z-index="2"><draw:image xlink:href="Pictures/10000001000000D8000000D8A259A628CC1E469D.png" xlink:type="simple" xlink:show="embed" xlink:actuate="onLoad" draw:mime-type="image/png"/></draw:frame>Jesus Heals the Centurion's Servant</text:h>
        </text:list-item>
      </text:list>
      <text:p text:style-name="M.T._20_Lesson_20_Title">Jesus Heals the Centurion's Servant</text:p>
      <text:p text:style-name="English_20_Translation_20_-_20_Lesson_20_title">Jesus Heals the Centurion's Servant</text:p>
      <text:p text:style-name="M.T._20_Text_20_-_20_Lesson_20_Title_20_Scrip_20_Reference">Luke <text:s/>7:1-10</text:p>
      <text:p text:style-name="Part_20_Heading">Lesson Overview</text:p>
      <table:table table:name="Title&amp;Truth" table:style-name="Title_26_Truth" table:template-name="Lesson Overview">
        <table:table-column table:style-name="Title_26_Truth.A"/>
        <table:table-column table:style-name="Title_26_Truth.B"/>
        <table:table-row table:style-name="Title_26_Truth.1">
          <table:table-cell table:style-name="Title_26_Truth.A1" office:value-type="string">
            <text:p text:style-name="Table_20_Left_20_headings">Today’s Truth</text:p>
          </table:table-cell>
          <table:table-cell table:style-name="Title_26_Truth.B1" office:value-type="string">
            <text:p text:style-name="M.T._20_Text">A true disciple of Jesus has faith in him.</text:p>
            <text:p text:style-name="English_20_translation">A true disciple of Jesus has faith in him.</text:p>
          </table:table-cell>
        </table:table-row>
        <table:table-row table:style-name="Title_26_Truth.1">
          <table:table-cell table:style-name="Title_26_Truth.A1" office:value-type="string">
            <text:p text:style-name="Table_20_Left_20_headings">Objective</text:p>
          </table:table-cell>
          <table:table-cell table:style-name="Title_26_Truth.B1" office:value-type="string">
            <text:p text:style-name="Body_20_Tight_20_lines"><text:span text:style-name="Body_20_Emphasized_20_-_20_Small">KNOW: <text:s/></text:span>The children will know that to be a disciple of Jesus, you need to have faith in him.</text:p>
            <text:p text:style-name="Body_20_Tight_20_lines"><text:span text:style-name="Body_20_Emphasized_20_-_20_Small">DO:</text:span> <text:s/>The children will pray and ask God to help them with something.</text:p>
          </table:table-cell>
        </table:table-row>
        <table:table-row table:style-name="Title_26_Truth.1">
          <table:table-cell table:style-name="Title_26_Truth.A1" office:value-type="string">
            <text:p text:style-name="Table_20_Left_20_headings">Materials</text:p>
          </table:table-cell>
          <table:table-cell table:style-name="Title_26_Truth.B1" office:value-type="string">
            <text:list xml:id="list1664947433"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5-10 different sized containers or cups (You can also use shoes or hats/caps)</text:p>
              </text:list-item>
              <text:list-item>
                <text:p text:style-name="Table_20_Bullet_20_-_20_Checkmark">5-10 strips of paper (One for each container). <text:s/>Write different amounts of points on each. (Have numbers as low as 1 and numbers as high as 100.)</text:p>
              </text:list-item>
              <text:list-item>
                <text:p text:style-name="Table_20_Bullet_20_-_20_Checkmark">2 bottle caps, stones, or other small things to throw</text:p>
              </text:list-item>
            </text:list>
          </table:table-cell>
        </table:table-row>
        <table:table-row table:style-name="Title_26_Truth.1">
          <table:table-cell table:style-name="Title_26_Truth.A1" office:value-type="string">
            <text:p text:style-name="Table_20_Left_20_headings">Memory Verse</text:p>
          </table:table-cell>
          <table:table-cell table:style-name="Title_26_Truth.B1" office:value-type="string">
            <text:p text:style-name="M.T._20_Text">Luke 7:9 When Jesus heard this, he was amazed at him, and turning to the crowd following him, he said, “I tell you, I have not found such great faith even in Israel.”</text:p>
            <text:p text:style-name="English_20_translation">Luke 7:9 When Jesus heard this, he was amazed at him, and turning to the crowd following him, he said, “I tell you, I have not found such great faith even in Israel.”</text:p>
          </table:table-cell>
        </table:table-row>
        <table:table-row table:style-name="Title_26_Truth.1">
          <table:table-cell table:style-name="Title_26_Truth.A1" office:value-type="string">
            <text:p text:style-name="Table_20_Left_20_headings">Homework</text:p>
          </table:table-cell>
          <table:table-cell table:style-name="Title_26_Truth.B1" office:value-type="string">
            <text:p text:style-name="M.T._20_Text"><text:span text:style-name="Character_20_style"><text:span text:style-name="T7">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span></text:span></text:p>
            <text:p text:style-name="English_20_translation">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able:table-cell>
        </table:table-row>
      </table:table>
      <text:p text:style-name="Body_20_-_20_Small_20_Spacer"/>
      <text:p text:style-name="Part_20_Heading">Detailed Lesson Plan</text:p>
      <text:section text:style-name="Sect1" text:name="L-19 Detail Plan">
        <text:p text:style-name="Sub-Head_20_1_20_No_20_follow">Song</text:p>
        <text:p text:style-name="Section_20_Heading">Opening</text:p>
        <text:p text:style-name="Sub-Head_20_1">Welcome</text:p>
        <text:list xml:id="list3443959692" text:style-name="Bullet_20_-_20_checkmark">
          <text:list-item>
            <text:p text:style-name="Body_20_Bullet_20_-_20_Checkmark">Be sure the children know you are happy to see them!</text:p>
          </text:list-item>
          <text:list-item>
            <text:p text:style-name="Body_20_Bullet_20_-_20_Checkmark_20_-_20_No_20_follow">Introduce yourself and your helpers.</text:p>
          </text:list-item>
        </text:list>
        <text:p text:style-name="Sub-Head_20_1">Sharing Time</text:p>
        <text:list xml:id="list155955836768828" text:continue-numbering="true" text:style-name="Bullet_20_-_20_checkmark">
          <text:list-item>
            <text:p text:style-name="Body_20_Bullet_20_-_20_Checkmark">Say the truth from the previous lesson together:</text:p>
          </text:list-item>
        </text:list>
        <text:p text:style-name="M.T._20_Text_20_-_20_Single_20_Inset">A true disciple of Jesus does what the Bible teaches.</text:p>
        <text:p text:style-name="English_20_Translation_20_-_20_single_20_inset">A true disciple of Jesus does what the Bible teaches.</text:p>
        <text:list xml:id="list155955744561159" text:continue-numbering="true" text:style-name="Bullet_20_-_20_checkmark">
          <text:list-item>
            <text:p text:style-name="Body_20_Bullet_20_-_20_Checkmark"><text:soft-page-break/>Say the memory verse from the previous lesson together:</text:p>
          </text:list-item>
        </text:list>
        <text:p text:style-name="M.T._20_Text_20_-_20_Single_20_Inset">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English_20_Translation_20_-_20_single_20_inset">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list xml:id="list155955666577020" text:continue-numbering="true" text:style-name="Bullet_20_-_20_checkmark">
          <text:list-item>
            <text:p text:style-name="Body_20_Bullet_20_-_20_Checkmark">Review the homework from the previous lesson:</text:p>
          </text:list-item>
        </text:list>
        <text:p text:style-name="M.T._20_Text_20_-_20_Single_20_Inset">Did you remember to read the Bible or listen to God's Word every day last week? When? What did you learn?</text:p>
        <text:p text:style-name="English_20_Translation_20_-_20_single_20_inset">Did you remember to read the Bible or listen to God's Word every day last week? When? What did you learn?</text:p>
        <text:p text:style-name="Body_20_Inset">(Give children time to share.)</text:p>
        <text:p text:style-name="Sub-Head_20_1">Prayer</text:p>
        <text:list xml:id="list155955864854645" text:continue-numbering="true" text:style-name="Bullet_20_-_20_checkmark">
          <text:list-item>
            <text:p text:style-name="Body_20_Bullet_20_-_20_Checkmark">Let the children share praises and prayer requests.</text:p>
          </text:list-item>
          <text:list-item>
            <text:p text:style-name="Body_20_Bullet_20_-_20_Checkmark">Keep a record of what the children are sharing so you can remember to thank God together for answered prayers.</text:p>
          </text:list-item>
          <text:list-item>
            <text:p text:style-name="Body_20_Bullet_20_-_20_Checkmark">Spend time praying together. <text:s/>Let children pray out loud if they volunteer. <text:s/>Do not force anyone to pray out loud.</text:p>
          </text:list-item>
        </text:list>
        <text:p text:style-name="Sub-Head_20_1_20_No_20_follow">Song</text:p>
        <text:p text:style-name="Section_20_Heading">Words to Discuss</text:p>
        <text:list xml:id="list155956750584591" text:continue-numbering="true" text:style-name="Bullet_20_-_20_checkmark">
          <text:list-item>
            <text:p text:style-name="Body_20_Bullet_20_-_20_Checkmark">On the blackboard, write the “Words to Discuss” from the list below.</text:p>
          </text:list-item>
          <text:list-item>
            <text:p text:style-name="M.T._20_Text_20_-_20_Checkmark_20_bullet">Let's discuss some words to help us better understand the Bible story for today.</text:p>
          </text:list-item>
        </text:list>
        <text:p text:style-name="English_20_Translation_20_-_20_single_20_inset">Let's discuss some words to help us better understand the Bible story for today.</text:p>
        <text:list xml:id="list2751004969" text:style-name="Bullet_20_-_20_Diamond">
          <text:list-item>
            <text:p text:style-name="M.T._20_Text_20_-_20_Diamond_20_bullet"><text:span text:style-name="Body_20_Emphasized_20_-_20_Small">Synagogue: </text:span>Jewish place of worship.</text:p>
          </text:list-item>
        </text:list>
        <text:p text:style-name="English_20_Translation_20_-_20_double_20_inset">Synagogue: <text:s/>Jewish place of worship.</text:p>
        <text:list xml:id="list155955148363660" text:continue-numbering="true" text:style-name="Bullet_20_-_20_Diamond">
          <text:list-item>
            <text:p text:style-name="M.T._20_Text_20_-_20_Diamond_20_bullet"><text:span text:style-name="Body_20_Emphasized_20_-_20_Small">Roman Centurion: <text:s/></text:span>An officer in charge of one hundred soldiers.</text:p>
          </text:list-item>
        </text:list>
        <text:p text:style-name="English_20_Translation_20_-_20_double_20_inset">Roman Centurion: <text:s/>An officer in charge of one hundred soldiers.</text:p>
        <text:list xml:id="list155956122004390" text:continue-numbering="true" text:style-name="Bullet_20_-_20_Diamond">
          <text:list-item>
            <text:p text:style-name="M.T._20_Text_20_-_20_Diamond_20_bullet"><text:span text:style-name="Body_20_Emphasized_20_-_20_Small">Jewish Leader: <text:s/></text:span>A leader in Israel.</text:p>
          </text:list-item>
        </text:list>
        <text:p text:style-name="English_20_Translation_20_-_20_double_20_inset">Jewish Leader: <text:s/>A leader in Israel.</text:p>
        <text:list xml:id="list155956712918810" text:continue-numbering="true" text:style-name="Bullet_20_-_20_Diamond">
          <text:list-item>
            <text:p text:style-name="M.T._20_Text_20_-_20_Diamond_20_bullet"><text:span text:style-name="Body_20_Emphasized_20_-_20_Small">Gentile: <text:s/></text:span>A person who is not Jewish.</text:p>
          </text:list-item>
        </text:list>
        <text:p text:style-name="English_20_Translation_20_-_20_double_20_inset">Gentile: <text:s/>A person who is not Jewish.</text:p>
        <text:list xml:id="list155956628788972" text:continue-numbering="true" text:style-name="Bullet_20_-_20_Diamond">
          <text:list-item>
            <text:p text:style-name="M.T._20_Text_20_-_20_Diamond_20_bullet"><text:span text:style-name="Body_20_Emphasized_20_-_20_Small">People of Israel: <text:s/></text:span>All the people who were living in Israel.</text:p>
          </text:list-item>
        </text:list>
        <text:p text:style-name="English_20_Translation_20_-_20_double_20_inset">People of Israel: <text:s/>All the people who were living in Israel.</text:p>
        <text:p text:style-name="Sub-Head_20_1_20_No_20_follow">Song</text:p>
        <text:p text:style-name="Section_20_Heading">Bible Story / Lesson</text:p>
        <text:p text:style-name="Body">Have a volunteer stand straight with their arms crossed in front of them, so that their hands touch their shoulders. The teacher then stands behind the volunteer and then asks the volunteer to have faith in them by closing their eyes and letting them fall backward until the teacher catches them.</text:p>
        <text:list xml:id="list155956718049054" text:continue-list="list155956750584591" text:style-name="Bullet_20_-_20_checkmark">
          <text:list-item>
            <text:p text:style-name="M.T._20_Text_20_-_20_Checkmark_20_bullet"><text:soft-page-break/>This demonstrates faith. Faith means putting confidence in something. We put our confidence in many things. We have confidence that a chair will hold us up when we sit in it. We have confidence that the rain will fall in rainy season, so that we can plant our farms. Can you think of anything else?</text:p>
          </text:list-item>
        </text:list>
        <text:p text:style-name="English_20_Translation_20_-_20_single_20_inset">This demonstrates faith. Faith means putting confidence in something. We put our confidence in many things. We have confidence that a chair will hold us up when we sit in it. We have confidence that the rain will fall in rainy season, so that we can plant our farms. Can you think of anything else?</text:p>
        <text:list xml:id="list155955309119728" text:continue-numbering="true" text:style-name="Bullet_20_-_20_checkmark">
          <text:list-item>
            <text:p text:style-name="M.T._20_Text_20_-_20_Checkmark_20_bullet">A true follower of Jesus has faith, they put their confidence in Jesus because they know that Jesus will do what he said he will do.</text:p>
          </text:list-item>
        </text:list>
        <text:p text:style-name="English_20_Translation_20_-_20_single_20_inset">A true follower of Jesus has faith, they put their confidence in Jesus because they know that Jesus will do what he said he will do.</text:p>
        <text:list xml:id="list155956247298703" text:continue-numbering="true" text:style-name="Bullet_20_-_20_checkmark">
          <text:list-item>
            <text:p text:style-name="M.T._20_Text_20_-_20_Checkmark_20_bullet">Today we will be learning that a true disciple of Jesus has faith in him.</text:p>
          </text:list-item>
        </text:list>
        <text:p text:style-name="English_20_Translation_20_-_20_single_20_inset">Today we will be learning that a true disciple of Jesus has faith in him.</text:p>
        <text:p text:style-name="Sub-Head_20_1">Introduce Truth</text:p>
        <text:p text:style-name="M.T._20_Text">Our truth for today is: <text:s/>A true disciple of Jesus has faith in him.</text:p>
        <text:p text:style-name="English_20_translation">Our truth for today is: <text:s/>A true disciple of Jesus has faith in him.</text:p>
        <text:p text:style-name="M.T._20_Text">This reminds me of a true story from the Bible.</text:p>
        <text:p text:style-name="English_20_translation">This reminds me of a true story from the Bible.</text:p>
        <text:p text:style-name="Sub-Head_20_1">Bible Story: <text:s/>Luke <text:s/>7:1-10</text:p>
        <text:p text:style-name="M.T._20_Text_20_-_20_Indented">[ <text:s/>In the time of Jesus, Rome ruled over the land of Israel. Roman soldiers were stationed at different places throughout the country to keep the peace. <text:s/>]</text:p>
        <text:p text:style-name="English_20_Translation_20_-_20_Indented">[ <text:s/>In the time of Jesus, Rome ruled over the land of Israel. Roman soldiers were stationed at different places throughout the country to keep the peace. <text:s/>]</text:p>
        <text:p text:style-name="M.T._20_Text_20_-_20_Bible_20_story_20_inset"><draw:frame draw:style-name="fr1" draw:name="Frame2" text:anchor-type="paragraph" svg:x="-0.046cm" svg:y="0.009cm" svg:width="3.5cm" draw:z-index="3"><draw:text-box fo:min-height="3.062cm"><text:p text:style-name="P1"><text:span text:style-name="T3">Picture <text:s/></text:span><text:span text:style-name="T4">19-1</text:span></text:p><text:p text:style-name="P1"><draw:frame draw:style-name="fr4" draw:name="Image1" text:anchor-type="as-char" svg:width="3.281cm" svg:height="2.379cm" draw:z-index="6"><draw:image xlink:href="Pictures/100000000000015F000000FEA4DF133D846CF728.jpg" xlink:type="simple" xlink:show="embed" xlink:actuate="onLoad" draw:mime-type="image/jpeg"/></draw:frame></text:p></draw:text-box></draw:frame>Luke 7:1-5 A certain Roman Centurion lived in Capernaum. A Centurion was an officer in charge of one hundred soldiers. The Centurion had a servant who was very dear to him. The servant was very sick. When the Centurion heard of Jesus, he asked some of the Jewish leaders of the city to go and talk to Jesus for him. These leaders urged Jesus to heal the Centurion's servant. They said, “This man deserves your help. Although he is a Gentile, he loves the Jewish people. He even built a synagogue for us.”</text:p>
        <text:p text:style-name="English_20_Translation_20_-_20_Bible_20_story_20_inset">Luke 7:1-5 A certain Roman Centurion lived in Capernaum. A Centurion was an officer in charge of one hundred soldiers. The Centurion had a servant who was very dear to him. The servant was very sick. When the Centurion heard of Jesus, he asked some of the Jewish leaders of the city to go and talk to Jesus for him. These leaders urged Jesus to heal the Centurion's servant. They said, “This man deserves your help. Although he is a Gentile, he loves the Jewish people. He even built a synagogue for us.”</text:p>
        <text:p text:style-name="M.T._20_Text_20_-_20_Bible_20_story_20_inset"><draw:frame draw:style-name="fr1" draw:name="Frame1" text:anchor-type="paragraph" svg:x="-0.046cm" svg:y="0.009cm" svg:width="3.5cm" draw:z-index="4"><draw:text-box fo:min-height="3.062cm"><text:p text:style-name="P2">Picture <text:s/>19–2</text:p><text:p text:style-name="P1"><draw:frame draw:style-name="fr4" draw:name="Image5" text:anchor-type="as-char" svg:width="3.281cm" svg:height="2.379cm" draw:z-index="8"><draw:image xlink:href="Pictures/100000000000015F000000FEBE66E99E081C6ADF.jpg" xlink:type="simple" xlink:show="embed" xlink:actuate="onLoad" draw:mime-type="image/jpeg"/></draw:frame></text:p></draw:text-box></draw:frame>Luke 7:6-8 So Jesus went with the Jewish leaders to the Centurion's house. When they were not far off, the Centurion saw them coming and sent out some friends. “Give Jesus this message,” he told them. The message said: “Lord, I am not worthy to have you come into my house. This is why I sent other people instead of coming myself. If you just say the word, I know my servant will be healed. I also am a man with authority,” the message continued. “If I say to one of my soldiers, 'Go!' He goes. If I say to another, 'Come!' He comes. If I say to my servant, 'Do this!' He does it.”</text:p>
        <text:p text:style-name="English_20_Translation_20_-_20_Bible_20_story_20_inset">Luke 7:6-8 So Jesus went with the Jewish leaders to the Centurion's house. When they were not far off, the Centurion saw them coming and sent out some friends. “Give Jesus this message,” he told them. The message said: “Lord, I am not worthy to have you come into my house. This is why I sent other people instead of coming myself. If you just say the word, I know my servant will be healed. I also am a man with authority,” the message continued. “If I say to one of my soldiers, 'Go!' He goes. If I say to another, 'Come!' He comes. If I say to my servant, 'Do this!' He does it.” <text:soft-page-break/> </text:p>
        <text:p text:style-name="M.T._20_Text_20_-_20_Bible_20_story_20_inset"><draw:frame draw:style-name="fr1" draw:name="Frame3" text:anchor-type="paragraph" svg:x="-0.046cm" svg:y="0.009cm" svg:width="3.5cm" draw:z-index="5"><draw:text-box fo:min-height="3.062cm"><text:p text:style-name="P2">Picture <text:s/>19–3</text:p><text:p text:style-name="P1"><draw:frame draw:style-name="fr4" draw:name="Image7" text:anchor-type="as-char" svg:width="3.281cm" svg:height="2.379cm" draw:z-index="9"><draw:image xlink:href="Pictures/100000000000015F000000FEDA8CB35CC6A8BFE7.jpg" xlink:type="simple" xlink:show="embed" xlink:actuate="onLoad" draw:mime-type="image/jpeg"/></draw:frame></text:p></draw:text-box></draw:frame>Luke 7:9 Jesus was very surprised at the Centurion's words. He turned to those who were following him and said, “I have not found such faith as this even among the people of Israel!” Jesus said to the friends whom the Centurion had sent to him, “Tell the Centurion that it will be done for him as he has believed.”</text:p>
        <text:p text:style-name="English_20_Translation_20_-_20_Bible_20_story_20_inset">Luke 7:9 Jesus was very surprised at the Centurion's words. He turned to those who were following him and said, “I have not found such faith as this even among the people of Israel!” Jesus said to the friends whom the Centurion had sent to him, “Tell the Centurion that it will be done for him as he has believed.” </text:p>
        <text:p text:style-name="M.T._20_Text_20_-_20_Bible_20_story_20_inset"><draw:frame draw:style-name="fr1" draw:name="Frame4" text:anchor-type="paragraph" svg:x="-0.046cm" svg:y="0.009cm" svg:width="3.5cm" draw:z-index="7"><draw:text-box fo:min-height="3.062cm"><text:p text:style-name="P2">Picture <text:s/>19–4</text:p><text:p text:style-name="P1"><draw:frame draw:style-name="fr4" draw:name="Image8" text:anchor-type="as-char" svg:width="3.281cm" svg:height="2.379cm" draw:z-index="10"><draw:image xlink:href="Pictures/100000000000015F000000FE606BDC1318B69364.jpg" xlink:type="simple" xlink:show="embed" xlink:actuate="onLoad" draw:mime-type="image/jpeg"/></draw:frame></text:p></draw:text-box></draw:frame>Luke 7:10 Then Jesus sent the Centurion's friends back to the house. When they got there, they found the servant was already well!</text:p>
        <text:p text:style-name="English_20_Translation_20_-_20_Bible_20_story_20_inset">Luke 7:10 Then Jesus sent the Centurion's friends back to the house. When they got there, they found the servant was already well!</text:p>
        <text:p text:style-name="English_20_Translation_20_-_20_Bible_20_story_20_inset"/>
        <text:p text:style-name="English_20_Translation_20_-_20_Bible_20_story_20_inset"/>
        <text:p text:style-name="English_20_Translation_20_-_20_Bible_20_story_20_inset"/>
        <text:p text:style-name="Sub-Head_20_1">Application</text:p>
        <text:p text:style-name="M.T._20_Text_20_-_20_Indented">In what, or who do you put your confidence? Some people look to the traditional medicine man, the Fon, family, friends, or teachers. It is not wrong to look to some of these people for help and guidance if they are followers of Jesus, but they cannot do what Jesus can do: save us from our sins and set us free. They also will let us down sometimes because they are human. A true follower of Jesus puts their confidence in Jesus. Jesus will never let us down.</text:p>
        <text:p text:style-name="English_20_Translation_20_-_20_Indented">In what, or who do you put your confidence? Some people look to the traditional medicine man, the Fon, family, friends, or teachers. It is not wrong to look to some of these people for help and guidance if they are followers of Jesus, but they cannot do what Jesus can do: save us from our sins and set us free. They also will let us down sometimes because they are human. A true follower of Jesus puts their confidence in Jesus. Jesus will never let us down.</text:p>
        <text:p text:style-name="M.T._20_Text">A true disciple of Jesus has faith in him.</text:p>
        <text:p text:style-name="English_20_translation">A true disciple of Jesus has faith in him.</text:p>
        <text:p text:style-name="Sub-Head_20_2">Homework</text:p>
        <text:p text:style-name="M.T._20_Text_20_-_20_Indented"><text:span text:style-name="Character_20_style"><text:span text:style-name="T7">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span></text:span></text:p>
        <text:p text:style-name="English_20_Translation_20_-_20_Indented">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ext:p text:style-name="Sub-Head_20_1_20_No_20_follow">Prayer / Song</text:p>
        <text:p text:style-name="Section_20_Heading">Review Game</text:p>
        <text:p text:style-name="Sub-Head_20_1">Throw Bottle Caps into Containers</text:p>
        <text:p text:style-name="Sub-Head_20_2">Materials</text:p>
        <text:list xml:id="list155955598801042" text:continue-numbering="true" text:style-name="Bullet_20_-_20_checkmark">
          <text:list-item>
            <text:p text:style-name="Body_20_Bullet_20_-_20_Checkmark">Draw a line for the children to stand behind.</text:p>
          </text:list-item>
          <text:list-item>
            <text:p text:style-name="Body_20_Bullet_20_-_20_Checkmark_20_-_20_No_20_follow">Arrange 5-10 different sized containers or cups (you can also use shoes or hats/caps) into a group a distance from the line.</text:p>
          </text:list-item>
          <text:list-item>
            <text:p text:style-name="Body_20_Bullet_20_-_20_Checkmark_20_-_20_No_20_follow">Put one small paper with points written on it inside each container.</text:p>
          </text:list-item>
          <text:list-item>
            <text:p text:style-name="Body_20_Bullet_20_-_20_Checkmark_20_-_20_No_20_follow"><text:soft-page-break/>Collect 2 bottle caps, stones, or other small things to throw and set them on the line that you drew for the children to stand behind.</text:p>
          </text:list-item>
        </text:list>
        <text:p text:style-name="Sub-Head_20_2">How to Play</text:p>
        <text:list xml:id="list155955252178199" text:continue-numbering="true" text:style-name="Bullet_20_-_20_checkmark">
          <text:list-item>
            <text:p text:style-name="Body_20_Bullet_20_-_20_Checkmark">Divide the class into 2 teams.</text:p>
          </text:list-item>
          <text:list-item>
            <text:p text:style-name="Body_20_Bullet_20_-_20_Checkmark_20_-_20_No_20_follow">The first team tries to answer the first question. <text:s/>The teacher can use this time to explain what the children do not seem to understand.</text:p>
          </text:list-item>
          <text:list-item>
            <text:p text:style-name="Body_20_Bullet_20_-_20_Checkmark_20_-_20_No_20_follow">The child on the team that answers the question correctly comes to the front and stands behind the line. <text:s/>If the child only gets part of the question right, the teacher can fill in the rest.</text:p>
          </text:list-item>
          <text:list-item>
            <text:p text:style-name="Body_20_Bullet_20_-_20_Checkmark_20_-_20_No_20_follow">The child then tries to throw the bottle cap into the group of containers. <text:s/>Wherever the bottle cap enters, the points on the paper inside that container are what the team has.</text:p>
          </text:list-item>
          <text:list-item>
            <text:p text:style-name="Body_20_Bullet_20_-_20_Checkmark_20_-_20_No_20_follow">Record the points. <text:s/><text:span text:style-name="T5">The team with the most points wins.</text:span></text:p>
          </text:list-item>
          <text:list-item>
            <text:p text:style-name="Body_20_Bullet_20_-_20_Checkmark_20_-_20_No_20_follow">Be sure to clap for both sides. <text:s/>No name-calling. <text:s/>Encourage good sportsmanship.</text:p>
          </text:list-item>
        </text:list>
        <text:p text:style-name="Sub-Head_20_2">Questions for Review Game</text:p>
        <text:list xml:id="list2258064985" text:style-name="L1">
          <text:list-item>
            <text:p text:style-name="P9">Who ruled Israel during the time of Jesus? (The Romans)</text:p>
          </text:list-item>
        </text:list>
        <text:p text:style-name="English_20_Translation_20_-_20_single_20_inset">Who ruled Israel during the time of Jesus? (The Romans)</text:p>
        <text:list xml:id="list155956554751279" text:continue-numbering="true" text:style-name="L1">
          <text:list-item>
            <text:p text:style-name="P9">What kind of Roman Soldier was a Centurion? (A soldier who commanded over one hundred other soldiers)</text:p>
          </text:list-item>
        </text:list>
        <text:p text:style-name="English_20_Translation_20_-_20_single_20_inset">What kind of Roman Soldier was a Centurion? (A soldier who commanded over one hundred other soldiers)</text:p>
        <text:list xml:id="list155954820547509" text:continue-numbering="true" text:style-name="L1">
          <text:list-item>
            <text:p text:style-name="P9">What problem did the Centurion have? (His dear servant was very sick.)</text:p>
          </text:list-item>
        </text:list>
        <text:p text:style-name="English_20_Translation_20_-_20_single_20_inset">What problem did the Centurion have? (His dear servant was very sick.)</text:p>
        <text:list xml:id="list155956698047896" text:continue-numbering="true" text:style-name="L1">
          <text:list-item>
            <text:p text:style-name="P9">What did the Centurion do when he heard about Jesus? (He asked some Jewish leaders to go and talk to Jesus for him.)</text:p>
          </text:list-item>
        </text:list>
        <text:p text:style-name="English_20_Translation_20_-_20_single_20_inset">What did the Centurion do when he heard about Jesus? (He asked some Jewish leaders to go and talk to Jesus for him.)</text:p>
        <text:list xml:id="list155955516573770" text:continue-numbering="true" text:style-name="L1">
          <text:list-item>
            <text:p text:style-name="P9">What did the Jewish leaders tell Jesus about the Centurion? (The Centurion was kind to the Jews, and even built them a place to worship.)</text:p>
          </text:list-item>
        </text:list>
        <text:p text:style-name="English_20_Translation_20_-_20_single_20_inset">What did the Jewish leaders tell Jesus about the Centurion? (The Centurion was kind to the Jews, and even built them a place to worship.)</text:p>
        <text:list xml:id="list155954961454876" text:continue-numbering="true" text:style-name="L1">
          <text:list-item>
            <text:p text:style-name="P9">What did the Centurion do when he saw Jesus and the Jewish leaders on their way to his house? (He sent a message to Jesus telling him not to enter his house because he felt he was unworthy to have Jesus in his house.)</text:p>
          </text:list-item>
        </text:list>
        <text:p text:style-name="English_20_Translation_20_-_20_single_20_inset">What did the Centurion do when he saw Jesus and the Jewish leaders on their way to his house? (He sent a message to Jesus telling him not to enter his house because he felt he was unworthy to have Jesus in his house.)</text:p>
        <text:list xml:id="list155956599235024" text:continue-numbering="true" text:style-name="L1">
          <text:list-item>
            <text:p text:style-name="P9">How did the Centurion want Jesus to heal his servant? (Say a word so that his servant would be healed.)</text:p>
          </text:list-item>
        </text:list>
        <text:p text:style-name="English_20_Translation_20_-_20_single_20_inset">How did the Centurion want Jesus to heal his servant? (Say a word so that his servant would be healed.)</text:p>
        <text:list xml:id="list155955650889614" text:continue-numbering="true" text:style-name="L1">
          <text:list-item>
            <text:p text:style-name="P9">How did the Centurion describe his authority? (He tells a soldier to come and he comes, or he tells a soldier to go, and he goes. He tells a soldier to do something, and he does it.)</text:p>
          </text:list-item>
        </text:list>
        <text:p text:style-name="English_20_Translation_20_-_20_single_20_inset">How did the Centurion describe his authority? (He tells a soldier to come and he comes, or he tells a soldier to go, and he goes. He tells a soldier to do something, and he does it.)<text:tab/></text:p>
        <text:list xml:id="list155955435377809" text:continue-numbering="true" text:style-name="L1">
          <text:list-item>
            <text:p text:style-name="P9">Why was Jesus surprised? (He had not seen so much faith in all of Israel. The Centurion was not Jewish, but he had more confidence in Jesus than the Jewish people.)</text:p>
          </text:list-item>
        </text:list>
        <text:p text:style-name="English_20_Translation_20_-_20_single_20_inset">Why was Jesus surprised? (He had not seen so much faith in all of Israel. The Centurion was not Jewish, but he had more confidence in Jesus than the Jewish people.)</text:p>
        <text:list xml:id="list155955599090538" text:continue-numbering="true" text:style-name="L1">
          <text:list-item>
            <text:p text:style-name="P9">What did Jesus do for the Centurion? (Jesus healed the Centurion's servant.)</text:p>
          </text:list-item>
        </text:list>
        <text:p text:style-name="English_20_Translation_20_-_20_single_20_inset">What did Jesus do for the Centurion? (Jesus healed the Centurion's servant.)</text:p>
        <text:list xml:id="list155956132786186" text:continue-numbering="true" text:style-name="L1">
          <text:list-item>
            <text:p text:style-name="P9"><text:soft-page-break/>In what kinds of things, or people, do we wrongly place our confidence in? (Sometimes we place our confidence in traditional doctors, fons, teachers, family, and friends.)</text:p>
          </text:list-item>
        </text:list>
        <text:p text:style-name="English_20_Translation_20_-_20_single_20_inset">In what kinds of things, or people, do we wrongly place our confidence in? (Sometimes we place our confidence in traditional doctors, fons, teachers, family, and friends.)</text:p>
        <text:list xml:id="list155955755964177" text:continue-numbering="true" text:style-name="L1">
          <text:list-item>
            <text:p text:style-name="P9">As followers of Jesus, in whom should we put our confidence in? (Jesus)</text:p>
          </text:list-item>
        </text:list>
        <text:p text:style-name="English_20_Translation_20_-_20_single_20_inset">As followers of Jesus, in whom should we put our confidence in? (Jesus)</text:p>
        <text:p text:style-name="Sub-Head_20_1_20_No_20_follow">Song</text:p>
        <text:p text:style-name="Section_20_Heading">Memory Verse</text:p>
        <text:p text:style-name="Sub-Head_20_2">Materials and Preparations</text:p>
        <text:list xml:id="list155955655250882" text:continue-list="list155955252178199" text:style-name="Bullet_20_-_20_checkmark">
          <text:list-item>
            <text:p text:style-name="Body_20_Bullet_20_-_20_Checkmark_20_-_20_No_20_follow">Put a bookmark in <text:s/>Luke 7:9</text:p>
          </text:list-item>
          <text:list-item>
            <text:p text:style-name="Body_20_Bullet_20_-_20_Checkmark">Write memory verse on the blackboard.</text:p>
          </text:list-item>
        </text:list>
        <text:p text:style-name="M.T._20_Text_20_-_20_Single_20_Inset">Luke 7:9 When Jesus heard this, he was amazed at him, and turning to the crowd following him, he said, “I tell you, I have not found such great faith even in Israel.”</text:p>
        <text:p text:style-name="English_20_Translation_20_-_20_single_20_inset">Luke 7:9 When Jesus heard this, he was amazed at him, and turning to the crowd following him, he said, “I tell you, I have not found such great faith even in Israel.”</text:p>
        <text:p text:style-name="Sub-Head_20_1">Teach and Explain</text:p>
        <text:p text:style-name="M.T._20_Text_20_-_20_Indented">Our memory verse is in the Gospel of Luke. <text:s/>That is in the New Testament, a part of the Bible.</text:p>
        <text:p text:style-name="English_20_Translation_20_-_20_Indented">Our memory verse is in the Gospel of Luke. <text:s/>That is in the New Testament, a part of the Bible.</text:p>
        <text:list xml:id="list906942154" text:style-name="WWNum1">
          <text:list-item text:start-value="1">
            <text:p text:style-name="Body_20_Numbered_20_List">Read the verse from your Bible.</text:p>
          </text:list-item>
          <text:list-item>
            <text:p text:style-name="Body_20_Numbered_20_List">Read the verse by yourself as you point to the words.</text:p>
          </text:list-item>
          <text:list-item>
            <text:p text:style-name="Body_20_Numbered_20_List">Read the verse with the children as you point to the words.</text:p>
          </text:list-item>
          <text:list-item>
            <text:p text:style-name="Body_20_Numbered_20_List">Explain the verse:</text:p>
          </text:list-item>
        </text:list>
        <text:list xml:id="list155955668736309" text:continue-list="list155955655250882" text:style-name="Bullet_20_-_20_checkmark">
          <text:list-item>
            <text:p text:style-name="M.T._20_Text_20_-_20_Checkmark_20_bullet">Remember, a man named Luke wrote this book in the Bible. <text:s/>He was a doctor and a friend of Paul. <text:s/>He wrote this book so we would know what Jesus did.</text:p>
          </text:list-item>
        </text:list>
        <text:p text:style-name="English_20_Translation_20_-_20_single_20_inset">Remember, a man named Luke wrote this book in the Bible. <text:s/>He was a doctor and a friend of Paul. <text:s/>He wrote this book so we would know what Jesus did.</text:p>
        <text:list xml:id="list155954783070911" text:continue-numbering="true" text:style-name="Bullet_20_-_20_checkmark">
          <text:list-item>
            <text:p text:style-name="Body_20_Bullet_20_-_20_Checkmark">As you read the verse, circle the words shown below. <text:s/>Explain each of these words.</text:p>
          </text:list-item>
        </text:list>
        <text:list xml:id="list155955192183399" text:continue-list="list155956628788972" text:style-name="Bullet_20_-_20_Diamond">
          <text:list-item>
            <text:p text:style-name="M.T._20_Text_20_-_20_Diamond_20_bullet"><text:span text:style-name="Body_20_Emphasized_20_-_20_Small">Heard this: <text:s/></text:span>What was it that Jesus heard? Remember in the story for today we heard about the Centurion who asked Jesus to heal his servant, by just speaking a word. He knew Jesus had authority to do that because he himself was a man of authority. He tells his servant's come, go, do this, or that, and they do it.</text:p>
          </text:list-item>
        </text:list>
        <text:p text:style-name="English_20_Translation_20_-_20_double_20_inset">Heard this: <text:s/>What was it that Jesus heard? Remember in the story for today we heard about the Centurion who asked Jesus to heal his servant, by just speaking a word. He knew Jesus had authority to do that because he himself was a man of authority. He tells his servant's come, go, do this, or that, and they do it.</text:p>
        <text:list xml:id="list155955687022321" text:continue-numbering="true" text:style-name="Bullet_20_-_20_Diamond">
          <text:list-item>
            <text:p text:style-name="M.T._20_Text_20_-_20_Diamond_20_bullet"><text:span text:style-name="Body_20_Emphasized_20_-_20_Small">Amazed: <text:s/></text:span>Do you remember why Jesus was amazed at the words of the Centurion? (Jesus was amazed because the Centurion showed his faith and confidence in Jesus.)</text:p>
          </text:list-item>
        </text:list>
        <text:p text:style-name="English_20_Translation_20_-_20_double_20_inset">Amazed: <text:s/>Do you remember why Jesus was amazed at the words of the Centurion? (Jesus was amazed because the Centurion showed his faith and confidence in Jesus.)</text:p>
        <text:list xml:id="list155955256017661" text:continue-numbering="true" text:style-name="Bullet_20_-_20_Diamond">
          <text:list-item>
            <text:p text:style-name="M.T._20_Text_20_-_20_Diamond_20_bullet"><text:span text:style-name="Body_20_Emphasized_20_-_20_Small">Crowd: <text:s/></text:span>Why was a crowd following Jesus? (They wanted to see his miracles and hear his teachings.)</text:p>
          </text:list-item>
        </text:list>
        <text:p text:style-name="English_20_Translation_20_-_20_double_20_inset">Crowd: <text:s/>Why was a crowd following Jesus? (They wanted to see his miracles and hear his teachings.)</text:p>
        <text:list xml:id="list155955049994823" text:continue-numbering="true" text:style-name="Bullet_20_-_20_Diamond">
          <text:list-item>
            <text:p text:style-name="M.T._20_Text_20_-_20_Diamond_20_bullet"><text:span text:style-name="Body_20_Emphasized_20_-_20_Small">Great Faith: <text:s/></text:span>Why did Jesus say that the Centurion has such great faith? (Jesus said that the Centurion had great faith because he put his faith and confidence in Jesus.)</text:p>
          </text:list-item>
        </text:list>
        <text:p text:style-name="English_20_Translation_20_-_20_double_20_inset">Great Faith: <text:s/>Why did Jesus say that the Centurion has such great faith? (Jesus said that the Centurion had great faith because he put his faith and confidence in Jesus.)</text:p>
        <text:list xml:id="list155955137385946" text:continue-list="list906942154" text:style-name="WWNum1">
          <text:list-item>
            <text:p text:style-name="Body_20_Numbered_20_List"><text:soft-page-break/>Read the verse again by yourself as you point to the words.</text:p>
          </text:list-item>
          <text:list-item>
            <text:p text:style-name="Body_20_Numbered_20_List">Read the verse again with the children as you point to the words.</text:p>
          </text:list-item>
        </text:list>
        <text:p text:style-name="M.T._20_Text">Remember our truth for today? <text:s/><text:span text:style-name="T6">Let’s all say it together:</text:span></text:p>
        <text:p text:style-name="English_20_translation">Remember our truth for today? <text:s/>Let’s all say it together:</text:p>
        <text:p text:style-name="M.T._20_Text">A true disciple of Jesus has faith in him.</text:p>
        <text:p text:style-name="English_20_translation">A true disciple of Jesus has faith in him.</text:p>
        <text:p text:style-name="Section_20_Heading">Memory Verse Review</text:p>
        <text:p text:style-name="Sub-Head_20_1">Children Repeat the Verse by Using Movements</text:p>
        <text:list xml:id="list155956629465955" text:continue-list="list155954783070911" text:style-name="Bullet_20_-_20_checkmark">
          <text:list-item>
            <text:p text:style-name="Body_20_Bullet_20_-_20_Checkmark">Talk about different movements with our bodies: Your hands on your head, standing on one foot, jumping up and down, touching your toes....</text:p>
          </text:list-item>
          <text:list-item>
            <text:p text:style-name="Body_20_Bullet_20_-_20_Checkmark_20_-_20_No_20_follow">Ask the children the first question.</text:p>
          </text:list-item>
          <text:list-item>
            <text:p text:style-name="Body_20_Bullet_20_-_20_Checkmark_20_-_20_No_20_follow">When a question is answered correctly, that child chooses one of the movements listed above or chooses their own movement.</text:p>
          </text:list-item>
          <text:list-item>
            <text:p text:style-name="Body_20_Bullet_20_-_20_Checkmark_20_-_20_No_20_follow">The verse is said out loud together while doing the movement.</text:p>
          </text:list-item>
          <text:list-item>
            <text:p text:style-name="Body_20_Bullet_20_-_20_Checkmark_20_-_20_No_20_follow">Then the next question is asked.</text:p>
          </text:list-item>
          <text:list-item>
            <text:p text:style-name="Body_20_Bullet_20_-_20_Checkmark_20_-_20_No_20_follow">When that question is answered correctly, another child chooses one of the movements.</text:p>
          </text:list-item>
          <text:list-item>
            <text:p text:style-name="Body_20_Bullet_20_-_20_Checkmark_20_-_20_No_20_follow">The verse is said aloud again while doing the movement.</text:p>
          </text:list-item>
          <text:list-item>
            <text:p text:style-name="Body_20_Bullet_20_-_20_Checkmark_20_-_20_No_20_follow">Do this until all the questions are asked.</text:p>
          </text:list-item>
        </text:list>
        <text:p text:style-name="Sub-Head_20_2">Questions for Memory Verse</text:p>
        <text:list xml:id="list602900920" text:style-name="L2">
          <text:list-item text:start-value="1">
            <text:p text:style-name="P10">How did the Centurion understand Jesus' authority? (He understood that Jesus had authority to do that, because he himself was a man of authority. He tells his servants come, go, do this, or that, and they do it.)</text:p>
          </text:list-item>
        </text:list>
        <text:p text:style-name="English_20_Translation_20_-_20_single_20_inset">How did the Centurion understand Jesus' authority? (He understood that Jesus had authority to do that, because he himself was a man of authority. He tells his servants come, go, do this, or that, and they do it.)</text:p>
        <text:list xml:id="list155956264053397" text:continue-numbering="true" text:style-name="L2">
          <text:list-item>
            <text:p text:style-name="P10">What amazed Jesus? (The Centurion's great faith in him)</text:p>
          </text:list-item>
        </text:list>
        <text:p text:style-name="English_20_Translation_20_-_20_single_20_inset">What amazed Jesus? (The Centurion's great faith in him)</text:p>
        <text:list xml:id="list155954832685681" text:continue-numbering="true" text:style-name="L2">
          <text:list-item>
            <text:p text:style-name="P10">Why was a crowd following Jesus? (They wanted to see his miracles and hear his teachings.)</text:p>
          </text:list-item>
        </text:list>
        <text:p text:style-name="English_20_Translation_20_-_20_single_20_inset">Why was a crowd following Jesus? (They wanted to see his miracles and hear his teachings.)</text:p>
        <text:list xml:id="list155955539265992" text:continue-numbering="true" text:style-name="L2">
          <text:list-item>
            <text:p text:style-name="P10">In whom does a follower of Jesus put their confidence in? (Jesus)</text:p>
          </text:list-item>
        </text:list>
        <text:p text:style-name="English_20_Translation_20_-_20_single_20_inset">In whom does a follower of Jesus put their confidence in? (Jesus)</text:p>
        <text:list xml:id="list155955845236429" text:continue-numbering="true" text:style-name="L2">
          <text:list-item>
            <text:p text:style-name="P10">Why does a follower of Jesus put their confidence in Jesus? What does Jesus have? (Jesus has all the authority.)</text:p>
          </text:list-item>
        </text:list>
        <text:p text:style-name="English_20_Translation_20_-_20_single_20_inset">Why does a follower of Jesus put their confidence in Jesus? What does Jesus have? (Jesus has all the authority.)</text:p>
        <text:p text:style-name="Sub-Head_20_1_20_No_20_follow">Song</text:p>
        <text:p text:style-name="Section_20_Heading">Closing and Homework</text:p>
        <text:list xml:id="list155956090068956" text:continue-list="list155956629465955" text:style-name="Bullet_20_-_20_checkmark">
          <text:list-item>
            <text:p text:style-name="Body_20_Bullet_20_-_20_Checkmark">Say the truth together:</text:p>
          </text:list-item>
        </text:list>
        <text:p text:style-name="M.T._20_Text_20_-_20_Single_20_Inset">A true disciple of Jesus has faith in him.</text:p>
        <text:p text:style-name="English_20_Translation_20_-_20_single_20_inset">A true disciple of Jesus has faith in him.</text:p>
        <text:list xml:id="list155955399257783" text:continue-numbering="true" text:style-name="Bullet_20_-_20_checkmark">
          <text:list-item>
            <text:p text:style-name="Body_20_Bullet_20_-_20_Checkmark"><text:soft-page-break/>Say the memory verse together:</text:p>
          </text:list-item>
        </text:list>
        <text:p text:style-name="M.T._20_Text_20_-_20_Single_20_Inset">Luke 7:9 When Jesus heard this, he was amazed at him, and turning to the crowd following him, he said, “I tell you, I have not found such great faith even in Israel.”</text:p>
        <text:p text:style-name="English_20_Translation_20_-_20_single_20_inset">Luke 7:9 When Jesus heard this, he was amazed at him, and turning to the crowd following him, he said, “I tell you, I have not found such great faith even in Israel.”</text:p>
        <text:list xml:id="list155956146192852" text:continue-numbering="true" text:style-name="Bullet_20_-_20_checkmark">
          <text:list-item>
            <text:p text:style-name="Body_20_Bullet_20_-_20_Checkmark">Review the homework:</text:p>
          </text:list-item>
        </text:list>
        <text:p text:style-name="M.T._20_Text_20_-_20_Single_20_Inset"><text:span text:style-name="Character_20_style"><text:span text:style-name="T7">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span></text:span></text:p>
        <text:p text:style-name="English_20_Translation_20_-_20_single_20_inset">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 </text:p>
        <text:list xml:id="list155955574583007" text:continue-numbering="true"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 <text:s/></text:span>that we are able to have faith in such an amazing God.</text:p>
        <text:p text:style-name="Body"><text:span text:style-name="Body_20_Emphasized_20_-_20_Small">Ask God <text:s/></text:span>that the children will go to Jesus with any problems that they may have.</text:p>
        <text:p text:style-name="Sub-Head_20_-_20_Coloring_20_page_20_last_20_paragraph">Colouring page to colour and take home!</text:p>
      </text:section>
      <text:p text:style-name="Body"/>
      <text:p text:style-name="P6">A true disciple of Jesus has faith in him.</text:p>
      <text:p text:style-name="Bible_20_Story_20_-_20_Graphic_20_Number"><draw:frame draw:style-name="fr3" draw:name="Image2" text:anchor-type="as-char" svg:width="12.857cm" svg:height="12.353cm" draw:z-index="0"><draw:image xlink:href="Pictures/1000000100000B1200000B12BB2A0D2EA6C7D8E5.tif" xlink:type="simple" xlink:show="embed" xlink:actuate="onLoad" draw:mime-type="image/tiff"/></draw:frame></text:p>
      <text:p text:style-name="M.T._20_Coloring_20_Page_20_-_20_Memory_20_Verse">Luke 7:9 When Jesus heard this, he was amazed at him, and turning to the crowd following him, he said, “I tell you, I have not found such great faith even in Israel.”</text:p>
      <text:p text:style-name="P7">A true disciple of Jesus has faith in him.</text:p>
      <text:p text:style-name="Bible_20_Story_20_-_20_Graphic_20_Number"><draw:frame draw:style-name="fr3" draw:name="Image4" text:anchor-type="as-char" svg:width="12.857cm" svg:height="12.353cm" draw:z-index="1"><draw:image xlink:href="Pictures/1000000100000B1200000B12BB2A0D2EA6C7D8E5.tif" xlink:type="simple" xlink:show="embed" xlink:actuate="onLoad" draw:mime-type="image/tiff"/></draw:frame></text:p>
      <text:p text:style-name="M.T._20_Coloring_20_Page_20_-_20_Memory_20_Verse">Luke 7:9 When Jesus heard this, he was amazed at him, and turning to the crowd following him, he said, “I tell you, I have not found such great faith even in Isr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6" text:anchor-type="as-char" svg:width="2.378cm" svg:height="0.838cm" draw:z-index="11"><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 </text:p>
              <text:p text:style-name="MP3"><text:span text:style-name="Body_20_8_20_pt">This work is licensed under the Creative Commons Attribution-NonCommercial-ShareAlike 4.0 International License. To view a copy of this license, visit http://creativecommons.org/licenses/by-nc-sa/4.0/deed.en_US. </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 </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19</text:user-defined></text:span><text:span text:style-name="MT2"><text:tab/></text:span><text:span text:style-name="MT1"><text:title>Lessons from Luke </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19</text:user-defined></text:span></text:p>
      </style:footer>
    </style:master-page>
    <style:master-page style:name="Lesson_20_Content" style:display-name="Lesson Content" style:page-layout-name="Mpm11" draw:style-name="Mdp1">
      <style:footer>
        <text:p text:style-name="Footer"><text:span text:style-name="MT3">Quarter </text:span><text:span text:style-name="MT4"> <text:s/></text:span><text:span text:style-name="MT4"><text:user-defined style:data-style-name="N0" text:name="Quarter">2</text:user-defined></text:span><text:span text:style-name="MT4"><text:s text:c="2"/></text:span><text:span text:style-name="MT3">Lesson </text:span><text:span text:style-name="MT4"> <text:s/></text:span><text:span text:style-name="MT4"><text:user-defined style:data-style-name="N0" text:name="Lesson">19</text:user-defined></text:span><text:tab/><text:chapter text:display="name" text:outline-level="1">Jesus Heals the Centurion's Servant </text:chapter><text:tab/>Page  <text:s/><text:page-number text:select-page="current">8</text:page-number></text:p>
      </style:footer>
    </style:master-page>
    <style:master-page style:name="Front_20_matter" style:display-name="Front matter" style:page-layout-name="Mpm12" draw:style-name="Mdp1">
      <style:footer>
        <text:p text:style-name="Front_20_Matter_20_footer"><text:title>Lessons from Luke </text:title><text:tab/><text:subject>Jesus Heals the Centurion's Servant </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3-27T15:48:55.628171000</meta:creation-date>
    <meta:editing-cycles>110</meta:editing-cycles>
    <meta:editing-duration>PT8H45M37S</meta:editing-duration>
    <meta:generator>LibreOffice/7.4.0.3$MacOSX_AARCH64 LibreOffice_project/f85e47c08ddd19c015c0114a68350214f7066f5a</meta:generator>
    <dc:date>2022-10-25T15:59:54.464764341</dc:date>
    <dc:title>Lessons from Luke</dc:title>
    <dc:subject>Jesus Heals the Centurion's Servant</dc:subject>
    <dc:creator>Chris Jackson</dc:creator>
    <meta:document-statistic meta:table-count="2" meta:image-count="8" meta:object-count="0" meta:page-count="9" meta:paragraph-count="220" meta:word-count="4193" meta:character-count="22141" meta:non-whitespace-character-count="18162"/>
    <meta:user-defined meta:name="Lesson">19</meta:user-defined>
    <meta:user-defined meta:name="Quarter">2</meta:user-defined>
  </office:meta>
</office:document-meta>
</file>