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0EC000000A7E55F623EAB1D2CC3.jpg" manifest:media-type="image/jpeg"/>
  <manifest:file-entry manifest:full-path="Pictures/10000000000000EC000000A7C33147732C5E0BD9.jpg" manifest:media-type="image/jpeg"/>
  <manifest:file-entry manifest:full-path="Pictures/100000000000033B000002EC874C4A976B7FC456.jpg" manifest:media-type="image/jpeg"/>
  <manifest:file-entry manifest:full-path="Pictures/10000000000000EC000000A768B6705F2FBEA416.jpg" manifest:media-type="image/jpeg"/>
  <manifest:file-entry manifest:full-path="Pictures/10000000000000EC000000A73244935FCA65033E.jpg" manifest:media-type="image/jpeg"/>
  <manifest:file-entry manifest:full-path="Pictures/10000001000000D8000000D8BD8DCAD2CD4D1B90.png" manifest:media-type="image/png"/>
  <manifest:file-entry manifest:full-path="Pictures/10000001000000580000001FF4DBFF4432E2ED5C.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ika" svg:font-family="Andika" style:font-pitch="variable"/>
    <style:font-face style:name="Andika Basic" svg:font-family="'Andika Basic'" style:font-family-generic="roman" style:font-pitch="variable"/>
    <style:font-face style:name="Andika Compact" svg:font-family="'Andika Compact'" style:font-pitch="variable"/>
    <style:font-face style:name="Andika New Basic" svg:font-family="'Andika New Basic'" style:font-pitch="variable"/>
    <style:font-face style:name="Andika New Basic1" svg:font-family="'Andika New Basic'" style:font-adornments="Bold" style:font-pitch="variable"/>
    <style:font-face style:name="Andika New Basic2" svg:font-family="'Andika New Basic'" style:font-adornments="Regular" style:font-pitch="variable"/>
    <style:font-face style:name="Andika1" svg:font-family="Andika" style:font-adornments="Bold" style:font-pitch="variable"/>
    <style:font-face style:name="Andika2" svg:font-family="Andika" style:font-adornments="Bold Italic" style:font-pitch="variable"/>
    <style:font-face style:name="Andika3" svg:font-family="Andika" style:font-adornments="Italic" style:font-pitch="variable"/>
    <style:font-face style:name="Andika4" svg:font-family="Andika" style:font-adornments="Regular" style:font-pitch="variable"/>
    <style:font-face style:name="Arial" svg:font-family="Arial" style:font-family-generic="roman"/>
    <style:font-face style:name="Arial Black" svg:font-family="'Arial Black'" style:font-pitch="variable"/>
    <style:font-face style:name="Arial Bold" svg:font-family="'Arial Bold'" style:font-family-generic="roman" style:font-pitch="variable"/>
    <style:font-face style:name="Arial1" svg:font-family="Arial" style:font-family-generic="roman" style:font-pitch="variable"/>
    <style:font-face style:name="Arial2"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ucida Grande" svg:font-family="'Lucida Grande'" style:font-family-generic="roman"/>
    <style:font-face style:name="Lucida Grande1" svg:font-family="'Lucida Grande'" style:font-family-generic="roman" style:font-pitch="variable"/>
    <style:font-face style:name="Lucida Grande2" svg:font-family="'Lucida Grande'" style:font-family-generic="system" style:font-pitch="variable"/>
    <style:font-face style:name="Lucida Sans" svg:font-family="'Lucida Sans'"/>
    <style:font-face style:name="Lucida Sans1" svg:font-family="'Lucida Sans'" style:font-family-generic="roman"/>
    <style:font-face style:name="Lucida Sans2" svg:font-family="'Lucida Sans'" style:font-family-generic="system" style:font-pitch="variable"/>
    <style:font-face style:name="OpenSymbol" svg:font-family="OpenSymbol"/>
    <style:font-face style:name="OpenSymbol1" svg:font-family="OpenSymbol" style:font-family-generic="system" style:font-pitch="variable"/>
    <style:font-face style:name="OpenSymbol2" svg:font-family="OpenSymbol, 'Arial Unicode MS'" style:font-family-generic="roman"/>
    <style:font-face style:name="SimSun" svg:font-family="SimSun" style:font-family-generic="system" style:font-pitch="variable"/>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2" svg:font-family="'Wingdings 2'" style:font-family-generic="roman"/>
    <style:font-face style:name="Wingdings 21" svg:font-family="'Wingdings 2'" style:font-family-generic="system" style:font-pitch="variable"/>
    <style:font-face style:name="ヒラギノ角ゴ Pro W3" svg:font-family="'ヒラギノ角ゴ Pro W3'" style:font-family-generic="system" style:font-pitch="variable"/>
  </office:font-face-decls>
  <office:automatic-styles>
    <style:style style:name="Title_26_Truth" style:display-name="Title&amp;Truth" style:family="table">
      <style:table-properties style:width="17.5cm" table:align="left" style:may-break-between-rows="true" style:writing-mode="lr-tb" table:border-model="collapsing"/>
    </style:style>
    <style:style style:name="Title_26_Truth.A" style:display-name="Title&amp;Truth.A" style:family="table-column">
      <style:table-column-properties style:column-width="2.701cm"/>
    </style:style>
    <style:style style:name="Title_26_Truth.B" style:display-name="Title&amp;Truth.B" style:family="table-column">
      <style:table-column-properties style:column-width="14.799cm"/>
    </style:style>
    <style:style style:name="Title_26_Truth.1" style:display-name="Title&amp;Truth.1" style:family="table-row">
      <style:table-row-properties fo:keep-together="auto"/>
    </style:style>
    <style:style style:name="Title_26_Truth.A1" style:display-name="Title&amp;Truth.A1" style:family="table-cell">
      <style:table-cell-properties style:vertical-align="middle" fo:background-color="#cccccc" fo:padding-left="0.102cm" fo:padding-right="0.102cm" fo:padding-top="0cm" fo:padding-bottom="0.051cm" fo:border-left="none" fo:border-right="none" fo:border-top="none" fo:border-bottom="1pt solid #000000" style:writing-mode="lr-tb">
        <style:background-image/>
      </style:table-cell-properties>
    </style:style>
    <style:style style:name="Title_26_Truth.B1" style:display-name="Title&amp;Truth.B1" style:family="table-cell">
      <style:table-cell-properties style:vertical-align="middle" fo:background-color="transparent" fo:padding-left="0.102cm" fo:padding-right="0.102cm" fo:padding-top="0cm" fo:padding-bottom="0.051cm" fo:border-left="none" fo:border-right="none" fo:border-top="none" fo:border-bottom="1pt solid #000000" style:writing-mode="lr-tb">
        <style:background-image/>
      </style:table-cell-properties>
    </style:style>
    <style:style style:name="P1" style:family="paragraph" style:parent-style-name="Coloring_20_Page_20_Footer">
      <style:text-properties officeooo:paragraph-rsid="02b4e089"/>
    </style:style>
    <style:style style:name="P2" style:family="paragraph" style:parent-style-name="M.T._20_Text">
      <style:text-properties officeooo:paragraph-rsid="029f899c"/>
    </style:style>
    <style:style style:name="P3" style:family="paragraph" style:parent-style-name="Body">
      <style:text-properties fo:font-size="8pt" officeooo:paragraph-rsid="029f899c" style:font-size-asian="8pt" style:font-size-complex="8pt"/>
    </style:style>
    <style:style style:name="P4" style:family="paragraph" style:parent-style-name="Standard">
      <style:paragraph-properties fo:text-align="center" style:justify-single-word="false"/>
      <style:text-properties officeooo:paragraph-rsid="00a120ab"/>
    </style:style>
    <style:style style:name="P5" style:family="paragraph" style:parent-style-name="Sub-Head_20_1">
      <style:text-properties officeooo:paragraph-rsid="00b15a9c"/>
    </style:style>
    <style:style style:name="P6" style:family="paragraph" style:parent-style-name="Body">
      <style:text-properties officeooo:paragraph-rsid="00b15a9c"/>
    </style:style>
    <style:style style:name="P7" style:family="paragraph" style:parent-style-name="Body_20_Inset">
      <style:text-properties officeooo:paragraph-rsid="00b15a9c"/>
    </style:style>
    <style:style style:name="P8" style:family="paragraph" style:parent-style-name="English_20_Translation_20_-_20_Bible_20_story_20_inset">
      <style:text-properties officeooo:paragraph-rsid="00b15a9c"/>
    </style:style>
    <style:style style:name="P9" style:family="paragraph" style:parent-style-name="English_20_Translation_20_-_20_Indented">
      <style:text-properties officeooo:paragraph-rsid="00b15a9c"/>
    </style:style>
    <style:style style:name="P10" style:family="paragraph" style:parent-style-name="English_20_Translation_20_-_20_double_20_inset">
      <style:text-properties officeooo:paragraph-rsid="00b15a9c"/>
    </style:style>
    <style:style style:name="P11" style:family="paragraph" style:parent-style-name="English_20_Translation_20_-_20_single_20_inset">
      <style:text-properties officeooo:paragraph-rsid="00b15a9c"/>
    </style:style>
    <style:style style:name="P12" style:family="paragraph" style:parent-style-name="English_20_translation">
      <style:text-properties officeooo:paragraph-rsid="00b15a9c"/>
    </style:style>
    <style:style style:name="P13" style:family="paragraph" style:parent-style-name="M.T._20_Text">
      <style:text-properties officeooo:paragraph-rsid="00b15a9c"/>
    </style:style>
    <style:style style:name="P14" style:family="paragraph" style:parent-style-name="M.T._20_Text_20_-_20_Bible_20_story_20_inset">
      <style:text-properties officeooo:paragraph-rsid="00b15a9c"/>
    </style:style>
    <style:style style:name="P15" style:family="paragraph" style:parent-style-name="M.T._20_Text_20_-_20_Indented">
      <style:text-properties officeooo:paragraph-rsid="00b15a9c"/>
    </style:style>
    <style:style style:name="P16" style:family="paragraph" style:parent-style-name="M.T._20_Text_20_-_20_Single_20_Inset">
      <style:text-properties officeooo:paragraph-rsid="00b15a9c"/>
    </style:style>
    <style:style style:name="P17" style:family="paragraph" style:parent-style-name="Section_20_Heading">
      <style:text-properties officeooo:paragraph-rsid="00b15a9c"/>
    </style:style>
    <style:style style:name="P18" style:family="paragraph" style:parent-style-name="Sub-Head_20_-_20_Coloring_20_page_20_last_20_paragraph">
      <style:text-properties officeooo:paragraph-rsid="00b15a9c"/>
    </style:style>
    <style:style style:name="P19" style:family="paragraph" style:parent-style-name="Sub-Head_20_1_20_No_20_follow">
      <style:text-properties officeooo:paragraph-rsid="00b15a9c"/>
    </style:style>
    <style:style style:name="P20" style:family="paragraph" style:parent-style-name="Sub-Head_20_2">
      <style:text-properties officeooo:paragraph-rsid="00b15a9c"/>
    </style:style>
    <style:style style:name="P21" style:family="paragraph" style:parent-style-name="Bible_20_Story_20_-_20_Graphic_20_Number">
      <style:text-properties officeooo:paragraph-rsid="00a120ab"/>
    </style:style>
    <style:style style:name="P22" style:family="paragraph" style:parent-style-name="Bible_20_Story_20_-_20_Graphic_20_Number">
      <style:text-properties officeooo:rsid="017e3f1f" officeooo:paragraph-rsid="009fa191"/>
    </style:style>
    <style:style style:name="P23" style:family="paragraph" style:parent-style-name="Bible_20_Story_20_-_20_Graphic_20_Number">
      <style:text-properties officeooo:rsid="017e3f1f" officeooo:paragraph-rsid="00a120ab"/>
    </style:style>
    <style:style style:name="P24" style:family="paragraph" style:parent-style-name="Sub-Head_20_1">
      <style:text-properties fo:language="en" fo:country="US" officeooo:paragraph-rsid="00b15a9c" style:language-asian="en" style:country-asian="US" style:language-complex="hi" style:country-complex="IN"/>
    </style:style>
    <style:style style:name="P25" style:family="paragraph" style:parent-style-name="M.T._20_Coloring_20_Page_20_-_20_Truth">
      <style:paragraph-properties fo:break-before="column"/>
    </style:style>
    <style:style style:name="P26" style:family="paragraph" style:parent-style-name="M.T._20_Coloring_20_Page_20_-_20_Truth" style:master-page-name="Coloring_20_Page">
      <style:paragraph-properties style:page-number="auto"/>
    </style:style>
    <style:style style:name="P27" style:family="paragraph" style:parent-style-name="Body_20_Bullet_20_-_20_Checkmark">
      <style:text-properties officeooo:paragraph-rsid="00b15a9c"/>
    </style:style>
    <style:style style:name="P28" style:family="paragraph" style:parent-style-name="Body_20_Bullet_20_-_20_Checkmark_20_-_20_No_20_follow">
      <style:text-properties officeooo:paragraph-rsid="00b15a9c"/>
    </style:style>
    <style:style style:name="P29" style:family="paragraph" style:parent-style-name="Body_20_Numbered_20_List">
      <style:text-properties officeooo:paragraph-rsid="00b15a9c"/>
    </style:style>
    <style:style style:name="P30" style:family="paragraph" style:parent-style-name="M.T._20_Lesson_20_title_20_-_20_invisible" style:master-page-name="First_20_Page">
      <style:paragraph-properties style:page-number="auto"/>
    </style:style>
    <style:style style:name="P31" style:family="paragraph" style:parent-style-name="M.T._20_Text_20_-_20_Checkmark_20_bullet">
      <style:text-properties officeooo:paragraph-rsid="00b15a9c"/>
    </style:style>
    <style:style style:name="P32" style:family="paragraph" style:parent-style-name="M.T._20_Text_20_-_20_Diamond_20_bullet">
      <style:text-properties officeooo:paragraph-rsid="00b15a9c"/>
    </style:style>
    <style:style style:name="P33" style:family="paragraph" style:parent-style-name="M.T._20_Text_20_-_20_Numbered_20_List_20_Inset" style:list-style-name="L1">
      <style:text-properties officeooo:paragraph-rsid="00b15a9c"/>
    </style:style>
    <style:style style:name="P34" style:family="paragraph" style:parent-style-name="M.T._20_Text_20_-_20_Numbered_20_List_20_Inset" style:list-style-name="L2">
      <style:text-properties officeooo:paragraph-rsid="00b15a9c"/>
    </style:style>
    <style:style style:name="P35"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2" style:font-size-complex="18pt" style:font-style-complex="normal" style:font-weight-complex="normal" style:text-emphasize="none" style:font-relief="none" style:text-overline-style="none" style:text-overline-color="font-color"/>
    </style:style>
    <style:style style:name="T1" style:family="text">
      <style:text-properties fo:color="#000000" loext:opacity="100%" fo:language="en" fo:country="US" officeooo:rsid="016feef4" style:font-name-asian="ヒラギノ角ゴ Pro W3" style:language-asian="en" style:country-asian="US" style:font-name-complex="Times New Roman2" style:language-complex="hi" style:country-complex="IN"/>
    </style:style>
    <style:style style:name="T2" style:family="text">
      <style:text-properties officeooo:rsid="0184d68b"/>
    </style:style>
    <style:style style:name="T3" style:family="text">
      <style:text-properties officeooo:rsid="01d657ac"/>
    </style:style>
    <style:style style:name="T4" style:family="text">
      <style:text-properties officeooo:rsid="01355e7d"/>
    </style:style>
    <style:style style:name="T5" style:family="text">
      <style:text-properties fo:language="en" fo:country="US" style:language-asian="en" style:country-asian="US" style:language-complex="hi" style:country-complex="IN"/>
    </style:style>
    <style:style style:name="fr1" style:family="graphic" style:parent-style-name="Bible_5f_Story_5f_Box">
      <style:graphic-properties style:vertical-pos="from-top" style:vertical-rel="paragraph" style:horizontal-pos="from-left" style:horizontal-rel="paragraph" draw:opacity="50%"/>
    </style:style>
    <style:style style:name="fr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Number_20_Graphic">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CC_20_Logo">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30" text:outline-level="1"><draw:frame draw:style-name="fr3" draw:name="Image3" text:anchor-type="char" svg:x="0cm" svg:y="0.041cm" svg:width="2.731cm" svg:height="2.731cm" draw:z-index="2"><draw:image xlink:href="Pictures/10000001000000D8000000D8BD8DCAD2CD4D1B90.png" xlink:type="simple" xlink:show="embed" xlink:actuate="onLoad" draw:mime-type="image/png"/></draw:frame>A True Disciple of Jesus is Generous</text:h>
        </text:list-item>
      </text:list>
      <text:p text:style-name="M.T._20_Lesson_20_Title">A True Disciple of Jesus is Generous</text:p>
      <text:p text:style-name="English_20_Translation_20_-_20_Lesson_20_title">A True Disciple of Jesus is Generous</text:p>
      <text:p text:style-name="M.T._20_Text_20_-_20_Lesson_20_Title_20_Scrip_20_Reference">Luke <text:s/>6:30-31</text:p>
      <text:p text:style-name="Part_20_Heading">Lesson Overview</text:p>
      <table:table table:name="Title&amp;Truth" table:style-name="Title_26_Truth" table:template-name="Lesson Overview">
        <table:table-column table:style-name="Title_26_Truth.A"/>
        <table:table-column table:style-name="Title_26_Truth.B"/>
        <table:table-row table:style-name="Title_26_Truth.1">
          <table:table-cell table:style-name="Title_26_Truth.A1" office:value-type="string">
            <text:p text:style-name="Table_20_Left_20_headings">Today’s Truth</text:p>
          </table:table-cell>
          <table:table-cell table:style-name="Title_26_Truth.B1" office:value-type="string">
            <text:p text:style-name="M.T._20_Text">A true disciple of Jesus is generous.</text:p>
            <text:p text:style-name="English_20_translation">A true disciple of Jesus is generous.</text:p>
          </table:table-cell>
        </table:table-row>
        <table:table-row table:style-name="Title_26_Truth.1">
          <table:table-cell table:style-name="Title_26_Truth.A1" office:value-type="string">
            <text:p text:style-name="Table_20_Left_20_headings">Objective</text:p>
          </table:table-cell>
          <table:table-cell table:style-name="Title_26_Truth.B1" office:value-type="string">
            <text:p text:style-name="Body_20_Tight_20_lines"><text:span text:style-name="Body_20_Emphasized_20_-_20_Small">KNOW: <text:s/></text:span>The children will learn about how to be generous.</text:p>
            <text:p text:style-name="Body_20_Tight_20_lines"><text:span text:style-name="Body_20_Emphasized_20_-_20_Small">DO:</text:span> <text:s/>The children this week will be kind and patient with others.</text:p>
          </table:table-cell>
        </table:table-row>
        <table:table-row table:style-name="Title_26_Truth.1">
          <table:table-cell table:style-name="Title_26_Truth.A1" office:value-type="string">
            <text:p text:style-name="Table_20_Left_20_headings">Materials</text:p>
          </table:table-cell>
          <table:table-cell table:style-name="Title_26_Truth.B1" office:value-type="string">
            <text:list text:style-name="Table_20_Bullet_20_-_20_checkmark">
              <text:list-item>
                <text:p text:style-name="Table_20_Bullet_20_-_20_Checkmark">Quarter <text:s/>2 <text:s/>Picture book, Bible, chalk</text:p>
              </text:list-item>
              <text:list-item>
                <text:p text:style-name="Table_20_Bullet_20_-_20_Checkmark">Copies of the memory verse coloring page for the children to take home.</text:p>
              </text:list-item>
              <text:list-item>
                <text:p text:style-name="Table_20_Bullet_20_-_20_Checkmark">Cooking pot with a lid</text:p>
              </text:list-item>
              <text:list-item>
                <text:p text:style-name="Table_20_Bullet_20_-_20_Checkmark">Rope, string, or yarn cut into 10 pieces that are all different sizes</text:p>
              </text:list-item>
            </text:list>
          </table:table-cell>
        </table:table-row>
        <table:table-row table:style-name="Title_26_Truth.1">
          <table:table-cell table:style-name="Title_26_Truth.A1" office:value-type="string">
            <text:p text:style-name="Table_20_Left_20_headings">Memory Verse</text:p>
          </table:table-cell>
          <table:table-cell table:style-name="Title_26_Truth.B1" office:value-type="string">
            <text:p text:style-name="M.T._20_Text">Luke 6:30-31 Give to everyone who asks you, and do not ask for your possessions back from the person who takes them away. Treat others in the same way that you would want them to treat you.</text:p>
            <text:p text:style-name="English_20_translation">Luke 6:30-31 Give to everyone who asks you, and do not ask for your possessions back from the person who takes them away. Treat others in the same way that you would want them to treat you.</text:p>
          </table:table-cell>
        </table:table-row>
        <table:table-row table:style-name="Title_26_Truth.1">
          <table:table-cell table:style-name="Title_26_Truth.A1" office:value-type="string">
            <text:p text:style-name="Table_20_Left_20_headings">Homework</text:p>
          </table:table-cell>
          <table:table-cell table:style-name="Title_26_Truth.B1" office:value-type="string">
            <text:p text:style-name="M.T._20_Text">Who can you be generous to this week? Who can you treat with kindness? Who in your family, friends, and schoolmates can you show patience to? Think of these people, then pray and ask God to help you.</text:p>
            <text:p text:style-name="English_20_translation">Who can you be generous to this week? Who can you treat with kindness? Who in your family, friends, and schoolmates can you show patience to? Think of these people, then pray and ask God to help you.</text:p>
          </table:table-cell>
        </table:table-row>
      </table:table>
      <text:p text:style-name="Body_20_-_20_Small_20_Spacer"/>
      <text:p text:style-name="Part_20_Heading">Detailed Lesson Plan</text:p>
      <text:section text:style-name="Sect1" text:name="L-16 Detail Plan">
        <text:p text:style-name="P19">Song</text:p>
        <text:p text:style-name="P17">Opening</text:p>
        <text:p text:style-name="P5">Welcome</text:p>
        <text:list xml:id="list2034641217" text:style-name="Bullet_20_-_20_checkmark">
          <text:list-item>
            <text:p text:style-name="P27">Be sure the children know you are happy to see them!</text:p>
          </text:list-item>
          <text:list-item>
            <text:p text:style-name="P27">Introduce yourself and your helpers.</text:p>
          </text:list-item>
        </text:list>
        <text:p text:style-name="P5">Sharing Time</text:p>
        <text:list xml:id="list153505333460363" text:continue-numbering="true" text:style-name="Bullet_20_-_20_checkmark">
          <text:list-item>
            <text:p text:style-name="P27">Say the truth from the previous lesson together:</text:p>
          </text:list-item>
        </text:list>
        <text:p text:style-name="P16">True disciples of Jesus love their enemies.</text:p>
        <text:p text:style-name="P11">True disciples of Jesus love their enemies.</text:p>
        <text:list xml:id="list153505825536421" text:continue-numbering="true" text:style-name="Bullet_20_-_20_checkmark">
          <text:list-item>
            <text:p text:style-name="P27">Say the memory verse from the previous lesson together:</text:p>
          </text:list-item>
        </text:list>
        <text:p text:style-name="P16">Luke 6:27-28 But I tell you who hear me: Love your enemies, do good to those who hate you, bless those who curse you, pray for those who mistreat you.</text:p>
        <text:p text:style-name="P11">Luke 6:27-28 But I tell you who hear me: Love your enemies, do good to those who hate you, bless those who curse you, pray for those who mistreat you.</text:p>
        <text:list xml:id="list153505773990680" text:continue-numbering="true" text:style-name="Bullet_20_-_20_checkmark">
          <text:list-item>
            <text:p text:style-name="P27"><text:soft-page-break/>Review the homework from the previous lesson:</text:p>
          </text:list-item>
        </text:list>
        <text:p text:style-name="P16">You were to show love to someone who you do not get along with. Did you say something kind to them? Did you do something for that person? What did you do?</text:p>
        <text:p text:style-name="P11">You were to show love to someone who you do not get along with. Did you say something kind to them? Did you do something for that person? What did you do?</text:p>
        <text:p text:style-name="P7">(Give children time to share.)</text:p>
        <text:p text:style-name="P5">Prayer</text:p>
        <text:list xml:id="list153504071712471" text:continue-numbering="true" text:style-name="Bullet_20_-_20_checkmark">
          <text:list-item>
            <text:p text:style-name="P27">Let the children share praises and prayer requests.</text:p>
          </text:list-item>
          <text:list-item>
            <text:p text:style-name="P28">Keep a record of what the children are sharing so you can remember to thank God together for answered prayers.</text:p>
          </text:list-item>
          <text:list-item>
            <text:p text:style-name="P28">Spend time praying together. <text:s/>Let children pray out loud if they volunteer. <text:s/>Do not force anyone to pray out loud.</text:p>
          </text:list-item>
        </text:list>
        <text:p text:style-name="P19">Song</text:p>
        <text:p text:style-name="P17">Words to Discuss</text:p>
        <text:list xml:id="list153504718945209" text:continue-numbering="true" text:style-name="Bullet_20_-_20_checkmark">
          <text:list-item>
            <text:p text:style-name="P27">On the blackboard, write the “Words to Discuss” from the list below.</text:p>
          </text:list-item>
          <text:list-item>
            <text:p text:style-name="P31">Let's discuss some words to help us better understand the Bible story for today.</text:p>
          </text:list-item>
        </text:list>
        <text:p text:style-name="P11">Let's discuss some words to help us better understand the Bible story for today.</text:p>
        <text:list xml:id="list1112083246" text:style-name="Bullet_20_-_20_Diamond">
          <text:list-item>
            <text:p text:style-name="P32"><text:span text:style-name="Body_20_Emphasized_20_-_20_Small">Disciple: <text:s/></text:span>Someone who follows Jesus and lives by His teachings.</text:p>
          </text:list-item>
        </text:list>
        <text:p text:style-name="P10">Disciple: <text:s/>Someone who follows Jesus and lives by His teachings.</text:p>
        <text:list xml:id="list153504061100601" text:continue-numbering="true" text:style-name="Bullet_20_-_20_Diamond">
          <text:list-item>
            <text:p text:style-name="P32"><text:span text:style-name="Body_20_Emphasized_20_-_20_Small">Generous: <text:s/></text:span>Willing to give or to serve.</text:p>
          </text:list-item>
        </text:list>
        <text:p text:style-name="P10">Generous: <text:s/>Willing to give or to serve.</text:p>
        <text:list xml:id="list153505452701539" text:continue-numbering="true" text:style-name="Bullet_20_-_20_Diamond">
          <text:list-item>
            <text:p text:style-name="P32"><text:span text:style-name="Body_20_Emphasized_20_-_20_Small">Demand: <text:s/></text:span>To urgently insist.</text:p>
          </text:list-item>
        </text:list>
        <text:p text:style-name="P10">Demand: <text:s/>To urgently insist.</text:p>
        <text:p text:style-name="P19">Song</text:p>
        <text:p text:style-name="P17">Bible Story / Lesson</text:p>
        <text:p text:style-name="P15">Today we will be learning that a true disciple of Jesus is generous.</text:p>
        <text:p text:style-name="P9">Today we will be learning that a true disciple of Jesus is generous.</text:p>
        <text:p text:style-name="P5">Introduce Truth</text:p>
        <text:p text:style-name="P15">In our last lesson, we learned that a true follower of Jesus loves everyone, even his enemies. This week, we will learn another truth about those who are true followers of Jesus.</text:p>
        <text:p text:style-name="P9">In our last lesson, we learned that a true follower of Jesus loves everyone, even his enemies. This week, we will learn another truth about those who are true followers of Jesus.</text:p>
        <text:p text:style-name="P13">Our truth for today is: <text:s/>A true disciple of Jesus is generous.</text:p>
        <text:p text:style-name="P12">Our truth for today is: <text:s/>A true disciple of Jesus is generous.</text:p>
        <text:p text:style-name="P13">This reminds me of a story from the village.</text:p>
        <text:p text:style-name="P12">This reminds me of a story from the village.</text:p>
        <text:p text:style-name="P24">Bible Story: <text:s/>A story from a village</text:p>
        <text:p text:style-name="P15">In one village not too far from here, I heard a story about some people who showed us what it means to be generous. The time of the year to prepare for planting had come. Everyone had spent all the money they had to buy seed, so they could plant their crops and have enough food for the next year.</text:p>
        <text:p text:style-name="P9"><text:soft-page-break/>In one village not too far from here, I heard a story about some people who showed us what it means to be generous. The time of the year to prepare for planting had come. Everyone had spent all the money they had to buy seed, so they could plant their crops and have enough food for the next year.</text:p>
        <text:p text:style-name="P14"><draw:frame draw:style-name="fr1" draw:name="Frame2" text:anchor-type="paragraph" svg:x="-0.046cm" svg:y="0.009cm" svg:width="3.5cm" draw:z-index="3"><draw:text-box fo:min-height="3.062cm"><text:p text:style-name="P22">Picture <text:s/>16–1</text:p><text:p text:style-name="P4"><draw:frame text:anchor-type="as-char" draw:z-index="4" draw:name="Shape1_0" draw:style-name="gr1" draw:text-style-name="P35" svg:width="3.282cm" svg:height="2.32cm"><draw:image xlink:href="Pictures/10000000000000EC000000A73244935FCA65033E.jpg" xlink:type="simple" xlink:show="embed" xlink:actuate="onLoad" draw:mime-type="image/jpeg"><text:p/></draw:image></draw:frame></text:p></draw:text-box></draw:frame>One day, a very bad thing happened to the Nfor family. Their cookhouse caught fire while they were away from the compound. The whole cookhouse and barn burned down, including all of their seed that they bought to plant.</text:p>
        <text:p text:style-name="P14">Ma Nfor was crying and asked her husband, “What will we do? We have no seed to plant. We have no money to buy more seed. We will not have food next year! We will starve! What can we do?”</text:p>
        <text:p text:style-name="P14">Pa Nfor told his wife not to worry, he would go to see Elder Mbe, who was elder of their church. Elder Mbe would know what to do. They were fellow Christians, and went to church together. Certainly Pa Mbe would know how to solve their problem.</text:p>
        <text:p text:style-name="P8">One day, a very bad thing happened to the Nfor family. Their cookhouse caught fire while they were away from the compound. The whole cookhouse and barn burned down, including all of their seed that they bought to plant.</text:p>
        <text:p text:style-name="P8">Ma Nfor was crying and asked her husband, “What will we do? We have no seed to plant. We have no money to buy more seed. We will not have food next year! We will starve! What can we do?”</text:p>
        <text:p text:style-name="P8">Pa Nfor told his wife not to worry, he would go to see Elder Mbe, who was elder of their church. Elder Mbe would know what to do. They were fellow Christians, and went to church together. Certainly Pa Mbe would know how to solve their problem.</text:p>
        <text:p text:style-name="P14"><draw:frame draw:style-name="fr1" draw:name="Frame1" text:anchor-type="paragraph" svg:x="-0.046cm" svg:y="0.009cm" svg:width="3.5cm" draw:z-index="5"><draw:text-box fo:min-height="3.062cm"><text:p text:style-name="P23">Picture <text:s/>16–2</text:p><text:p text:style-name="P21"><draw:frame text:anchor-type="as-char" draw:z-index="6" draw:name="Shape2_0" draw:style-name="gr1" draw:text-style-name="P35" svg:width="3.282cm" svg:height="2.32cm"><draw:image xlink:href="Pictures/10000000000000EC000000A768B6705F2FBEA416.jpg" xlink:type="simple" xlink:show="embed" xlink:actuate="onLoad" draw:mime-type="image/jpeg"><text:p/></draw:image></draw:frame></text:p></draw:text-box></draw:frame>Pa went to see Elder Mbe and told him of his family's situation and his need. Elder Mbe said, “We will pray for you, my brother. You too should remember to pray. You should have faith, God will help you. As for me, I can do nothing. I only have enough seed for my family's needs.”</text:p>
        <text:p text:style-name="P8">Pa went to see Elder Mbe and told him of his family's situation and his need. Elder Mbe said, “We will pray for you, my brother. You too should remember to pray. You should have faith, God will help you. As for me, I can do nothing. I only have enough seed for my family's needs.”</text:p>
        <text:p text:style-name="P14"><draw:frame draw:style-name="fr1" draw:name="Frame3" text:anchor-type="paragraph" svg:x="-0.046cm" svg:y="0.009cm" svg:width="3.5cm" draw:z-index="7"><draw:text-box fo:min-height="3.062cm"><text:p text:style-name="P23">Picture <text:s/>16–3</text:p><text:p text:style-name="P21"><draw:frame text:anchor-type="as-char" draw:z-index="8" draw:name="Shape3_0" draw:style-name="gr1" draw:text-style-name="P35" svg:width="3.282cm" svg:height="2.32cm"><draw:image xlink:href="Pictures/10000000000000EC000000A7C33147732C5E0BD9.jpg" xlink:type="simple" xlink:show="embed" xlink:actuate="onLoad" draw:mime-type="image/jpeg"><text:p/></draw:image></draw:frame></text:p></draw:text-box></draw:frame>Pa Nfor went away sad and discouraged. He thought that of anyone he knew, Elder Mbe would understand his situation and help him. He wondered what he would do. He asked God, “What will happen to me and my family?”</text:p>
        <text:p text:style-name="P8">Pa Nfor went away sad and discouraged. He thought that of anyone he knew, Elder Mbe would understand his situation and help him. He wondered what he would do. He asked God, “What will happen to me and my family?”</text:p>
        <text:p text:style-name="P14"><draw:frame draw:style-name="fr1" draw:name="Frame4" text:anchor-type="paragraph" svg:x="-0.046cm" svg:y="0.009cm" svg:width="3.5cm" draw:z-index="9"><draw:text-box fo:min-height="3.062cm"><text:p text:style-name="P23">Picture <text:s/>16–4</text:p><text:p text:style-name="P21"><draw:frame text:anchor-type="as-char" draw:z-index="10" draw:name="Shape4_0" draw:style-name="gr1" draw:text-style-name="P35" svg:width="3.282cm" svg:height="2.32cm"><draw:image xlink:href="Pictures/10000000000000EC000000A7E55F623EAB1D2CC3.jpg" xlink:type="simple" xlink:show="embed" xlink:actuate="onLoad" draw:mime-type="image/jpeg"><text:p/></draw:image></draw:frame></text:p></draw:text-box></draw:frame>Upon reaching his compound, he met Pa Akem waiting for him to return. He had also brought a bag of seed corn with him. Pa Akem said, “I heard about your loss. I know that you lost all of your seed, and you don't have any more money to buy seed. Jesus said that his true followers are generous, so I knew that I must come to help you.”</text:p>
        <text:p text:style-name="P14">Pa Nfor said, “I don't understand, how can you give me a bag of your seed when you only have enough to feed your family? Your family will not have enough.”</text:p>
        <text:p text:style-name="P14">Pa Aken said, “True followers of Jesus treat others as they want to be treated. If I were in need, I would hope others would come to help me too. I believe that with God's help, we will all have enough to eat next year.”</text:p>
        <text:p text:style-name="P14">The two families joined together singing, dancing, and praising God.</text:p>
        <text:p text:style-name="P8">Upon reaching his compound, he met Pa Akem waiting for him to return. He had also brought a bag of seed corn with him. Pa Akem said, “I heard about your loss. I know that you lost all of your seed, and you don't have any more money to buy seed. Jesus said that his true followers are generous, so I knew that I must come to help you.”</text:p>
        <text:p text:style-name="P8"><text:soft-page-break/>Pa Nfor said, “I don't understand, how can you give me a bag of your seed when you only have enough to feed your family? Your family will not have enough.”</text:p>
        <text:p text:style-name="P8">Pa Aken said, “True followers of Jesus treat others as they want to be treated. If I were in need, I would hope others would come to help me too. I believe that with God's help, we will all have enough to eat next year.”</text:p>
        <text:p text:style-name="P8">The two families joined together singing, dancing, and praising God.</text:p>
        <text:p text:style-name="P5">Application</text:p>
        <text:p text:style-name="P15">Jesus tells us that we should be generous and share with those in need around us. Just like in the story, the Nfor family were going to have no food because of the fire. The Akem family saw that there was a family in need, so they helped them out. This is a good example as to how we are to be. Jesus tells us to treat others the way we want to be treated. Being generous, kind, and patient with others is how we can show that we are true followers of Jesus. <text:s text:c="3"/></text:p>
        <text:p text:style-name="P9">Jesus tells us that we should be generous and share with those in need around us. Just like in the story, the Nfor family were going to have no food because of the fire. The Akem family saw that there was a family in need, so they helped them out. This is a good example as to how we are to be. Jesus tells us to treat others the way we want to be treated. Being generous, kind, and patient with others is how we can show that we are true followers of Jesus.</text:p>
        <text:p text:style-name="P13">A true disciple of Jesus is generous.</text:p>
        <text:p text:style-name="P12">A true disciple of Jesus is generous.</text:p>
        <text:p text:style-name="P20">Homework</text:p>
        <text:p text:style-name="P15">Who can you be generous to this week? Who can you treat with kindness? Who in your family, friends, and schoolmates can you show patience to? Think of these people, then pray and ask God to help you.</text:p>
        <text:p text:style-name="P9">Who can you be generous to this week? Who can you treat with kindness? Who in your family, friends, and schoolmates can you show patience to? Think of these people, then pray and ask God to help you.</text:p>
        <text:p text:style-name="P19">Prayer / Song</text:p>
        <text:p text:style-name="P17">Review Game</text:p>
        <text:p text:style-name="P5">Spaghetti Game</text:p>
        <text:p text:style-name="P20">Materials</text:p>
        <text:list xml:id="list153506054828307" text:continue-list="list153504718945209" text:style-name="Bullet_20_-_20_checkmark">
          <text:list-item>
            <text:p text:style-name="P27">Cooking pot with a lid</text:p>
          </text:list-item>
          <text:list-item>
            <text:p text:style-name="P28">Rope, string, or yarn cut into 10 pieces that are all different sizes</text:p>
          </text:list-item>
        </text:list>
        <text:p text:style-name="P20">How to Play</text:p>
        <text:list xml:id="list153504780780539" text:continue-numbering="true" text:style-name="Bullet_20_-_20_checkmark">
          <text:list-item>
            <text:p text:style-name="P27">Put the rope, string, or yarn in the pot with some of it hanging out. <text:s/>Put the lid on the pot over the ropes.</text:p>
          </text:list-item>
          <text:list-item>
            <text:p text:style-name="P28">Divide the children into two teams.</text:p>
          </text:list-item>
          <text:list-item>
            <text:p text:style-name="P28">When someone on the team answers the question correctly, they come to the front and choose one of the ropes. (They never know if they will get a long or short rope.)</text:p>
          </text:list-item>
          <text:list-item>
            <text:p text:style-name="P28">The ropes that each team gets are tied together into one long rope.</text:p>
          </text:list-item>
          <text:list-item>
            <text:p text:style-name="P28">At the end, measure the ropes from the two teams side by side.</text:p>
          </text:list-item>
          <text:list-item>
            <text:p text:style-name="P28">The teams with the longest rope wins.</text:p>
          </text:list-item>
        </text:list>
        <text:p text:style-name="P20">Questions for Review Game</text:p>
        <text:list xml:id="list764622863" text:style-name="L1">
          <text:list-item>
            <text:p text:style-name="P33">Is the story we had today from the Bible? (No, it is from a village.)</text:p>
          </text:list-item>
        </text:list>
        <text:p text:style-name="P11">Is the story we had today from the Bible? (No, it is from a village.)</text:p>
        <text:list xml:id="list153506025442970" text:continue-numbering="true" text:style-name="L1">
          <text:list-item>
            <text:p text:style-name="P33">What did Jesus say his true followers will do when people ask for help? (They are generous and give to those who ask.)</text:p>
          </text:list-item>
        </text:list>
        <text:p text:style-name="P11">What did Jesus say his true followers will do when people ask for help? (They are generous and give to those who ask.)</text:p>
        <text:list xml:id="list153504469102752" text:continue-numbering="true" text:style-name="L1">
          <text:list-item>
            <text:p text:style-name="P33"><text:soft-page-break/>How does Jesus want his true followers to treat other people? (In the same way that they want to be treated.)</text:p>
          </text:list-item>
        </text:list>
        <text:p text:style-name="P11">How does Jesus want his true followers to treat other people? (In the same way that they want to be treated.)</text:p>
        <text:list xml:id="list153505471132105" text:continue-numbering="true" text:style-name="L1">
          <text:list-item>
            <text:p text:style-name="P33">What do you think it means to treat others like we want to be treated? (Give the children time to give examples. Be sure to mention being honest, patient, helpful, and kind.)</text:p>
          </text:list-item>
        </text:list>
        <text:p text:style-name="P11">What do you think it means to treat others like we want to be treated? (Give the children time to give examples. Be sure to mention being honest, patient, helpful, and kind.)</text:p>
        <text:list xml:id="list153505658457079" text:continue-numbering="true" text:style-name="L1">
          <text:list-item>
            <text:p text:style-name="P33">What happened to the Nfor family? (Their cookhouse burned down with all of their seed for planting inside.)</text:p>
          </text:list-item>
        </text:list>
        <text:p text:style-name="P11">What happened to the Nfor family? (Their cookhouse burned down with all of their seed for planting inside.)</text:p>
        <text:list xml:id="list153504991451881" text:continue-numbering="true" text:style-name="L1">
          <text:list-item>
            <text:p text:style-name="P33">Why was Ma Nfor crying and afraid? (They had no money to buy more seed, so they would not have food to harvest and feed themselves.)</text:p>
          </text:list-item>
        </text:list>
        <text:p text:style-name="P11">Why was Ma Nfor crying and afraid? (They had no money to buy more seed, so they would not have food to harvest and feed themselves.)</text:p>
        <text:list xml:id="list153505169796374" text:continue-numbering="true" text:style-name="L1">
          <text:list-item>
            <text:p text:style-name="P33">Who did Pa Nfor go to for help first? (Elder Mbe from the church)</text:p>
          </text:list-item>
        </text:list>
        <text:p text:style-name="P11">Who did Pa Nfor go to for help first? (Elder Mbe from the church)</text:p>
        <text:list xml:id="list153504529929220" text:continue-numbering="true" text:style-name="L1">
          <text:list-item>
            <text:p text:style-name="P33">Did Elder Mbe help the Nfor family? (It is good that Elder Mbe promised to pray for the Nfor family, but he did not try to think of how he could help them with their physical needs.)</text:p>
          </text:list-item>
        </text:list>
        <text:p text:style-name="P11">Did Elder Mbe help the Nfor family? (It is good that Elder Mbe promised to pray for the Nfor family, but he did not try to think of how he could help them with their physical needs.)</text:p>
        <text:list xml:id="list153504459293959" text:continue-numbering="true" text:style-name="L1">
          <text:list-item>
            <text:p text:style-name="P33">Who did Pa Nfor meet at his compound? (Pa Akem)</text:p>
          </text:list-item>
        </text:list>
        <text:p text:style-name="P11">Who did Pa Nfor meet at his compound? (Pa Akem)</text:p>
        <text:list xml:id="list153506151023525" text:continue-numbering="true" text:style-name="L1">
          <text:list-item>
            <text:p text:style-name="P33">What did Pa Akem have to give to Pa Nfor? (A bag of his family's seed)</text:p>
          </text:list-item>
        </text:list>
        <text:p text:style-name="P11">What did Pa Akem have to give to Pa Nfor? (A bag of his family's seed)</text:p>
        <text:list xml:id="list153504341119101" text:continue-numbering="true" text:style-name="L1">
          <text:list-item>
            <text:p text:style-name="P33">Was Pa Akem sacrificing to help the Nfor family? (Yes, Pa Akem was giving from his own family's seed they would use for planting. Pa Akem's family might not have enough food from their harvest.)</text:p>
          </text:list-item>
        </text:list>
        <text:p text:style-name="P11">Was Pa Akem sacrificing to help the Nfor family? (Yes, Pa Akem was giving from his own family's seed they would use for planting. Pa Akem's family might not have enough food from their harvest.)</text:p>
        <text:list xml:id="list153505534207319" text:continue-numbering="true" text:style-name="L1">
          <text:list-item>
            <text:p text:style-name="P33">Why did Pa Akem give Pa Nfor a bag of his seed? (Pa Akem knew that Jesus wants his true followers to be generous and treat others like they want to be treated. If Pa Akem knew they had the same problem, he would want people to help him so his family would not be hungry.)</text:p>
          </text:list-item>
        </text:list>
        <text:p text:style-name="P11">Why did Pa Akem give Pa Nfor a bag of his seed? (Pa Akem knew that Jesus wants his true followers to be generous and treat others like they want to be treated. If Pa Akem knew they had the same problem, he would want people to help him so his family would not be hungry.)</text:p>
        <text:p text:style-name="P19">Song</text:p>
        <text:p text:style-name="P17">Memory Verse</text:p>
        <text:p text:style-name="P20">Materials and Preparations</text:p>
        <text:list xml:id="list153505725479406" text:continue-list="list153504780780539" text:style-name="Bullet_20_-_20_checkmark">
          <text:list-item>
            <text:p text:style-name="P27">Put a bookmark in <text:s/>Luke 6:30-31</text:p>
          </text:list-item>
          <text:list-item>
            <text:p text:style-name="P27">Write memory verse on the blackboard.</text:p>
          </text:list-item>
        </text:list>
        <text:p text:style-name="P16">Luke 6:30-31 Give to everyone who asks you, and do not ask for your possessions back from the person who takes them away. Treat others in the same way that you would want them to treat you.</text:p>
        <text:p text:style-name="P11">Luke 6:30-31 Give to everyone who asks you, and do not ask for your possessions back from the person who takes them away. Treat others in the same way that you would want them to treat you.</text:p>
        <text:p text:style-name="P5"><text:soft-page-break/>Teach and Explain</text:p>
        <text:p text:style-name="P15">Our memory verse is in the Gospel of Luke. <text:s/>That is in the New Testament, a part of the Bible.</text:p>
        <text:p text:style-name="P9">Our memory verse is in the Gospel of Luke. <text:s/>That is in the New Testament, a part of the Bible.</text:p>
        <text:list xml:id="list425905632" text:style-name="WWNum1">
          <text:list-item text:start-value="1">
            <text:p text:style-name="P29">Read the verse from your Bible.</text:p>
          </text:list-item>
          <text:list-item>
            <text:p text:style-name="P29">Read the verse by yourself as you point to the words.</text:p>
          </text:list-item>
          <text:list-item>
            <text:p text:style-name="P29">Read the verse with the children as you point to the words.</text:p>
          </text:list-item>
          <text:list-item>
            <text:p text:style-name="P29">Explain the verse:</text:p>
          </text:list-item>
        </text:list>
        <text:list xml:id="list153505079258022" text:continue-list="list153505725479406" text:style-name="Bullet_20_-_20_checkmark">
          <text:list-item>
            <text:p text:style-name="P31">Our memory verse comes from today’s Bible story.</text:p>
          </text:list-item>
        </text:list>
        <text:p text:style-name="P11">Our memory verse comes from today’s Bible story.</text:p>
        <text:list xml:id="list153505745081772" text:continue-numbering="true" text:style-name="Bullet_20_-_20_checkmark">
          <text:list-item>
            <text:p text:style-name="P27">As you read the verse, circle the words shown below. <text:s/>Explain each of these words.</text:p>
          </text:list-item>
        </text:list>
        <text:list xml:id="list153504483295858" text:continue-list="list153505452701539" text:style-name="Bullet_20_-_20_Diamond">
          <text:list-item>
            <text:p text:style-name="P32"><text:span text:style-name="Body_20_Emphasized_20_-_20_Small">Everyone: <text:s/></text:span>Jesus wants us to be generous with people. If someone asks us for something, Jesus wants us to give it to them whether they are friends, family, or strangers.</text:p>
          </text:list-item>
        </text:list>
        <text:p text:style-name="P10">Everyone: <text:s/>Jesus wants us to be generous with people. If someone asks us for something, Jesus wants us to give it to them whether they are friends, family, or strangers.</text:p>
        <text:list xml:id="list153506041846239" text:continue-numbering="true" text:style-name="Bullet_20_-_20_Diamond">
          <text:list-item>
            <text:p text:style-name="P32"><text:span text:style-name="Body_20_Emphasized_20_-_20_Small">Takes: <text:s/></text:span>Jesus is talking about people who take things from us without our permission.</text:p>
          </text:list-item>
        </text:list>
        <text:p text:style-name="P10">Takes: <text:s/>Jesus is talking about people who take things from us without our permission.</text:p>
        <text:list xml:id="list153504252388752" text:continue-numbering="true" text:style-name="Bullet_20_-_20_Diamond">
          <text:list-item>
            <text:p text:style-name="P32"><text:span text:style-name="Body_20_Emphasized_20_-_20_Small">Demand: <text:s/></text:span>To demand something to be returned to you means that you will not forgive someone unless they give back what was taken from you. Jesus wants us to forgive people who wrong us, whether they ever give back what they took, or not.</text:p>
          </text:list-item>
        </text:list>
        <text:p text:style-name="P10">Demand: <text:s/>To demand something to be returned to you means that you will not forgive someone unless they give back what was taken from you. Jesus wants us to forgive people who wrong us, whether they ever give back what they took, or not.</text:p>
        <text:list xml:id="list153504924630386" text:continue-numbering="true" text:style-name="Bullet_20_-_20_Diamond">
          <text:list-item>
            <text:p text:style-name="P32"><text:span text:style-name="Body_20_Emphasized_20_-_20_Small">Others: <text:s/></text:span>This means ALL people: strangers, family, friends, neighbors-anyone! Jesus is telling us how to treat ALL the people around us. Whether we like them or not.</text:p>
          </text:list-item>
        </text:list>
        <text:p text:style-name="P10">Others: <text:s/>This means ALL people: strangers, family, friends, neighbors-anyone! Jesus is telling us how to treat ALL the people around us. Whether we like them or not.</text:p>
        <text:list xml:id="list153505104855037" text:continue-list="list425905632" text:style-name="WWNum1">
          <text:list-item>
            <text:p text:style-name="P29">Read the verse again by yourself as you point to the words.</text:p>
          </text:list-item>
          <text:list-item>
            <text:p text:style-name="P29">Read the verse again with the children as you point to the words.</text:p>
          </text:list-item>
        </text:list>
        <text:p text:style-name="P15">Jesus tells us to think about how we want to be treated by other people. This is how we are to treat others. Do you want to be treated nicely, or badly? I am sure you want people to be nice to you. Jesus says that is how you should treat all other people.</text:p>
        <text:p text:style-name="P9">Jesus tells us to think about how we want to be treated by other people. This is how we are to treat others. Do you want to be treated nicely, or badly? I am sure you want people to be nice to you. Jesus says that is how you should treat all other people.</text:p>
        <text:p text:style-name="P13">Remember our truth for the day? <text:s/>Let’s all say it together:</text:p>
        <text:p text:style-name="P12">Remember our truth for the day? <text:s/>Let’s all say it together:</text:p>
        <text:p text:style-name="P13">A true disciple of Jesus is generous.</text:p>
        <text:p text:style-name="P12">A true disciple of Jesus is generous.</text:p>
        <text:p text:style-name="P17">Memory Verse Review</text:p>
        <text:p text:style-name="P5">Children Repeat the Verse by Using Movements</text:p>
        <text:list xml:id="list153505312181370" text:continue-list="list153505745081772" text:style-name="Bullet_20_-_20_checkmark">
          <text:list-item>
            <text:p text:style-name="P27">Talk about different movements with our bodies: Your hands on your head, standing on one foot, jumping up and down, touching your toes....</text:p>
          </text:list-item>
          <text:list-item>
            <text:p text:style-name="P28">Ask the children the first question.</text:p>
          </text:list-item>
          <text:list-item>
            <text:p text:style-name="P28">When a question is answered correctly, that child chooses one of the movements listed above or chooses their own movement.</text:p>
          </text:list-item>
          <text:list-item>
            <text:p text:style-name="P28"><text:soft-page-break/>The verse is said out loud together while doing the movement.</text:p>
          </text:list-item>
          <text:list-item>
            <text:p text:style-name="P28">Then the next question is asked.</text:p>
          </text:list-item>
          <text:list-item>
            <text:p text:style-name="P28">When that question is answered correctly, another child chooses one of the movements.</text:p>
          </text:list-item>
          <text:list-item>
            <text:p text:style-name="P28">The verse is said aloud again while doing the movement.</text:p>
          </text:list-item>
          <text:list-item>
            <text:p text:style-name="P28">Do this until all the questions are asked.</text:p>
          </text:list-item>
        </text:list>
        <text:p text:style-name="P20">Questions for Memory Verse</text:p>
        <text:list xml:id="list4217081630" text:style-name="L2">
          <text:list-item text:start-value="1">
            <text:p text:style-name="P34">Where is today's memory verse found? <text:s/>( <text:s/>Luke 6:30-31 <text:s/>)</text:p>
          </text:list-item>
        </text:list>
        <text:p text:style-name="P11">Where is today's memory verse found? <text:s/>( <text:s/>Luke 6:30-31 <text:s/>)</text:p>
        <text:list xml:id="list153504637857559" text:continue-numbering="true" text:style-name="L2">
          <text:list-item>
            <text:p text:style-name="P34">How does Jesus want us to treat others? (In the same way we want to be treated)</text:p>
          </text:list-item>
        </text:list>
        <text:p text:style-name="P11">How does Jesus want us to treat others? (In the same way we want to be treated)</text:p>
        <text:list xml:id="list153504541390818" text:continue-numbering="true" text:style-name="L2">
          <text:list-item>
            <text:p text:style-name="P34">If someone takes something from us, what does Jesus tell us NOT to do? (Demand things taken from us to be given back)</text:p>
          </text:list-item>
        </text:list>
        <text:p text:style-name="P11">If someone takes something from us, what does Jesus tell us NOT to do? (Demand things taken from us to be given back)</text:p>
        <text:list xml:id="list153504350262113" text:continue-numbering="true" text:style-name="L2">
          <text:list-item>
            <text:p text:style-name="P34">What does Jesus want us to to do when people ask for something from us? (We should give it to them.)</text:p>
          </text:list-item>
        </text:list>
        <text:p text:style-name="P11">What does Jesus want us to to do when people ask for something from us? (We should give it to them.)</text:p>
        <text:list xml:id="list153505974882260" text:continue-numbering="true" text:style-name="L2">
          <text:list-item>
            <text:p text:style-name="P34">If we like it when people help us, should we help others? (Yes)</text:p>
          </text:list-item>
        </text:list>
        <text:p text:style-name="P11">If we like it when people help us, should we help others? (Yes)</text:p>
        <text:list xml:id="list153504774442818" text:continue-numbering="true" text:style-name="L2">
          <text:list-item>
            <text:p text:style-name="P34">If we like it when people are honest with us, should we be honest with them? (Yes)</text:p>
          </text:list-item>
        </text:list>
        <text:p text:style-name="P11">If we like it when people are honest with us, should we be honest with them? (Yes)</text:p>
        <text:list xml:id="list153506093802600" text:continue-numbering="true" text:style-name="L2">
          <text:list-item>
            <text:p text:style-name="P34">Should we be kind to only people we like? (No. Jesus tells us to treat ALL people with kindness, whether we like them or not.)</text:p>
          </text:list-item>
        </text:list>
        <text:p text:style-name="P11">Should we be kind to only people we like? (No. Jesus tells us to treat ALL people with kindness, whether we like them or not.)</text:p>
        <text:list xml:id="list153504658620071" text:continue-numbering="true" text:style-name="L2">
          <text:list-item>
            <text:p text:style-name="P34">What should we do to people who do wrong against us and then ask for forgiveness? (We should forgive those who do wrong against us because, that is how we want to be treated.)</text:p>
          </text:list-item>
        </text:list>
        <text:p text:style-name="P11">What should we do to people who do wrong against us and then ask for forgiveness? (We should forgive those who do wrong against us because, that is how we want to be treated.)</text:p>
        <text:p text:style-name="P19">Song</text:p>
        <text:p text:style-name="P17">Closing and Homework</text:p>
        <text:list xml:id="list153504188369099" text:continue-list="list153505312181370" text:style-name="Bullet_20_-_20_checkmark">
          <text:list-item>
            <text:p text:style-name="P27">Say the truth together:</text:p>
          </text:list-item>
        </text:list>
        <text:p text:style-name="P16">A true disciple of Jesus is generous.</text:p>
        <text:p text:style-name="P11">A true disciple of Jesus is generous.</text:p>
        <text:list xml:id="list153504123335580" text:continue-numbering="true" text:style-name="Bullet_20_-_20_checkmark">
          <text:list-item>
            <text:p text:style-name="P27">Say the memory verse together:</text:p>
          </text:list-item>
        </text:list>
        <text:p text:style-name="P16">Luke 6:30-31 Give to everyone who asks you, and do not ask for your possessions back from the person who takes them away. Treat others in the same way that you would want them to treat you.</text:p>
        <text:p text:style-name="P11">Luke 6:30-31 Give to everyone who asks you, and do not ask for your possessions back from the person who takes them away. Treat others in the same way that you would want them to treat you.</text:p>
        <text:list xml:id="list153505663015298" text:continue-numbering="true" text:style-name="Bullet_20_-_20_checkmark">
          <text:list-item>
            <text:p text:style-name="P27">Review the homework:</text:p>
          </text:list-item>
        </text:list>
        <text:p text:style-name="P16">Who can you be generous to this week? Who can you treat with kindness? Who in your family, friends, and schoolmates can you show patience to? Think of these people, then pray and ask God to help you.</text:p>
        <text:p text:style-name="P11">Who can you be generous to this week? Who can you treat with kindness? Who in your family, friends, and schoolmates can you show patience to? Think of these people, then pray and ask God to help you.</text:p>
        <text:list xml:id="list153504811491601" text:continue-numbering="true" text:style-name="Bullet_20_-_20_checkmark">
          <text:list-item>
            <text:p text:style-name="P27"><text:soft-page-break/>Give any needed announcements.</text:p>
          </text:list-item>
        </text:list>
        <text:p text:style-name="P5">Closing Prayer</text:p>
        <text:p text:style-name="P6"><text:span text:style-name="Body_20_Emphasized_20_-_20_Small">Thank God <text:s/></text:span>that we are children of God, and that we can go to Him if we come to any troubles.</text:p>
        <text:p text:style-name="P6"><text:span text:style-name="Body_20_Emphasized_20_-_20_Small">Ask God <text:s/></text:span>that the children will remember to treat others with kindness and generosity.</text:p>
        <text:p text:style-name="P18">Colouring page to colour and take home!</text:p>
        <text:p text:style-name="Body"/>
      </text:section>
      <text:p text:style-name="P26">A true disciple of Jesus is generous.</text:p>
      <text:p text:style-name="Bible_20_Story_20_-_20_Graphic_20_Number"><draw:frame draw:style-name="fr2" draw:name="Image1" text:anchor-type="as-char" svg:width="13.351cm" svg:height="12.076cm" draw:z-index="0"><draw:image xlink:href="Pictures/100000000000033B000002EC874C4A976B7FC456.jpg" xlink:type="simple" xlink:show="embed" xlink:actuate="onLoad" draw:mime-type="image/jpeg"/></draw:frame></text:p>
      <text:p text:style-name="M.T._20_Coloring_20_Page_20_-_20_Memory_20_Verse">Luke 6:30-31 Give to everyone who asks you, and do not ask for your possessions back from the person who takes them away. Treat others in the same way that you would want them to treat you.</text:p>
      <text:p text:style-name="P25">A true disciple of Jesus is generous.</text:p>
      <text:p text:style-name="Bible_20_Story_20_-_20_Graphic_20_Number"><draw:frame draw:style-name="fr2" draw:name="Image2" text:anchor-type="as-char" svg:width="13.351cm" svg:height="12.076cm" draw:z-index="1"><draw:image xlink:href="Pictures/100000000000033B000002EC874C4A976B7FC456.jpg" xlink:type="simple" xlink:show="embed" xlink:actuate="onLoad" draw:mime-type="image/jpeg"/></draw:frame></text:p>
      <text:p text:style-name="M.T._20_Coloring_20_Page_20_-_20_Memory_20_Verse">Luke 6:30-31 Give to everyone who asks you, and do not ask for your possessions back from the person who takes them away. Treat others in the same way that you would want them to treat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ika" svg:font-family="Andika" style:font-pitch="variable"/>
    <style:font-face style:name="Andika Basic" svg:font-family="'Andika Basic'" style:font-family-generic="roman" style:font-pitch="variable"/>
    <style:font-face style:name="Andika Compact" svg:font-family="'Andika Compact'" style:font-pitch="variable"/>
    <style:font-face style:name="Andika New Basic" svg:font-family="'Andika New Basic'" style:font-pitch="variable"/>
    <style:font-face style:name="Andika New Basic1" svg:font-family="'Andika New Basic'" style:font-adornments="Bold" style:font-pitch="variable"/>
    <style:font-face style:name="Andika New Basic2" svg:font-family="'Andika New Basic'" style:font-adornments="Regular" style:font-pitch="variable"/>
    <style:font-face style:name="Andika1" svg:font-family="Andika" style:font-adornments="Bold" style:font-pitch="variable"/>
    <style:font-face style:name="Andika2" svg:font-family="Andika" style:font-adornments="Bold Italic" style:font-pitch="variable"/>
    <style:font-face style:name="Andika3" svg:font-family="Andika" style:font-adornments="Italic" style:font-pitch="variable"/>
    <style:font-face style:name="Andika4" svg:font-family="Andika" style:font-adornments="Regular" style:font-pitch="variable"/>
    <style:font-face style:name="Arial" svg:font-family="Arial" style:font-family-generic="roman"/>
    <style:font-face style:name="Arial Black" svg:font-family="'Arial Black'" style:font-pitch="variable"/>
    <style:font-face style:name="Arial Bold" svg:font-family="'Arial Bold'" style:font-family-generic="roman" style:font-pitch="variable"/>
    <style:font-face style:name="Arial1" svg:font-family="Arial" style:font-family-generic="roman" style:font-pitch="variable"/>
    <style:font-face style:name="Arial2"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ucida Grande" svg:font-family="'Lucida Grande'" style:font-family-generic="roman"/>
    <style:font-face style:name="Lucida Grande1" svg:font-family="'Lucida Grande'" style:font-family-generic="roman" style:font-pitch="variable"/>
    <style:font-face style:name="Lucida Grande2" svg:font-family="'Lucida Grande'" style:font-family-generic="system" style:font-pitch="variable"/>
    <style:font-face style:name="Lucida Sans" svg:font-family="'Lucida Sans'"/>
    <style:font-face style:name="Lucida Sans1" svg:font-family="'Lucida Sans'" style:font-family-generic="roman"/>
    <style:font-face style:name="Lucida Sans2" svg:font-family="'Lucida Sans'" style:font-family-generic="system" style:font-pitch="variable"/>
    <style:font-face style:name="OpenSymbol" svg:font-family="OpenSymbol"/>
    <style:font-face style:name="OpenSymbol1" svg:font-family="OpenSymbol" style:font-family-generic="system" style:font-pitch="variable"/>
    <style:font-face style:name="OpenSymbol2" svg:font-family="OpenSymbol, 'Arial Unicode MS'" style:font-family-generic="roman"/>
    <style:font-face style:name="SimSun" svg:font-family="SimSun" style:font-family-generic="system" style:font-pitch="variable"/>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2" svg:font-family="'Wingdings 2'" style:font-family-generic="roman"/>
    <style:font-face style:name="Wingdings 21" svg:font-family="'Wingdings 2'" style:font-family-generic="system" style:font-pitch="variable"/>
    <style:font-face style:name="ヒラギノ角ゴ Pro W3" svg:font-family="'ヒラギノ角ゴ Pro W3'" style:font-family-generic="system" style:font-pitch="variable"/>
  </office:font-face-decls>
  <office:styles>
    <draw:gradient draw:name="Gradient_20_14" draw:display-name="Gradient 14" draw:style="linear" draw:start-color="#000000" draw:end-color="#b3b3b3" draw:start-intensity="100%" draw:end-intensity="100%" draw:angle="90deg" draw:border="0%"/>
    <draw:gradient draw:name="Gradient_20_15" draw:display-name="Gradient 15" draw:style="linear" draw:start-color="#b3b3b3" draw:end-color="#ffffff" draw:start-intensity="100%" draw:end-intensity="100%" draw:angle="9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1" fo:font-size="12pt" fo:language="en" fo:country="US" style:letter-kerning="true" style:font-name-asian="SimSun"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orphans="2" fo:widows="2" fo:hyphenation-ladder-count="no-limit" style:writing-mode="lr-tb">
        <style:tab-stops>
          <style:tab-stop style:position="1.134cm"/>
        </style:tab-stops>
      </style:paragraph-properties>
      <style:text-properties fo:color="#000000" loext:opacity="100%" style:font-name="Andika4" fo:font-family="Andika" style:font-style-name="Regular" style:font-pitch="variable" fo:font-size="10pt" fo:language="en" fo:country="US" style:font-name-asian="ヒラギノ角ゴ Pro W3" style:font-family-asian="'ヒラギノ角ゴ Pro W3'" style:font-family-generic-asian="system" style:font-pitch-asian="variable" style:font-size-asian="8.80000019073486pt" style:language-asian="en" style:country-asian="US"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default-outline-level="" style:list-style-name="" style:class="text">
      <loext:graphic-properties draw:fill="solid" draw:fill-color="#ffffff" draw:opacity="100%"/>
      <style:paragraph-properties fo:margin-left="-0.046cm" fo:margin-right="0cm" fo:margin-top="0.423cm" fo:margin-bottom="0.212cm" style:contextual-spacing="false" fo:text-indent="-0.762cm" style:auto-text-indent="false" fo:background-color="#ffffff" fo:keep-with-next="always">
        <style:tab-stops/>
      </style:paragraph-properties>
      <style:text-properties style:font-name="Andika1" fo:font-family="Andika" style:font-style-name="Bold" style:font-pitch="variable" fo:font-size="14pt" fo:font-weight="bold" style:font-name-asian="SimSun" style:font-family-asian="SimSun" style:font-family-generic-asian="system" style:font-pitch-asian="variable" style:font-size-asian="14pt" style:font-weight-asian="bold"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loext:hidden="true" style:hidden="true" style:parent-style-name="Text_20_body" style:default-outline-level="" style:class="list">
      <style:text-properties style:font-size-asian="12pt" style:font-name-complex="Lucida Sans" style:font-family-complex="'Lucida Sans'"/>
    </style:style>
    <style:style style:name="Caption" style:family="paragraph" loext:hidden="true" style:hidden="true"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size-complex="12pt" style:font-style-complex="italic"/>
    </style:style>
    <style:style style:name="Index" style:family="paragraph" loext:hidden="true" style:hidden="true" style:parent-style-name="Standard" style:default-outline-level="" style:class="index">
      <style:paragraph-properties text:number-lines="false" text:line-number="0"/>
      <style:text-properties style:font-size-asian="12pt" style:font-name-complex="Lucida Sans" style:font-family-complex="'Lucida Sans'"/>
    </style:style>
    <style:style style:name="Heading_20_1" style:display-name="Heading 1" style:family="paragraph" loext:hidden="true" style:hidden="true" style:parent-style-name="Heading" style:next-style-name="Body_20_Tight_20_lines" style:class="text" style:master-page-name="">
      <loext:graphic-properties draw:fill="solid" draw:fill-color="#b3b3b3" draw:opacity="100%"/>
      <style:paragraph-properties fo:margin-left="-0.182cm" fo:margin-right="0cm" fo:margin-top="0.381cm" fo:margin-bottom="0.203cm" style:contextual-spacing="false" fo:orphans="2" fo:widows="2" fo:text-indent="0.205cm" style:auto-text-indent="false" style:page-number="auto" fo:background-color="#b3b3b3" style:shadow="none" fo:keep-with-next="always" text:number-lines="false" text:line-number="0">
        <style:tab-stops>
          <style:tab-stop style:position="1.134cm"/>
        </style:tab-stops>
      </style:paragraph-properties>
      <style:text-properties fo:color="#000000" loext:opacity="100%" style:font-name="Andika1" fo:font-family="Andika" style:font-style-name="Bold"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 style:display-name="Heading 2" style:family="paragraph" loext:hidden="true" style:hidden="true" style:parent-style-name="Standard" style:next-style-name="Body_20_Tight_20_lines" style:default-outline-level="2" style:list-style-name="Outline" style:class="text" style:master-page-name="">
      <loext:graphic-properties draw:fill="solid" draw:fill-color="#ffffff" draw:opacity="100%"/>
      <style:paragraph-properties fo:margin-left="0.801cm" fo:margin-right="0cm" fo:margin-top="0.152cm" fo:margin-bottom="0cm" style:contextual-spacing="false" fo:keep-together="auto" fo:orphans="2" fo:widows="2" fo:hyphenation-ladder-count="no-limit" fo:text-indent="-0.801cm" style:auto-text-indent="false" style:page-number="auto" fo:background-color="#ffffff" style:shadow="none" fo:keep-with-next="auto" text:number-lines="false" text:line-number="0" style:writing-mode="lr-tb">
        <style:tab-stops/>
      </style:paragraph-properties>
      <style:text-properties fo:color="#000000" loext:opacity="100%" style:font-name="Andika1" fo:font-family="Andika" style:font-style-name="Bold" style:font-pitch="variable" fo:font-size="16pt" fo:font-weight="bold" style:font-name-asian="ヒラギノ角ゴ Pro W3" style:font-family-asian="'ヒラギノ角ゴ Pro W3'" style:font-family-generic-asian="system" style:font-pitch-asian="variable" style:font-size-asian="16pt" style:language-asian="en" style:country-asian="US" style:font-weight-asian="bold" style:font-name-complex="Times New Roman2" style:font-family-complex="'Times New Roman'"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loext:hidden="true" style:hidden="true" style:parent-style-name="Heading" style:next-style-name="Body" style:default-outline-level="2" style:list-style-name="" style:class="text" style:master-page-name="">
      <loext:graphic-properties draw:fill="solid" draw:fill-color="#ffffff" draw:opacity="100%"/>
      <style:paragraph-properties fo:margin-left="0.801cm" fo:margin-right="0cm" fo:margin-top="0.152cm" fo:margin-bottom="0.051cm" style:contextual-spacing="false" fo:orphans="2" fo:widows="2" fo:hyphenation-ladder-count="no-limit" fo:text-indent="-0.801cm" style:auto-text-indent="false" style:page-number="auto" fo:background-color="#ffffff" fo:keep-with-next="auto" style:writing-mode="lr-tb">
        <style:tab-stops/>
      </style:paragraph-properties>
      <style:text-properties fo:color="#000000" loext:opacity="100%" style:font-name="Andika" fo:font-family="Andika" style:font-pitch="variable" fo:font-size="12pt" fo:font-style="italic" fo:font-weight="bold" officeooo:rsid="00261f9d" style:font-name-asian="ヒラギノ角ゴ Pro W3" style:font-family-asian="'ヒラギノ角ゴ Pro W3'" style:font-family-generic-asian="system" style:font-pitch-asian="variable" style:font-size-asian="12pt" style:language-asian="en" style:country-asian="US" style:font-style-asian="italic" style:font-weight-asian="bold" style:font-name-complex="Times New Roman2" style:font-family-complex="'Times New Roman'" style:font-family-generic-complex="system" style:font-pitch-complex="variable"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Body" style:family="paragraph" style:default-outline-level="" style:master-page-name="">
      <loext:graphic-properties draw:fill="none" draw:fill-color="#729fcf"/>
      <style:paragraph-properties fo:margin-left="0cm" fo:margin-right="0cm" fo:margin-top="0.049cm" fo:margin-bottom="0.101cm" style:contextual-spacing="false" fo:orphans="2" fo:widows="2" fo:hyphenation-ladder-count="no-limit" fo:text-indent="0cm" style:auto-text-indent="false" style:page-number="auto" fo:background-color="transparent" style:writing-mode="lr-tb">
        <style:tab-stops>
          <style:tab-stop style:position="1.27cm"/>
        </style:tab-stops>
      </style:paragraph-properties>
      <style:text-properties fo:color="#000000" loext:opacity="100%" style:font-name="Andika4" fo:font-family="Andika" style:font-style-name="Regular" style:font-pitch="variable" fo:font-size="10pt" fo:language="en" fo:country="US"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Header_20__26__20_Footer" style:display-name="Header &amp; Footer" style:family="paragraph" style:default-outline-level="">
      <style:paragraph-properties fo:margin-top="0cm" fo:margin-bottom="0cm" style:contextual-spacing="false" fo:orphans="2" fo:widows="2" fo:hyphenation-ladder-count="no-limit" style:writing-mode="lr-tb">
        <style:tab-stops>
          <style:tab-stop style:position="8.001cm" style:type="center"/>
          <style:tab-stop style:position="14.416cm"/>
          <style:tab-stop style:position="16.51cm" style:type="right"/>
        </style:tab-stops>
      </style:paragraph-properties>
      <style:text-properties fo:color="#000000" loext:opacity="100%" style:font-name="Arial1" fo:font-family="Arial" style:font-family-generic="roman" style:font-pitch="variable" fo:font-size="10pt" fo:language="en" fo:country="US" style:font-name-asian="ヒラギノ角ゴ Pro W3" style:font-family-asian="'ヒラギノ角ゴ Pro W3'"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ody_20_Numbered_20_List" style:display-name="Body Numbered List" style:family="paragraph" style:parent-style-name="Body" style:default-outline-level="" style:list-style-name="WWNum1">
      <loext:graphic-properties draw:fill="none" draw:fill-color="#729fcf"/>
      <style:paragraph-properties fo:margin-left="1cm" fo:margin-right="0cm" fo:margin-top="0cm" fo:margin-bottom="0cm" style:contextual-spacing="false" fo:orphans="0" fo:widows="0" fo:hyphenation-ladder-count="no-limit" fo:text-indent="-0.499cm" style:auto-text-indent="false" fo:background-color="transparent" fo:keep-with-next="auto" text:number-lines="true" text:line-number="0" style:writing-mode="lr-tb">
        <style:tab-stops/>
      </style:paragraph-properties>
      <style:text-properties style:font-name="Andika4" fo:font-family="Andika" style:font-style-name="Regular" style:font-pitch="variable" fo:font-size="10pt" style:font-size-asian="10pt" fo:hyphenate="false" fo:hyphenation-remain-char-count="2" fo:hyphenation-push-char-count="2" loext:hyphenation-no-caps="false" loext:hyphenation-no-last-word="false" loext:hyphenation-word-char-count="no-limit" loext:hyphenation-zone="no-limit"/>
    </style:style>
    <style:style style:name="Body_20_Bullet_20_List" style:display-name="Body Bullet List" style:family="paragraph" style:parent-style-name="Body" style:default-outline-level="">
      <loext:graphic-properties draw:fill="solid" draw:fill-color="#ffffff" draw:opacity="100%"/>
      <style:paragraph-properties fo:margin-left="0.885cm" fo:margin-right="0cm" fo:margin-top="0.051cm" fo:margin-bottom="0cm" style:contextual-spacing="false" fo:orphans="2" fo:widows="2" fo:text-indent="-0.346cm" style:auto-text-indent="false" fo:background-color="#ffffff" fo:keep-with-next="always">
        <style:tab-stops>
          <style:tab-stop style:position="0.885cm"/>
          <style:tab-stop style:position="1.729cm"/>
        </style:tab-stops>
      </style:paragraph-properties>
      <style:text-properties fo:color="#000000" loext:opacity="100%" style:font-name="Andika4"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loext:hidden="true" style:hidden="true" style:parent-style-name="Standard" style:default-outline-level="" style:class="extra">
      <style:paragraph-properties fo:margin-left="0cm" fo:margin-right="0cm" fo:margin-top="0cm" fo:margin-bottom="0.102cm" style:contextual-spacing="false" fo:text-indent="0cm" style:auto-text-indent="false" style:border-line-width-bottom="0.002cm 0.035cm 0.002cm" fo:padding="0cm" fo:border-left="none" fo:border-right="none" fo:border-top="none" fo:border-bottom="1.11pt double #000001" text:number-lines="false" text:line-number="0">
        <style:tab-stops>
          <style:tab-stop style:position="7.62cm" style:type="center"/>
          <style:tab-stop style:position="16.764cm" style:type="right"/>
        </style:tab-stops>
      </style:paragraph-properties>
      <style:text-properties style:font-name="Andika Basic" fo:font-family="'Andika Basic'" style:font-family-generic="roman" style:font-pitch="variable" fo:font-size="10pt" style:font-size-asian="10pt"/>
    </style:style>
    <style:style style:name="Footer" style:family="paragraph" style:parent-style-name="Standard" style:default-outline-level="" style:class="extra" style:master-page-name="">
      <style:paragraph-properties style:page-number="auto" text:number-lines="false" text:line-number="0">
        <style:tab-stops>
          <style:tab-stop style:position="9.525cm" style:type="center"/>
          <style:tab-stop style:position="17.394cm" style:type="right"/>
        </style:tab-stops>
      </style:paragraph-properties>
      <style:text-properties style:font-name="Andika4" fo:font-family="Andika" style:font-style-name="Regular" style:font-pitch="variable" fo:font-size="10pt" style:font-size-asian="10pt" style:font-weight-asian="normal"/>
    </style:style>
    <style:style style:name="Body_20_Inset" style:display-name="Body Inset" style:family="paragraph" style:parent-style-name="Body" style:default-outline-level="">
      <style:paragraph-properties fo:margin-left="0.751cm" fo:margin-right="0cm" fo:margin-top="0cm" fo:margin-bottom="0cm" style:contextual-spacing="false" fo:text-indent="0cm" style:auto-text-indent="false"/>
    </style:style>
    <style:style style:name="Balloon_20_Text" style:display-name="Balloon Text" style:family="paragraph" style:parent-style-name="Standard" style:default-outline-level="">
      <style:text-properties style:font-name="Lucida Grande1" fo:font-family="'Lucida Grande'" style:font-family-generic="roman" style:font-pitch="variable" fo:font-size="9pt" style:font-size-asian="9pt" style:font-name-complex="Lucida Grande2" style:font-family-complex="'Lucida Grande'" style:font-family-generic-complex="system" style:font-pitch-complex="variable" style:font-size-complex="9pt"/>
    </style:style>
    <style:style style:name="Body_20_Bold" style:display-name="Body Bold" style:family="paragraph" style:parent-style-name="Standard" style:default-outline-level="">
      <style:paragraph-properties fo:margin-left="0cm" fo:margin-right="0cm" fo:margin-top="0.152cm" fo:margin-bottom="0.152cm" style:contextual-spacing="false" fo:text-align="start" style:justify-single-word="false" fo:text-indent="0cm" style:auto-text-indent="false"/>
      <style:text-properties style:font-name="Andika1" fo:font-family="Andika" style:font-style-name="Bold" style:font-pitch="variable" fo:font-size="10pt" fo:font-style="normal" fo:font-weight="bold" style:font-size-asian="10pt" style:font-style-asian="normal" style:font-weight-asian="bold" style:font-size-complex="10pt" style:font-style-complex="normal" style:font-weight-complex="bold"/>
    </style:style>
    <style:style style:name="English_20_translation" style:display-name="English translation" style:family="paragraph" style:parent-style-name="Body" style:default-outline-level="" style:master-page-name="">
      <style:paragraph-properties fo:margin-top="0cm" fo:margin-bottom="0.101cm" style:contextual-spacing="true" fo:text-align="start" style:justify-single-word="false" style:page-number="auto" style:shadow="none">
        <style:tab-stops/>
      </style:paragraph-properties>
      <style:text-properties style:font-name="Andika3" fo:font-family="Andika" style:font-style-name="Italic" style:font-pitch="variable" fo:font-size="8pt" fo:font-style="italic" style:font-style-asian="italic" style:font-style-complex="italic"/>
    </style:style>
    <style:style style:name="Body_20_Bold_20_Right_20_Flush" style:display-name="Body Bold Right Flush" style:family="paragraph" style:parent-style-name="Body_20_Bold" style:default-outline-level="">
      <style:paragraph-properties fo:text-align="end" style:justify-single-word="false"/>
    </style:style>
    <style:style style:name="Body_20_Tight_20_lines" style:display-name="Body Tight lines" style:family="paragraph" style:parent-style-name="Body" style:default-outline-level="" style:master-page-name="">
      <style:paragraph-properties fo:margin-top="0cm" fo:margin-bottom="0.049cm" style:contextual-spacing="false" style:page-number="auto" fo:keep-with-next="always"/>
      <style:text-properties fo:font-size="10pt" fo:font-weight="normal" style:font-size-asian="10pt" style:font-weight-asian="normal"/>
    </style:style>
    <style:style style:name="Table_20_Contents" style:display-name="Table Contents" style:family="paragraph" style:parent-style-name="Body" style:default-outline-level="" style:class="extra" style:master-page-name="">
      <style:paragraph-properties style:page-number="auto" fo:keep-with-next="always" text:number-lines="false" text:line-number="0"/>
      <style:text-properties style:font-name="Andika4" fo:font-family="Andika" style:font-style-name="Regular" style:font-pitch="variable" fo:font-size="10pt" style:font-weight-asian="norma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style:font-name="Andika1" fo:font-family="Andika" style:font-style-name="Bold" style:font-pitch="variable" fo:font-size="16pt" fo:font-weight="bold" style:font-weight-asian="bold" style:font-weight-complex="bold"/>
    </style:style>
    <style:style style:name="Body_20_Large_20_Inset" style:display-name="Body Large Inset" style:family="paragraph" style:parent-style-name="Body" style:default-outline-level="">
      <style:paragraph-properties fo:margin-left="1.252cm" fo:margin-right="1.685cm" fo:margin-top="0.152cm" fo:margin-bottom="0cm" style:contextual-spacing="false" fo:orphans="2" fo:widows="2" fo:text-indent="0cm" style:auto-text-indent="false">
        <style:tab-stops>
          <style:tab-stop style:position="2.522cm"/>
        </style:tab-stops>
      </style:paragraph-properties>
      <style:text-properties fo:color="#000000" loext:opacity="100%" style:font-name="Andika Basic" fo:font-family="'Andika Basic'" style:font-family-generic="roman" style:font-pitch="variable" fo:font-size="12pt" fo:font-style="normal" fo:font-weight="bold" style:font-name-asian="ヒラギノ角ゴ Pro W3" style:font-family-asian="'ヒラギノ角ゴ Pro W3'" style:font-family-generic-asian="system" style:font-pitch-asian="variable" style:font-size-asian="12pt" style:language-asian="en" style:country-asian="US" style:font-style-asian="normal" style:font-weight-asian="bold" style:font-name-complex="Times New Roman2" style:font-family-complex="'Times New Roman'" style:font-family-generic-complex="system" style:font-pitch-complex="variable" style:font-size-complex="12pt" style:font-style-complex="normal"/>
    </style:style>
    <style:style style:name="Heading_20_2_20_with_20_graphic" style:display-name="Heading 2 with graphic" style:family="paragraph" style:parent-style-name="Heading_20_2" style:auto-update="true" style:default-outline-level="2" style:list-style-name="WWNum1" style:master-page-name="">
      <loext:graphic-properties draw:fill="solid" draw:fill-color="#ffffff" draw:opacity="100%"/>
      <style:paragraph-properties fo:margin-left="1.383cm" fo:margin-right="0cm" fo:margin-top="0.254cm" fo:margin-bottom="0.203cm" style:contextual-spacing="false" fo:keep-together="always" fo:orphans="2" fo:widows="2" fo:hyphenation-ladder-count="no-limit" fo:text-indent="1.088cm" style:auto-text-indent="false" style:page-number="auto" fo:background-color="#ffffff" fo:keep-with-next="always" style:vertical-align="bottom" style:writing-mode="lr-tb">
        <style:tab-stops/>
        <style:drop-cap/>
      </style:paragraph-properties>
      <style:text-properties fo:hyphenate="false" fo:hyphenation-remain-char-count="2" fo:hyphenation-push-char-count="2" loext:hyphenation-no-caps="false" loext:hyphenation-no-last-word="false" loext:hyphenation-word-char-count="no-limit" loext:hyphenation-zone="no-limit"/>
    </style:style>
    <style:style style:name="Part_20_Heading" style:display-name="Part Heading" style:family="paragraph" style:parent-style-name="Standard" style:default-outline-level="" style:list-style-name="" style:master-page-name="">
      <loext:graphic-properties draw:fill="gradient" draw:fill-color="#000000" draw:fill-gradient-name="Gradient_20_14" draw:gradient-step-count="0" draw:opacity="100%"/>
      <style:paragraph-properties fo:margin-left="0cm" fo:margin-right="0cm" fo:margin-top="0cm" fo:margin-bottom="0cm" style:contextual-spacing="false" fo:text-align="start" style:justify-single-word="false" fo:orphans="2" fo:widows="2" fo:hyphenation-ladder-count="no-limit" fo:text-indent="0.199cm" style:auto-text-indent="false" style:page-number="auto" fo:break-before="auto" fo:break-after="auto" fo:background-color="#5a5a5a" fo:padding="0cm" fo:border="none" style:shadow="none" fo:keep-with-next="always" style:vertical-align="bottom" style:writing-mode="lr-tb">
        <style:tab-stops/>
      </style:paragraph-properties>
      <style:text-properties fo:color="#ffffff" loext:opacity="100%" style:text-outline="false" style:font-name="Andika1" fo:font-family="Andika" style:font-style-name="Bold" style:font-pitch="variable" fo:font-size="16pt" fo:font-weight="bold"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Heading_20_inline_20_Graphic" style:display-name="Heading inline Graphic" style:family="paragraph" style:parent-style-name="Heading" style:default-outline-level="2" style:list-style-name="WWNum1">
      <style:paragraph-properties fo:margin-left="-0.499cm" fo:margin-right="0cm" fo:margin-top="0cm" fo:margin-bottom="0cm" style:contextual-spacing="false" fo:text-indent="-0.762cm" style:auto-text-indent="false">
        <style:tab-stops>
          <style:tab-stop style:position="1.134cm"/>
        </style:tab-stops>
      </style:paragraph-properties>
    </style:style>
    <style:style style:name="Table_20_Left_20_headings" style:display-name="Table Left headings" style:family="paragraph" style:parent-style-name="Body_20_Bold">
      <style:paragraph-properties fo:margin-left="0cm" fo:margin-right="0.049cm" fo:margin-top="0cm" fo:margin-bottom="0cm" style:contextual-spacing="false" fo:text-align="end" style:justify-single-word="false" fo:text-indent="0cm" style:auto-text-indent="false"/>
      <style:text-properties style:font-name="Andika New Basic1" fo:font-family="'Andika New Basic'" style:font-style-name="Bold" style:font-pitch="variable"/>
    </style:style>
    <style:style style:name="Graphic_20_Header" style:display-name="Graphic Header" style:family="paragraph" style:parent-style-name="Heading_20_2" style:default-outline-level="" style:list-style-name="">
      <style:paragraph-properties fo:margin-left="0.046cm" fo:margin-right="0cm" fo:margin-top="0cm" fo:margin-bottom="0cm" style:contextual-spacing="false" fo:text-indent="-1.016cm" style:auto-text-indent="false">
        <style:tab-stops/>
      </style:paragraph-properties>
    </style:style>
    <style:style style:name="Table_20_Column_20_Heading" style:display-name="Table Column Heading" style:family="paragraph" style:parent-style-name="Table_20_Contents" style:master-page-name="">
      <style:paragraph-properties fo:margin-left="0.014cm" fo:margin-right="-0.009cm" fo:margin-top="0cm" fo:margin-bottom="0cm" style:contextual-spacing="false" fo:text-align="center" style:justify-single-word="false" fo:text-indent="0cm" style:auto-text-indent="false" style:page-number="auto">
        <style:tab-stops/>
      </style:paragraph-properties>
      <style:text-properties style:font-name="Andika New Basic1" fo:font-family="'Andika New Basic'" style:font-style-name="Bold" style:font-pitch="variable" fo:font-size="16pt" fo:font-weight="bold" style:font-size-asian="16pt" style:font-weight-asian="bold" style:font-size-complex="16pt" style:font-weight-complex="bold"/>
    </style:style>
    <style:style style:name="Table_20_Bullets" style:display-name="Table Bullets" style:family="paragraph" style:parent-style-name="Table_20_Contents" style:auto-update="true" style:default-outline-level="1" style:list-style-name="" style:class="extra" style:master-page-name="">
      <style:paragraph-properties fo:margin-left="0.67cm" fo:margin-right="-0.018cm" fo:margin-top="0cm" fo:margin-bottom="0cm" style:contextual-spacing="false" fo:orphans="2" fo:widows="2" fo:hyphenation-ladder-count="no-limit" fo:text-indent="-0.635cm" style:auto-text-indent="false" style:page-number="auto" style:shadow="none" text:number-lines="false" text:line-number="0" style:writing-mode="lr-tb">
        <style:tab-stops/>
      </style:paragraph-properties>
      <style:text-properties style:font-name="Andika" fo:font-family="Andika" style:font-pitch="variable" fo:font-size="10pt" fo:font-weight="normal" style:font-size-asian="10pt" style:font-weight-asian="bold"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M.T_20_Bible_20_Story" style:display-name="M.T Bible Story" style:family="paragraph" style:parent-style-name="English_20_translation">
      <style:paragraph-properties fo:margin-left="0cm" fo:margin-right="0cm" fo:margin-top="0cm" fo:margin-bottom="0cm" style:contextual-spacing="false" fo:text-indent="0cm" style:auto-text-indent="false"/>
      <style:text-properties fo:font-size="10pt" fo:font-style="normal" style:font-size-asian="10pt" style:font-style-asian="normal" style:font-size-complex="10pt" style:font-style-complex="normal"/>
    </style:style>
    <style:style style:name="M.T._20_Application" style:display-name="M.T. Application" style:family="paragraph" style:parent-style-name="English_20_translation">
      <style:paragraph-properties fo:margin-left="0cm" fo:margin-right="0cm" fo:margin-top="0cm" fo:margin-bottom="0cm" style:contextual-spacing="false" fo:text-indent="0cm" style:auto-text-indent="false"/>
      <style:text-properties fo:font-size="10pt" fo:font-style="normal" fo:font-weight="normal" style:font-size-asian="10pt" style:font-style-asian="normal" style:font-weight-asian="bold" style:font-size-complex="10pt" style:font-style-complex="normal" style:font-weight-complex="bold"/>
    </style:style>
    <style:style style:name="Table_20_Bullet_20_List" style:display-name="Table Bullet List" style:family="paragraph" style:auto-update="true" style:default-outline-level="1" style:list-style-name="" style:class="extra">
      <style:paragraph-properties fo:margin-left="0.67cm" fo:margin-right="-0.018cm" fo:margin-top="0cm" fo:margin-bottom="0cm" style:contextual-spacing="false" fo:orphans="2" fo:widows="2" fo:hyphenation-ladder-count="no-limit" fo:text-indent="-0.635cm" style:auto-text-indent="false" style:shadow="none" text:number-lines="false" text:line-number="0" style:writing-mode="lr-tb">
        <style:tab-stops>
          <style:tab-stop style:position="0.635cm" style:leader-style="dotted" style:leader-tex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Review_20_Game" style:display-name="M.T. Review Game" style:family="paragraph" style:list-style-name="WWNum2" style:master-page-name="">
      <style:paragraph-properties style:page-number="auto"/>
      <style:text-properties style:font-name="Andika4" fo:font-family="Andika" style:font-style-name="Regular" style:font-pitch="variable" fo:font-size="10pt" style:font-size-asian="10.5pt"/>
    </style:style>
    <style:style style:name="M.T._20_Text" style:display-name="M.T. Text" style:family="paragraph" style:parent-style-name="Body" style:next-style-name="English_20_translation" style:master-page-name="">
      <loext:graphic-properties draw:fill="solid" draw:fill-color="#ffffcc" draw:opacity="100%" draw:fill-image-width="0cm" draw:fill-image-height="0cm"/>
      <style:paragraph-properties fo:margin-top="0cm" fo:margin-bottom="0cm" style:contextual-spacing="true" style:page-number="auto" fo:background-color="#ffffcc" fo:keep-with-next="auto">
        <style:tab-stops>
          <style:tab-stop style:position="6.366cm"/>
        </style:tab-stops>
      </style:paragraph-properties>
      <style:text-properties style:font-name="Andika4" fo:font-family="Andika" style:font-style-name="Regular" style:font-pitch="variable" fo:language="en" fo:country="GB"/>
    </style:style>
    <style:style style:name="First_20_Page_20_Footer" style:display-name="First Page Footer" style:family="paragraph" style:parent-style-name="Footer" style:default-outline-level="" style:class="extra">
      <style:paragraph-properties fo:margin-left="2.401cm" fo:margin-right="0cm" fo:margin-top="0cm" fo:margin-bottom="0cm" style:contextual-spacing="false" fo:orphans="2" fo:widows="2" fo:hyphenation-ladder-count="no-limit" fo:text-indent="0cm" style:auto-text-indent="false" text:number-lines="false" text:line-number="0" style:writing-mode="lr-tb">
        <style:tab-stops>
          <style:tab-stop style:position="8.587cm" style:type="center"/>
          <style:tab-stop style:position="15.24cm" style:type="right"/>
        </style:tab-stops>
      </style:paragraph-properties>
      <style:text-properties style:font-name="Andika New Basic2" fo:font-family="'Andika New Basic'" style:font-style-name="Regular" style:font-pitch="variable" fo:font-size="6pt" officeooo:rsid="009839a1" style:font-size-asian="6pt" style:font-weight-asian="normal" style:font-size-complex="6pt" fo:hyphenate="false" fo:hyphenation-remain-char-count="2" fo:hyphenation-push-char-count="2" loext:hyphenation-no-caps="false" loext:hyphenation-no-last-word="false" loext:hyphenation-word-char-count="no-limit" loext:hyphenation-zone="no-limit"/>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loext:hidden="true"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M.T._20_Text_20_Numbered" style:display-name="M.T. Text Numbered" style:family="paragraph" style:parent-style-name="M.T._20_Text" style:list-style-name="WWNum2"/>
    <style:style style:name="Body_20_Bullet_20_-_20_Checkmark" style:display-name="Body Bullet - Checkmark" style:family="paragraph" style:parent-style-name="Body" style:next-style-name="Body_20_Bullet_20_-_20_Checkmark_20_-_20_No_20_follow" style:default-outline-level="" style:list-style-name="Bullet_20_-_20_checkmark" style:master-page-name="">
      <loext:graphic-properties draw:fill="none" draw:fill-color="#ffffff"/>
      <style:paragraph-properties fo:margin-left="1.199cm" fo:margin-right="0cm" fo:margin-top="0cm" fo:margin-bottom="0cm" style:contextual-spacing="true" fo:orphans="2" fo:widows="2" fo:hyphenation-ladder-count="no-limit" fo:text-indent="-0.499cm" style:auto-text-indent="false" style:page-number="auto" fo:background-color="transparent" fo:keep-with-next="always" style:writing-mode="lr-tb">
        <style:tab-stops>
          <style:tab-stop style:position="1.203cm"/>
        </style:tab-stops>
      </style:paragraph-properties>
      <style:text-properties fo:color="#000000" loext:opacity="100%" style:font-name="Andika4"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fo:hyphenate="false" fo:hyphenation-remain-char-count="2" fo:hyphenation-push-char-count="2" loext:hyphenation-no-caps="false" loext:hyphenation-no-last-word="false" loext:hyphenation-word-char-count="no-limit" loext:hyphenation-zone="no-limit"/>
    </style:style>
    <style:style style:name="Outline_20_Table_20_-_20_Left_20_Column_20_Headings" style:display-name="Outline Table - Left Column Headings" style:family="paragraph" style:parent-style-name="Table_20_Contents" style:master-page-name="">
      <style:paragraph-properties fo:margin-left="0cm" fo:margin-right="0cm" fo:margin-top="0cm" fo:margin-bottom="0cm" style:contextual-spacing="false" fo:text-align="end" style:justify-single-word="false" fo:text-indent="0cm" style:auto-text-indent="false" style:page-number="auto" style:vertical-align="bottom"/>
      <style:text-properties style:text-outline="false" style:font-name="Andika1" fo:font-family="Andika" style:font-style-name="Bold" style:font-pitch="variable" fo:font-weight="bold"/>
    </style:style>
    <style:style style:name="Bible_20_Story_20_Column_20_Heading" style:display-name="Bible Story Column Heading" style:family="paragraph" style:parent-style-name="Body">
      <style:paragraph-properties fo:margin-left="0.014cm" fo:margin-right="-0.009cm" fo:margin-top="0cm" fo:margin-bottom="0cm" style:contextual-spacing="false" fo:text-align="center" style:justify-single-word="false" fo:text-indent="0cm" style:auto-text-indent="false">
        <style:tab-stops/>
      </style:paragraph-properties>
      <style:text-properties fo:font-weight="bold" style:font-weight-asian="bold" style:font-weight-complex="bold"/>
    </style:style>
    <style:style style:name="Body_20_Translated" style:display-name="Body Translated" style:family="paragraph" style:parent-style-name="Body" style:auto-update="true">
      <style:paragraph-properties fo:margin-top="0.152cm" fo:margin-bottom="0cm" style:contextual-spacing="false"/>
      <style:text-properties fo:font-weight="normal" style:font-weight-asian="normal" style:font-weight-complex="normal"/>
    </style:style>
    <style:style style:name="M.T._20_Text_20_-_20_Checkmark_20_bullet" style:display-name="M.T. Text - Checkmark bullet" style:family="paragraph" style:parent-style-name="M.T._20_Text" style:default-outline-level="" style:list-style-name="Bullet_20_-_20_checkmark" style:master-page-name="">
      <loext:graphic-properties draw:opacity="100%"/>
      <style:paragraph-properties fo:margin-left="1.3cm" fo:margin-right="0cm" fo:margin-top="0cm" fo:margin-bottom="0cm" style:contextual-spacing="true" fo:orphans="2" fo:widows="2" fo:hyphenation-ladder-count="no-limit" fo:text-indent="-0.6cm" style:auto-text-indent="false"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Diamond_20_bullet" style:display-name="M.T. Text - Diamond bullet" style:family="paragraph" style:parent-style-name="M.T._20_Text" style:default-outline-level="" style:list-style-name="Bullet_20_-_20_Diamond" style:master-page-name="">
      <loext:graphic-properties draw:opacity="100%"/>
      <style:paragraph-properties fo:margin-left="1.799cm" fo:margin-right="0cm" fo:margin-top="0cm" fo:margin-bottom="0cm" style:contextual-spacing="false" fo:orphans="2" fo:widows="2" fo:hyphenation-ladder-count="no-limit" fo:text-indent="-0.6cm" style:auto-text-indent="false"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Numbered_20_List" style:display-name="M.T. Text - Numbered List" style:family="paragraph" style:parent-style-name="M.T._20_Text" style:list-style-name="" style:master-page-name="">
      <style:paragraph-properties style:page-number="auto" fo:keep-with-next="always"/>
    </style:style>
    <style:style style:name="English_20_Translation_20_-_20_double_20_inset" style:display-name="English Translation - double inset" style:family="paragraph" style:parent-style-name="English_20_translation" style:default-outline-level="" style:master-page-name="">
      <style:paragraph-properties fo:margin-left="1.799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single_20_inset" style:display-name="English Translation - single inset" style:family="paragraph" style:parent-style-name="English_20_translation" style:default-outline-level="" style:master-page-name="">
      <style:paragraph-properties fo:margin-left="1.3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eader_20_right" style:display-name="Header righ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Bible_20_Story_20_-_20_Graphic_20_Number" style:display-name="Bible Story - Graphic Number" style:family="paragraph" style:parent-style-name="Body" style:master-page-name="">
      <style:paragraph-properties fo:margin-top="0.101cm" fo:margin-bottom="0cm" style:contextual-spacing="false" fo:text-align="center" style:justify-single-word="false" fo:orphans="0" fo:widows="0" style:page-number="auto" style:vertical-align="top"/>
      <style:text-properties fo:font-size="10pt" fo:font-style="italic" fo:font-weight="bold" style:font-size-asian="10pt" style:font-style-asian="italic" style:font-weight-asian="bold" style:font-size-complex="10pt" style:font-style-complex="italic" style:font-weight-complex="bold"/>
    </style:style>
    <style:style style:name="Sub-Head_20_1" style:display-name="Sub-Head 1" style:family="paragraph" style:parent-style-name="Standard" style:default-outline-level="" style:list-style-name="" style:master-page-name="">
      <style:paragraph-properties fo:margin-left="0cm" fo:margin-right="0cm" fo:margin-top="0cm" fo:margin-bottom="0cm" style:contextual-spacing="false" fo:orphans="2" fo:widows="2" fo:hyphenation-ladder-count="no-limit" fo:text-indent="0cm" style:auto-text-indent="false" style:page-number="auto" fo:keep-with-next="always" style:writing-mode="lr-tb">
        <style:tab-stops>
          <style:tab-stop style:position="1.134cm"/>
        </style:tab-stops>
      </style:paragraph-properties>
      <style:text-properties style:text-outline="false" style:font-name="Andika1" fo:font-family="Andika" style:font-style-name="Bold" style:font-pitch="variable" fo:font-size="14pt" fo:font-weight="bold" style:font-size-asian="14pt" style:font-weight-asian="bold"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Section_20_Heading" style:display-name="Section Heading" style:family="paragraph" style:parent-style-name="Standard" style:default-outline-level="" style:master-page-name="">
      <loext:graphic-properties draw:fill="gradient" draw:fill-color="#cccccc" draw:fill-gradient-name="Gradient_20_15" draw:gradient-step-count="0" draw:opacity="100%"/>
      <style:paragraph-properties fo:margin-left="0cm" fo:margin-right="0cm" fo:margin-top="0.3cm" fo:margin-bottom="0.199cm" style:contextual-spacing="true" fo:orphans="2" fo:widows="2" fo:hyphenation-ladder-count="no-limit" fo:text-indent="0.199cm" style:auto-text-indent="false" style:page-number="auto" fo:background-color="#d9d9d9" fo:keep-with-next="always" style:writing-mode="lr-tb">
        <style:tab-stops>
          <style:tab-stop style:position="1.134cm"/>
        </style:tab-stops>
      </style:paragraph-properties>
      <style:text-properties style:text-outline="false" style:font-name="Andika1" fo:font-family="Andika" style:font-style-name="Bold" style:font-pitch="variable" fo:font-size="16pt" fo:font-weight="bold" officeooo:rsid="00de704f"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Sub-Head_20_2" style:display-name="Sub-Head 2" style:family="paragraph" style:parent-style-name="Sub-Head_20_1">
      <style:paragraph-properties fo:margin-left="0cm" fo:margin-right="0cm" fo:margin-top="0.101cm" fo:margin-bottom="0cm" style:contextual-spacing="false" fo:text-indent="0cm" style:auto-text-indent="false"/>
      <style:text-properties style:text-outline="false" fo:font-size="10pt" fo:font-style="italic" fo:font-weight="bold" style:font-size-asian="10pt" style:font-size-complex="10p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Salutation"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er_20_right" style:display-name="Footer righ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loext:hidden="true" style:hidden="true" style:parent-style-name="Standard"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Header_20_left" style:display-name="Header lef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Body_20_-_20_Small_20_Spacer" style:display-name="Body - Small Spacer" style:family="paragraph" style:parent-style-name="Body">
      <style:paragraph-properties fo:margin-top="0cm" fo:margin-bottom="0cm" style:contextual-spacing="false"/>
      <style:text-properties fo:font-size="6pt" style:font-size-asian="5.30000019073486pt" style:font-size-complex="6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loext:hidden="true" style:hidden="true" style:parent-style-name="Heading" style:next-style-name="Text_20_body" style:default-outline-level="4" style:list-style-name="Outline"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loext:hidden="true" style:hidden="true"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loext:hidden="true" style:hidden="true" style:parent-style-name="Text_20_body" style:class="text">
      <style:paragraph-properties fo:margin-left="4.001cm" fo:margin-right="0cm" fo:text-indent="0cm" style:auto-text-indent="false"/>
    </style:style>
    <style:style style:name="M.T._20_Text_20_-_20_Numbered_20_List_20_Inset" style:display-name="M.T. Text - Numbered List Inset" style:family="paragraph" style:parent-style-name="M.T._20_Text" style:next-style-name="English_20_Translation_20_-_20_single_20_inset" style:default-outline-level="" style:list-style-name="" style:master-page-name="">
      <loext:graphic-properties draw:opacity="100%"/>
      <style:paragraph-properties fo:margin-top="0cm" fo:margin-bottom="0cm" style:contextual-spacing="fals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able_20_Bullet_20_-_20_Checkmark" style:display-name="Table Bullet - Checkmark" style:family="paragraph" style:parent-style-name="Table_20_Contents" style:default-outline-level="" style:list-style-name="Table_20_Bullet_20_-_20_checkmark">
      <loext:graphic-properties draw:fill="none" draw:fill-color="#ffffff"/>
      <style:paragraph-properties fo:margin-left="0.499cm" fo:margin-right="0cm" fo:margin-top="0cm" fo:margin-bottom="0cm" style:contextual-spacing="false" fo:orphans="2" fo:widows="2" fo:hyphenation-ladder-count="no-limit" fo:text-indent="-0.499cm" style:auto-text-indent="false" fo:background-color="transparent" fo:keep-with-next="always" style:writing-mode="lr-tb">
        <style:tab-stops>
          <style:tab-stop style:position="1.203cm"/>
        </style:tab-stops>
      </style:paragraph-properties>
      <style:text-properties style:font-name="Andika4" fo:font-family="Andika" style:font-style-name="Regular" style:font-pitch="variable" fo:hyphenate="false" fo:hyphenation-remain-char-count="2" fo:hyphenation-push-char-count="2" loext:hyphenation-no-caps="false" loext:hyphenation-no-last-word="false" loext:hyphenation-word-char-count="no-limit" loext:hyphenation-zone="no-limit"/>
    </style:style>
    <style:style style:name="M.T._20_Text_20_-_20_Table_20_Single_20_Inset" style:display-name="M.T. Text - Table Single Inset" style:family="paragraph" style:parent-style-name="M.T._20_Text" style:master-page-name="">
      <style:paragraph-properties fo:margin-left="0.499cm" fo:margin-right="0cm" fo:text-indent="0cm" style:auto-text-indent="false" style:page-number="auto"/>
    </style:style>
    <style:style style:name="M.T._20_Text_20_-_20_Single_20_Inset" style:display-name="M.T. Text - Single Inset" style:family="paragraph" style:parent-style-name="M.T._20_Text" style:master-page-name="">
      <loext:graphic-properties draw:fill="solid" draw:fill-color="#ffffcc"/>
      <style:paragraph-properties fo:margin-left="1.251cm" fo:margin-right="0cm" fo:text-indent="0cm" style:auto-text-indent="false" style:page-number="auto" fo:background-color="#ffffcc" fo:keep-with-next="always"/>
    </style:style>
    <style:style style:name="M.T._20_Text_20_-_20_Numbered_20_List_20_Dbl_20_Inset" style:display-name="M.T. Text - Numbered List Dbl Inset" style:family="paragraph" style:parent-style-name="M.T._20_Text" style:next-style-name="English_20_Translation_20_-_20_double_20_inset" style:default-outline-level="" style:list-style-name="" style:master-page-name="">
      <loext:graphic-properties draw:opacity="100%"/>
      <style:paragraph-properties fo:margin-top="0cm" fo:margin-bottom="0cm" style:contextual-spacing="fals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Table_20_single_20_inset" style:display-name="English Translation - Table single inset" style:family="paragraph" style:parent-style-name="English_20_translation" style:default-outline-level="" style:master-page-name="">
      <style:paragraph-properties fo:margin-left="0.499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Table_20_Bullet_20_Checkmark" style:display-name="M.T. Text - Table Bullet Checkmark" style:family="paragraph" style:parent-style-name="M.T._20_Text" style:list-style-name="Table_20_Bullet_20_-_20_checkmark" style:master-page-name="">
      <loext:graphic-properties draw:opacity="100%"/>
      <style:paragraph-properties style:page-number="auto" fo:keep-with-next="always"/>
    </style:style>
    <style:style style:name="Lesson_20_Number" style:display-name="Lesson Number" style:family="paragraph" style:parent-style-name="Standard" style:default-outline-level="" style:master-page-name="">
      <loext:graphic-properties draw:fill="none" draw:fill-color="#ffffff"/>
      <style:paragraph-properties fo:margin-left="0cm" fo:margin-right="0cm" fo:margin-top="0cm" fo:margin-bottom="0cm" style:contextual-spacing="false" fo:text-align="center" style:justify-single-word="false" fo:orphans="0" fo:widows="0" fo:hyphenation-ladder-count="no-limit" fo:text-indent="0cm" style:auto-text-indent="false" style:page-number="auto" fo:break-before="auto" fo:break-after="auto" fo:background-color="transparent" style:vertical-align="bottom" style:writing-mode="lr-tb">
        <style:tab-stops>
          <style:tab-stop style:position="1.134cm"/>
        </style:tab-stops>
      </style:paragraph-properties>
      <style:text-properties style:use-window-font-color="true" loext:opacity="0%" style:font-name="Arial Black" fo:font-family="'Arial Black'" style:font-pitch="variable" fo:font-size="44pt" fo:language="en" fo:country="US" fo:font-weight="900" officeooo:rsid="01a034e0" style:font-name-asian="ヒラギノ角ゴ Pro W3" style:font-family-asian="'ヒラギノ角ゴ Pro W3'" style:font-family-generic-asian="system" style:font-pitch-asian="variable" style:font-size-asian="38.5pt" style:language-asian="en" style:country-asian="US" style:font-weight-asian="normal" style:font-name-complex="Times New Roman2" style:font-family-complex="'Times New Roman'" style:font-family-generic-complex="system" style:font-pitch-complex="variable" style:font-size-complex="44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Lesson_20_Title_20_Scrip_20_Reference" style:display-name="Lesson Title Scrip Reference" style:family="paragraph" style:parent-style-name="Body" style:default-outline-level="" style:master-page-name="">
      <loext:graphic-properties draw:fill="none" draw:fill-color="#729fcf"/>
      <style:paragraph-properties fo:margin-left="0cm" fo:margin-right="0cm" fo:margin-top="0cm" fo:margin-bottom="0.3cm" style:contextual-spacing="false" fo:text-align="start" style:justify-single-word="false" fo:orphans="2" fo:widows="2" fo:hyphenation-ladder-count="no-limit" fo:text-indent="0cm" style:auto-text-indent="false" style:page-number="auto" fo:background-color="transparent" fo:keep-with-next="always"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able_20_English_20_Translation" style:display-name="Table English Translation" style:family="paragraph" style:parent-style-name="English_20_translation" style:auto-update="true" style:default-outline-level="" style:master-page-name="">
      <loext:graphic-properties draw:fill="none" draw:fill-color="#729fcf"/>
      <style:paragraph-properties fo:margin-left="0.3cm" fo:margin-right="0cm" fo:margin-top="0.101cm" fo:margin-bottom="0.25cm" style:contextual-spacing="false" fo:text-align="start" style:justify-single-word="false" fo:orphans="2" fo:widows="2" fo:hyphenation-ladder-count="no-limit" fo:text-indent="0cm" style:auto-text-indent="false" style:page-number="auto" fo:background-color="transparent"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able_20_English_20_Trans_20_-_20_Single_20_Inset" style:display-name="Table English Trans - Single Inset" style:family="paragraph" style:parent-style-name="Table_20_English_20_Translation"/>
    <style:style style:name="M.T._20_Text_20_-_20_Table_20_Bullet" style:display-name="M.T. Text - Table Bullet" style:family="paragraph" style:parent-style-name="M.T._20_Text_20_-_20_Table_20_Single_20_Inset" style:default-outline-level="" style:list-style-name="Table_20_Bullet_20_-_20_checkmark" style:master-page-name="">
      <loext:graphic-properties draw:opacity="100%"/>
      <style:paragraph-properties fo:margin-top="0cm" fo:margin-bottom="0cm" style:contextual-spacing="tru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ext_20_body_20_tight_20_lines" style:display-name="Text body tight lines" style:family="paragraph" style:parent-style-name="Text_20_body"/>
    <style:style style:name="Copyright_20_footer_20_text" style:display-name="Copyright footer text" style:family="paragraph" style:parent-style-name="Footer">
      <style:text-properties style:font-name="Andika" fo:font-family="Andika" style:font-pitch="variable" fo:font-size="8pt" style:font-size-asian="8pt" style:font-size-complex="8pt"/>
    </style:style>
    <style:style style:name="M.T._20_Text_20_-_20_Bullet" style:display-name="M.T. Text - Bullet" style:family="paragraph" style:parent-style-name="M.T._20_Text" style:auto-update="true" style:master-page-name="">
      <style:paragraph-properties style:page-number="auto" fo:keep-with-next="always"/>
      <style:text-properties fo:background-color="transparent"/>
    </style:style>
    <style:style style:name="M.T._20_Text_20_-_20_Bullet_20_Dot" style:display-name="M.T. Text - Bullet Dot" style:family="paragraph" style:parent-style-name="M.T._20_Text" style:next-style-name="English_20_translation" style:list-style-name="Bullet_20_-_20_Dot" style:master-page-name="">
      <loext:graphic-properties draw:opacity="100%"/>
      <style:paragraph-properties style:page-number="auto" fo:keep-with-next="always"/>
    </style:style>
    <style:style style:name="Body_20_-_20_Large_20_Spacer" style:display-name="Body - Large Spacer" style:family="paragraph" style:parent-style-name="Body" style:class="text">
      <style:paragraph-properties fo:margin-top="0.499cm" fo:margin-bottom="0cm" style:contextual-spacing="false"/>
    </style:style>
    <style:style style:name="Body_20_-_20_1st_20_Line_20_Indent" style:display-name="Body - 1st Line Indent" style:family="paragraph" style:parent-style-name="Body" style:default-outline-level="">
      <style:paragraph-properties fo:margin-left="0cm" fo:margin-right="0cm" fo:margin-top="0.049cm" fo:margin-bottom="0.199cm" style:contextual-spacing="false" fo:orphans="2" fo:widows="2" fo:hyphenation-ladder-count="no-limit" fo:text-indent="0.6cm" style:auto-text-indent="false" style:writing-mode="lr-tb">
        <style:tab-stops>
          <style:tab-stop style:position="1.27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Sub-Head_20_1_20_No_20_follow" style:display-name="Sub-Head 1 No follow" style:family="paragraph" style:parent-style-name="Sub-Head_20_1" style:auto-update="true" style:default-outline-level="" style:list-style-name="" style:master-page-name="">
      <style:paragraph-properties fo:margin-left="0cm" fo:margin-right="0cm" fo:margin-top="0cm" fo:margin-bottom="0cm" style:contextual-spacing="false" fo:orphans="2" fo:widows="2" fo:hyphenation-ladder-count="no-limit" fo:text-indent="0cm" style:auto-text-indent="false" style:page-number="auto" fo:keep-with-next="auto" style:writing-mode="lr-tb">
        <style:tab-stops>
          <style:tab-stop style:position="1.134cm"/>
        </style:tab-stops>
      </style:paragraph-properties>
      <style:text-properties fo:color="#000000" loext:opacity="100%" style:text-outline="false" style:font-name="Andika1" fo:font-family="Andika" style:font-style-name="Bold" style:font-pitch="variable" fo:font-size="14pt" fo:language="en" fo:country="US" fo:font-weight="bold" style:font-name-asian="ヒラギノ角ゴ Pro W3" style:font-family-asian="'ヒラギノ角ゴ Pro W3'" style:font-family-generic-asian="system" style:font-pitch-asian="variable" style:font-size-asian="14pt" style:language-asian="en" style:country-asian="US" style:font-weight-asian="bold" style:font-name-complex="Times New Roman2" style:font-family-complex="'Times New Roman'" style:font-family-generic-complex="system" style:font-pitch-complex="variable"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Body_20_Bullet_20_-_20_Checkmark_20_-_20_No_20_follow" style:display-name="Body Bullet - Checkmark - No follow" style:family="paragraph" style:parent-style-name="Body_20_Bullet_20_-_20_Checkmark" style:master-page-name="">
      <style:paragraph-properties style:page-number="auto" fo:keep-with-next="auto"/>
    </style:style>
    <style:style style:name="Coloring_20_Page_20_Footer" style:display-name="Coloring Page Footer" style:family="paragraph" style:parent-style-name="Footer" style:default-outline-level="">
      <loext:graphic-properties draw:fill="none" draw:fill-color="#729fcf"/>
      <style:paragraph-properties fo:margin-left="0.499cm" fo:margin-right="0cm" fo:margin-top="0cm" fo:margin-bottom="0cm" style:contextual-spacing="false" fo:orphans="2" fo:widows="2" fo:hyphenation-ladder-count="no-limit" fo:text-indent="0cm" style:auto-text-indent="false" fo:background-color="transparent" style:writing-mode="lr-tb">
        <style:tab-stops>
          <style:tab-stop style:position="14.91cm"/>
        </style:tab-stops>
      </style:paragraph-properties>
      <style:text-properties style:font-name="Andika4" fo:font-family="Andika" style:font-style-name="Regular" style:font-pitch="variable"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English_20_Translation_20_-_20_Lesson_20_title" style:display-name="English Translation - Lesson title" style:family="paragraph" style:parent-style-name="English_20_translation" style:default-outline-level="">
      <loext:graphic-properties draw:fill="none" draw:fill-color="#729fcf"/>
      <style:paragraph-properties fo:margin-left="0cm" fo:margin-right="0cm" fo:margin-top="0.101cm" fo:margin-bottom="0cm" style:contextual-spacing="false" fo:text-align="start" style:justify-single-word="false" fo:orphans="2" fo:widows="2" fo:hyphenation-ladder-count="no-limit" fo:text-indent="0cm" style:auto-text-indent="false" fo:background-color="transparent" style:shadow="none" style:writing-mode="lr-tb">
        <style:tab-stops/>
      </style:paragraph-properties>
      <style:text-properties officeooo:rsid="011cacd7" fo:hyphenate="false" fo:hyphenation-remain-char-count="2" fo:hyphenation-push-char-count="2" loext:hyphenation-no-caps="false" loext:hyphenation-no-last-word="false" loext:hyphenation-word-char-count="no-limit" loext:hyphenation-zone="no-limit"/>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505cm" style:type="right" style:leader-style="dotted" style:leader-text="."/>
        </style:tab-stops>
      </style:paragraph-properties>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5.005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Figure_20_Index_20_Heading" style:display-name="Figur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T._20_Application_20_" style:display-name="M.T. Application " style:family="paragraph" style:parent-style-name="Text_20_body">
      <style:text-properties fo:font-size="10pt" style:font-size-asian="10pt" style:font-size-complex="10pt"/>
    </style:style>
    <style:style style:name="Eng_20_Application_20_" style:display-name="Eng Application " style:family="paragraph" style:parent-style-name="Text_20_body">
      <style:text-properties fo:font-size="8pt" fo:font-style="italic" style:font-size-asian="8pt" style:font-style-asian="italic" style:font-size-complex="8pt" style:font-style-complex="italic"/>
    </style:style>
    <style:style style:name="Table_20_English_20_Translation_20_-_20_Flush_20_Left" style:display-name="Table English Translation - Flush Left" style:family="paragraph" style:parent-style-name="English_20_translation" style:auto-update="true" style:default-outline-level="" style:master-page-name="">
      <style:paragraph-properties fo:margin-left="0.499cm" fo:margin-right="0cm" fo:margin-top="0cm" fo:margin-bottom="0.25cm" style:contextual-spacing="fals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Bullet_20_-_20_Checkmark_20_Last_20_line" style:display-name="Body Bullet - Checkmark Last line" style:family="paragraph" style:parent-style-name="Body_20_Bullet_20_-_20_Checkmark" style:master-page-name="">
      <style:paragraph-properties style:page-number="auto" fo:keep-with-next="auto"/>
    </style:style>
    <style:style style:name="Table_20_English_20_Translation_20_-_20_Single_20_Inset" style:display-name="Table English Translation - Single Inset" style:family="paragraph" style:parent-style-name="Table_20_English_20_Translation_20_-_20_Flush_20_Left"/>
    <style:style style:name="Body_20_Italics" style:display-name="Body Italics" style:family="paragraph" style:parent-style-name="Body">
      <style:text-properties fo:font-size="8pt" fo:font-style="italic" style:font-weight-asian="250"/>
    </style:style>
    <style:style style:name="English_20_Translation_20_-_20_Inset_20_to_20_numbered" style:display-name="English Translation - Inset to numbered" style:family="paragraph" style:parent-style-name="English_20_Translation_20_-_20_single_20_inset">
      <style:paragraph-properties fo:margin-left="0.801cm" fo:margin-right="0cm" fo:text-indent="0cm" style:auto-text-indent="false"/>
    </style:style>
    <style:style style:name="Premiere_20_Page_20_Footer_20_-_20_français" style:display-name="Premiere Page Footer - français" style:family="paragraph" style:parent-style-name="First_20_Page_20_Footer" style:master-page-name="">
      <style:paragraph-properties style:page-number="auto"/>
    </style:style>
    <style:style style:name="M.T._20_Text_20_-_20_Indented" style:display-name="M.T. Text - Indented" style:family="paragraph" style:parent-style-name="M.T._20_Text" style:next-style-name="English_20_Translation_20_-_20_Indented" style:default-outline-level="" style:master-page-name="">
      <style:paragraph-properties fo:margin-left="0cm" fo:margin-right="0cm" fo:margin-top="0cm" fo:margin-bottom="0cm" style:contextual-spacing="true" fo:text-align="start" style:justify-single-word="false" fo:orphans="2" fo:widows="2" fo:hyphenation-ladder-count="no-limit" fo:text-indent="0.499cm" style:auto-text-indent="false" style:page-number="auto" fo:keep-with-next="auto"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Indented" style:display-name="English Translation - Indented" style:family="paragraph" style:parent-style-name="English_20_translation" style:default-outline-level="" style:master-page-name="">
      <loext:graphic-properties draw:fill="none" draw:fill-color="#729fcf"/>
      <style:paragraph-properties fo:margin-left="0cm" fo:margin-right="0cm" fo:margin-top="0cm" fo:margin-bottom="0.101cm" style:contextual-spacing="true" fo:text-align="start" style:justify-single-word="false" fo:orphans="2" fo:widows="2" fo:hyphenation-ladder-count="no-limit" fo:text-indent="0.6cm" style:auto-text-indent="false" style:page-number="auto" fo:background-color="transparent" style:shadow="none" style:writing-mode="lr-tb">
        <style:tab-stops/>
      </style:paragraph-properties>
      <style:text-properties officeooo:rsid="015eaa71" fo:hyphenate="false" fo:hyphenation-remain-char-count="2" fo:hyphenation-push-char-count="2" loext:hyphenation-no-caps="false" loext:hyphenation-no-last-word="false" loext:hyphenation-word-char-count="no-limit" loext:hyphenation-zone="no-limit"/>
    </style:style>
    <style:style style:name="Body_20_Bullet_20_-_20_Checkmark_20_-_20_Flush_20_left" style:display-name="Body Bullet - Checkmark - Flush left" style:family="paragraph" style:parent-style-name="Body_20_Bullet_20_-_20_Checkmark" style:default-outline-level="" style:list-style-name="Bullet_20_-_20_checkmark">
      <loext:graphic-properties draw:fill="solid" draw:fill-color="#ffffff" draw:opacity="100%"/>
      <style:paragraph-properties fo:margin-left="0.635cm" fo:margin-right="0cm" fo:margin-top="0cm" fo:margin-bottom="0cm" style:contextual-spacing="false" fo:orphans="2" fo:widows="2" fo:hyphenation-ladder-count="no-limit" fo:text-indent="-0.635cm" style:auto-text-indent="false" fo:background-color="#ffffff" fo:keep-with-next="always" style:writing-mode="lr-tb">
        <style:tab-stops>
          <style:tab-stop style:position="0.63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Bible_20_story_20_inset" style:display-name="M.T. Text - Bible story inset" style:family="paragraph" style:parent-style-name="M.T._20_Text_20_-_20_Indented" style:default-outline-level="" style:master-page-name="">
      <loext:graphic-properties draw:opacity="100%" draw:fill-image-width="0cm" draw:fill-image-height="0cm"/>
      <style:paragraph-properties fo:margin-left="3.6cm" fo:margin-right="0cm" fo:margin-top="0cm" fo:margin-bottom="0cm" style:contextual-spacing="true" fo:text-align="start" style:justify-single-word="false" fo:orphans="2" fo:widows="2" fo:hyphenation-ladder-count="no-limit" fo:text-indent="0.499cm" style:auto-text-indent="false" style:page-number="auto" fo:keep-with-next="auto"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Bible_20_story_20_inset" style:display-name="English Translation - Bible story inset" style:family="paragraph" style:parent-style-name="English_20_Translation_20_-_20_Indented" style:default-outline-level="" style:master-page-name="">
      <loext:graphic-properties draw:fill="none" draw:fill-color="#729fcf"/>
      <style:paragraph-properties fo:margin-left="3.6cm" fo:margin-right="0cm" fo:margin-top="0cm" fo:margin-bottom="0.101cm" style:contextual-spacing="true" fo:text-align="start" style:justify-single-word="false" fo:orphans="2" fo:widows="2" fo:hyphenation-ladder-count="no-limit" fo:text-indent="0.6cm" style:auto-text-indent="false" style:page-number="auto" fo:background-color="transparent"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Sub-Head_20_-_20_Coloring_20_page_20_last_20_paragraph" style:display-name="Sub-Head - Coloring page last paragraph" style:family="paragraph" style:parent-style-name="Sub-Head_20_1_20_No_20_follow">
      <style:paragraph-properties fo:margin-top="0.3cm" fo:margin-bottom="0cm" style:contextual-spacing="false"/>
    </style:style>
    <style:style style:name="M.T._20_Text_20_-_20_Lesson_20_Title_20_Scrip_20_Reference" style:display-name="M.T. Text - Lesson Title Scrip Reference" style:family="paragraph" style:parent-style-name="M.T._20_Text" style:default-outline-level="">
      <style:paragraph-properties fo:margin-left="0cm" fo:margin-right="0cm" fo:margin-top="0cm" fo:margin-bottom="0.3cm" style:contextual-spacing="false" fo:text-align="start" style:justify-single-word="false" fo:orphans="2" fo:widows="2" fo:hyphenation-ladder-count="no-limit" fo:text-indent="0cm" style:auto-text-indent="fals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Centered" style:display-name="M.T. Text - Centered" style:family="paragraph" style:parent-style-name="M.T._20_Text" style:master-page-name="">
      <style:paragraph-properties fo:text-align="center" style:justify-single-word="false" style:page-number="auto" fo:keep-with-next="always"/>
    </style:style>
    <style:style style:name="Page_20_breaker" style:display-name="Page breaker" style:family="paragraph" style:parent-style-name="Body_20_-_20_Small_20_Spacer" style:master-page-name="">
      <style:paragraph-properties style:page-number="auto" fo:break-before="page"/>
      <style:text-properties fo:font-size="4pt" style:font-size-asian="3.5pt" style:font-size-complex="4pt"/>
    </style:style>
    <style:style style:name="M.T._20_Front_20_matter_20_Title" style:display-name="M.T. Front matter Title" style:family="paragraph" style:parent-style-name="M.T._20_Text">
      <style:paragraph-properties fo:text-align="center" style:justify-single-word="false"/>
      <style:text-properties style:text-outline="false" style:font-name="Andika" fo:font-family="Andika" style:font-pitch="variable" fo:font-size="30pt" fo:font-weight="bold" fo:background-color="transparent" style:font-size-asian="30pt" style:font-weight-asian="normal" style:font-size-complex="30pt" style:font-weight-complex="normal"/>
    </style:style>
    <style:style style:name="Body_20_Centered" style:display-name="Body Centered" style:family="paragraph" style:parent-style-name="Body">
      <style:paragraph-properties fo:text-align="center" style:justify-single-word="false"/>
      <style:text-properties officeooo:rsid="00059c2d" fo:background-color="transparen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default-outline-level="">
      <style:paragraph-properties fo:margin-left="0cm" fo:margin-right="0cm" fo:margin-top="0cm" fo:margin-bottom="0cm" style:contextual-spacing="false" fo:text-align="start"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default-outline-level="">
      <style:paragraph-properties fo:margin-left="0cm" fo:margin-right="0cm" fo:margin-top="0cm" fo:margin-bottom="0cm" style:contextual-spacing="false" fo:text-align="center"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default-outline-level="">
      <style:paragraph-properties fo:margin-left="0cm" fo:margin-right="0.199cm" fo:margin-top="0.101cm" fo:margin-bottom="0.101cm" style:contextual-spacing="false" fo:text-align="center"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loext:opacity="100%" style:text-outline="false" style:text-line-through-style="none" style:text-line-through-type="none" style:font-name="Lucida Sans1"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loext:opacity="100%" style:text-outline="false" style:text-line-through-style="none" style:text-line-through-type="none" style:font-name="Lucida Sans1"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default-outline-level="">
      <style:paragraph-properties fo:margin-top="0cm" fo:margin-bottom="0.199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loext:opacity="100%" style:text-outline="false" style:text-line-through-style="none" style:text-line-through-type="none" style:font-name="Lucida Sans1" fo:font-family="'Lucida Sans'"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gray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ay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ay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loext:opacity="100%" style:text-outline="false" style:text-line-through-style="none" style:text-line-through-type="none" style:font-name="Lucida Sans1"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loext:opacity="100%" style:text-outline="false" style:text-line-through-style="none" style:text-line-through-type="none" style:font-name="Lucida Sans1"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Body_20_Emphasized_20_-_20_Small" style:display-name="Body Emphasized - Small" style:family="paragraph" style:default-outline-level="">
      <style:paragraph-properties fo:text-align="start" style:justify-single-word="false" fo:orphans="2" fo:widows="2" style:writing-mode="lr-tb"/>
      <style:text-properties fo:color="#00000a" loext:opacity="100%" style:font-name="Andika4" fo:font-family="Andika" style:font-style-name="Regular" style:font-pitch="variable" fo:font-size="10pt" fo:font-style="normal" fo:font-weight="normal" style:font-name-asian="Tahoma" style:font-family-asian="Tahoma" style:font-family-generic-asian="system" style:font-pitch-asian="variable" style:font-size-asian="10pt" style:font-style-asian="normal" style:font-weight-asian="bold" style:font-name-complex="Liberation Sans1" style:font-family-complex="'Liberation Sans'" style:font-family-generic-complex="system" style:font-pitch-complex="variable" style:font-size-complex="12pt"/>
    </style:style>
    <style:style style:name="Body_20_Emphasized_20_-_20_Big" style:display-name="Body Emphasized - Big" style:family="paragraph" style:default-outline-level="">
      <style:paragraph-properties fo:text-align="start" style:justify-single-word="false" fo:orphans="2" fo:widows="2" style:writing-mode="lr-tb"/>
      <style:text-properties fo:color="#000000" loext:opacity="100%" style:font-name="Andika2" fo:font-family="Andika" style:font-style-name="Bold Italic" style:font-pitch="variable" fo:font-size="16pt" fo:font-style="italic" fo:font-weight="bold" style:font-name-asian="Tahoma" style:font-family-asian="Tahoma" style:font-family-generic-asian="system" style:font-pitch-asian="variable" style:font-size-asian="16pt" style:font-style-asian="normal" style:font-weight-asian="bold"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 style:display-name="ListLabel 6" style:family="paragraph" style:default-outline-level="">
      <style:paragraph-properties fo:text-align="start" style:justify-single-word="false" fo:orphans="2" fo:widows="2" style:writing-mode="lr-tb"/>
      <style:text-properties style:font-name="OpenSymbol2" fo:font-family="OpenSymbol, 'Arial Unicode MS'"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 style:display-name="ListLabel 5" style:family="paragraph" style:default-outline-level="">
      <style:paragraph-properties fo:text-align="start" style:justify-single-word="false" fo:orphans="2" fo:widows="2" style:writing-mode="lr-tb"/>
      <style:text-properties style:font-name="Wingdings 2" fo:font-family="'Wingdings 2'"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 style:display-name="ListLabel 4"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RTF_5f_Num_20_3_20_1" style:display-name="RTF_Num 3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RTF_5f_Num_20_2_20_1" style:display-name="RTF_Num 2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2" fo:font-family="OpenSymbol, 'Arial Unicode MS'"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 style:display-name="ListLabel 3"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4pt" fo:font-style="normal" fo:font-weight="normal" style:font-name-asian="Tahoma" style:font-family-asian="Tahoma"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lloon_20_Text_20_Char" style:display-name="Balloon Text Char" style:family="paragraph" style:default-outline-level="">
      <style:paragraph-properties fo:text-align="start" style:justify-single-word="false" fo:orphans="2" fo:widows="2" style:writing-mode="lr-tb"/>
      <style:text-properties fo:color="#000000" loext:opacity="100%" style:font-name="Lucida Grande" fo:font-family="'Lucida Grande'" style:font-family-generic="roman" fo:font-size="9pt" style:font-name-asian="Tahoma"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age_20_number" style:display-name="page number" style:family="paragraph" style:default-outline-level="">
      <style:paragraph-properties fo:text-align="start" style:justify-single-word="false" fo:orphans="2" fo:widows="2" style:writing-mode="lr-tb"/>
      <style:text-properties style:font-name="Arial" fo:font-family="Arial"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_20_Char" style:display-name="Footer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1pt" style:font-name-asian="Tahoma"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Header_20_Char" style:display-name="Header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1pt" style:font-name-asian="Tahoma"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Heading_20_3_20_Char" style:display-name="Heading 3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2pt" fo:font-style="italic" fo:font-weight="bold" style:font-name-asian="Tahoma" style:font-family-asian="Tahoma" style:font-family-generic-asian="system" style:font-pitch-asian="variable" style:font-size-asian="12pt" style:font-style-asian="italic" style:font-weight-asian="bold" style:font-name-complex="Liberation Sans1" style:font-family-complex="'Liberation Sans'" style:font-family-generic-complex="system" style:font-pitch-complex="variable" style:font-size-complex="12pt"/>
    </style:style>
    <style:style style:name="Heading_20_2_20_Char" style:display-name="Heading 2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8pt"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Heading_20_1_20_Char" style:display-name="Heading 1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22pt" style:font-name-asian="Tahoma" style:font-family-asian="Tahoma" style:font-family-generic-asian="system" style:font-pitch-asian="variable" style:font-size-asian="22pt" style:font-name-complex="Liberation Sans1" style:font-family-complex="'Liberation Sans'" style:font-family-generic-complex="system" style:font-pitch-complex="variable" style:font-size-complex="12pt"/>
    </style:style>
    <style:style style:name="Table_20_of_20_Lessons" style:display-name="Table of Lessons" style:family="paragraph" style:parent-style-name="Body">
      <style:paragraph-properties fo:text-align="center" style:justify-single-word="false"/>
      <style:text-properties fo:font-size="10pt" style:font-size-asian="10pt" style:font-size-complex="10pt"/>
    </style:style>
    <style:style style:name="Table_20_of_20_Contents" style:display-name="Table of Contents" style:family="paragraph" style:parent-style-name="Table_20_of_20_Lessons">
      <style:paragraph-properties fo:margin-left="0.199cm" fo:margin-right="0cm" fo:margin-top="0.049cm" fo:margin-bottom="0.101cm" style:contextual-spacing="false" fo:text-align="start" style:justify-single-word="false" fo:orphans="2" fo:widows="2" fo:hyphenation-ladder-count="no-limit" fo:text-indent="0cm" style:auto-text-indent="false" style:writing-mode="lr-tb">
        <style:tab-stops>
          <style:tab-stop style:position="1.3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Front_20_matter_20_subtitle" style:display-name="M.T. Front matter subtitle" style:family="paragraph" style:parent-style-name="M.T._20_Front_20_matter_20_Title">
      <style:text-properties fo:font-size="18pt" fo:background-color="transparent" style:font-size-asian="18pt" style:font-size-complex="18pt"/>
    </style:style>
    <style:style style:name="Publisher_20_info" style:display-name="Publisher info" style:family="paragraph" style:parent-style-name="Body_20_Centered">
      <style:text-properties style:font-name="Andika New Basic2" fo:font-family="'Andika New Basic'" style:font-style-name="Regular" style:font-pitch="variable" fo:background-color="#ffffcc"/>
    </style:style>
    <style:style style:name="Example_20_text" style:display-name="Example text" style:family="paragraph" style:parent-style-name="M.T._20_Text">
      <style:paragraph-properties fo:margin-left="0cm" fo:margin-right="0cm" fo:margin-top="0.101cm" fo:margin-bottom="0cm" style:contextual-spacing="false" fo:orphans="2" fo:widows="2" fo:hyphenation-ladder-count="no-limit" fo:text-indent="0cm" style:auto-text-indent="false" style:writing-mode="lr-tb">
        <style:tab-stops>
          <style:tab-stop style:position="6.366cm"/>
        </style:tab-stops>
      </style:paragraph-properties>
      <style:text-properties fo:background-color="transparent" fo:hyphenate="false" fo:hyphenation-remain-char-count="2" fo:hyphenation-push-char-count="2" loext:hyphenation-no-caps="false" loext:hyphenation-no-last-word="false" loext:hyphenation-word-char-count="no-limit" loext:hyphenation-zone="no-limit"/>
    </style:style>
    <style:style style:name="Table_20_of_20_Lessons_20_-_20_Numbers" style:display-name="Table of Lessons - Numbers" style:family="paragraph" style:parent-style-name="Table_20_of_20_Lessons">
      <style:paragraph-properties fo:margin-top="0cm" fo:margin-bottom="0cm" style:contextual-spacing="false" fo:text-align="center" style:justify-single-word="false"/>
      <style:text-properties fo:color="#000000" loext:opacity="100%" fo:font-size="15pt" fo:font-weight="bold" fo:background-color="transparent" style:font-size-asian="15pt" style:font-weight-asian="bold" style:font-size-complex="15pt" style:font-weight-complex="bold"/>
    </style:style>
    <style:style style:name="M.T._20_Table_20_of_20_Contents" style:display-name="M.T. Table of Contents" style:family="paragraph" style:parent-style-name="M.T._20_Text" style:next-style-name="English_20_Translation_20_-_20_Table_20_of_20_contents" style:master-page-name="">
      <style:paragraph-properties fo:margin-left="0.199cm" fo:margin-right="0cm" fo:margin-top="0cm" fo:margin-bottom="0cm" style:contextual-spacing="false" fo:text-align="start" style:justify-single-word="false" fo:orphans="2" fo:widows="2" fo:hyphenation-ladder-count="no-limit" fo:text-indent="0cm" style:auto-text-indent="false" style:page-number="auto" style:writing-mode="lr-tb">
        <style:tab-stops>
          <style:tab-stop style:position="1.3cm"/>
        </style:tab-stops>
      </style:paragraph-properties>
      <style:text-properties style:font-name="Andika4" fo:font-family="Andika" style:font-style-name="Regular" style:font-pitch="variable" fo:background-color="transparent" fo:hyphenate="false" fo:hyphenation-remain-char-count="2" fo:hyphenation-push-char-count="2" loext:hyphenation-no-caps="false" loext:hyphenation-no-last-word="false" loext:hyphenation-word-char-count="no-limit" loext:hyphenation-zone="no-limit"/>
    </style:style>
    <style:style style:name="English_20_Translation_20_-_20_Table_20_of_20_contents" style:display-name="English Translation - Table of contents" style:family="paragraph" style:parent-style-name="English_20_Translation_20_-_20_Table_20_single_20_inset" style:default-outline-level="">
      <loext:graphic-properties draw:fill="none" draw:fill-color="#729fcf"/>
      <style:paragraph-properties fo:margin-left="0.199cm" fo:margin-right="0cm" fo:margin-top="0cm" fo:margin-bottom="0.101cm" style:contextual-spacing="true" fo:text-align="start" style:justify-single-word="false" fo:orphans="2" fo:widows="2" fo:hyphenation-ladder-count="no-limit" fo:text-indent="0cm" style:auto-text-indent="false" fo:background-color="transparent" style:shadow="none" style:writing-mode="lr-tb">
        <style:tab-stops/>
      </style:paragraph-properties>
      <style:text-properties style:font-name="Andika3" fo:font-family="Andika" style:font-style-name="Italic" style:font-pitch="variable" officeooo:rsid="00786fef" fo:hyphenate="false" fo:hyphenation-remain-char-count="2" fo:hyphenation-push-char-count="2" loext:hyphenation-no-caps="false" loext:hyphenation-no-last-word="false" loext:hyphenation-word-char-count="no-limit" loext:hyphenation-zone="no-limit"/>
    </style:style>
    <style:style style:name="Table_20_of_20_Contents_20_-_20_Table_20_heading" style:display-name="Table of Contents - Table heading" style:family="paragraph" style:parent-style-name="Table_20_Heading" style:default-outline-level="">
      <loext:graphic-properties draw:fill="none" draw:fill-color="#729fcf"/>
      <style:paragraph-properties fo:margin-left="0.199cm" fo:margin-right="0cm" fo:margin-top="0.049cm" fo:margin-bottom="0.101cm" style:contextual-spacing="false" fo:text-align="start" style:justify-single-word="false" fo:orphans="2" fo:widows="2" fo:hyphenation-ladder-count="no-limit" fo:text-indent="0cm" style:auto-text-indent="false" fo:background-color="transparent" fo:keep-with-next="always" text:number-lines="false" text:line-number="0" style:writing-mode="lr-tb">
        <style:tab-stops>
          <style:tab-stop style:position="1.27cm"/>
        </style:tab-stops>
      </style:paragraph-properties>
      <style:text-properties style:font-name="Andika1" fo:font-family="Andika" style:font-style-name="Bold" style:font-pitch="variable" fo:font-size="14pt"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Front_20_Matter_20_footer" style:display-name="Front Matter footer" style:family="paragraph" style:parent-style-name="Footer" style:master-page-name="">
      <style:paragraph-properties style:page-number="auto">
        <style:tab-stops>
          <style:tab-stop style:position="9.188cm" style:type="center"/>
          <style:tab-stop style:position="17.394cm" style:type="right"/>
        </style:tab-stops>
      </style:paragraph-properties>
    </style:style>
    <style:style style:name="Drawing"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loext:opacity="100%" style:font-name="Lucida Sans1" fo:font-family="'Lucida Sans'" style:font-family-generic="roman"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cripture_20_References" style:display-name="Scripture References" style:family="paragraph" style:parent-style-name="Table_20_of_20_Lessons" style:default-outline-level="">
      <loext:graphic-properties draw:fill="none" draw:fill-color="#729fcf"/>
      <style:paragraph-properties fo:margin-left="0.199cm" fo:margin-right="0cm" fo:margin-top="0.049cm" fo:margin-bottom="0.101cm" style:contextual-spacing="false" fo:text-align="start" style:justify-single-word="false" fo:orphans="2" fo:widows="2" fo:hyphenation-ladder-count="no-limit" fo:text-indent="0cm" style:auto-text-indent="false" fo:background-color="transparent" style:writing-mode="lr-tb">
        <style:tab-stops>
          <style:tab-stop style:position="1.27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_20_Small_20_spacer" style:display-name="Body - Small spacer" style:family="paragraph" style:parent-style-name="Body">
      <style:paragraph-properties fo:margin-top="0cm" fo:margin-bottom="0cm" style:contextual-spacing="false"/>
      <style:text-properties fo:font-size="6pt" style:font-size-asian="5.25pt" style:font-size-complex="6pt"/>
    </style:style>
    <style:style style:name="English_20_translation_20_-_20_indent" style:display-name="English translation - indent" style:family="paragraph" style:parent-style-name="English_20_translation" style:default-outline-level="">
      <style:paragraph-properties fo:margin-left="1.3cm" fo:margin-right="0cm" fo:margin-top="0cm" fo:margin-bottom="0.101cm" style:contextual-spacing="false" fo:text-align="start" style:justify-single-word="false" fo:orphans="2" fo:widows="2" fo:hyphenation-ladder-count="no-limit" fo:text-indent="0cm" style:auto-text-indent="false" style:writing-mode="lr-tb">
        <style:tab-stops/>
      </style:paragraph-properties>
      <style:text-properties style:font-name="Andika" fo:font-family="Andika" style:font-pitch="variable" fo:font-size="8pt" fo:font-style="italic" fo:font-weight="normal" officeooo:rsid="00eb45c2" style:font-size-asian="8pt" style:font-style-asian="italic" style:font-weight-asian="normal" style:font-size-complex="8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M.T._20_Lesson_20_Title" style:display-name="M.T. Lesson Title" style:family="paragraph" style:parent-style-name="M.T._20_Text" style:default-outline-level="" style:master-page-name="">
      <loext:graphic-properties draw:fill-image-width="0cm" draw:fill-image-height="0cm"/>
      <style:paragraph-properties fo:margin-left="0cm" fo:margin-right="0cm" fo:margin-top="0.3cm" fo:margin-bottom="0cm" style:contextual-spacing="false" fo:orphans="0" fo:widows="0" fo:hyphenation-ladder-count="no-limit" fo:text-indent="0cm" style:auto-text-indent="false" style:page-number="auto" style:shadow="none" style:vertical-align="auto" style:writing-mode="lr-tb">
        <style:tab-stops>
          <style:tab-stop style:position="1.134cm"/>
        </style:tab-stops>
      </style:paragraph-properties>
      <style:text-properties style:text-outline="false" style:font-name="Andika1" fo:font-family="Andika" style:font-style-name="Bold" style:font-pitch="variable" fo:font-size="18pt" fo:font-weight="bold" fo:background-color="transparent" style:font-size-asian="22pt" style:font-weight-asian="bold" style:font-size-complex="22pt" style:font-weight-complex="bold" fo:hyphenate="false" fo:hyphenation-remain-char-count="2" fo:hyphenation-push-char-count="2" loext:hyphenation-no-caps="false" loext:hyphenation-no-last-word="false" loext:hyphenation-word-char-count="no-limit" loext:hyphenation-zone="no-limit"/>
    </style:style>
    <style:style style:name="M.T._20_Lesson_20_title_20_-_20_invisible" style:display-name="M.T. Lesson title - invisible" style:family="paragraph" style:parent-style-name="M.T._20_Text" style:next-style-name="Part_20_Heading" style:auto-update="true" style:default-outline-level="1" style:list-style-name="Outline" style:master-page-name="">
      <loext:graphic-properties draw:fill="none" draw:fill-color="#729fcf"/>
      <style:paragraph-properties fo:text-align="end" style:justify-single-word="false" style:page-number="auto" fo:break-before="page" fo:background-color="transparent" text:number-lines="false" text:line-number="0"/>
      <style:text-properties fo:color="#ffffff" loext:opacity="100%" fo:font-size="6pt" officeooo:rsid="0189809f"/>
    </style:style>
    <style:style style:name="M.T._20_Text_20_-_20_Cover_20_title" style:display-name="M.T. Text - Cover title" style:family="paragraph" style:parent-style-name="M.T._20_Text" style:next-style-name="English_20_Translation_20_-_20_cover_20_title">
      <loext:graphic-properties draw:fill="solid" draw:fill-color="#ffffcc"/>
      <style:paragraph-properties fo:margin-left="0cm" fo:margin-right="0cm" fo:text-indent="0cm" style:auto-text-indent="false" fo:background-color="#ffffcc"/>
      <style:text-properties style:text-outline="true" style:font-name="Andika" fo:font-family="Andika" style:font-pitch="variable" fo:font-size="36pt" fo:font-weight="bold" officeooo:rsid="002cd037" style:font-size-asian="36pt" style:font-weight-asian="bold" style:font-size-complex="36pt" style:font-weight-complex="bold"/>
    </style:style>
    <style:style style:name="M.T._20_Text_20_-_20_Cover_20_subtitle" style:display-name="M.T. Text - Cover subtitle" style:family="paragraph" style:parent-style-name="M.T._20_Text_20_-_20_Cover_20_title" style:next-style-name="English_20_Translation_20_-_20_cover_20_subtitle">
      <loext:graphic-properties draw:fill="solid" draw:fill-color="#ffffcc"/>
      <style:paragraph-properties fo:margin-left="0cm" fo:margin-right="0cm" fo:text-align="end" style:justify-single-word="false" fo:text-indent="0cm" style:auto-text-indent="false" fo:background-color="#ffffcc"/>
      <style:text-properties style:text-outline="true" style:font-name="Andika New Basic" fo:font-family="'Andika New Basic'" style:font-pitch="variable" fo:font-size="36pt" fo:font-weight="bold" style:font-size-asian="36pt" style:font-weight-asian="bold" style:font-size-complex="36pt" style:font-weight-complex="bold"/>
    </style:style>
    <style:style style:name="English_20_Translation_20_-_20_cover_20_subtitle" style:display-name="English Translation - cover subtitle" style:family="paragraph" style:parent-style-name="English_20_translation" style:default-outline-level="">
      <loext:graphic-properties draw:fill="none" draw:fill-color="#729fcf"/>
      <style:paragraph-properties fo:margin-left="0cm" fo:margin-right="0cm" fo:margin-top="0cm" fo:margin-bottom="0.049cm" style:contextual-spacing="true" fo:text-align="end" style:justify-single-word="false" fo:orphans="2" fo:widows="2" fo:hyphenation-ladder-count="no-limit" fo:text-indent="0cm"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English_20_Translation_20_-_20_cover_20_title" style:display-name="English Translation - cover title" style:family="paragraph" style:parent-style-name="English_20_translation" style:default-outline-level="">
      <loext:graphic-properties draw:fill="none" draw:fill-color="#729fcf"/>
      <style:paragraph-properties fo:margin-left="0cm" fo:margin-right="0cm" fo:margin-top="0cm" fo:margin-bottom="0cm" style:contextual-spacing="true" fo:text-align="start" style:justify-single-word="false" fo:orphans="2" fo:widows="2" fo:hyphenation-ladder-count="no-limit" fo:text-indent="0cm"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M.T._20_Coloring_20_Page_20_-_20_Truth" style:display-name="M.T. Coloring Page - Truth" style:family="paragraph" style:parent-style-name="M.T._20_Text" style:master-page-name="">
      <style:paragraph-properties fo:text-align="center" style:justify-single-word="false" style:page-number="auto"/>
      <style:text-properties style:font-name="Andika1" fo:font-family="Andika" style:font-style-name="Bold" style:font-pitch="variable" fo:font-size="18pt" fo:font-weight="bold" officeooo:rsid="00135fa9" style:font-size-asian="18pt" style:font-weight-asian="bold" style:font-size-complex="18pt" style:font-weight-complex="bold"/>
    </style:style>
    <style:style style:name="M.T._20_Coloring_20_Page_20_-_20_Memory_20_Verse" style:display-name="M.T. Coloring Page - Memory Verse" style:family="paragraph" style:parent-style-name="M.T._20_Coloring_20_Page_20_-_20_Truth" style:default-outline-level="">
      <style:paragraph-properties fo:margin-left="0.499cm" fo:margin-right="0cm" fo:margin-top="0.049cm" fo:margin-bottom="0.101cm" style:contextual-spacing="false" fo:text-align="start" style:justify-single-word="false" fo:orphans="2" fo:widows="2" fo:hyphenation-ladder-count="no-limit" fo:text-indent="0cm" style:auto-text-indent="false" style:writing-mode="lr-tb">
        <style:tab-stops>
          <style:tab-stop style:position="1.27cm"/>
        </style:tab-stops>
      </style:paragraph-properties>
      <style:text-properties style:font-name="Andika4" fo:font-family="Andika" style:font-style-name="Regular" style:font-pitch="variable" fo:font-size="12pt" fo:font-weight="normal"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loext:opacity="100%" style:font-name="Arial Bold" fo:font-family="'Arial Bold'" style:font-family-generic="roman"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_20_Char" style:display-name="Heading 2 Char" style:family="text" style:parent-style-name="Default_20_Paragraph_20_Font">
      <style:text-properties fo:color="#000000" loext:opacity="100%" style:font-name="Arial Bold" fo:font-family="'Arial Bold'" style:font-family-generic="roman" style:font-pitch="variable" fo:font-size="18pt" style:font-name-asian="ヒラギノ角ゴ Pro W3" style:font-family-asian="'ヒラギノ角ゴ Pro W3'" style:font-family-generic-asian="system" style:font-pitch-asian="variable" style:font-size-asian="18pt" style:language-asian="en" style:country-asian="US" style:font-name-complex="Times New Roman2" style:font-family-complex="'Times New Roman'" style:font-family-generic-complex="system" style:font-pitch-complex="variable"/>
    </style:style>
    <style:style style:name="Heading_20_3_20_Char" style:display-name="Heading 3 Char" style:family="text" style:parent-style-name="Default_20_Paragraph_20_Font">
      <style:text-properties fo:color="#000000" loext:opacity="100%" style:font-name="Arial1" fo:font-family="Arial" style:font-family-generic="roman" style:font-pitch="variable" fo:font-style="italic" fo:font-weight="bold" style:font-name-asian="ヒラギノ角ゴ Pro W3" style:font-family-asian="'ヒラギノ角ゴ Pro W3'" style:font-family-generic-asian="system" style:font-pitch-asian="variable" style:language-asian="en" style:country-asian="US" style:font-style-asian="italic" style:font-weight-asian="bold"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color="#000000" loext:opacity="1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fo:color="#000000" loext:opacity="1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page_20_number" style:display-name="page number" style:family="text">
      <style:text-properties style:font-name="Arial1" fo:font-family="Arial" style:font-family-generic="roman" style:font-pitch="variable"/>
    </style:style>
    <style:style style:name="Balloon_20_Text_20_Char" style:display-name="Balloon Text Char" style:family="text" style:parent-style-name="Default_20_Paragraph_20_Font">
      <style:text-properties fo:color="#000000" loext:opacity="100%" style:font-name="Lucida Grande1" fo:font-family="'Lucida Grande'" style:font-family-generic="roman" style:font-pitch="variable" fo:font-size="9pt" style:font-name-asian="ヒラギノ角ゴ Pro W3" style:font-family-asian="'ヒラギノ角ゴ Pro W3'" style:font-family-generic-asian="system" style:font-pitch-asian="variable" style:font-size-asian="9pt" style:language-asian="en" style:country-asian="US" style:font-name-complex="Lucida Grande2" style:font-family-complex="'Lucida Grande'" style:font-family-generic-complex="system" style:font-pitch-complex="variable" style:font-size-complex="9pt"/>
    </style:style>
    <style:style style:name="ListLabel_20_1" style:display-name="ListLabel 1" style:family="text">
      <style:text-properties style:text-position="-58% 100%"/>
    </style:style>
    <style:style style:name="ListLabel_20_2" style:display-name="ListLabel 2" style:family="text">
      <style:text-properties style:text-position="-58% 100%" fo:font-size="14pt" fo:font-style="normal" fo:font-weight="normal" style:font-size-asian="14pt" style:font-style-asian="normal" style:font-weight-asian="normal"/>
    </style:style>
    <style:style style:name="ListLabel_20_3" style:display-name="ListLabel 3" style:family="text">
      <style:text-properties style:text-position="0% 0%" fo:font-size="12pt" style:font-size-asian="12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RTF_5f_Num_20_2_20_1" style:display-name="RTF_Num 2 1" style:family="text"/>
    <style:style style:name="RTF_5f_Num_20_3_20_1" style:display-name="RTF_Num 3 1" style:family="text"/>
    <style:style style:name="ListLabel_20_4" style:display-name="ListLabel 4" style:family="text">
      <style:text-properties style:text-position="0% 0%" fo:font-size="12pt" style:font-size-asian="12pt"/>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Body_20_Emphasized_20_-_20_Big" style:display-name="Body Emphasized - Big" style:family="text">
      <style:text-properties fo:color="#000000" loext:opacity="100%" style:font-name="Andika4" fo:font-family="Andika" style:font-style-name="Regular" style:font-pitch="variable" fo:font-size="14pt" fo:font-style="normal" fo:font-weight="bold" style:font-name-asian="ヒラギノ角ゴ Pro W3" style:font-family-asian="'ヒラギノ角ゴ Pro W3'" style:font-family-generic-asian="system" style:font-pitch-asian="variable" style:font-size-asian="14pt" style:language-asian="en" style:country-asian="US" style:font-style-asian="normal" style:font-weight-asian="bold" style:font-name-complex="Times New Roman2" style:font-family-complex="'Times New Roman'" style:font-family-generic-complex="system" style:font-pitch-complex="variable" style:font-size-complex="14pt" style:language-complex="hi" style:country-complex="IN" style:font-style-complex="normal" style:font-weight-complex="normal"/>
    </style:style>
    <style:style style:name="Body_20_Emphasized_20_-_20_Small" style:display-name="Body Emphasized - Small" style:family="text">
      <style:text-properties fo:color="#000000" loext:opacity="100%" style:font-name="Andika" fo:font-family="Andika" style:font-pitch="variable" fo:font-size="10pt" fo:language="en" fo:country="US" fo:font-style="normal" fo:font-weight="bold" fo:background-color="transparent" style:font-name-asian="ヒラギノ角ゴ Pro W3" style:font-family-asian="'ヒラギノ角ゴ Pro W3'" style:font-family-generic-asian="system" style:font-pitch-asian="variable" style:font-size-asian="10pt" style:language-asian="en" style:country-asian="US" style:font-style-asian="normal" style:font-weight-asian="bold" style:font-name-complex="Times New Roman2" style:font-family-complex="'Times New Roman'" style:font-family-generic-complex="system" style:font-pitch-complex="variable" style:font-size-complex="12pt" style:language-complex="hi" style:country-complex="IN" style:font-style-complex="normal" style:font-weight-complex="bold"/>
    </style:style>
    <style:style style:name="Eng._20_Trans_20_Emphasized" style:display-name="Eng. Trans Emphasized" style:family="text">
      <style:text-properties fo:color="#000000" loext:opacity="100%" style:font-name="Andika4" fo:font-family="Andika" style:font-style-name="Regular" style:font-pitch="variable" fo:font-size="8pt" fo:language="en" fo:country="GB" fo:font-style="italic" fo:font-weight="bold" style:font-name-asian="ヒラギノ角ゴ Pro W3" style:font-family-asian="'ヒラギノ角ゴ Pro W3'" style:font-family-generic-asian="system" style:font-pitch-asian="variable" style:font-size-asian="8pt" style:language-asian="en" style:country-asian="US" style:font-style-asian="italic" style:font-weight-asian="bold" style:font-name-complex="Times New Roman2" style:font-family-complex="'Times New Roman'" style:font-family-generic-complex="system" style:font-pitch-complex="variable" style:font-size-complex="8pt" style:language-complex="hi" style:country-complex="IN" style:font-style-complex="normal" style:font-weight-complex="bold"/>
    </style:style>
    <style:style style:name="Body_20_Emphasized_20_-_20_Underline" style:display-name="Body Emphasized - Underline" style:family="text">
      <style:text-properties fo:color="#000000" loext:opacity="100%" style:font-name="Andika4" fo:font-family="Andika" style:font-style-name="Regular" style:font-pitch="variable" fo:font-size="10pt" fo:language="en" fo:country="US" fo:font-style="normal" style:text-underline-style="solid" style:text-underline-width="auto" style:text-underline-color="font-color" fo:font-weight="bold"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ody_20_Emphasized_20_-_20_Bold_20_Underline" style:display-name="Body Emphasized - Bold Underline" style:family="text" style:parent-style-name="Body_20_Emphasized_20_-_20_Underline">
      <style:text-properties fo:font-weight="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5f_20_5f_Symbols" style:display-name="Numbering_20_Symbols" style:family="text"/>
    <style:style style:name="Bullet_5f_20_5f_Symbols" style:display-name="Bullet_20_Symbols" style:family="text"/>
    <style:style style:name="ListLabel_5f_20_5f_4" style:display-name="ListLabel_20_4" style:family="text"/>
    <style:style style:name="ListLabel_5f_20_5f_5" style:display-name="ListLabel_20_5" style:family="text"/>
    <style:style style:name="ListLabel_5f_20_5f_6" style:display-name="ListLabel_20_6"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ody_20_Emphasized_20_-_20_Super_20_big_20_underlined" style:display-name="Body Emphasized - Super big underlined" style:family="text">
      <style:text-properties fo:color="#000000" loext:opacity="100%" style:font-name="Andika New Basic2" fo:font-family="'Andika New Basic'" style:font-style-name="Regular" style:font-pitch="variable" fo:font-size="24pt" fo:language="en" fo:country="GB" fo:font-style="normal" style:text-underline-style="none" fo:font-weight="bold" officeooo:rsid="01760947" style:font-name-asian="ヒラギノ角ゴ Pro W3" style:font-family-asian="'ヒラギノ角ゴ Pro W3'" style:font-family-generic-asian="system" style:font-pitch-asian="variable" style:font-size-asian="24pt" style:language-asian="en" style:country-asian="US" style:font-style-asian="normal" style:font-weight-asian="bold" style:font-name-complex="Times New Roman2" style:font-family-complex="'Times New Roman'" style:font-family-generic-complex="system" style:font-pitch-complex="variable" style:font-size-complex="24pt" style:language-complex="hi" style:country-complex="IN" style:font-style-complex="normal" style:font-weight-complex="bold"/>
    </style:style>
    <style:style style:name="Lesson_20_number" style:display-name="Lesson number" style:family="text">
      <style:text-properties fo:color="#ffffff" loext:opacity="100%" style:text-outline="false" style:text-line-through-style="none" style:text-line-through-type="none" style:font-name="Andika Compact" fo:font-family="'Andika Compact'" style:font-pitch="variable" fo:font-size="48pt" fo:language="en" fo:country="US" fo:font-style="normal" fo:text-shadow="none" style:text-underline-style="none" fo:font-weight="bold" officeooo:rsid="018f45e1" fo:background-color="transparent" style:font-name-asian="ヒラギノ角ゴ Pro W3" style:font-family-asian="'ヒラギノ角ゴ Pro W3'" style:font-family-generic-asian="system" style:font-pitch-asian="variable" style:font-size-asian="48pt" style:language-asian="en" style:country-asian="US" style:font-style-asian="normal" style:font-weight-asian="bold" style:font-name-complex="Times New Roman2" style:font-family-complex="'Times New Roman'" style:font-family-generic-complex="system" style:font-pitch-complex="variable" style:font-size-complex="48pt" style:language-complex="hi" style:country-complex="IN" style:font-style-complex="normal" style:font-weight-complex="normal" style:text-overline-style="none" style:text-overline-color="font-color" loext:padding-left="0.199cm" loext:padding-right="0.349cm" loext:padding-top="0.349cm" loext:padding-bottom="0.199cm" loext:border="none"/>
    </style:style>
    <style:style style:name="Numbered_20_List" style:display-name="Numbered List" style:family="text">
      <style:text-properties fo:color="#000000" loext:opacity="100%" style:font-name="Andika New Basic2" fo:font-family="'Andika New Basic'" style:font-style-name="Regular" style:font-pitch="variable" fo:font-size="10pt" fo:language="en" fo:country="GB"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Body_20_8_20_pt" style:display-name="Body 8 pt" style:family="text">
      <style:text-properties fo:color="#000000" loext:opacity="100%" style:font-name="Andika4" fo:font-family="Andika" style:font-style-name="Regular" style:font-pitch="variable" fo:font-size="8pt" fo:language="en" fo:country="US" fo:font-style="normal" fo:font-weight="normal" style:font-name-asian="ヒラギノ角ゴ Pro W3" style:font-family-asian="'ヒラギノ角ゴ Pro W3'" style:font-family-generic-asian="system" style:font-pitch-asian="variable" style:font-size-asian="8pt" style:language-asian="en" style:country-asian="US" style:font-style-asian="normal" style:font-weight-asian="normal" style:font-name-complex="Times New Roman2" style:font-family-complex="'Times New Roman'" style:font-family-generic-complex="system" style:font-pitch-complex="variable" style:font-size-complex="8pt" style:language-complex="hi" style:country-complex="IN" style:font-style-complex="normal" style:font-weight-complex="normal"/>
    </style:style>
    <style:style style:name="Graphics" style:family="graphic">
      <style:graphic-properties svg:width="3cm" fo:min-height="3cm" text:anchor-type="paragraph" svg:x="-0.24cm" svg:y="-0.071cm" fo:margin-left="0cm" fo:margin-right="0cm" fo:margin-top="0cm" fo:margin-bottom="0cm" style:run-through="foreground"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Badge_20_Graphic" style:display-name="Badge Graphic" style:family="graphic" style:parent-style-name="Graphics">
      <style:graphic-properties svg:width="1.401cm" fo:min-height="0.041cm" text:anchor-type="as-char" svg:x="0cm" svg:y="-1.251cm" style:vertical-pos="from-top" style:horizontal-pos="from-left"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Bible_5f_Story_5f_Box" style:display-name="Bible_Story_Box" style:family="graphic" style:parent-style-name="Frame">
      <style:graphic-properties svg:width="3.5cm" fo:min-height="3.062cm" svg:x="-0.046cm" svg:y="0.009cm" fo:margin-left="0cm" fo:margin-right="0.101cm" fo:margin-top="0cm" fo:margin-bottom="0cm" style:run-through="foreground" style:wrap="dynamic" style:number-wrapped-paragraphs="no-limit" style:wrap-contour="true" style:wrap-contour-mode="full" style:vertical-pos="from-top" style:vertical-rel="paragraph" style:horizontal-pos="from-left" style:horizontal-rel="paragraph" fo:background-color="transparent" draw:fill="none" draw:fill-color="#729fcf" draw:opacity="50%" fo:padding="0cm" fo:border="none" draw:wrap-influence-on-position="once-concurrent" loext:allow-overlap="false">
        <style:columns fo:column-count="1" fo:column-gap="0cm"/>
      </style:graphic-properties>
    </style:style>
    <style:style style:name="Bible_5f_Story_5f_Picture" style:display-name="Bible_Story_Picture" style:family="graphic" style:parent-style-name="Graphics">
      <style:graphic-properties svg:width="3.281cm" fo:min-height="2.379cm" svg:x="0cm" svg:y="-2.379cm" fo:margin-left="0cm" fo:margin-right="0cm" fo:margin-top="0cm" fo:margin-bottom="0cm" style:vertical-pos="top" style:vertical-rel="paragraph" style:horizontal-pos="center" style:horizontal-rel="paragraph" fo:background-color="transparent" draw:fill="none" draw:fill-color="#729fcf" draw:textarea-vertical-align="bottom">
        <style:columns fo:column-count="1" fo:column-gap="0cm"/>
      </style:graphic-properties>
    </style:style>
    <style:style style:name="Lesson_5f_Number" style:display-name="Lesson_Number" style:family="graphic" style:parent-style-name="Frame">
      <style:graphic-properties svg:width="2.672cm" svg:height="2.538cm" svg:x="0cm" svg:y="0.25cm" fo:margin-left="0cm" fo:margin-right="0.199cm" fo:margin-top="0cm" fo:margin-bottom="0cm" style:run-through="foreground" style:protect="size" style:wrap="right" style:number-wrapped-paragraphs="no-limit" style:wrap-contour="false" style:vertical-pos="from-top" style:vertical-rel="page-content" style:horizontal-pos="left" style:horizontal-rel="page-content" fo:background-color="#000000" style:background-transparency="0%" draw:fill="solid" draw:fill-color="#000000" draw:opacity="100%" fo:padding="0.15cm" fo:border="none" style:flow-with-text="true" draw:wrap-influence-on-position="once-concurrent" loext:allow-overlap="false" draw:textarea-vertical-align="middle">
        <style:columns fo:column-count="1" fo:column-gap="0cm"/>
      </style:graphic-properties>
    </style:style>
    <style:style style:name="Number_20_Graphic" style:display-name="Number Graphic" style:family="graphic" style:parent-style-name="Graphics">
      <style:graphic-properties svg:width="2.731cm" fo:min-height="2.731cm" svg:x="0cm" svg:y="0.041cm" fo:margin-left="0cm" fo:margin-right="0.101cm" fo:margin-top="0cm" fo:margin-bottom="0cm" style:run-through="foreground" style:protect="none"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top">
        <style:columns fo:column-count="1" fo:column-gap="0cm"/>
      </style:graphic-properties>
    </style:style>
    <style:style style:name="Bullseye_20_graphic" style:display-name="Bullseye graphic" style:family="graphic" style:parent-style-name="Graphics">
      <style:graphic-properties svg:width="3cm" fo:min-height="3cm" svg:x="14.501cm" svg:y="-1cm" fo:margin-left="0.25cm" fo:margin-right="0cm" fo:margin-top="0cm" fo:margin-bottom="0cm" style:run-through="foreground" style:wrap="left" style:number-wrapped-paragraphs="no-limit" style:wrap-contour="true" style:wrap-contour-mode="full"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cm"/>
      </style:graphic-properties>
    </style:style>
    <style:style style:name="Coloring_20_Page_20_picture" style:display-name="Coloring Page picture" style:family="graphic" style:parent-style-name="Graphics">
      <style:graphic-properties svg:width="13.351cm" fo:min-height="13.788cm" svg:x="0cm" svg:y="-6.893cm" fo:margin-left="0cm" fo:margin-right="0cm" fo:margin-top="0cm" fo:margin-bottom="0cm" style:vertical-pos="middle"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Long_20_Jump_20_Graphic" style:display-name="Long Jump Graphic" style:family="graphic" style:parent-style-name="Graphics">
      <style:graphic-properties svg:width="5.001cm" fo:min-height="3.641cm" svg:x="12.501cm" svg:y="-1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cm"/>
      </style:graphic-properties>
    </style:style>
    <style:style style:name="Bowling_20_Pins_20_Graphic" style:display-name="Bowling Pins Graphic" style:family="graphic" style:parent-style-name="Graphics">
      <style:graphic-properties svg:width="3.505cm" fo:min-height="4.23cm" svg:x="13.996cm" svg:y="-1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Tic-Tac-Toe_20_graphic" style:display-name="Tic-Tac-Toe graphic" style:family="graphic" style:parent-style-name="Graphics">
      <style:graphic-properties svg:width="3cm" fo:min-height="3cm" svg:x="14.501cm" svg:y="-0.499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Front_20_matter_20_frames" style:display-name="Front matter frames" style:family="graphic" style:parent-style-name="Frame">
      <style:graphic-properties svg:width="17.501cm" style:rel-width="100%" fo:min-height="0.499cm" svg:x="0cm" svg:y="1.545cm" fo:margin-left="0.201cm" fo:margin-right="0.201cm" fo:margin-top="0.201cm" fo:margin-bottom="0.201cm" style:wrap="parallel" style:number-wrapped-paragraphs="no-limit" style:wrap-contour="false" style:vertical-pos="middle" style:vertical-rel="page-content" style:horizontal-pos="center" style:horizontal-rel="paragraph" fo:background-color="transparent" draw:fill="none" draw:fill-color="#729fcf" fo:padding="0.15cm" fo:border="none" loext:rel-width-rel="paragraph"/>
    </style:style>
    <style:style style:name="CC_20_Logo" style:display-name="CC Logo" style:family="graphic" style:parent-style-name="Graphics">
      <style:graphic-properties svg:width="2.378cm" fo:min-height="0.838cm" svg:x="0cm" svg:y="0.15cm" fo:margin-left="0cm" fo:margin-right="0.3cm" fo:margin-top="0cm" fo:margin-bottom="0.499cm" style:run-through="foreground" style:wrap="right" style:number-wrapped-paragraphs="no-limit" style:wrap-contour="false" style:vertical-pos="top" style:vertical-rel="paragraph-content"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loext:hidden="true" style:hidden="true">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loext:hidden="true" style:hidden="true">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loext:hidden="true" style:hidden="true">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loext:hidden="true" style:hidden="true">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loext:hidden="true" style:hidden="true">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Num1">
      <text:list-level-style-number text:level="1" text:style-name="Numbered_20_List"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style:list-level-label-alignment text:label-followed-by="listtab" fo:margin-left="0.423cm"/>
        </style:list-level-properties>
        <style:text-properties style:font-name="StarSymbol"/>
      </text:list-level-style-bullet>
      <text:list-level-style-number text:level="2" text:style-name="ListLabel_20_4" loext:num-list-format="%2%." style:num-suffix="." style:num-format="a">
        <style:list-level-properties text:list-level-position-and-space-mode="label-alignment">
          <style:list-level-label-alignment text:label-followed-by="listtab" fo:text-indent="0.635cm" fo:margin-left="0.423cm"/>
        </style:list-level-properties>
      </text:list-level-style-number>
      <text:list-level-style-number text:level="3" text:style-name="ListLabel_20_4" loext:num-list-format="%2%.%3%." style:num-suffix="." style:num-format="i" text:display-levels="2">
        <style:list-level-properties text:list-level-position-and-space-mode="label-alignment">
          <style:list-level-label-alignment text:label-followed-by="listtab" fo:text-indent="1.27cm" fo:margin-left="0.423cm"/>
        </style:list-level-properties>
      </text:list-level-style-number>
      <text:list-level-style-number text:level="4" text:style-name="ListLabel_20_4" loext:num-list-format="%2%.%3%.%4%." style:num-suffix="." style:num-format="1" text:display-levels="3">
        <style:list-level-properties text:list-level-position-and-space-mode="label-alignment">
          <style:list-level-label-alignment text:label-followed-by="listtab" fo:text-indent="1.905cm" fo:margin-left="0.423cm"/>
        </style:list-level-properties>
      </text:list-level-style-number>
      <text:list-level-style-number text:level="5" text:style-name="ListLabel_20_4" loext:num-list-format="%2%.%3%.%4%.%5%." style:num-suffix="." style:num-format="a" text:display-levels="4">
        <style:list-level-properties text:list-level-position-and-space-mode="label-alignment">
          <style:list-level-label-alignment text:label-followed-by="listtab" fo:text-indent="2.54cm" fo:margin-left="0.423cm"/>
        </style:list-level-properties>
      </text:list-level-style-number>
      <text:list-level-style-number text:level="6" text:style-name="ListLabel_20_4" loext:num-list-format="%2%.%3%.%4%.%5%.%6%." style:num-suffix="." style:num-format="i" text:display-levels="5">
        <style:list-level-properties text:list-level-position-and-space-mode="label-alignment">
          <style:list-level-label-alignment text:label-followed-by="listtab" fo:text-indent="3.175cm" fo:margin-left="0.423cm"/>
        </style:list-level-properties>
      </text:list-level-style-number>
      <text:list-level-style-number text:level="7" text:style-name="ListLabel_20_4" loext:num-list-format="%2%.%3%.%4%.%5%.%6%.%7%." style:num-suffix="." style:num-format="1" text:display-levels="6">
        <style:list-level-properties text:list-level-position-and-space-mode="label-alignment">
          <style:list-level-label-alignment text:label-followed-by="listtab" fo:text-indent="3.81cm" fo:margin-left="0.423cm"/>
        </style:list-level-properties>
      </text:list-level-style-number>
      <text:list-level-style-number text:level="8" text:style-name="ListLabel_20_4" loext:num-list-format="%2%.%3%.%4%.%5%.%6%.%7%.%8%." style:num-suffix="." style:num-format="a" text:display-levels="7">
        <style:list-level-properties text:list-level-position-and-space-mode="label-alignment">
          <style:list-level-label-alignment text:label-followed-by="listtab" fo:text-indent="4.445cm" fo:margin-left="0.423cm"/>
        </style:list-level-properties>
      </text:list-level-style-number>
      <text:list-level-style-number text:level="9" text:style-name="ListLabel_20_4" loext:num-list-format="%2%.%3%.%4%.%5%.%6%.%7%.%8%.%9%." style:num-suffix="." style:num-format="i" text:display-levels="8">
        <style:list-level-properties text:list-level-position-and-space-mode="label-alignment">
          <style:list-level-label-alignment text:label-followed-by="listtab" fo:text-indent="5.08cm" fo:margin-left="0.42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 loext:num-list-format="%1%" text:bullet-char="">
        <style:list-level-properties text:list-level-position-and-space-mode="label-alignment">
          <style:list-level-label-alignment text:label-followed-by="listtab" fo:text-indent="-0.635cm" fo:margin-left="2.021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656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291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926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56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196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831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466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101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loext:num-list-format="%1%" text:bullet-char="">
        <style:list-level-properties text:list-level-position-and-space-mode="label-alignment">
          <style:list-level-label-alignment text:label-followed-by="listtab" fo:text-indent="-0.635cm" fo:margin-left="2.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loext:num-list-format="%1%" text:bullet-char="">
        <style:list-level-properties text:list-level-position-and-space-mode="label-alignment">
          <style:list-level-label-alignment text:label-followed-by="listtab" fo:text-indent="-0.635cm" fo:margin-left="1.905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List" style:display-name="Numbered List">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20_checkmark" style:display-name="Bullet - checkmark">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iamond" style:display-name="Bullet - Diamond">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1.27cm"/>
        </style:list-level-properties>
        <style:text-properties style:font-name="Aria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56cm" fo:text-indent="-0.635cm" fo:margin-left="2.656cm"/>
        </style:list-level-properties>
        <style:text-properties style:font-name="Aria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91cm" fo:text-indent="-0.635cm" fo:margin-left="3.291cm"/>
        </style:list-level-properties>
        <style:text-properties style:font-name="Aria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26cm" fo:text-indent="-0.635cm" fo:margin-left="3.926cm"/>
        </style:list-level-properties>
        <style:text-properties style:font-name="Aria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61cm" fo:text-indent="-0.635cm" fo:margin-left="4.561cm"/>
        </style:list-level-properties>
        <style:text-properties style:font-name="Aria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96cm" fo:text-indent="-0.635cm" fo:margin-left="5.196cm"/>
        </style:list-level-properties>
        <style:text-properties style:font-name="Aria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31cm" fo:text-indent="-0.635cm" fo:margin-left="5.831cm"/>
        </style:list-level-properties>
        <style:text-properties style:font-name="Aria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66cm" fo:text-indent="-0.635cm" fo:margin-left="6.466cm"/>
        </style:list-level-properties>
        <style:text-properties style:font-name="Aria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101cm" fo:text-indent="-0.635cm" fo:margin-left="7.101cm"/>
        </style:list-level-properties>
        <style:text-properties style:font-name="Aria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36cm" fo:text-indent="-0.635cm" fo:margin-left="7.736cm"/>
        </style:list-level-properties>
        <style:text-properties style:font-name="Arial2"/>
      </text:list-level-style-bullet>
    </text:list-style>
    <text:list-style style:name="Table_20_Bullet_20_-_20_checkmark" style:display-name="Table Bullet - checkmark">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ot" style:display-name="Bullet - Dot">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Bullet_20_-_20_Checkmark" style:display-name="Bullet - Checkmark">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Lesson_20_Overview.1" style:display-name="Lesson Overview.1"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2" style:display-name="Lesson Overview.2"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3" style:display-name="Lesson Overview.3"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4" style:display-name="Lesson Overview.4"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5" style:display-name="Lesson Overview.5"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6" style:display-name="Lesson Overview.6"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7" style:display-name="Lesson Overview.7"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8" style:display-name="Lesson Overview.8"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9" style:display-name="Lesson Overview.9"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0" style:display-name="Lesson Overview.10"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1" style:display-name="Lesson Overview.11"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12" style:display-name="Lesson Overview.12"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3" style:display-name="Lesson Overview.13"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14" style:display-name="Lesson Overview.14"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5" style:display-name="Lesson Overview.15"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6" style:display-name="Lesson Overview.16"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table:table-template table:name="Lesson Overview" table:first-row-end-column="row" table:first-row-start-column="column" table:last-row-end-column="row" table:last-row-start-column="column">
      <table:first-row table:style-name="Lesson_20_Overview.1"/>
      <table:last-row table:style-name="Lesson_20_Overview.2"/>
      <table:first-column table:style-name="Lesson_20_Overview.3"/>
      <table:last-column table:style-name="Lesson_20_Overview.4"/>
      <table:body table:style-name="Lesson_20_Overview.9"/>
      <table:even-rows table:style-name="Lesson_20_Overview.5"/>
      <table:odd-rows table:style-name="Lesson_20_Overview.6"/>
      <table:even-columns table:style-name="Lesson_20_Overview.7"/>
      <table:odd-columns table:style-name="Lesson_20_Overview.8"/>
      <table:background table:style-name="Lesson_20_Overview.10"/>
      <loext:first-row-even-column table:style-name="Lesson_20_Overview.15"/>
      <loext:last-row-even-column table:style-name="Lesson_20_Overview.16"/>
      <loext:first-row-end-column table:style-name="Lesson_20_Overview.12"/>
      <loext:first-row-start-column table:style-name="Lesson_20_Overview.11"/>
      <loext:last-row-end-column table:style-name="Lesson_20_Overview.14"/>
      <loext:last-row-start-column table:style-name="Lesson_20_Overview.13"/>
    </table:table-template>
    <style:default-page-layout>
      <style:page-layout-properties style:writing-mode="lr-tb" style:layout-grid-standard-mode="true"/>
    </style:default-page-layout>
  </office:styles>
  <office:automatic-styles>
    <style:style style:name="Table4" style:family="table">
      <style:table-properties style:width="17.501cm" table:align="margins" style:writing-mode="lr-tb"/>
    </style:style>
    <style:style style:name="Table4.A" style:family="table-column">
      <style:table-column-properties style:column-width="2.6cm" style:rel-column-width="9735*"/>
    </style:style>
    <style:style style:name="Table4.B" style:family="table-column">
      <style:table-column-properties style:column-width="14.901cm" style:rel-column-width="55800*"/>
    </style:style>
    <style:style style:name="Table4.A1" style:family="table-cell">
      <style:table-cell-properties fo:padding="0.097cm" fo:border="none"/>
    </style:style>
    <style:style style:name="MP1" style:family="paragraph" style:parent-style-name="Coloring_20_Page_20_Footer">
      <style:text-properties officeooo:paragraph-rsid="02b4e089"/>
    </style:style>
    <style:style style:name="MP2" style:family="paragraph" style:parent-style-name="M.T._20_Text">
      <style:text-properties officeooo:paragraph-rsid="029f899c"/>
    </style:style>
    <style:style style:name="MP3" style:family="paragraph" style:parent-style-name="Body">
      <style:text-properties fo:font-size="8pt" officeooo:paragraph-rsid="029f899c" style:font-size-asian="8pt" style:font-size-complex="8pt"/>
    </style:style>
    <style:style style:name="MT1" style:family="text">
      <style:text-properties fo:color="#000000" loext:opacity="100%" fo:language="en" fo:country="US" officeooo:rsid="016feef4" style:font-name-asian="ヒラギノ角ゴ Pro W3" style:language-asian="en" style:country-asian="US" style:font-name-complex="Times New Roman2" style:language-complex="hi" style:country-complex="IN"/>
    </style:style>
    <style:style style:name="MT2" style:family="text">
      <style:text-properties officeooo:rsid="0184d68b"/>
    </style:style>
    <style:style style:name="MT3" style:family="text">
      <style:text-properties officeooo:rsid="01d657ac"/>
    </style:style>
    <style:style style:name="MT4" style:family="text">
      <style:text-properties officeooo:rsid="01355e7d"/>
    </style:style>
    <style:style style:name="MT5" style:family="text">
      <style:text-properties fo:language="en" fo:country="US" style:language-asian="en" style:country-asian="US" style:language-complex="hi" style:country-complex="IN"/>
    </style:style>
    <style:style style:name="MT6" style:family="text"/>
    <style:style style:name="Mfr1" style:family="graphic" style:parent-style-name="CC_20_Logo">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7cm" fo:margin-left="0cm" fo:margin-right="0cm" fo:margin-top="0.4cm" fo:background-color="transparent" style:dynamic-spacing="true" draw:fill="none" draw:fill-color="#729fcf"/>
      </style:footer-style>
    </style:page-layout>
    <style:page-layout style:name="Mpm3">
      <style:page-layout-properties fo:page-width="20.989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2" fo:column-gap="0.998cm">
          <style:column-sep style:width="0.009cm" style:color="#000000" style:height="0%" style:style="none" style:vertical-align="middle"/>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101cm" fo:background-color="transparent" style:dynamic-spacing="false" draw:fill="none" draw:fill-color="#729fcf"/>
      </style:footer-style>
    </style:page-layout>
    <style:page-layout style:name="Mpm1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799cm" fo:margin-left="0cm" fo:margin-right="0cm" fo:margin-top="0.499cm" fo:background-color="transparent" style:dynamic-spacing="true" draw:fill="none" draw:fill-color="#729fcf"/>
      </style:footer-style>
    </style:page-layout>
    <style:page-layout style:name="Mpm12">
      <style:page-layout-properties fo:page-width="21.001cm" fo:page-height="29.7cm" style:num-format="i"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101cm" fo:background-color="transparent" style:dynamic-spacing="true" draw:fill="none" draw:fill-color="#729fcf"/>
      </style:footer-style>
    </style:page-layout>
    <style:page-layout style:name="Mpm13" style:page-usage="left">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usage="mirrored">
      <style:page-layout-properties fo:page-width="21.001cm" fo:page-height="29.7cm" style:num-format="1" style:print-orientation="portrait" fo:margin-top="1.499cm" fo:margin-bottom="1.499cm" fo:margin-left="1.75cm" fo:margin-right="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1.001cm" fo:page-height="29.7cm" style:num-format="1" style:print-orientation="portrait" fo:margin-top="1cm" fo:margin-bottom="1.4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number-style style:name="N0">
      <number:number number:min-integer-digits="1"/>
    </number:number-style>
  </office:automatic-styles>
  <office:master-styles>
    <style:master-page style:name="Standard" style:page-layout-name="Mpm1" draw:style-name="Mdp1"/>
    <style:master-page style:name="First_20_Page" style:display-name="First Page" style:page-layout-name="Mpm2" draw:style-name="Mdp1" style:next-style-name="Lesson_20_Content">
      <style:footer>
        <table:table table:name="Table4" table:style-name="Table4">
          <table:table-column table:style-name="Table4.A"/>
          <table:table-column table:style-name="Table4.B"/>
          <table:table-row>
            <table:table-cell table:style-name="Table4.A1" office:value-type="string">
              <text:p text:style-name="Table_20_Contents"><draw:frame draw:style-name="Mfr1" draw:name="Image8" text:anchor-type="as-char" svg:width="2.378cm" svg:height="0.838cm" draw:z-index="11"><draw:image xlink:href="Pictures/10000001000000580000001FF4DBFF4432E2ED5C.png" xlink:type="simple" xlink:show="embed" xlink:actuate="onLoad" draw:mime-type="image/png"/></draw:frame></text:p>
            </table:table-cell>
            <table:table-cell table:style-name="Table4.A1" office:value-type="string">
              <text:p text:style-name="MP2">Year of publication <text:s/>Publisher</text:p>
              <text:p text:style-name="MP3"><text:span text:style-name="Body_20_8_20_pt">This work is licensed under the Creative Commons Attribution-NonCommercial-ShareAlike 4.0 International License. To view a copy of this license, visit http://creativecommons.org/licenses/by-nc-sa/4.0/deed.en_US.</text:span></text:p>
            </table:table-cell>
          </table:table-row>
        </table:table>
        <text:p text:style-name="Body_20_-_20_Small_20_Spacer"/>
      </style:footer>
    </style:master-page>
    <style:master-page style:name="HTML" style:page-layout-name="Mpm3" draw:style-name="Mdp1"/>
    <style:master-page style:name="Endnote" style:page-layout-name="Mpm4" draw:style-name="Mdp1"/>
    <style:master-page style:name="Index" style:page-layout-name="Mpm5" draw:style-name="Mdp1"/>
    <style:master-page style:name="Envelope" style:page-layout-name="Mpm6" draw:style-name="Mdp1"/>
    <style:master-page style:name="Footnote" style:page-layout-name="Mpm4" draw:style-name="Mdp1"/>
    <style:master-page style:name="Landscape" style:page-layout-name="Mpm7" draw:style-name="Mdp1"/>
    <style:master-page style:name="Left_20_Page" style:display-name="Left Page" style:page-layout-name="Mpm8" draw:style-name="Mdp1" style:next-style-name="Right_20_Page"/>
    <style:master-page style:name="Right_20_Page" style:display-name="Right Page" style:page-layout-name="Mpm9" draw:style-name="Mdp1" style:next-style-name="Left_20_Page"/>
    <style:master-page style:name="Coloring_20_Page" style:display-name="Coloring Page" style:page-layout-name="Mpm10" draw:style-name="Mdp2">
      <style:footer>
        <text:p text:style-name="MP1"><text:span text:style-name="MT1"><text:title>Lessons from Luke</text:title></text:span><text:s text:c="2"/><text:span text:style-name="MT1">Quarter <text:s/></text:span><text:span text:style-name="MT1"><text:user-defined style:data-style-name="N0" text:name="Quarter">2</text:user-defined></text:span><text:span text:style-name="MT1"><text:s text:c="2"/>Lesson <text:s/></text:span><text:span text:style-name="MT1"><text:user-defined style:data-style-name="N0" text:name="Lesson">16</text:user-defined></text:span><text:span text:style-name="MT2"><text:tab/></text:span><text:span text:style-name="MT1"><text:title>Lessons from Luke</text:title></text:span><text:span text:style-name="MT1"> <text:s/>Quarter <text:s/></text:span><text:span text:style-name="MT1"><text:user-defined style:data-style-name="N0" text:name="Quarter">2</text:user-defined></text:span><text:span text:style-name="MT1"><text:s text:c="2"/>Lesson <text:s/></text:span><text:span text:style-name="MT1"><text:user-defined style:data-style-name="N0" text:name="Lesson">16</text:user-defined></text:span></text:p>
      </style:footer>
    </style:master-page>
    <style:master-page style:name="Lesson_20_Content" style:display-name="Lesson Content" style:page-layout-name="Mpm11" draw:style-name="Mdp1">
      <style:footer>
        <text:p text:style-name="Footer"><text:span text:style-name="MT3">Quarter</text:span><text:span text:style-name="MT4"> <text:s/></text:span><text:span text:style-name="MT4"><text:user-defined style:data-style-name="N0" text:name="Quarter">2</text:user-defined></text:span><text:span text:style-name="MT4"><text:s text:c="2"/></text:span><text:span text:style-name="MT3">Lesson</text:span><text:span text:style-name="MT4"> <text:s/></text:span><text:span text:style-name="MT4"><text:user-defined style:data-style-name="N0" text:name="Lesson">16</text:user-defined></text:span><text:tab/><text:chapter text:display="name" text:outline-level="1">A True Disciple of Jesus is Generous</text:chapter><text:tab/>Page <text:s/><text:page-number text:select-page="current">8</text:page-number></text:p>
      </style:footer>
    </style:master-page>
    <style:master-page style:name="Front_20_matter" style:display-name="Front matter" style:page-layout-name="Mpm12" draw:style-name="Mdp1">
      <style:footer>
        <text:p text:style-name="Front_20_Matter_20_footer"><text:title>Lessons from Luke</text:title><text:tab/><text:subject>A True Disciple of Jesus is Generous</text:subject> <text:s/>– <text:s/><text:span text:style-name="MT5">Quarter </text:span><text:s/><text:user-defined style:data-style-name="N0" text:name="Quarter #"/><text:tab/>Page <text:page-number text:select-page="current" text:page-adjust="-3"/></text:p>
      </style:footer>
    </style:master-page>
    <style:master-page style:name="Inside_20_cover" style:display-name="Inside cover" style:page-layout-name="Mpm13" draw:style-name="Mdp1" style:next-style-name="Front_20_matter"/>
    <style:master-page style:name="Body_20_Pages" loext:hidden="true" style:hidden="true" style:display-name="Body Pages" style:page-layout-name="Mpm14" draw:style-name="Mdp1"/>
    <style:master-page style:name="Cover_20_pages" style:display-name="Cover pages" style:page-layout-name="Mpm1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10-16T07:05:03.830000000</meta:creation-date>
    <meta:editing-cycles>150</meta:editing-cycles>
    <meta:editing-duration>P5DT13H42M16S</meta:editing-duration>
    <meta:generator>LibreOffice/7.4.0.3$MacOSX_AARCH64 LibreOffice_project/f85e47c08ddd19c015c0114a68350214f7066f5a</meta:generator>
    <dc:date>2022-10-25T15:35:03.748703102</dc:date>
    <dc:subject>A True Disciple of Jesus is Generous</dc:subject>
    <dc:title>Lessons from Luke</dc:title>
    <dc:creator>Chris Jackson</dc:creator>
    <meta:document-statistic meta:table-count="2" meta:image-count="4" meta:object-count="0" meta:page-count="9" meta:paragraph-count="228" meta:word-count="4106" meta:character-count="21204" meta:non-whitespace-character-count="17328"/>
    <meta:user-defined meta:name="Lesson" meta:value-type="float">16</meta:user-defined>
    <meta:user-defined meta:name="Quarter" meta:value-type="float">2</meta:user-defined>
  </office:meta>
</office:document-meta>
</file>