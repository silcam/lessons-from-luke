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61D00000491B00410A78DA234C0.tif" manifest:media-type="image/tiff"/>
  <manifest:file-entry manifest:full-path="Pictures/100000000000015F000000FE36A0B4DDB886F879.jpg" manifest:media-type="image/jpeg"/>
  <manifest:file-entry manifest:full-path="Pictures/100000000000015F000000FE85FACB7263479162.jpg" manifest:media-type="image/jpeg"/>
  <manifest:file-entry manifest:full-path="Pictures/100000000000015F000000FE3C7D2BDEDDD5B7DB.jpg" manifest:media-type="image/jpeg"/>
  <manifest:file-entry manifest:full-path="Pictures/100000000000015F000000FEA717B20C83B6FA99.jpg" manifest:media-type="image/jpeg"/>
  <manifest:file-entry manifest:full-path="Pictures/10000001000000D8000000D87DE1E0E5D1660AB4.png" manifest:media-type="image/pn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Mangal" svg:font-family="Mangal" style:font-family-generic="roman" style:font-pitch="variable"/>
    <style:font-face style:name="OpenSymbol" svg:font-family="OpenSymbol"/>
    <style:font-face style:name="OpenSymbol1" svg:font-family="OpenSymbol" style:font-family-generic="system" style:font-charset="x-symbol"/>
    <style:font-face style:name="OpenSymbol2" svg:font-family="OpenSymbol" style:font-family-generic="system" style:font-pitch="variable"/>
    <style:font-face style:name="OpenSymbol3" svg:font-family="OpenSymbol, 'Arial Unicode MS'" style:font-family-generic="roman"/>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5cm" table:align="left" style:may-break-between-rows="true" style:writing-mode="lr-tb" table:border-model="collapsing"/>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9cm"/>
    </style:style>
    <style:style style:name="Title_26_Truth.1" style:display-name="Title&amp;Truth.1" style:family="table-row">
      <style:table-row-properties fo:keep-together="auto"/>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writing-mode="lr-tb">
        <style:background-image/>
      </style:table-cell-properties>
    </style:style>
    <style:style style:name="Title_26_Truth.B1" style:display-name="Title&amp;Truth.B1" style:family="table-cell">
      <style:table-cell-properties style:vertical-align="middle" fo:background-color="transparent" fo:padding-left="0.102cm" fo:padding-right="0.102cm" fo:padding-top="0cm" fo:padding-bottom="0.051cm" fo:border-left="none" fo:border-right="none" fo:border-top="none" fo:border-bottom="1pt solid #000000" style:writing-mode="lr-tb">
        <style:background-image/>
      </style:table-cell-properties>
    </style:style>
    <style:style style:name="P1" style:family="paragraph" style:parent-style-name="Coloring_20_Page_20_Footer">
      <style:text-properties officeooo:paragraph-rsid="02b4e089"/>
    </style:style>
    <style:style style:name="P2" style:family="paragraph" style:parent-style-name="M.T._20_Text">
      <style:text-properties officeooo:paragraph-rsid="029f899c"/>
    </style:style>
    <style:style style:name="P3" style:family="paragraph" style:parent-style-name="Body">
      <style:text-properties fo:font-size="8pt" officeooo:paragraph-rsid="029f899c" style:font-size-asian="8pt" style:font-size-complex="8pt"/>
    </style:style>
    <style:style style:name="P4" style:family="paragraph" style:parent-style-name="Sub-Head_20_1" style:master-page-name="">
      <style:paragraph-properties style:page-number="auto" fo:keep-with-next="always"/>
      <style:text-properties officeooo:paragraph-rsid="008cb4bb"/>
    </style:style>
    <style:style style:name="P5" style:family="paragraph" style:parent-style-name="English_20_Translation_20_-_20_single_20_inset">
      <style:text-properties officeooo:paragraph-rsid="008cb4bb"/>
    </style:style>
    <style:style style:name="P6" style:family="paragraph" style:parent-style-name="M.T._20_Text_20_-_20_Single_20_Inset">
      <style:text-properties officeooo:paragraph-rsid="008cb4bb"/>
    </style:style>
    <style:style style:name="P7" style:family="paragraph" style:parent-style-name="Sub-Head_20_1">
      <style:text-properties officeooo:paragraph-rsid="008cb4bb"/>
    </style:style>
    <style:style style:name="P8" style:family="paragraph" style:parent-style-name="M.T._20_Text_20_-_20_Indented">
      <style:text-properties officeooo:paragraph-rsid="008cb4bb"/>
    </style:style>
    <style:style style:name="P9" style:family="paragraph" style:parent-style-name="Body">
      <style:text-properties officeooo:paragraph-rsid="008cb4bb"/>
    </style:style>
    <style:style style:name="P10" style:family="paragraph" style:parent-style-name="English_20_Translation_20_-_20_Bible_20_story_20_inset">
      <style:text-properties officeooo:paragraph-rsid="008cb4bb"/>
    </style:style>
    <style:style style:name="P11" style:family="paragraph" style:parent-style-name="English_20_Translation_20_-_20_Indented">
      <style:text-properties officeooo:paragraph-rsid="008cb4bb"/>
    </style:style>
    <style:style style:name="P12" style:family="paragraph" style:parent-style-name="English_20_Translation_20_-_20_double_20_inset">
      <style:text-properties officeooo:paragraph-rsid="008cb4bb"/>
    </style:style>
    <style:style style:name="P13" style:family="paragraph" style:parent-style-name="English_20_translation">
      <style:text-properties officeooo:paragraph-rsid="008cb4bb"/>
    </style:style>
    <style:style style:name="P14" style:family="paragraph" style:parent-style-name="M.T._20_Text">
      <style:text-properties officeooo:paragraph-rsid="008cb4bb"/>
    </style:style>
    <style:style style:name="P15" style:family="paragraph" style:parent-style-name="M.T._20_Text_20_-_20_Bible_20_story_20_inset">
      <style:text-properties officeooo:paragraph-rsid="008cb4bb"/>
    </style:style>
    <style:style style:name="P16" style:family="paragraph" style:parent-style-name="Section_20_Heading">
      <style:text-properties officeooo:paragraph-rsid="008cb4bb"/>
    </style:style>
    <style:style style:name="P17" style:family="paragraph" style:parent-style-name="Sub-Head_20_-_20_Coloring_20_page_20_last_20_paragraph">
      <style:text-properties officeooo:paragraph-rsid="008cb4bb"/>
    </style:style>
    <style:style style:name="P18" style:family="paragraph" style:parent-style-name="Sub-Head_20_1_20_No_20_follow">
      <style:text-properties officeooo:paragraph-rsid="008cb4bb"/>
    </style:style>
    <style:style style:name="P19" style:family="paragraph" style:parent-style-name="Sub-Head_20_2">
      <style:text-properties officeooo:paragraph-rsid="008cb4bb"/>
    </style:style>
    <style:style style:name="P20" style:family="paragraph" style:parent-style-name="M.T._20_Text_20_-_20_Single_20_Inset">
      <style:text-properties officeooo:rsid="00715c8c" officeooo:paragraph-rsid="008cb4bb"/>
    </style:style>
    <style:style style:name="P21" style:family="paragraph" style:parent-style-name="Sub-Head_20_1">
      <style:text-properties fo:language="en" fo:country="US" officeooo:paragraph-rsid="008cb4bb" style:language-asian="en" style:country-asian="US" style:language-complex="hi" style:country-complex="IN"/>
    </style:style>
    <style:style style:name="P22" style:family="paragraph" style:parent-style-name="M.T._20_Text_20_-_20_Indented">
      <style:text-properties officeooo:rsid="00724ec1" officeooo:paragraph-rsid="008cb4bb"/>
    </style:style>
    <style:style style:name="P23" style:family="paragraph" style:parent-style-name="Bible_20_Story_20_-_20_Graphic_20_Number">
      <style:text-properties officeooo:paragraph-rsid="007c31d2"/>
    </style:style>
    <style:style style:name="P24" style:family="paragraph" style:parent-style-name="Bible_20_Story_20_Column_20_Heading">
      <style:text-properties officeooo:paragraph-rsid="007c31d2"/>
    </style:style>
    <style:style style:name="P25" style:family="paragraph" style:parent-style-name="Bible_20_Story_20_-_20_Graphic_20_Number">
      <style:text-properties officeooo:rsid="017e3f1f" officeooo:paragraph-rsid="007c31d2"/>
    </style:style>
    <style:style style:name="P26" style:family="paragraph" style:parent-style-name="M.T._20_Coloring_20_Page_20_-_20_Truth">
      <style:paragraph-properties fo:break-before="column"/>
    </style:style>
    <style:style style:name="P27" style:family="paragraph" style:parent-style-name="M.T._20_Coloring_20_Page_20_-_20_Truth" style:master-page-name="Coloring_20_Page">
      <style:paragraph-properties style:page-number="auto"/>
    </style:style>
    <style:style style:name="P28" style:family="paragraph" style:parent-style-name="Body_20_Bullet_20_-_20_Checkmark">
      <style:text-properties officeooo:paragraph-rsid="008cb4bb"/>
    </style:style>
    <style:style style:name="P29" style:family="paragraph" style:parent-style-name="Body_20_Bullet_20_-_20_Checkmark" style:master-page-name="">
      <style:paragraph-properties style:page-number="auto" fo:keep-with-next="always"/>
      <style:text-properties officeooo:paragraph-rsid="008cb4bb"/>
    </style:style>
    <style:style style:name="P30" style:family="paragraph" style:parent-style-name="Body_20_Bullet_20_-_20_Checkmark_20_-_20_No_20_follow">
      <style:text-properties officeooo:paragraph-rsid="008cb4bb"/>
    </style:style>
    <style:style style:name="P31" style:family="paragraph" style:parent-style-name="Body_20_Numbered_20_List">
      <style:text-properties officeooo:paragraph-rsid="008cb4bb"/>
    </style:style>
    <style:style style:name="P32" style:family="paragraph" style:parent-style-name="M.T._20_Lesson_20_title_20_-_20_invisible" style:master-page-name="First_20_Page">
      <style:paragraph-properties style:page-number="auto"/>
    </style:style>
    <style:style style:name="P33" style:family="paragraph" style:parent-style-name="M.T._20_Text_20_-_20_Checkmark_20_bullet">
      <style:text-properties officeooo:paragraph-rsid="008cb4bb"/>
    </style:style>
    <style:style style:name="P34" style:family="paragraph" style:parent-style-name="M.T._20_Text_20_-_20_Diamond_20_bullet">
      <style:text-properties officeooo:paragraph-rsid="008cb4bb"/>
    </style:style>
    <style:style style:name="P35" style:family="paragraph" style:parent-style-name="M.T._20_Text_20_-_20_Numbered_20_List_20_Inset" style:list-style-name="L1">
      <style:text-properties officeooo:paragraph-rsid="008cb4bb"/>
    </style:style>
    <style:style style:name="P36" style:family="paragraph" style:parent-style-name="M.T._20_Text_20_-_20_Numbered_20_List_20_Inset" style:list-style-name="L2">
      <style:text-properties officeooo:paragraph-rsid="008cb4bb"/>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fo:color="#000000" loext:opacity="100%" style:font-name="Andika New Basic2" fo:font-size="10pt" fo:language="en" fo:country="US" fo:font-style="normal" fo:font-weight="normal" officeooo:rsid="008f5c58"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T3" style:family="text">
      <style:text-properties officeooo:rsid="0184d68b"/>
    </style:style>
    <style:style style:name="T4" style:family="text">
      <style:text-properties officeooo:rsid="01d657ac"/>
    </style:style>
    <style:style style:name="T5" style:family="text">
      <style:text-properties officeooo:rsid="01355e7d"/>
    </style:style>
    <style:style style:name="T6" style:family="text">
      <style:text-properties fo:language="en" fo:country="US" style:language-asian="en" style:country-asian="US" style:language-complex="hi" style:country-complex="IN"/>
    </style:style>
    <style:style style:name="T7" style:family="text">
      <style:text-properties fo:language="en" fo:country="US" officeooo:rsid="008f5c58" style:language-asian="en" style:country-asian="US" style:language-complex="hi" style:country-complex="IN"/>
    </style:style>
    <style:style style:name="T8" style:family="text">
      <style:text-properties officeooo:rsid="00724ec1"/>
    </style:style>
    <style:style style:name="T9" style:family="text">
      <style:text-properties officeooo:rsid="00742a0c"/>
    </style:style>
    <style:style style:name="T10" style:family="text">
      <style:text-properties officeooo:rsid="007e3368"/>
    </style:style>
    <style:style style:name="fr1" style:family="graphic" style:parent-style-name="Bible_5f_Story_5f_Box">
      <style:graphic-properties style:vertical-pos="from-top" style:vertical-rel="paragraph" style:horizontal-pos="from-left" style:horizontal-rel="paragraph" draw:opacity="50%"/>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Bible_5f_Story_5f_Picture">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32" text:outline-level="1"><draw:frame draw:style-name="fr4" draw:name="Image3" text:anchor-type="char" svg:x="0cm" svg:y="0.041cm" svg:width="2.731cm" svg:height="2.731cm" draw:z-index="0"><draw:image xlink:href="Pictures/10000001000000D8000000D87DE1E0E5D1660AB4.png" xlink:type="simple" xlink:show="embed" xlink:actuate="onLoad" draw:mime-type="image/png"/></draw:frame>The Seed and the Sower</text:h>
        </text:list-item>
      </text:list>
      <text:p text:style-name="M.T._20_Lesson_20_Title">The Seed and the Sower</text:p>
      <text:p text:style-name="English_20_Translation_20_-_20_Lesson_20_title">The Seed and the Sower</text:p>
      <text:p text:style-name="M.T._20_Text_20_-_20_Lesson_20_Title_20_Scrip_20_Reference">Luke <text:s/>8:4-15</text:p>
      <text:p text:style-name="Part_20_Heading">Lesson Overview</text:p>
      <table:table table:name="Title&amp;Truth" table:style-name="Title_26_Truth" table:template-name="Lesson Overview">
        <table:table-column table:style-name="Title_26_Truth.A"/>
        <table:table-column table:style-name="Title_26_Truth.B"/>
        <table:table-row table:style-name="Title_26_Truth.1">
          <table:table-cell table:style-name="Title_26_Truth.A1" office:value-type="string">
            <text:p text:style-name="Table_20_Left_20_headings">Today’s Truth</text:p>
          </table:table-cell>
          <table:table-cell table:style-name="Title_26_Truth.B1" office:value-type="string">
            <text:p text:style-name="M.T._20_Text">Follow Jesus no matter the cost.</text:p>
            <text:p text:style-name="English_20_translation">Follow Jesus no matter the cost.</text:p>
          </table:table-cell>
        </table:table-row>
        <table:table-row table:style-name="Title_26_Truth.1">
          <table:table-cell table:style-name="Title_26_Truth.A1" office:value-type="string">
            <text:p text:style-name="Table_20_Left_20_headings">Objective</text:p>
          </table:table-cell>
          <table:table-cell table:style-name="Title_26_Truth.B1" office:value-type="string">
            <text:p text:style-name="Body_20_Tight_20_lines"><text:span text:style-name="Body_20_Emphasized_20_-_20_Small">KNOW: <text:s/></text:span>The children will know how to correctly follow Jesus.</text:p>
            <text:p text:style-name="Body_20_Tight_20_lines"><text:span text:style-name="Body_20_Emphasized_20_-_20_Small">DO:</text:span> <text:s/>The children will look for the four kinds of soil around their compound.</text:p>
          </table:table-cell>
        </table:table-row>
        <table:table-row table:style-name="Title_26_Truth.1">
          <table:table-cell table:style-name="Title_26_Truth.A1" office:value-type="string">
            <text:p text:style-name="Table_20_Left_20_headings">Materials</text:p>
          </table:table-cell>
          <table:table-cell table:style-name="Title_26_Truth.B1" office:value-type="string">
            <text:list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text:span text:style-name="T7">Ball</text:span> <text:s/>(Make a ball by tying wrappen (plastic bag) into knots many times, or fill an old sock with scrap material.)</text:p>
              </text:list-item>
              <text:list-item>
                <text:p text:style-name="Table_20_Bullet_20_-_20_Checkmark">A drum, shaker, or anything to make music with.</text:p>
              </text:list-item>
            </text:list>
          </table:table-cell>
        </table:table-row>
        <table:table-row table:style-name="Title_26_Truth.1">
          <table:table-cell table:style-name="Title_26_Truth.A1" office:value-type="string">
            <text:p text:style-name="Table_20_Left_20_headings">Memory Verse</text:p>
          </table:table-cell>
          <table:table-cell table:style-name="Title_26_Truth.B1" office:value-type="string">
            <text:p text:style-name="M.T._20_Text">Luke 8:15 But the seed on the good soil stands for those with a noble and good heart, who hear the Word, retain it, and by persevering produce a crop.</text:p>
            <text:p text:style-name="English_20_translation">Luke 8:15 But the seed on the good soil stands for those with a noble and good heart, who hear the Word, retain it, and by persevering produce a crop.</text:p>
          </table:table-cell>
        </table:table-row>
        <table:table-row table:style-name="Title_26_Truth.1">
          <table:table-cell table:style-name="Title_26_Truth.A1" office:value-type="string">
            <text:p text:style-name="Table_20_Left_20_headings">Homework</text:p>
          </table:table-cell>
          <table:table-cell table:style-name="Title_26_Truth.B1" office:value-type="string">
            <text:p text:style-name="M.T._20_Text">This week, as you walk or work or play outside this week, see if you can find examples of these four different kinds of soil around your compound. Ask God to help you be like the good soil and follow Jesus no matter what happens.</text:p>
            <text:p text:style-name="English_20_translation">This week, as you walk or work or play outside this week, see if you can find examples of these four different kinds of soil around your compound. Ask God to help you be like the good soil and follow Jesus no matter what happens.</text:p>
          </table:table-cell>
        </table:table-row>
      </table:table>
      <text:p text:style-name="Body_20_-_20_Small_20_Spacer"/>
      <text:p text:style-name="Part_20_Heading">Detailed Lesson Plan</text:p>
      <text:section text:style-name="Sect1" text:name="L-22 Detail Plan">
        <text:p text:style-name="P18">Song</text:p>
        <text:p text:style-name="P16">Opening</text:p>
        <text:p text:style-name="P7">Welcome</text:p>
        <text:list xml:id="list3132274941" text:style-name="Bullet_20_-_20_checkmark">
          <text:list-item>
            <text:p text:style-name="P28">Be sure the children know you are happy to see them!</text:p>
          </text:list-item>
          <text:list-item>
            <text:p text:style-name="P28">Introduce yourself and your helpers.</text:p>
          </text:list-item>
        </text:list>
        <text:p text:style-name="P7">Sharing Time</text:p>
        <text:list xml:id="list193045164705477" text:continue-numbering="true" text:style-name="Bullet_20_-_20_checkmark">
          <text:list-item>
            <text:p text:style-name="P29">Say the truth from the previous lesson together:</text:p>
          </text:list-item>
        </text:list>
        <text:p text:style-name="P6">Jesus forgives our sins.</text:p>
        <text:p text:style-name="P5">Jesus forgives our sins.</text:p>
        <text:list xml:id="list193044388131786" text:continue-numbering="true" text:style-name="Bullet_20_-_20_checkmark">
          <text:list-item>
            <text:p text:style-name="P28">Say the memory verse from the previous lesson together:</text:p>
          </text:list-item>
        </text:list>
        <text:p text:style-name="P6">Luke 7:48 Jesus said to her, “Your sins are forgiven.”</text:p>
        <text:p text:style-name="P20">Luke 7:50 Jesus said to the woman, “Your faith has saved you; go in peace.”</text:p>
        <text:p text:style-name="P5">Luke 7:48 Jesus said to her, “Your sins are forgiven.”</text:p>
        <text:p text:style-name="P5">Luke 7:50 Jesus said to the woman, “Your faith has saved you; go in peace.”</text:p>
        <text:list xml:id="list193044383387074" text:continue-numbering="true" text:style-name="Bullet_20_-_20_checkmark">
          <text:list-item>
            <text:p text:style-name="P28"><text:soft-page-break/>Review the homework from the previous lesson:</text:p>
          </text:list-item>
        </text:list>
        <text:p text:style-name="P6">The homework was to think of ways you can show your love for Jesus. What did you do? Did you confess a sin? Did you show love to an enemy? What did you do?</text:p>
        <text:p text:style-name="P5">The homework was to think of ways you can show your love for Jesus. What did you do? Did you confess a sin? Did you show love to an enemy? What did you do?</text:p>
        <text:p text:style-name="P7">Prayer</text:p>
        <text:list xml:id="list193046172958432" text:continue-numbering="true" text:style-name="Bullet_20_-_20_checkmark">
          <text:list-item>
            <text:p text:style-name="P28">Let the children share praises and prayer requests.</text:p>
          </text:list-item>
          <text:list-item>
            <text:p text:style-name="P30">Keep a record of what the children are sharing so you can remember to thank God together for answered prayers.</text:p>
          </text:list-item>
          <text:list-item>
            <text:p text:style-name="P30">Spend time praying together. <text:s/>Let children pray out loud if they volunteer. <text:s/>Do not force anyone to pray out loud.</text:p>
          </text:list-item>
        </text:list>
        <text:p text:style-name="P18">Song</text:p>
        <text:p text:style-name="P16">Words to Discuss</text:p>
        <text:list xml:id="list193045830130525" text:continue-numbering="true" text:style-name="Bullet_20_-_20_checkmark">
          <text:list-item>
            <text:p text:style-name="P28">On the blackboard, write the “Words to Discuss” from the list below.</text:p>
          </text:list-item>
          <text:list-item>
            <text:p text:style-name="P33">Let's discuss some words to help us better understand the Bible story for today.</text:p>
          </text:list-item>
        </text:list>
        <text:p text:style-name="P5">Let's discuss some words to help us better understand the Bible story for today.</text:p>
        <text:list xml:id="list2086813669" text:style-name="Bullet_20_-_20_Diamond">
          <text:list-item>
            <text:p text:style-name="P34"><text:span text:style-name="Body_20_Emphasized_20_-_20_Small">Farmer: <text:s/></text:span>(Let the children give their definitions.)</text:p>
          </text:list-item>
        </text:list>
        <text:p text:style-name="P12">Farmer: <text:s/>(Let the children give their definitions.)</text:p>
        <text:list xml:id="list193046247595842" text:continue-numbering="true" text:style-name="Bullet_20_-_20_Diamond">
          <text:list-item>
            <text:p text:style-name="P34"><text:span text:style-name="Body_20_Emphasized_20_-_20_Small">Seeds: <text:s/></text:span>(Let the children give their definitions.)</text:p>
          </text:list-item>
        </text:list>
        <text:p text:style-name="P12">Seeds: <text:s/>(Let the children give their definitions.)</text:p>
        <text:list xml:id="list193044731276323" text:continue-numbering="true" text:style-name="Bullet_20_-_20_Diamond">
          <text:list-item>
            <text:p text:style-name="P34"><text:span text:style-name="Body_20_Emphasized_20_-_20_Small">Soil: <text:s/></text:span>(Let the children give their definitions.)</text:p>
          </text:list-item>
        </text:list>
        <text:p text:style-name="P12">Soil: <text:s/>(Let the children give their definitions.)</text:p>
        <text:p text:style-name="P18">Song</text:p>
        <text:p text:style-name="P16">Bible Story / Lesson</text:p>
        <text:p text:style-name="P8">When planting season comes, what is the best kind of soil to plant your seeds in?</text:p>
        <text:p text:style-name="P11">When planting season comes, what is the best kind of soil to plant your seeds in?</text:p>
        <text:p text:style-name="P8">What do seeds need in order to grow?</text:p>
        <text:p text:style-name="P11">What do seeds need in order to grow?</text:p>
        <text:p text:style-name="P8">What will cause your seeds to not produce?</text:p>
        <text:p text:style-name="P11">What will cause your seeds to not produce?</text:p>
        <text:p text:style-name="P8">Today we will be learning about how to follow Jesus no matter the cost.</text:p>
        <text:p text:style-name="P11">Today we will be learning about how to follow Jesus no matter the cost.</text:p>
        <text:p text:style-name="P7">Introduce Truth</text:p>
        <text:p text:style-name="P14">Our truth for today is: <text:s/>Follow Jesus no matter the cost.</text:p>
        <text:p text:style-name="P13">Our truth for today is: <text:s/>Follow Jesus no matter the cost.</text:p>
        <text:p text:style-name="P14">This reminds me of a true story from the Bible.</text:p>
        <text:p text:style-name="P13">This reminds me of a true story from the Bible.</text:p>
        <text:p text:style-name="P21">Bible Story: <text:s/>Luke <text:s/>8:4-15</text:p>
        <text:p text:style-name="P9"><text:span text:style-name="T9">Note: <text:s/></text:span>In this lesson, you will show the picture of each type of soil Jesus describes, and you will show the picture again when Jesus explains the meaning of each.</text:p>
        <text:p text:style-name="P8"><text:soft-page-break/>Luke 8:4 While a large crowd was gathering and people were coming to Jesus from town after town, he told this parable:</text:p>
        <text:p text:style-name="P11">Luke 8:4 While a large crowd was gathering and people were coming to Jesus from town after town, he told this parable:</text:p>
        <text:p text:style-name="P15"><draw:frame draw:style-name="fr1" draw:name="Frame2" text:anchor-type="paragraph" svg:x="-0.046cm" svg:y="0.009cm" svg:width="3.5cm" draw:z-index="3"><draw:text-box fo:min-height="3.062cm"><text:p text:style-name="P25">Picture <text:s/>22–1</text:p><text:p text:style-name="P23"><draw:frame draw:style-name="fr3" draw:name="Image1" text:anchor-type="as-char" svg:width="3.281cm" svg:height="2.379cm" draw:z-index="10"><draw:image xlink:href="Pictures/100000000000015F000000FEA717B20C83B6FA99.jpg" xlink:type="simple" xlink:show="embed" xlink:actuate="onLoad" draw:mime-type="image/jpeg"/></draw:frame></text:p></draw:text-box></draw:frame>Luke 8:5 A farmer went out to sow his seed. As he was scattering the seed, some fell along the path; it was trampled on, and the birds of the air ate it up.</text:p>
        <text:p text:style-name="P10">Luke 8:5 A farmer went out to sow his seed. As he was scattering the seed, some fell along the path; it was trampled on, and the birds of the air ate it up.</text:p>
        <text:p text:style-name="P10"/>
        <text:p text:style-name="P10"/>
        <text:p text:style-name="P10"/>
        <text:p text:style-name="P15"><draw:frame draw:style-name="fr1" draw:name="Frame1" text:anchor-type="paragraph" svg:x="-0.046cm" svg:y="0.009cm" svg:width="3.5cm" draw:z-index="4"><draw:text-box fo:min-height="3.062cm"><text:p text:style-name="P25">Picture <text:s/>22–2</text:p><text:p text:style-name="P23"><draw:frame draw:style-name="fr3" draw:name="Image8" text:anchor-type="as-char" svg:width="3.281cm" svg:height="2.379cm" draw:z-index="12"><draw:image xlink:href="Pictures/100000000000015F000000FE3C7D2BDEDDD5B7DB.jpg" xlink:type="simple" xlink:show="embed" xlink:actuate="onLoad" draw:mime-type="image/jpeg"/></draw:frame></text:p></draw:text-box></draw:frame>Luke 8:6 Some fell on rock, and when it came up, the plants withered because they had no moisture.</text:p>
        <text:p text:style-name="P11">Luke 8:6 Some fell on rock, and when it came up, the plants withered because they had no moisture.</text:p>
        <text:p text:style-name="P11"/>
        <text:p text:style-name="P11"/>
        <text:p text:style-name="P11"/>
        <text:p text:style-name="P11"/>
        <text:p text:style-name="P15"><draw:frame draw:style-name="fr1" draw:name="Frame3" text:anchor-type="paragraph" svg:x="-0.046cm" svg:y="0.009cm" svg:width="3.5cm" draw:z-index="5"><draw:text-box fo:min-height="3.062cm"><text:p text:style-name="P25">Picture <text:s/>22–3</text:p><text:p text:style-name="P23"><draw:frame draw:style-name="fr3" draw:name="Image9" text:anchor-type="as-char" svg:width="3.281cm" svg:height="2.379cm" draw:z-index="13"><draw:image xlink:href="Pictures/100000000000015F000000FE85FACB7263479162.jpg" xlink:type="simple" xlink:show="embed" xlink:actuate="onLoad" draw:mime-type="image/jpeg"/></draw:frame></text:p></draw:text-box></draw:frame>Luke 8:7 Other seed fell among thorns, which grew up with it and choked the plants.</text:p>
        <text:p text:style-name="P11">Luke 8:7 Other seed fell among thorns, which grew up with it and choked the plants.</text:p>
        <text:p text:style-name="P11"/>
        <text:p text:style-name="P11"/>
        <text:p text:style-name="P11"/>
        <text:p text:style-name="P11"/>
        <text:p text:style-name="P15"><draw:frame draw:style-name="fr1" draw:name="Frame4" text:anchor-type="paragraph" svg:x="-0.046cm" svg:y="0.009cm" svg:width="3.5cm" draw:z-index="6"><draw:text-box fo:min-height="3.062cm"><text:p text:style-name="P25">Picture <text:s/>22–4</text:p><text:p text:style-name="P23"><draw:frame draw:style-name="fr3" draw:name="Image10" text:anchor-type="as-char" svg:width="3.281cm" svg:height="2.379cm" draw:z-index="14"><draw:image xlink:href="Pictures/100000000000015F000000FE36A0B4DDB886F879.jpg" xlink:type="simple" xlink:show="embed" xlink:actuate="onLoad" draw:mime-type="image/jpeg"/></draw:frame></text:p></draw:text-box></draw:frame>Luke 8:8 Still other seed fell on good soil. It came up and yielded a crop, a hundred times more than was sown.” When he said this, he called out, “He who has ears to hear, let him hear.”</text:p>
        <text:p text:style-name="P11">Luke 8:8 Still other seed fell on good soil. It came up and yielded a crop, a hundred times more than was sown.” When he said this, he called out, “He who has ears to hear, let him hear.”</text:p>
        <text:p text:style-name="P11"/>
        <text:p text:style-name="P15">Luke 8:9-10 His disciples asked him what this parable meant. He said, “The knowledge of the secrets of the kingdom of God has been given to you, but to others I speak in parables, so that, “‘though seeing, they may not see; though hearing, they may not understand.’</text:p>
        <text:p text:style-name="P15">Luke 8:11 “This is the meaning of the parable: The seed is the word of God.</text:p>
        <text:p text:style-name="P10">Luke 8:9-10 His disciples asked him what this parable meant. He said, “The knowledge of the secrets of the kingdom of God has been given to you, but to others I speak in parables, so that, “‘though seeing, they may not see; though hearing, they may not understand.’</text:p>
        <text:p text:style-name="P10">Luke 8:11 “This is the meaning of the parable: The seed is the word of God.</text:p>
        <text:p text:style-name="P15"><draw:frame draw:style-name="fr1" draw:name="Frame6" text:anchor-type="paragraph" svg:x="-0.046cm" svg:y="0.009cm" svg:width="3.5cm" draw:z-index="7"><draw:text-box fo:min-height="3.062cm"><text:p text:style-name="P24"><text:span text:style-name="T10">Picture <text:s/></text:span>22–1 <text:s/>(Repeat)</text:p><text:p text:style-name="P24"><draw:frame draw:style-name="fr3" draw:name="Image11" text:anchor-type="as-char" svg:width="3.281cm" svg:height="2.379cm" draw:z-index="15"><draw:image xlink:href="Pictures/100000000000015F000000FEA717B20C83B6FA99.jpg" xlink:type="simple" xlink:show="embed" xlink:actuate="onLoad" draw:mime-type="image/jpeg"/></draw:frame></text:p></draw:text-box></draw:frame>Luke 8:12 Those along the path are the ones who hear, and then the devil comes and takes away the word from their hearts, so that they may not believe and be saved.</text:p>
        <text:p text:style-name="P10">Luke 8:12 Those along the path are the ones who hear, and then the devil comes and takes away the word from their hearts, so that they may not believe and be saved.</text:p>
        <text:p text:style-name="P11"/>
        <text:p text:style-name="P11"/>
        <text:p text:style-name="P15"><draw:frame draw:style-name="fr1" draw:name="Frame7" text:anchor-type="paragraph" svg:x="-0.046cm" svg:y="0.009cm" svg:width="3.5cm" draw:z-index="8"><draw:text-box fo:min-height="3.062cm"><text:p text:style-name="P24"><text:span text:style-name="T10">Picture <text:s/></text:span>22–2 <text:s/>(Repeat)</text:p><text:p text:style-name="P24"><draw:frame draw:style-name="fr3" draw:name="Image12" text:anchor-type="as-char" svg:width="3.281cm" svg:height="2.379cm" draw:z-index="16"><draw:image xlink:href="Pictures/100000000000015F000000FE3C7D2BDEDDD5B7DB.jpg" xlink:type="simple" xlink:show="embed" xlink:actuate="onLoad" draw:mime-type="image/jpeg"/></draw:frame></text:p></draw:text-box></draw:frame>Luke 8:13 Those on the rock are the ones who receive the word with joy when they hear it, but they have no root. They believe for a while, but in the time of testing they fall away.</text:p>
        <text:p text:style-name="P10"><text:soft-page-break/>Luke 8:13 Those on the rock are the ones who receive the word with joy when they hear it, but they have no root. They believe for a while, but in the time of testing they fall away.</text:p>
        <text:p text:style-name="P11"/>
        <text:p text:style-name="P11"/>
        <text:p text:style-name="P15"><draw:frame draw:style-name="fr1" draw:name="Frame8" text:anchor-type="paragraph" svg:x="-0.046cm" svg:y="0.009cm" svg:width="3.5cm" draw:z-index="9"><draw:text-box fo:min-height="3.062cm"><text:p text:style-name="P24"><text:span text:style-name="T10">Picture <text:s/></text:span>22–3 <text:s/>(Repeat)</text:p><text:p text:style-name="P24"><draw:frame draw:style-name="fr3" draw:name="Image13" text:anchor-type="as-char" svg:width="3.281cm" svg:height="2.379cm" draw:z-index="17"><draw:image xlink:href="Pictures/100000000000015F000000FE85FACB7263479162.jpg" xlink:type="simple" xlink:show="embed" xlink:actuate="onLoad" draw:mime-type="image/jpeg"/></draw:frame></text:p></draw:text-box></draw:frame>Luke 8:14 The seed that fell among thorns stands for those who hear, but as they go on their way they are choked by life’s worries, riches and pleasures, and they do not mature.</text:p>
        <text:p text:style-name="P10">Luke 8:14 The seed that fell among thorns stands for those who hear, but as they go on their way they are choked by life’s worries, riches and pleasures, and they do not mature.</text:p>
        <text:p text:style-name="P11"/>
        <text:p text:style-name="P11"/>
        <text:p text:style-name="P15"><draw:frame draw:style-name="fr1" draw:name="Frame9" text:anchor-type="paragraph" svg:x="-0.046cm" svg:y="0.009cm" svg:width="3.5cm" draw:z-index="11"><draw:text-box fo:min-height="3.062cm"><text:p text:style-name="P24"><text:span text:style-name="T10">Picture <text:s/></text:span>22–4 <text:s/>(Repeat)</text:p><text:p text:style-name="P24"><draw:frame draw:style-name="fr3" draw:name="Image14" text:anchor-type="as-char" svg:width="3.281cm" svg:height="2.379cm" draw:z-index="18"><draw:image xlink:href="Pictures/100000000000015F000000FE36A0B4DDB886F879.jpg" xlink:type="simple" xlink:show="embed" xlink:actuate="onLoad" draw:mime-type="image/jpeg"/></draw:frame></text:p></draw:text-box></draw:frame>Luke 8:15 But the seed on good soil stands for those with a noble and good heart, who hear the word, retain it, and by persevering produce a crop.</text:p>
        <text:p text:style-name="P10">Luke 8:15 But the seed on good soil stands for those with a noble and good heart, who hear the word, retain it, and by persevering produce a crop.</text:p>
        <text:p text:style-name="P10"/>
        <text:p text:style-name="P10"/>
        <text:p text:style-name="P10"/>
        <text:p text:style-name="P10"/>
        <text:p text:style-name="P7">Application</text:p>
        <text:p text:style-name="P8">What kind of soil are you? Are you like the “footpath” that represented people who refuse to believe God's message? Are you like the “rocky soil” that represents people who believe the message of Jesus, but never get around to doing anything about it? Are you like the “thorny ground” that represents people that are overcome by worries and want all the things this life can offer, and leave no room in their lives for God? Or, are you like the “good soil” that represents people who follow Jesus no matter the cost? What soil would you like to be?</text:p>
        <text:p text:style-name="P11">What kind of soil are you? Are you like the “footpath” that represented people who refuse to believe God's message? Are you like the “rocky soil” that represents people who believe the message of Jesus, but never get around to doing anything about it? Are you like the “thorny ground” that represents people that are overcome by worries and want all the things this life can offer, and leave no room in their lives for God? Or, are you like the “good soil” that represents people who follow Jesus no matter the cost? What soil would you like to be?</text:p>
        <text:p text:style-name="P14">Follow Jesus no matter the cost.</text:p>
        <text:p text:style-name="P13">Follow Jesus no matter the cost.</text:p>
        <text:p text:style-name="P19">Homework</text:p>
        <text:p text:style-name="P22">This week, as you walk or work or play outside this week, see if you can find examples of these four different kinds of soil around your compound. Ask God to help you be like the good soil and follow Jesus no matter what happens.</text:p>
        <text:p text:style-name="P11">This week, as you walk or work or play outside this week, see if you can find examples of these four different kinds of soil around your compound. Ask God to help you be like the good soil and follow Jesus no matter what happens.</text:p>
        <text:p text:style-name="Sub-Head_20_1_20_No_20_follow">Prayer / Song</text:p>
        <text:p text:style-name="P16"><text:soft-page-break/>Review Game</text:p>
        <text:p text:style-name="P4">Team Hot Potato</text:p>
        <text:p text:style-name="P19">Materials</text:p>
        <text:list xml:id="list193044977394770" text:continue-list="list193045830130525" text:style-name="Bullet_20_-_20_checkmark">
          <text:list-item>
            <text:p text:style-name="P28"><text:span text:style-name="T2">Ball</text:span> <text:s/>(Make a ball by tying wrappen (plastic bag) into knots many times, or fill an old sock with scrap material.)</text:p>
          </text:list-item>
          <text:list-item>
            <text:p text:style-name="P30">A drum, shaker, or anything to make music with.</text:p>
          </text:list-item>
        </text:list>
        <text:p text:style-name="P19">How to Play</text:p>
        <text:list xml:id="list193046057722744" text:continue-numbering="true" text:style-name="Bullet_20_-_20_checkmark">
          <text:list-item>
            <text:p text:style-name="Body_20_Bullet_20_-_20_Checkmark">Divide the class into 2 teams. <text:s/>Pick 3 volunteers from each team.</text:p>
          </text:list-item>
          <text:list-item>
            <text:p text:style-name="Body_20_Bullet_20_-_20_Checkmark_20_-_20_No_20_follow">The 6 children will stand in a circle at the front of the room.</text:p>
          </text:list-item>
          <text:list-item>
            <text:p text:style-name="Body_20_Bullet_20_-_20_Checkmark_20_-_20_No_20_follow">The children will pass the ball from person to person in the circle as quickly as possible.</text:p>
          </text:list-item>
          <text:list-item>
            <text:p text:style-name="Body_20_Bullet_20_-_20_Checkmark_20_-_20_No_20_follow">Have a drummer not face the children and drum for a short time.</text:p>
          </text:list-item>
          <text:list-item>
            <text:p text:style-name="Body_20_Bullet_20_-_20_Checkmark_20_-_20_No_20_follow">When the drummer stops, the student holding the ball answers a question. <text:s/>If the answer is correct, that team gets a point.</text:p>
          </text:list-item>
          <text:list-item>
            <text:p text:style-name="Body_20_Bullet_20_-_20_Checkmark_20_-_20_No_20_follow">The drummer then starts to play again and the game continues.</text:p>
          </text:list-item>
          <text:list-item>
            <text:p text:style-name="Body_20_Bullet_20_-_20_Checkmark_20_-_20_No_20_follow">After playing 2 or 3 times, you can change the children in the circle. <text:s/>Have the chidren at the front sit down. <text:s/>Then, pick 3 different voluteers from each team.</text:p>
          </text:list-item>
          <text:list-item>
            <text:p text:style-name="Body_20_Bullet_20_-_20_Checkmark_20_-_20_No_20_follow">Continue playing the game.</text:p>
          </text:list-item>
          <text:list-item>
            <text:p text:style-name="Body_20_Bullet_20_-_20_Checkmark_20_-_20_No_20_follow">Record the points. <text:s/>The team with the most points wins.</text:p>
          </text:list-item>
          <text:list-item>
            <text:p text:style-name="Body_20_Bullet_20_-_20_Checkmark_20_-_20_No_20_follow">Be sure to clap for both sides. <text:s/>No name-calling. <text:s/>Encourage good sportsmanship.</text:p>
          </text:list-item>
        </text:list>
        <text:p text:style-name="P19">Questions for Review Game</text:p>
        <text:list xml:id="list3201140358" text:style-name="L1">
          <text:list-item>
            <text:p text:style-name="P35">Jesus told a story about a farmer who was planting his seeds by scattering them across his field. What happened to the seed that fell on the footpath? (They were stepped on, and the birds came and ate them all.)</text:p>
          </text:list-item>
        </text:list>
        <text:p text:style-name="P5">Jesus told a story about a farmer who was planting his seeds by scattering them across his field. What happened to the seed that fell on the footpath? (They were stepped on, and the birds came and ate them all.)</text:p>
        <text:list xml:id="list193045979421268" text:continue-numbering="true" text:style-name="L1">
          <text:list-item>
            <text:p text:style-name="P35">What happened to the seed that fell on the shallow soil with underlying rock? (They began to grow, but soon it withered and died for lack of moisture.)</text:p>
          </text:list-item>
        </text:list>
        <text:p text:style-name="P5">What happened to the seed that fell on the shallow soil with underlying rock? (They began to grow, but soon it withered and died for lack of moisture.)</text:p>
        <text:list xml:id="list193044779326295" text:continue-numbering="true" text:style-name="L1">
          <text:list-item>
            <text:p text:style-name="P35">What happened to the seed that fell among the thorns? (They were choked.)</text:p>
          </text:list-item>
        </text:list>
        <text:p text:style-name="P5">What happened to the seed that fell among the thorns? (They were choked.)</text:p>
        <text:list xml:id="list193045616281088" text:continue-numbering="true" text:style-name="L1">
          <text:list-item>
            <text:p text:style-name="P35">What happened to the seed that fell on fertile soil? (They grew and produced a crop one hundred times as much as had been planted.)</text:p>
          </text:list-item>
        </text:list>
        <text:p text:style-name="P5">What happened to the seed that fell on fertile soil? (They grew and produced a crop one hundred times as much as had been planted.)</text:p>
        <text:list xml:id="list193045880062301" text:continue-numbering="true" text:style-name="L1">
          <text:list-item>
            <text:p text:style-name="P35">What did Jesus' disciples want to know? (The meaning of the story)</text:p>
          </text:list-item>
        </text:list>
        <text:p text:style-name="P5">What did Jesus' disciples want to know? (The meaning of the story)</text:p>
        <text:list xml:id="list193046172886502" text:continue-numbering="true" text:style-name="L1">
          <text:list-item>
            <text:p text:style-name="P35">What did the seed represent? (The message of God)</text:p>
          </text:list-item>
        </text:list>
        <text:p text:style-name="P5">What did the seed represent? (The message of God)</text:p>
        <text:list xml:id="list193046202992356" text:continue-numbering="true" text:style-name="L1">
          <text:list-item>
            <text:p text:style-name="P35">What kind of people did the footpath represent? (Those who hear the message, but then the devil comes and steals it away and prevents them from believing and being saved)</text:p>
          </text:list-item>
        </text:list>
        <text:p text:style-name="P5">What kind of people did the footpath represent? (Those who hear the message, but then the devil comes and steals it away and prevents them from believing and being saved)</text:p>
        <text:list xml:id="list193044274731436" text:continue-numbering="true" text:style-name="L1">
          <text:list-item>
            <text:p text:style-name="P35"><text:soft-page-break/>What kind of people did the shallow soil with underlying hard rock represent? (Those who hear the message with joy. But like young plants in such soil, their roots don't go very deep. They believe for a while, but they wilt when the hot winds of testing blow.)</text:p>
          </text:list-item>
        </text:list>
        <text:p text:style-name="P5">What kind of people did the shallow soil with underlying hard rock represent? (Those who hear the message with joy. But like young plants in such soil, their roots don't go very deep. They believe for a while, but they wilt when the hot winds of testing blow.)</text:p>
        <text:list xml:id="list193045151018129" text:continue-numbering="true" text:style-name="L1">
          <text:list-item>
            <text:p text:style-name="P35">What kind of people did the thorny soil represent? (Those who hear and accept the message, but all too quickly the message is crowded out by the cares, riches, and pleasures of this life. The plants will never mature and grow.)</text:p>
          </text:list-item>
        </text:list>
        <text:p text:style-name="P5">What kind of people did the thorny soil represent? (Those who hear and accept the message, but all too quickly the message is crowded out by the cares, riches, and pleasures of this life. The plants will never mature and grow.)</text:p>
        <text:list xml:id="list193044851365312" text:continue-numbering="true" text:style-name="L1">
          <text:list-item>
            <text:p text:style-name="P35">What kind of people did the fertile soil represent? (Honest, good-hearted people who hear God's message. They cling to it, and they steadily produce a huge harvest.)</text:p>
          </text:list-item>
        </text:list>
        <text:p text:style-name="P5">What kind of people did the fertile soil represent? (Honest, good-hearted people who hear God's message. They cling to it, and they steadily produce a huge harvest.)</text:p>
        <text:p text:style-name="Sub-Head_20_1_20_No_20_follow">Song</text:p>
        <text:p text:style-name="P16">Memory Verse</text:p>
        <text:p text:style-name="P19">Materials and Preparations</text:p>
        <text:list xml:id="list193044221984486" text:continue-list="list193046057722744" text:style-name="Bullet_20_-_20_checkmark">
          <text:list-item>
            <text:p text:style-name="P28">Put a bookmark in <text:s/>Luke 8:15</text:p>
          </text:list-item>
          <text:list-item>
            <text:p text:style-name="P28">Write memory verse on the blackboard.</text:p>
          </text:list-item>
        </text:list>
        <text:p text:style-name="P6">Luke 8:15 But the seed on the good soil stands for those with a noble and good heart, who hear the Word, retain it, and by persevering produce a crop.</text:p>
        <text:p text:style-name="P5">Luke 8:15 But the seed on the good soil stands for those with a noble and good heart, who hear the Word, retain it, and by persevering produce a crop.</text:p>
        <text:p text:style-name="P7">Teach and Explain</text:p>
        <text:p text:style-name="P8">Our memory verse is in the Gospel of Luke. <text:s/>That is in the New Testament, a part of the Bible.</text:p>
        <text:p text:style-name="P11">Our memory verse is in the Gospel of Luke. <text:s/>That is in the New Testament, a part of the Bible.</text:p>
        <text:list xml:id="list2948730300" text:style-name="WWNum1">
          <text:list-item text:start-value="1">
            <text:p text:style-name="P31">Read the verse from your Bible.</text:p>
          </text:list-item>
          <text:list-item>
            <text:p text:style-name="P31">Read the verse by yourself as you point to the words.</text:p>
          </text:list-item>
          <text:list-item>
            <text:p text:style-name="P31">Read the verse with the children as you point to the words.</text:p>
          </text:list-item>
          <text:list-item>
            <text:p text:style-name="P31">Explain the verse:</text:p>
          </text:list-item>
        </text:list>
        <text:list xml:id="list193044444284247" text:continue-list="list193044221984486" text:style-name="Bullet_20_-_20_checkmark">
          <text:list-item>
            <text:p text:style-name="P33">Our memory verse comes from today’s Bible story.</text:p>
          </text:list-item>
        </text:list>
        <text:p text:style-name="P5">Our memory verse comes from today’s Bible story.</text:p>
        <text:list xml:id="list193044909119271" text:continue-numbering="true" text:style-name="Bullet_20_-_20_checkmark">
          <text:list-item>
            <text:p text:style-name="P28">As you read the verse, circle the words shown below. <text:s/>Explain each of these words.</text:p>
          </text:list-item>
        </text:list>
        <text:list xml:id="list193044683862949" text:continue-list="list193044731276323" text:style-name="Bullet_20_-_20_Diamond">
          <text:list-item>
            <text:p text:style-name="P34"><text:span text:style-name="Body_20_Emphasized_20_-_20_Small">Seed: <text:s/></text:span>Do you remember in the story Jesus told what the seed represents? (The message of God.) Seeds need to be planted on good soil if it is going to produce a harvest.</text:p>
          </text:list-item>
        </text:list>
        <text:p text:style-name="P12">Seed: <text:s/>Do you remember in the story Jesus told what the seed represents? (The message of God.) Seeds need to be planted on good soil if it is going to produce a harvest.</text:p>
        <text:list xml:id="list193044666749926" text:continue-numbering="true" text:style-name="Bullet_20_-_20_Diamond">
          <text:list-item>
            <text:p text:style-name="P34"><text:span text:style-name="Body_20_Emphasized_20_-_20_Small">Noble: <text:s/></text:span>Someone who is noble shows high moral qualities. Do you know someone who is noble? You know when someone has a good heart because they show kindness to others. You know when someone has a good heart because they show kindness to others.</text:p>
          </text:list-item>
        </text:list>
        <text:p text:style-name="P12">Noble: <text:s/>Someone who is noble shows high moral qualities. Do you know someone who is noble? You know when someone has a good heart because they show kindness to others. You know when someone has a good heart because they show kindness to others.</text:p>
        <text:list xml:id="list193044815488512" text:continue-numbering="true" text:style-name="Bullet_20_-_20_Diamond">
          <text:list-item>
            <text:p text:style-name="P34"><text:soft-page-break/><text:span text:style-name="Body_20_Emphasized_20_-_20_Small">Hear: <text:s/></text:span>How are ways that one hears the words of God? (By reading the Bible, going to church and Sunday school, having family Bible reading times, listening to radio programs.)</text:p>
          </text:list-item>
        </text:list>
        <text:p text:style-name="P12">Hear: <text:s/>How are ways that one hears the words of God? (By reading the Bible, going to church and Sunday school, having family Bible reading times, listening to radio programs.)</text:p>
        <text:list xml:id="list193045818230001" text:continue-numbering="true" text:style-name="Bullet_20_-_20_Diamond">
          <text:list-item>
            <text:p text:style-name="P34"><text:span text:style-name="Body_20_Emphasized_20_-_20_Small">Retain: <text:s/></text:span>To be good soil, one does not only hear God's message, but they keep it in their memory. The message goes with them wherever they go.</text:p>
          </text:list-item>
        </text:list>
        <text:p text:style-name="P12">Retain: <text:s/>To be good soil, one does not only hear God's message, but they keep it in their memory. The message goes with them wherever they go.</text:p>
        <text:list xml:id="list193044284890332" text:continue-numbering="true" text:style-name="Bullet_20_-_20_Diamond">
          <text:list-item>
            <text:p text:style-name="P34"><text:span text:style-name="Body_20_Emphasized_20_-_20_Small">Persevering: <text:s/></text:span>The one who produces a crop are those who follow Jesus no matter what the cost. They persevere, they continue to follow Jesus no matter what difficulties come their way.</text:p>
          </text:list-item>
        </text:list>
        <text:p text:style-name="P12">Persevering: <text:s/>The one who produces a crop are those who follow Jesus no matter what the cost. They persevere, they continue to follow Jesus no matter what difficulties come their way.</text:p>
        <text:list xml:id="list193044310414723" text:continue-list="list2948730300" text:style-name="WWNum1">
          <text:list-item>
            <text:p text:style-name="P31">Read the verse again by yourself as you point to the words.</text:p>
          </text:list-item>
          <text:list-item>
            <text:p text:style-name="P31">Read the verse again with the children as you point to the words.</text:p>
          </text:list-item>
        </text:list>
        <text:p text:style-name="P14">Remember our truth for the day? <text:s/><text:span text:style-name="T8">Let’s all say it together:</text:span></text:p>
        <text:p text:style-name="P13">Remember our truth for the day? <text:s/>Let’s all say it together:</text:p>
        <text:p text:style-name="P14">Follow Jesus no matter the cost.</text:p>
        <text:p text:style-name="P13">Follow Jesus no matter the cost.</text:p>
        <text:p text:style-name="P16">Memory Verse Review</text:p>
        <text:p text:style-name="P7">Children Repeat the Verse by Playing “Groupings”</text:p>
        <text:list xml:id="list193044751262519" text:continue-list="list193044909119271" text:style-name="Bullet_20_-_20_checkmark">
          <text:list-item>
            <text:p text:style-name="P28">Talk about different ways to group people. (All boys, all girls, all children who ate fufu corn this week, all the children wearing read, all the children in class 2, etc.)</text:p>
          </text:list-item>
          <text:list-item>
            <text:p text:style-name="P30">Ask the children the first question.</text:p>
          </text:list-item>
          <text:list-item>
            <text:p text:style-name="P30">When a question is answered correctly, that child chooses one of the groups listed above or chooses their own group.</text:p>
          </text:list-item>
          <text:list-item>
            <text:p text:style-name="P30">The verse is said out loud together by the group chosen.</text:p>
          </text:list-item>
          <text:list-item>
            <text:p text:style-name="P30">Then the next question is asked.</text:p>
          </text:list-item>
          <text:list-item>
            <text:p text:style-name="P30">When that question is answered correctly, another child chooses one of the groups.</text:p>
          </text:list-item>
          <text:list-item>
            <text:p text:style-name="P30">The verse is said aloud again by the group chosen.</text:p>
          </text:list-item>
          <text:list-item>
            <text:p text:style-name="P30">Do this until all the questions are asked.</text:p>
          </text:list-item>
        </text:list>
        <text:p text:style-name="P19">Questions for Memory Verse</text:p>
        <text:list xml:id="list2513511327" text:style-name="L2">
          <text:list-item text:start-value="1">
            <text:p text:style-name="P36">Where in the Bible is today's memory verse found? <text:s/>( <text:s/>Luke 8:15 <text:s/>)</text:p>
          </text:list-item>
        </text:list>
        <text:p text:style-name="P5">Where in the Bible is today's memory verse found? <text:s/>( <text:s/>Luke 8:15 <text:s/>)</text:p>
        <text:list xml:id="list193044406026823" text:continue-numbering="true" text:style-name="L2">
          <text:list-item>
            <text:p text:style-name="P36">What does the seed represent? (God's message)</text:p>
          </text:list-item>
        </text:list>
        <text:p text:style-name="P5">What does the seed represent? (God's message)</text:p>
        <text:list xml:id="list193044624149518" text:continue-numbering="true" text:style-name="L2">
          <text:list-item>
            <text:p text:style-name="P36">The seed on good soil stands for the person with what kind of heart? (A noble and good heart)</text:p>
          </text:list-item>
        </text:list>
        <text:p text:style-name="P5">The seed on good soil stands for the person with what kind of heart? (A noble and good heart)</text:p>
        <text:list xml:id="list193044465027953" text:continue-numbering="true" text:style-name="L2">
          <text:list-item>
            <text:p text:style-name="P36">The people with good and noble hearts not only hear God's message, but they also do what? (Retain God's message)</text:p>
          </text:list-item>
        </text:list>
        <text:p text:style-name="P5">The people with good and noble hearts not only hear God's message, but they also do what? (Retain God's message)</text:p>
        <text:list xml:id="list193044695053861" text:continue-numbering="true" text:style-name="L2">
          <text:list-item>
            <text:p text:style-name="P36">What else do they do? (Follow Jesus no matter what the cost is. They persevere.)</text:p>
          </text:list-item>
        </text:list>
        <text:p text:style-name="P5">What else do they do? (Follow Jesus no matter what the cost is. They persevere.)</text:p>
        <text:p text:style-name="P18">Song</text:p>
        <text:p text:style-name="P16"><text:soft-page-break/>Closing and Homework</text:p>
        <text:list xml:id="list193044416567412" text:continue-list="list193044751262519" text:style-name="Bullet_20_-_20_checkmark">
          <text:list-item>
            <text:p text:style-name="P28">Say the truth together:</text:p>
          </text:list-item>
        </text:list>
        <text:p text:style-name="P6">Follow Jesus no matter the cost.</text:p>
        <text:p text:style-name="P5">Follow Jesus no matter the cost.</text:p>
        <text:list xml:id="list193046333554535" text:continue-numbering="true" text:style-name="Bullet_20_-_20_checkmark">
          <text:list-item>
            <text:p text:style-name="P28">Say the memory verse together:</text:p>
          </text:list-item>
        </text:list>
        <text:p text:style-name="P6">Luke 8:15 But the seed on the good soil stands for those with a noble and good heart, who hear the Word, retain it, and by persevering produce a crop.</text:p>
        <text:p text:style-name="P5">Luke 8:15 But the seed on the good soil stands for those with a noble and good heart, who hear the Word, retain it, and by persevering produce a crop.</text:p>
        <text:list xml:id="list193045773235138" text:continue-numbering="true" text:style-name="Bullet_20_-_20_checkmark">
          <text:list-item>
            <text:p text:style-name="P28">Review the homework:</text:p>
          </text:list-item>
        </text:list>
        <text:p text:style-name="P6">This week, as you walk or work or play outside this week, see if you can find examples of these four different kinds of soil around your compound. Ask God to help you be like the good soil and follow Jesus no matter what happens.</text:p>
        <text:p text:style-name="P5">This week, as you walk or work or play outside this week, see if you can find examples of these four different kinds of soil around your compound. Ask God to help you be like the good soil and follow Jesus no matter what happens.</text:p>
        <text:list xml:id="list193045152780226" text:continue-numbering="true" text:style-name="Bullet_20_-_20_checkmark">
          <text:list-item>
            <text:p text:style-name="P28">Give any needed announcements.</text:p>
          </text:list-item>
        </text:list>
        <text:p text:style-name="P7">Closing Prayer</text:p>
        <text:p text:style-name="P9"><text:span text:style-name="Body_20_Emphasized_20_-_20_Small">Thank God <text:s/></text:span>that we can plant a firm faith in Him, even though we may not deserve it.</text:p>
        <text:p text:style-name="P9"><text:span text:style-name="Body_20_Emphasized_20_-_20_Small">Ask God <text:s/></text:span>that the children will remember to look for the four kinds of soil around their compound and decide to be like the good soil and follow Jesus no matter the cost.</text:p>
        <text:p text:style-name="P17">Colouring page to colour and take home!</text:p>
      </text:section>
      <text:p text:style-name="Body"/>
      <text:p text:style-name="P27">Follow Jesus no matter the cost.</text:p>
      <text:p text:style-name="Bible_20_Story_20_-_20_Graphic_20_Number"/>
      <text:p text:style-name="Bible_20_Story_20_-_20_Graphic_20_Number"><draw:frame draw:style-name="fr2" draw:name="Image2" text:anchor-type="as-char" svg:width="13.25cm" svg:height="9.897cm" draw:z-index="1"><draw:image xlink:href="Pictures/100000010000061D00000491B00410A78DA234C0.tif" xlink:type="simple" xlink:show="embed" xlink:actuate="onLoad" draw:mime-type="image/tiff"/></draw:frame></text:p>
      <text:p text:style-name="Bible_20_Story_20_-_20_Graphic_20_Number"/>
      <text:p text:style-name="M.T._20_Coloring_20_Page_20_-_20_Memory_20_Verse">Luke 8:15 But the seed on the good soil stands for those with a noble and good heart, who hear the Word, retain it, and by persevering produce a crop.</text:p>
      <text:p text:style-name="P26">Follow Jesus no matter the cost.</text:p>
      <text:p text:style-name="Bible_20_Story_20_-_20_Graphic_20_Number"/>
      <text:p text:style-name="Bible_20_Story_20_-_20_Graphic_20_Number"><draw:frame draw:style-name="fr2" draw:name="Image4" text:anchor-type="as-char" svg:width="13.25cm" svg:height="9.897cm" draw:z-index="2"><draw:image xlink:href="Pictures/100000010000061D00000491B00410A78DA234C0.tif" xlink:type="simple" xlink:show="embed" xlink:actuate="onLoad" draw:mime-type="image/tiff"/></draw:frame></text:p>
      <text:p text:style-name="Bible_20_Story_20_-_20_Graphic_20_Number"/>
      <text:p text:style-name="M.T._20_Coloring_20_Page_20_-_20_Memory_20_Verse">Luke 8:15 But the seed on the good soil stands for those with a noble and good heart, who hear the Word, retain it, and by persevering produce a cr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Mangal" svg:font-family="Mangal" style:font-family-generic="roman" style:font-pitch="variable"/>
    <style:font-face style:name="OpenSymbol" svg:font-family="OpenSymbol"/>
    <style:font-face style:name="OpenSymbol1" svg:font-family="OpenSymbol" style:font-family-generic="system" style:font-charset="x-symbol"/>
    <style:font-face style:name="OpenSymbol2" svg:font-family="OpenSymbol" style:font-family-generic="system" style:font-pitch="variable"/>
    <style:font-face style:name="OpenSymbol3" svg:font-family="OpenSymbol, 'Arial Unicode MS'" style:font-family-generic="roman"/>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fo:hyphenation-remain-char-count="2" fo:hyphenation-push-char-count="2" loext:hyphenation-no-caps="false" loext:hyphenation-no-last-word="false" loext:hyphenation-word-char-count="no-limit" loext:hyphenation-zone="no-limit"/>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Large_20_Spacer" style:display-name="Body - Large Spacer" style:family="paragraph" style:parent-style-name="Body" style:class="text">
      <style:paragraph-properties fo:margin-top="0.499cm" fo:margin-bottom="0cm" style:contextual-spacing="false"/>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New Basic" fo:font-family="'Andika New Basic'" style:font-pitch="variable" fo:font-size="18pt" fo:font-weight="bold" officeooo:rsid="00135fa9" style:font-size-asian="18pt" style:font-weight-asian="bold" style:font-size-complex="18pt" style:font-weight-complex="bold"/>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 New Basic" fo:font-family="'Andika New Basic'"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Page_20_Number" style:display-name="Page Number" style:family="text">
      <style:text-properties style:font-name="Arial2" fo:font-family="Arial" style:font-family-generic="swiss" style:font-pitch="variable"/>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3" style:display-name="WW_CharLFO4LVL3" style:family="text">
      <style:text-properties fo:font-weight="normal" style:font-weight-asian="normal" style:font-weight-complex="normal"/>
    </style:style>
    <style:style style:name="WW_5f_CharLFO4LVL4" style:display-name="WW_CharLFO4LVL4" style:family="text">
      <style:text-properties fo:font-weight="normal" style:font-weight-asian="normal" style:font-weight-complex="normal"/>
    </style:style>
    <style:style style:name="WW_5f_CharLFO4LVL5" style:display-name="WW_CharLFO4LVL5" style:family="text">
      <style:text-properties fo:font-weight="normal" style:font-weight-asian="normal" style:font-weight-complex="norma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8" style:display-name="WW_CharLFO4LVL8"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style:font-name="OpenSymbol1" fo:font-family="OpenSymbol" style:font-family-generic="system" style:font-charset="x-symbol" fo:font-weight="normal" style:font-weight-asian="normal" style:font-weight-complex="normal"/>
    </style:style>
    <style:style style:name="WW_5f_CharLFO5LVL5" style:display-name="WW_CharLFO5LVL5" style:family="text">
      <style:text-properties style:font-name="OpenSymbol1" fo:font-family="OpenSymbol" style:font-family-generic="system" style:font-charset="x-symbol" fo:font-weight="normal" style:font-weight-asian="normal" style:font-weight-complex="normal"/>
    </style:style>
    <style:style style:name="WW_5f_CharLFO5LVL6" style:display-name="WW_CharLFO5LVL6" style:family="text">
      <style:text-properties style:font-name="OpenSymbol1" fo:font-family="OpenSymbol" style:font-family-generic="system" style:font-charset="x-symbol" fo:font-weight="normal" style:font-weight-asian="normal" style:font-weight-complex="normal"/>
    </style:style>
    <style:style style:name="WW_5f_CharLFO5LVL7" style:display-name="WW_CharLFO5LVL7" style:family="text">
      <style:text-properties style:font-name="OpenSymbol1" fo:font-family="OpenSymbol" style:font-family-generic="system" style:font-charset="x-symbol" fo:font-weight="normal" style:font-weight-asian="normal" style:font-weight-complex="normal"/>
    </style:style>
    <style:style style:name="WW_5f_CharLFO5LVL8" style:display-name="WW_CharLFO5LVL8" style:family="text">
      <style:text-properties style:font-name="OpenSymbol1" fo:font-family="OpenSymbol" style:font-family-generic="system" style:font-charset="x-symbol" fo:font-weight="normal" style:font-weight-asian="normal" style:font-weight-complex="normal"/>
    </style:style>
    <style:style style:name="WW_5f_CharLFO5LVL9" style:display-name="WW_CharLFO5LVL9" style:family="text">
      <style:text-properties style:font-name="OpenSymbol1" fo:font-family="OpenSymbol" style:font-family-generic="system" style:font-charset="x-symbol" fo:font-weight="normal" style:font-weight-asian="normal" style:font-weight-complex="normal"/>
    </style:style>
    <style:style style:name="WW_5f_CharLFO9LVL1" style:display-name="WW_CharLFO9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9LVL2" style:display-name="WW_CharLFO9LVL2" style:family="text">
      <style:text-properties style:text-position="sub 67%" fo:font-size="12pt" style:font-size-asian="12pt"/>
    </style:style>
    <style:style style:name="WW_5f_CharLFO9LVL3" style:display-name="WW_CharLFO9LVL3" style:family="text">
      <style:text-properties style:text-position="sub 67%" fo:font-size="12pt" style:font-size-asian="12pt"/>
    </style:style>
    <style:style style:name="WW_5f_CharLFO9LVL4" style:display-name="WW_CharLFO9LVL4" style:family="text">
      <style:text-properties style:text-position="sub 67%" fo:font-size="12pt" style:font-size-asian="12pt"/>
    </style:style>
    <style:style style:name="WW_5f_CharLFO9LVL5" style:display-name="WW_CharLFO9LVL5" style:family="text">
      <style:text-properties style:text-position="sub 67%" fo:font-size="12pt" style:font-size-asian="12pt"/>
    </style:style>
    <style:style style:name="WW_5f_CharLFO9LVL6" style:display-name="WW_CharLFO9LVL6" style:family="text">
      <style:text-properties style:text-position="sub 67%" fo:font-size="12pt" style:font-size-asian="12pt"/>
    </style:style>
    <style:style style:name="WW_5f_CharLFO9LVL7" style:display-name="WW_CharLFO9LVL7" style:family="text">
      <style:text-properties style:text-position="sub 67%" fo:font-size="12pt" style:font-size-asian="12pt"/>
    </style:style>
    <style:style style:name="WW_5f_CharLFO9LVL8" style:display-name="WW_CharLFO9LVL8" style:family="text">
      <style:text-properties style:text-position="sub 67%" fo:font-size="12pt" style:font-size-asian="12pt"/>
    </style:style>
    <style:style style:name="WW_5f_CharLFO9LVL9" style:display-name="WW_CharLFO9LVL9" style:family="text">
      <style:text-properties style:text-position="sub 67%" fo:font-size="12pt" style:font-size-asian="12pt"/>
    </style:style>
    <style:style style:name="WW_5f_CharLFO12LVL1" style:display-name="WW_CharLFO12LVL1" style:family="text">
      <style:text-properties style:font-name-complex="Wingdings 21" style:font-family-complex="'Wingdings 2'" style:font-family-generic-complex="roman" style:font-pitch-complex="variable" style:font-charset-complex="x-symbol"/>
    </style:style>
    <style:style style:name="WW_5f_CharLFO12LVL2" style:display-name="WW_CharLFO12LVL2" style:family="text">
      <style:text-properties style:font-name-complex="OpenSymbol1" style:font-family-complex="OpenSymbol" style:font-family-generic-complex="system" style:font-charset-complex="x-symbol"/>
    </style:style>
    <style:style style:name="WW_5f_CharLFO12LVL3" style:display-name="WW_CharLFO12LVL3" style:family="text">
      <style:text-properties style:font-name-complex="OpenSymbol1" style:font-family-complex="OpenSymbol" style:font-family-generic-complex="system" style:font-charset-complex="x-symbol"/>
    </style:style>
    <style:style style:name="WW_5f_CharLFO12LVL4" style:display-name="WW_CharLFO12LVL4" style:family="text">
      <style:text-properties style:font-name-complex="Wingdings 21" style:font-family-complex="'Wingdings 2'" style:font-family-generic-complex="roman" style:font-pitch-complex="variable" style:font-charset-complex="x-symbol"/>
    </style:style>
    <style:style style:name="WW_5f_CharLFO12LVL5" style:display-name="WW_CharLFO12LVL5" style:family="text">
      <style:text-properties style:font-name-complex="OpenSymbol1" style:font-family-complex="OpenSymbol" style:font-family-generic-complex="system" style:font-charset-complex="x-symbol"/>
    </style:style>
    <style:style style:name="WW_5f_CharLFO12LVL6" style:display-name="WW_CharLFO12LVL6" style:family="text">
      <style:text-properties style:font-name-complex="OpenSymbol1" style:font-family-complex="OpenSymbol" style:font-family-generic-complex="system" style:font-charset-complex="x-symbol"/>
    </style:style>
    <style:style style:name="WW_5f_CharLFO12LVL7" style:display-name="WW_CharLFO12LVL7" style:family="text">
      <style:text-properties style:font-name-complex="Wingdings 21" style:font-family-complex="'Wingdings 2'" style:font-family-generic-complex="roman" style:font-pitch-complex="variable" style:font-charset-complex="x-symbol"/>
    </style:style>
    <style:style style:name="WW_5f_CharLFO12LVL8" style:display-name="WW_CharLFO12LVL8" style:family="text">
      <style:text-properties style:font-name-complex="OpenSymbol1" style:font-family-complex="OpenSymbol" style:font-family-generic-complex="system" style:font-charset-complex="x-symbol"/>
    </style:style>
    <style:style style:name="WW_5f_CharLFO12LVL9" style:display-name="WW_CharLFO12LVL9" style:family="text">
      <style:text-properties style:font-name-complex="OpenSymbol1" style:font-family-complex="OpenSymbol" style:font-family-generic-complex="system" style:font-charset-complex="x-symbol"/>
    </style:style>
    <style:style style:name="WW_5f_CharLFO14LVL1" style:display-name="WW_CharLFO14LVL1" style:family="text">
      <style:text-properties style:font-name-complex="Wingdings 21" style:font-family-complex="'Wingdings 2'" style:font-family-generic-complex="roman" style:font-pitch-complex="variable" style:font-charset-complex="x-symbol"/>
    </style:style>
    <style:style style:name="WW_5f_CharLFO14LVL2" style:display-name="WW_CharLFO14LVL2" style:family="text">
      <style:text-properties style:font-name-complex="OpenSymbol1" style:font-family-complex="OpenSymbol" style:font-family-generic-complex="system" style:font-charset-complex="x-symbol"/>
    </style:style>
    <style:style style:name="WW_5f_CharLFO14LVL3" style:display-name="WW_CharLFO14LVL3" style:family="text">
      <style:text-properties style:font-name-complex="OpenSymbol1" style:font-family-complex="OpenSymbol" style:font-family-generic-complex="system" style:font-charset-complex="x-symbol"/>
    </style:style>
    <style:style style:name="WW_5f_CharLFO14LVL4" style:display-name="WW_CharLFO14LVL4" style:family="text">
      <style:text-properties style:font-name-complex="Wingdings 21" style:font-family-complex="'Wingdings 2'" style:font-family-generic-complex="roman" style:font-pitch-complex="variable" style:font-charset-complex="x-symbol"/>
    </style:style>
    <style:style style:name="WW_5f_CharLFO14LVL5" style:display-name="WW_CharLFO14LVL5" style:family="text">
      <style:text-properties style:font-name-complex="OpenSymbol1" style:font-family-complex="OpenSymbol" style:font-family-generic-complex="system" style:font-charset-complex="x-symbol"/>
    </style:style>
    <style:style style:name="WW_5f_CharLFO14LVL6" style:display-name="WW_CharLFO14LVL6" style:family="text">
      <style:text-properties style:font-name-complex="OpenSymbol1" style:font-family-complex="OpenSymbol" style:font-family-generic-complex="system" style:font-charset-complex="x-symbol"/>
    </style:style>
    <style:style style:name="WW_5f_CharLFO14LVL7" style:display-name="WW_CharLFO14LVL7" style:family="text">
      <style:text-properties style:font-name-complex="Wingdings 21" style:font-family-complex="'Wingdings 2'" style:font-family-generic-complex="roman" style:font-pitch-complex="variable" style:font-charset-complex="x-symbol"/>
    </style:style>
    <style:style style:name="WW_5f_CharLFO14LVL8" style:display-name="WW_CharLFO14LVL8" style:family="text">
      <style:text-properties style:font-name-complex="OpenSymbol1" style:font-family-complex="OpenSymbol" style:font-family-generic-complex="system" style:font-charset-complex="x-symbol"/>
    </style:style>
    <style:style style:name="WW_5f_CharLFO14LVL9" style:display-name="WW_CharLFO14LVL9" style:family="text">
      <style:text-properties style:font-name-complex="OpenSymbol1" style:font-family-complex="OpenSymbol" style:font-family-generic-complex="system" style:font-charset-complex="x-symbol"/>
    </style:style>
    <style:style style:name="WW_5f_CharLFO15LVL1" style:display-name="WW_CharLFO15LVL1" style:family="text">
      <style:text-properties style:font-name-complex="Wingdings 21" style:font-family-complex="'Wingdings 2'" style:font-family-generic-complex="roman" style:font-pitch-complex="variable" style:font-charset-complex="x-symbol"/>
    </style:style>
    <style:style style:name="WW_5f_CharLFO15LVL2" style:display-name="WW_CharLFO15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15LVL3" style:display-name="WW_CharLFO15LVL3" style:family="text">
      <style:text-properties style:font-name-complex="OpenSymbol1" style:font-family-complex="OpenSymbol" style:font-family-generic-complex="system" style:font-charset-complex="x-symbol"/>
    </style:style>
    <style:style style:name="WW_5f_CharLFO15LVL4" style:display-name="WW_CharLFO15LVL4" style:family="text">
      <style:text-properties style:font-name-complex="Wingdings 21" style:font-family-complex="'Wingdings 2'" style:font-family-generic-complex="roman" style:font-pitch-complex="variable" style:font-charset-complex="x-symbol"/>
    </style:style>
    <style:style style:name="WW_5f_CharLFO15LVL5" style:display-name="WW_CharLFO15LVL5" style:family="text">
      <style:text-properties style:font-name-complex="OpenSymbol1" style:font-family-complex="OpenSymbol" style:font-family-generic-complex="system" style:font-charset-complex="x-symbol"/>
    </style:style>
    <style:style style:name="WW_5f_CharLFO15LVL6" style:display-name="WW_CharLFO15LVL6" style:family="text">
      <style:text-properties style:font-name-complex="OpenSymbol1" style:font-family-complex="OpenSymbol" style:font-family-generic-complex="system" style:font-charset-complex="x-symbol"/>
    </style:style>
    <style:style style:name="WW_5f_CharLFO15LVL7" style:display-name="WW_CharLFO15LVL7" style:family="text">
      <style:text-properties style:font-name-complex="Wingdings 21" style:font-family-complex="'Wingdings 2'" style:font-family-generic-complex="roman" style:font-pitch-complex="variable" style:font-charset-complex="x-symbol"/>
    </style:style>
    <style:style style:name="WW_5f_CharLFO15LVL8" style:display-name="WW_CharLFO15LVL8" style:family="text">
      <style:text-properties style:font-name-complex="OpenSymbol1" style:font-family-complex="OpenSymbol" style:font-family-generic-complex="system" style:font-charset-complex="x-symbol"/>
    </style:style>
    <style:style style:name="WW_5f_CharLFO15LVL9" style:display-name="WW_CharLFO15LVL9" style:family="text">
      <style:text-properties style:font-name-complex="OpenSymbol1" style:font-family-complex="OpenSymbol" style:font-family-generic-complex="system" style:font-charset-complex="x-symbol"/>
    </style:style>
    <style:style style:name="WW_5f_CharLFO16LVL1" style:display-name="WW_CharLFO16LVL1" style:family="text">
      <style:text-properties style:font-name-complex="Wingdings 21" style:font-family-complex="'Wingdings 2'" style:font-family-generic-complex="roman" style:font-pitch-complex="variable" style:font-charset-complex="x-symbol"/>
    </style:style>
    <style:style style:name="WW_5f_CharLFO16LVL2" style:display-name="WW_CharLFO16LVL2" style:family="text">
      <style:text-properties style:font-name-complex="OpenSymbol1" style:font-family-complex="OpenSymbol" style:font-family-generic-complex="system" style:font-charset-complex="x-symbol"/>
    </style:style>
    <style:style style:name="WW_5f_CharLFO16LVL3" style:display-name="WW_CharLFO16LVL3" style:family="text">
      <style:text-properties style:font-name-complex="OpenSymbol1" style:font-family-complex="OpenSymbol" style:font-family-generic-complex="system" style:font-charset-complex="x-symbol"/>
    </style:style>
    <style:style style:name="WW_5f_CharLFO16LVL4" style:display-name="WW_CharLFO16LVL4" style:family="text">
      <style:text-properties style:font-name-complex="Wingdings 21" style:font-family-complex="'Wingdings 2'" style:font-family-generic-complex="roman" style:font-pitch-complex="variable" style:font-charset-complex="x-symbol"/>
    </style:style>
    <style:style style:name="WW_5f_CharLFO16LVL5" style:display-name="WW_CharLFO16LVL5" style:family="text">
      <style:text-properties style:font-name-complex="OpenSymbol1" style:font-family-complex="OpenSymbol" style:font-family-generic-complex="system" style:font-charset-complex="x-symbol"/>
    </style:style>
    <style:style style:name="WW_5f_CharLFO16LVL6" style:display-name="WW_CharLFO16LVL6" style:family="text">
      <style:text-properties style:font-name-complex="OpenSymbol1" style:font-family-complex="OpenSymbol" style:font-family-generic-complex="system" style:font-charset-complex="x-symbol"/>
    </style:style>
    <style:style style:name="WW_5f_CharLFO16LVL7" style:display-name="WW_CharLFO16LVL7" style:family="text">
      <style:text-properties style:font-name-complex="Wingdings 21" style:font-family-complex="'Wingdings 2'" style:font-family-generic-complex="roman" style:font-pitch-complex="variable" style:font-charset-complex="x-symbol"/>
    </style:style>
    <style:style style:name="WW_5f_CharLFO16LVL8" style:display-name="WW_CharLFO16LVL8" style:family="text">
      <style:text-properties style:font-name-complex="OpenSymbol1" style:font-family-complex="OpenSymbol" style:font-family-generic-complex="system" style:font-charset-complex="x-symbol"/>
    </style:style>
    <style:style style:name="WW_5f_CharLFO16LVL9" style:display-name="WW_CharLFO16LVL9" style:family="text">
      <style:text-properties style:font-name-complex="OpenSymbol1" style:font-family-complex="OpenSymbol" style:font-family-generic-complex="system" style:font-charset-complex="x-symbol"/>
    </style:style>
    <style:style style:name="WW_5f_CharLFO17LVL1" style:display-name="WW_CharLFO17LVL1" style:family="text">
      <style:text-properties style:font-name-complex="Wingdings 21" style:font-family-complex="'Wingdings 2'" style:font-family-generic-complex="roman" style:font-pitch-complex="variable" style:font-charset-complex="x-symbol"/>
    </style:style>
    <style:style style:name="WW_5f_CharLFO17LVL2" style:display-name="WW_CharLFO17LVL2" style:family="text">
      <style:text-properties style:font-name-complex="OpenSymbol1" style:font-family-complex="OpenSymbol" style:font-family-generic-complex="system" style:font-charset-complex="x-symbol"/>
    </style:style>
    <style:style style:name="WW_5f_CharLFO17LVL3" style:display-name="WW_CharLFO17LVL3" style:family="text">
      <style:text-properties style:font-name-complex="OpenSymbol1" style:font-family-complex="OpenSymbol" style:font-family-generic-complex="system" style:font-charset-complex="x-symbol"/>
    </style:style>
    <style:style style:name="WW_5f_CharLFO17LVL4" style:display-name="WW_CharLFO17LVL4" style:family="text">
      <style:text-properties style:font-name-complex="Wingdings 21" style:font-family-complex="'Wingdings 2'" style:font-family-generic-complex="roman" style:font-pitch-complex="variable" style:font-charset-complex="x-symbol"/>
    </style:style>
    <style:style style:name="WW_5f_CharLFO17LVL5" style:display-name="WW_CharLFO17LVL5" style:family="text">
      <style:text-properties style:font-name-complex="OpenSymbol1" style:font-family-complex="OpenSymbol" style:font-family-generic-complex="system" style:font-charset-complex="x-symbol"/>
    </style:style>
    <style:style style:name="WW_5f_CharLFO17LVL6" style:display-name="WW_CharLFO17LVL6" style:family="text">
      <style:text-properties style:font-name-complex="OpenSymbol1" style:font-family-complex="OpenSymbol" style:font-family-generic-complex="system" style:font-charset-complex="x-symbol"/>
    </style:style>
    <style:style style:name="WW_5f_CharLFO17LVL7" style:display-name="WW_CharLFO17LVL7" style:family="text">
      <style:text-properties style:font-name-complex="Wingdings 21" style:font-family-complex="'Wingdings 2'" style:font-family-generic-complex="roman" style:font-pitch-complex="variable" style:font-charset-complex="x-symbol"/>
    </style:style>
    <style:style style:name="WW_5f_CharLFO17LVL8" style:display-name="WW_CharLFO17LVL8" style:family="text">
      <style:text-properties style:font-name-complex="OpenSymbol1" style:font-family-complex="OpenSymbol" style:font-family-generic-complex="system" style:font-charset-complex="x-symbol"/>
    </style:style>
    <style:style style:name="WW_5f_CharLFO17LVL9" style:display-name="WW_CharLFO17LVL9" style:family="text">
      <style:text-properties style:font-name-complex="OpenSymbol1" style:font-family-complex="OpenSymbol" style:font-family-generic-complex="system" style:font-charset-complex="x-symbol"/>
    </style:style>
    <style:style style:name="WW_5f_CharLFO18LVL1" style:display-name="WW_CharLFO18LVL1" style:family="text">
      <style:text-properties style:font-name-complex="Wingdings 21" style:font-family-complex="'Wingdings 2'" style:font-family-generic-complex="roman" style:font-pitch-complex="variable" style:font-charset-complex="x-symbol"/>
    </style:style>
    <style:style style:name="WW_5f_CharLFO18LVL2" style:display-name="WW_CharLFO18LVL2" style:family="text">
      <style:text-properties style:font-name-complex="OpenSymbol1" style:font-family-complex="OpenSymbol" style:font-family-generic-complex="system" style:font-charset-complex="x-symbol"/>
    </style:style>
    <style:style style:name="WW_5f_CharLFO18LVL3" style:display-name="WW_CharLFO18LVL3" style:family="text">
      <style:text-properties style:font-name-complex="OpenSymbol1" style:font-family-complex="OpenSymbol" style:font-family-generic-complex="system" style:font-charset-complex="x-symbol"/>
    </style:style>
    <style:style style:name="WW_5f_CharLFO18LVL4" style:display-name="WW_CharLFO18LVL4" style:family="text">
      <style:text-properties style:font-name-complex="Wingdings 21" style:font-family-complex="'Wingdings 2'" style:font-family-generic-complex="roman" style:font-pitch-complex="variable" style:font-charset-complex="x-symbol"/>
    </style:style>
    <style:style style:name="WW_5f_CharLFO18LVL5" style:display-name="WW_CharLFO18LVL5" style:family="text">
      <style:text-properties style:font-name-complex="OpenSymbol1" style:font-family-complex="OpenSymbol" style:font-family-generic-complex="system" style:font-charset-complex="x-symbol"/>
    </style:style>
    <style:style style:name="WW_5f_CharLFO18LVL6" style:display-name="WW_CharLFO18LVL6" style:family="text">
      <style:text-properties style:font-name-complex="OpenSymbol1" style:font-family-complex="OpenSymbol" style:font-family-generic-complex="system" style:font-charset-complex="x-symbol"/>
    </style:style>
    <style:style style:name="WW_5f_CharLFO18LVL7" style:display-name="WW_CharLFO18LVL7" style:family="text">
      <style:text-properties style:font-name-complex="Wingdings 21" style:font-family-complex="'Wingdings 2'" style:font-family-generic-complex="roman" style:font-pitch-complex="variable" style:font-charset-complex="x-symbol"/>
    </style:style>
    <style:style style:name="WW_5f_CharLFO18LVL8" style:display-name="WW_CharLFO18LVL8" style:family="text">
      <style:text-properties style:font-name-complex="OpenSymbol1" style:font-family-complex="OpenSymbol" style:font-family-generic-complex="system" style:font-charset-complex="x-symbol"/>
    </style:style>
    <style:style style:name="WW_5f_CharLFO18LVL9" style:display-name="WW_CharLFO18LVL9" style:family="text">
      <style:text-properties style:font-name-complex="OpenSymbol1" style:font-family-complex="OpenSymbol" style:font-family-generic-complex="system" style:font-charset-complex="x-symbol"/>
    </style:style>
    <style:style style:name="WW_5f_CharLFO19LVL1" style:display-name="WW_CharLFO19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19LVL2" style:display-name="WW_CharLFO19LVL2" style:family="text">
      <style:text-properties style:font-name-complex="OpenSymbol1" style:font-family-complex="OpenSymbol" style:font-family-generic-complex="system" style:font-charset-complex="x-symbol"/>
    </style:style>
    <style:style style:name="WW_5f_CharLFO19LVL3" style:display-name="WW_CharLFO19LVL3" style:family="text">
      <style:text-properties style:font-name-complex="OpenSymbol1" style:font-family-complex="OpenSymbol" style:font-family-generic-complex="system" style:font-charset-complex="x-symbol"/>
    </style:style>
    <style:style style:name="WW_5f_CharLFO19LVL4" style:display-name="WW_CharLFO19LVL4" style:family="text">
      <style:text-properties style:font-name-complex="Wingdings 21" style:font-family-complex="'Wingdings 2'" style:font-family-generic-complex="roman" style:font-pitch-complex="variable" style:font-charset-complex="x-symbol"/>
    </style:style>
    <style:style style:name="WW_5f_CharLFO19LVL5" style:display-name="WW_CharLFO19LVL5" style:family="text">
      <style:text-properties style:font-name-complex="OpenSymbol1" style:font-family-complex="OpenSymbol" style:font-family-generic-complex="system" style:font-charset-complex="x-symbol"/>
    </style:style>
    <style:style style:name="WW_5f_CharLFO19LVL6" style:display-name="WW_CharLFO19LVL6" style:family="text">
      <style:text-properties style:font-name-complex="OpenSymbol1" style:font-family-complex="OpenSymbol" style:font-family-generic-complex="system" style:font-charset-complex="x-symbol"/>
    </style:style>
    <style:style style:name="WW_5f_CharLFO19LVL7" style:display-name="WW_CharLFO19LVL7" style:family="text">
      <style:text-properties style:font-name-complex="Wingdings 21" style:font-family-complex="'Wingdings 2'" style:font-family-generic-complex="roman" style:font-pitch-complex="variable" style:font-charset-complex="x-symbol"/>
    </style:style>
    <style:style style:name="WW_5f_CharLFO19LVL8" style:display-name="WW_CharLFO19LVL8" style:family="text">
      <style:text-properties style:font-name-complex="OpenSymbol1" style:font-family-complex="OpenSymbol" style:font-family-generic-complex="system" style:font-charset-complex="x-symbol"/>
    </style:style>
    <style:style style:name="WW_5f_CharLFO19LVL9" style:display-name="WW_CharLFO19LVL9" style:family="text">
      <style:text-properties style:font-name-complex="OpenSymbol1" style:font-family-complex="OpenSymbol" style:font-family-generic-complex="system" style:font-charset-complex="x-symbol"/>
    </style:style>
    <style:style style:name="WW_5f_CharLFO20LVL1" style:display-name="WW_CharLFO20LVL1" style:family="text">
      <style:text-properties style:font-name-complex="Wingdings 21" style:font-family-complex="'Wingdings 2'" style:font-family-generic-complex="roman" style:font-pitch-complex="variable" style:font-charset-complex="x-symbol"/>
    </style:style>
    <style:style style:name="WW_5f_CharLFO20LVL2" style:display-name="WW_CharLFO20LVL2" style:family="text">
      <style:text-properties style:font-name-complex="OpenSymbol1" style:font-family-complex="OpenSymbol" style:font-family-generic-complex="system" style:font-charset-complex="x-symbol"/>
    </style:style>
    <style:style style:name="WW_5f_CharLFO20LVL3" style:display-name="WW_CharLFO20LVL3" style:family="text">
      <style:text-properties style:font-name-complex="OpenSymbol1" style:font-family-complex="OpenSymbol" style:font-family-generic-complex="system" style:font-charset-complex="x-symbol"/>
    </style:style>
    <style:style style:name="WW_5f_CharLFO20LVL4" style:display-name="WW_CharLFO20LVL4" style:family="text">
      <style:text-properties style:font-name-complex="Wingdings 21" style:font-family-complex="'Wingdings 2'" style:font-family-generic-complex="roman" style:font-pitch-complex="variable" style:font-charset-complex="x-symbol"/>
    </style:style>
    <style:style style:name="WW_5f_CharLFO20LVL5" style:display-name="WW_CharLFO20LVL5" style:family="text">
      <style:text-properties style:font-name-complex="OpenSymbol1" style:font-family-complex="OpenSymbol" style:font-family-generic-complex="system" style:font-charset-complex="x-symbol"/>
    </style:style>
    <style:style style:name="WW_5f_CharLFO20LVL6" style:display-name="WW_CharLFO20LVL6" style:family="text">
      <style:text-properties style:font-name-complex="OpenSymbol1" style:font-family-complex="OpenSymbol" style:font-family-generic-complex="system" style:font-charset-complex="x-symbol"/>
    </style:style>
    <style:style style:name="WW_5f_CharLFO20LVL7" style:display-name="WW_CharLFO20LVL7" style:family="text">
      <style:text-properties style:font-name-complex="Wingdings 21" style:font-family-complex="'Wingdings 2'" style:font-family-generic-complex="roman" style:font-pitch-complex="variable" style:font-charset-complex="x-symbol"/>
    </style:style>
    <style:style style:name="WW_5f_CharLFO20LVL8" style:display-name="WW_CharLFO20LVL8" style:family="text">
      <style:text-properties style:font-name-complex="OpenSymbol1" style:font-family-complex="OpenSymbol" style:font-family-generic-complex="system" style:font-charset-complex="x-symbol"/>
    </style:style>
    <style:style style:name="WW_5f_CharLFO20LVL9" style:display-name="WW_CharLFO20LVL9" style:family="text">
      <style:text-properties style:font-name-complex="OpenSymbol1" style:font-family-complex="OpenSymbol" style:font-family-generic-complex="system" style:font-charset-complex="x-symbol"/>
    </style:style>
    <style:style style:name="WW_5f_CharLFO21LVL1" style:display-name="WW_CharLFO21LVL1" style:family="text">
      <style:text-properties style:font-name-complex="Wingdings 21" style:font-family-complex="'Wingdings 2'" style:font-family-generic-complex="roman" style:font-pitch-complex="variable" style:font-charset-complex="x-symbol"/>
    </style:style>
    <style:style style:name="WW_5f_CharLFO21LVL2" style:display-name="WW_CharLFO21LVL2" style:family="text">
      <style:text-properties style:font-name-complex="OpenSymbol1" style:font-family-complex="OpenSymbol" style:font-family-generic-complex="system" style:font-charset-complex="x-symbol"/>
    </style:style>
    <style:style style:name="WW_5f_CharLFO21LVL3" style:display-name="WW_CharLFO21LVL3" style:family="text">
      <style:text-properties style:font-name-complex="OpenSymbol1" style:font-family-complex="OpenSymbol" style:font-family-generic-complex="system" style:font-charset-complex="x-symbol"/>
    </style:style>
    <style:style style:name="WW_5f_CharLFO21LVL4" style:display-name="WW_CharLFO21LVL4" style:family="text">
      <style:text-properties style:font-name-complex="Wingdings 21" style:font-family-complex="'Wingdings 2'" style:font-family-generic-complex="roman" style:font-pitch-complex="variable" style:font-charset-complex="x-symbol"/>
    </style:style>
    <style:style style:name="WW_5f_CharLFO21LVL5" style:display-name="WW_CharLFO21LVL5" style:family="text">
      <style:text-properties style:font-name-complex="OpenSymbol1" style:font-family-complex="OpenSymbol" style:font-family-generic-complex="system" style:font-charset-complex="x-symbol"/>
    </style:style>
    <style:style style:name="WW_5f_CharLFO21LVL6" style:display-name="WW_CharLFO21LVL6" style:family="text">
      <style:text-properties style:font-name-complex="OpenSymbol1" style:font-family-complex="OpenSymbol" style:font-family-generic-complex="system" style:font-charset-complex="x-symbol"/>
    </style:style>
    <style:style style:name="WW_5f_CharLFO21LVL7" style:display-name="WW_CharLFO21LVL7" style:family="text">
      <style:text-properties style:font-name-complex="Wingdings 21" style:font-family-complex="'Wingdings 2'" style:font-family-generic-complex="roman" style:font-pitch-complex="variable" style:font-charset-complex="x-symbol"/>
    </style:style>
    <style:style style:name="WW_5f_CharLFO21LVL8" style:display-name="WW_CharLFO21LVL8" style:family="text">
      <style:text-properties style:font-name-complex="OpenSymbol1" style:font-family-complex="OpenSymbol" style:font-family-generic-complex="system" style:font-charset-complex="x-symbol"/>
    </style:style>
    <style:style style:name="WW_5f_CharLFO21LVL9" style:display-name="WW_CharLFO21LVL9" style:family="text">
      <style:text-properties style:font-name-complex="OpenSymbol1" style:font-family-complex="OpenSymbol" style:font-family-generic-complex="system" style:font-charset-complex="x-symbol"/>
    </style:style>
    <style:style style:name="WW_5f_CharLFO22LVL1" style:display-name="WW_CharLFO22LVL1" style:family="text">
      <style:text-properties style:font-name-complex="Wingdings 21" style:font-family-complex="'Wingdings 2'" style:font-family-generic-complex="roman" style:font-pitch-complex="variable" style:font-charset-complex="x-symbol"/>
    </style:style>
    <style:style style:name="WW_5f_CharLFO22LVL2" style:display-name="WW_CharLFO22LVL2" style:family="text">
      <style:text-properties style:font-name-complex="OpenSymbol1" style:font-family-complex="OpenSymbol" style:font-family-generic-complex="system" style:font-charset-complex="x-symbol"/>
    </style:style>
    <style:style style:name="WW_5f_CharLFO22LVL3" style:display-name="WW_CharLFO22LVL3" style:family="text">
      <style:text-properties style:font-name-complex="OpenSymbol1" style:font-family-complex="OpenSymbol" style:font-family-generic-complex="system" style:font-charset-complex="x-symbol"/>
    </style:style>
    <style:style style:name="WW_5f_CharLFO22LVL4" style:display-name="WW_CharLFO22LVL4" style:family="text">
      <style:text-properties style:font-name-complex="Wingdings 21" style:font-family-complex="'Wingdings 2'" style:font-family-generic-complex="roman" style:font-pitch-complex="variable" style:font-charset-complex="x-symbol"/>
    </style:style>
    <style:style style:name="WW_5f_CharLFO22LVL5" style:display-name="WW_CharLFO22LVL5" style:family="text">
      <style:text-properties style:font-name-complex="OpenSymbol1" style:font-family-complex="OpenSymbol" style:font-family-generic-complex="system" style:font-charset-complex="x-symbol"/>
    </style:style>
    <style:style style:name="WW_5f_CharLFO22LVL6" style:display-name="WW_CharLFO22LVL6" style:family="text">
      <style:text-properties style:font-name-complex="OpenSymbol1" style:font-family-complex="OpenSymbol" style:font-family-generic-complex="system" style:font-charset-complex="x-symbol"/>
    </style:style>
    <style:style style:name="WW_5f_CharLFO22LVL7" style:display-name="WW_CharLFO22LVL7" style:family="text">
      <style:text-properties style:font-name-complex="Wingdings 21" style:font-family-complex="'Wingdings 2'" style:font-family-generic-complex="roman" style:font-pitch-complex="variable" style:font-charset-complex="x-symbol"/>
    </style:style>
    <style:style style:name="WW_5f_CharLFO22LVL8" style:display-name="WW_CharLFO22LVL8" style:family="text">
      <style:text-properties style:font-name-complex="OpenSymbol1" style:font-family-complex="OpenSymbol" style:font-family-generic-complex="system" style:font-charset-complex="x-symbol"/>
    </style:style>
    <style:style style:name="WW_5f_CharLFO22LVL9" style:display-name="WW_CharLFO22LVL9" style:family="text">
      <style:text-properties style:font-name-complex="OpenSymbol1" style:font-family-complex="OpenSymbol" style:font-family-generic-complex="system" style:font-charset-complex="x-symbol"/>
    </style:style>
    <style:style style:name="WW_5f_CharLFO23LVL1" style:display-name="WW_CharLFO23LVL1" style:family="text">
      <style:text-properties style:font-name-complex="Wingdings 21" style:font-family-complex="'Wingdings 2'" style:font-family-generic-complex="roman" style:font-pitch-complex="variable" style:font-charset-complex="x-symbol"/>
    </style:style>
    <style:style style:name="WW_5f_CharLFO23LVL2" style:display-name="WW_CharLFO23LVL2" style:family="text">
      <style:text-properties style:font-name-complex="OpenSymbol1" style:font-family-complex="OpenSymbol" style:font-family-generic-complex="system" style:font-charset-complex="x-symbol"/>
    </style:style>
    <style:style style:name="WW_5f_CharLFO23LVL3" style:display-name="WW_CharLFO23LVL3" style:family="text">
      <style:text-properties style:font-name-complex="OpenSymbol1" style:font-family-complex="OpenSymbol" style:font-family-generic-complex="system" style:font-charset-complex="x-symbol"/>
    </style:style>
    <style:style style:name="WW_5f_CharLFO23LVL4" style:display-name="WW_CharLFO23LVL4" style:family="text">
      <style:text-properties style:font-name-complex="Wingdings 21" style:font-family-complex="'Wingdings 2'" style:font-family-generic-complex="roman" style:font-pitch-complex="variable" style:font-charset-complex="x-symbol"/>
    </style:style>
    <style:style style:name="WW_5f_CharLFO23LVL5" style:display-name="WW_CharLFO23LVL5" style:family="text">
      <style:text-properties style:font-name-complex="OpenSymbol1" style:font-family-complex="OpenSymbol" style:font-family-generic-complex="system" style:font-charset-complex="x-symbol"/>
    </style:style>
    <style:style style:name="WW_5f_CharLFO23LVL6" style:display-name="WW_CharLFO23LVL6" style:family="text">
      <style:text-properties style:font-name-complex="OpenSymbol1" style:font-family-complex="OpenSymbol" style:font-family-generic-complex="system" style:font-charset-complex="x-symbol"/>
    </style:style>
    <style:style style:name="WW_5f_CharLFO23LVL7" style:display-name="WW_CharLFO23LVL7" style:family="text">
      <style:text-properties style:font-name-complex="Wingdings 21" style:font-family-complex="'Wingdings 2'" style:font-family-generic-complex="roman" style:font-pitch-complex="variable" style:font-charset-complex="x-symbol"/>
    </style:style>
    <style:style style:name="WW_5f_CharLFO23LVL8" style:display-name="WW_CharLFO23LVL8" style:family="text">
      <style:text-properties style:font-name-complex="OpenSymbol1" style:font-family-complex="OpenSymbol" style:font-family-generic-complex="system" style:font-charset-complex="x-symbol"/>
    </style:style>
    <style:style style:name="WW_5f_CharLFO23LVL9" style:display-name="WW_CharLFO23LVL9" style:family="text">
      <style:text-properties style:font-name-complex="OpenSymbol1" style:font-family-complex="OpenSymbol" style:font-family-generic-complex="system" style:font-charset-complex="x-symbol"/>
    </style:style>
    <style:style style:name="WW_5f_CharLFO24LVL1" style:display-name="WW_CharLFO24LVL1" style:family="text">
      <style:text-properties style:font-name-complex="Wingdings 21" style:font-family-complex="'Wingdings 2'" style:font-family-generic-complex="roman" style:font-pitch-complex="variable" style:font-charset-complex="x-symbol"/>
    </style:style>
    <style:style style:name="WW_5f_CharLFO24LVL2" style:display-name="WW_CharLFO24LVL2" style:family="text">
      <style:text-properties style:font-name-complex="OpenSymbol1" style:font-family-complex="OpenSymbol" style:font-family-generic-complex="system" style:font-charset-complex="x-symbol"/>
    </style:style>
    <style:style style:name="WW_5f_CharLFO24LVL3" style:display-name="WW_CharLFO24LVL3" style:family="text">
      <style:text-properties style:font-name-complex="OpenSymbol1" style:font-family-complex="OpenSymbol" style:font-family-generic-complex="system" style:font-charset-complex="x-symbol"/>
    </style:style>
    <style:style style:name="WW_5f_CharLFO24LVL4" style:display-name="WW_CharLFO24LVL4" style:family="text">
      <style:text-properties style:font-name-complex="Wingdings 21" style:font-family-complex="'Wingdings 2'" style:font-family-generic-complex="roman" style:font-pitch-complex="variable" style:font-charset-complex="x-symbol"/>
    </style:style>
    <style:style style:name="WW_5f_CharLFO24LVL5" style:display-name="WW_CharLFO24LVL5" style:family="text">
      <style:text-properties style:font-name-complex="OpenSymbol1" style:font-family-complex="OpenSymbol" style:font-family-generic-complex="system" style:font-charset-complex="x-symbol"/>
    </style:style>
    <style:style style:name="WW_5f_CharLFO24LVL6" style:display-name="WW_CharLFO24LVL6" style:family="text">
      <style:text-properties style:font-name-complex="OpenSymbol1" style:font-family-complex="OpenSymbol" style:font-family-generic-complex="system" style:font-charset-complex="x-symbol"/>
    </style:style>
    <style:style style:name="WW_5f_CharLFO24LVL7" style:display-name="WW_CharLFO24LVL7" style:family="text">
      <style:text-properties style:font-name-complex="Wingdings 21" style:font-family-complex="'Wingdings 2'" style:font-family-generic-complex="roman" style:font-pitch-complex="variable" style:font-charset-complex="x-symbol"/>
    </style:style>
    <style:style style:name="WW_5f_CharLFO24LVL8" style:display-name="WW_CharLFO24LVL8" style:family="text">
      <style:text-properties style:font-name-complex="OpenSymbol1" style:font-family-complex="OpenSymbol" style:font-family-generic-complex="system" style:font-charset-complex="x-symbol"/>
    </style:style>
    <style:style style:name="WW_5f_CharLFO24LVL9" style:display-name="WW_CharLFO24LVL9" style:family="text">
      <style:text-properties style:font-name-complex="OpenSymbol1" style:font-family-complex="OpenSymbol" style:font-family-generic-complex="system" style:font-charset-complex="x-symbol"/>
    </style:style>
    <style:style style:name="WW_5f_CharLFO25LVL1" style:display-name="WW_CharLFO25LVL1" style:family="text">
      <style:text-properties style:font-name-complex="Wingdings 21" style:font-family-complex="'Wingdings 2'" style:font-family-generic-complex="roman" style:font-pitch-complex="variable" style:font-charset-complex="x-symbol"/>
    </style:style>
    <style:style style:name="WW_5f_CharLFO25LVL2" style:display-name="WW_CharLFO25LVL2" style:family="text">
      <style:text-properties style:font-name-complex="OpenSymbol1" style:font-family-complex="OpenSymbol" style:font-family-generic-complex="system" style:font-charset-complex="x-symbol"/>
    </style:style>
    <style:style style:name="WW_5f_CharLFO25LVL3" style:display-name="WW_CharLFO25LVL3" style:family="text">
      <style:text-properties style:font-name-complex="OpenSymbol1" style:font-family-complex="OpenSymbol" style:font-family-generic-complex="system" style:font-charset-complex="x-symbol"/>
    </style:style>
    <style:style style:name="WW_5f_CharLFO25LVL4" style:display-name="WW_CharLFO25LVL4" style:family="text">
      <style:text-properties style:font-name-complex="Wingdings 21" style:font-family-complex="'Wingdings 2'" style:font-family-generic-complex="roman" style:font-pitch-complex="variable" style:font-charset-complex="x-symbol"/>
    </style:style>
    <style:style style:name="WW_5f_CharLFO25LVL5" style:display-name="WW_CharLFO25LVL5" style:family="text">
      <style:text-properties style:font-name-complex="OpenSymbol1" style:font-family-complex="OpenSymbol" style:font-family-generic-complex="system" style:font-charset-complex="x-symbol"/>
    </style:style>
    <style:style style:name="WW_5f_CharLFO25LVL6" style:display-name="WW_CharLFO25LVL6" style:family="text">
      <style:text-properties style:font-name-complex="OpenSymbol1" style:font-family-complex="OpenSymbol" style:font-family-generic-complex="system" style:font-charset-complex="x-symbol"/>
    </style:style>
    <style:style style:name="WW_5f_CharLFO25LVL7" style:display-name="WW_CharLFO25LVL7" style:family="text">
      <style:text-properties style:font-name-complex="Wingdings 21" style:font-family-complex="'Wingdings 2'" style:font-family-generic-complex="roman" style:font-pitch-complex="variable" style:font-charset-complex="x-symbol"/>
    </style:style>
    <style:style style:name="WW_5f_CharLFO25LVL8" style:display-name="WW_CharLFO25LVL8" style:family="text">
      <style:text-properties style:font-name-complex="OpenSymbol1" style:font-family-complex="OpenSymbol" style:font-family-generic-complex="system" style:font-charset-complex="x-symbol"/>
    </style:style>
    <style:style style:name="WW_5f_CharLFO25LVL9" style:display-name="WW_CharLFO25LVL9" style:family="text">
      <style:text-properties style:font-name-complex="OpenSymbol1" style:font-family-complex="OpenSymbol" style:font-family-generic-complex="system" style:font-charset-complex="x-symbol"/>
    </style:style>
    <style:style style:name="WW_5f_CharLFO27LVL1" style:display-name="WW_CharLFO27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2" style:display-name="WW_CharLFO27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3" style:display-name="WW_CharLFO27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4" style:display-name="WW_CharLFO27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5" style:display-name="WW_CharLFO27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6" style:display-name="WW_CharLFO27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7" style:display-name="WW_CharLFO27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8" style:display-name="WW_CharLFO27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7LVL9" style:display-name="WW_CharLFO27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1" style:display-name="WW_CharLFO28LVL1"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2" style:display-name="WW_CharLFO28LVL2"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3" style:display-name="WW_CharLFO28LVL3"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4" style:display-name="WW_CharLFO28LVL4"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5" style:display-name="WW_CharLFO28LVL5"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6" style:display-name="WW_CharLFO28LVL6"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7" style:display-name="WW_CharLFO28LVL7"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8" style:display-name="WW_CharLFO28LVL8"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8LVL9" style:display-name="WW_CharLFO28LVL9" style:family="text">
      <style:text-properties style:font-name="Arial2" fo:font-family="Arial" style:font-family-generic="swiss" style:font-pitch="variable"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1" style:display-name="WW_CharLFO29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2" style:display-name="WW_CharLFO29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3" style:display-name="WW_CharLFO29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4" style:display-name="WW_CharLFO29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5" style:display-name="WW_CharLFO29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6" style:display-name="WW_CharLFO29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7" style:display-name="WW_CharLFO29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8" style:display-name="WW_CharLFO29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29LVL9" style:display-name="WW_CharLFO29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1" style:display-name="WW_CharLFO30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2" style:display-name="WW_CharLFO30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3" style:display-name="WW_CharLFO30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4" style:display-name="WW_CharLFO30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5" style:display-name="WW_CharLFO30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6" style:display-name="WW_CharLFO30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7" style:display-name="WW_CharLFO30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8" style:display-name="WW_CharLFO30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0LVL9" style:display-name="WW_CharLFO30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1" style:display-name="WW_CharLFO31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2" style:display-name="WW_CharLFO31LVL2"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3" style:display-name="WW_CharLFO31LVL3"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4" style:display-name="WW_CharLFO31LVL4"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5" style:display-name="WW_CharLFO31LVL5"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6" style:display-name="WW_CharLFO31LVL6"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7" style:display-name="WW_CharLFO31LVL7"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8" style:display-name="WW_CharLFO31LVL8"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1LVL9" style:display-name="WW_CharLFO31LVL9"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WW_5f_CharLFO33LVL1" style:display-name="WW_CharLFO33LVL1" style:family="text">
      <style:text-properties style:font-name="StarSymbol1" fo:font-family="Star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2" style:display-name="WW_CharLFO33LVL2"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3" style:display-name="WW_CharLFO33LVL3"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4" style:display-name="WW_CharLFO33LVL4"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5" style:display-name="WW_CharLFO33LVL5"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6" style:display-name="WW_CharLFO33LVL6"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7" style:display-name="WW_CharLFO33LVL7"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8" style:display-name="WW_CharLFO33LVL8"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WW_5f_CharLFO33LVL9" style:display-name="WW_CharLFO33LVL9" style:family="text">
      <style:text-properties style:font-name="OpenSymbol1" fo:font-family="OpenSymbol" style:font-family-generic="system" style:font-charset="x-symbol" fo:font-size="10pt" style:font-name-asian="OpenSymbol1" style:font-family-asian="OpenSymbol" style:font-family-generic-asian="system" style:font-charset-asian="x-symbol" style:font-size-asian="10pt" style:font-name-complex="OpenSymbol1" style:font-family-complex="OpenSymbol" style:font-family-generic-complex="system" style:font-charset-complex="x-symbol" style:font-size-complex="10pt"/>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3"/>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3"/>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3"/>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3"/>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3"/>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3"/>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3"/>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3"/>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Table_20_Bullet_20_-_20_checkmark_5f_1" style:display-name="Table Bullet - checkmark_1">
      <text:list-level-style-bullet text:level="1" text:style-name="WW_5f_CharLFO29LVL1" loext:num-list-format="%1%" text:bullet-char="✔">
        <style:list-level-properties/>
        <style:text-properties style:font-name="StarSymbol1"/>
      </text:list-level-style-bullet>
      <text:list-level-style-bullet text:level="2" text:style-name="WW_5f_CharLFO29LVL2" loext:num-list-format="%2%" text:bullet-char="✔">
        <style:list-level-properties/>
        <style:text-properties style:font-name="StarSymbol1"/>
      </text:list-level-style-bullet>
      <text:list-level-style-bullet text:level="3" text:style-name="WW_5f_CharLFO29LVL3" loext:num-list-format="%3%" text:bullet-char="✔">
        <style:list-level-properties/>
        <style:text-properties style:font-name="StarSymbol1"/>
      </text:list-level-style-bullet>
      <text:list-level-style-bullet text:level="4" text:style-name="WW_5f_CharLFO29LVL4" loext:num-list-format="%4%" text:bullet-char="✔">
        <style:list-level-properties/>
        <style:text-properties style:font-name="StarSymbol1"/>
      </text:list-level-style-bullet>
      <text:list-level-style-bullet text:level="5" text:style-name="WW_5f_CharLFO29LVL5" loext:num-list-format="%5%" text:bullet-char="✔">
        <style:list-level-properties/>
        <style:text-properties style:font-name="StarSymbol1"/>
      </text:list-level-style-bullet>
      <text:list-level-style-bullet text:level="6" text:style-name="WW_5f_CharLFO29LVL6" loext:num-list-format="%6%" text:bullet-char="✔">
        <style:list-level-properties/>
        <style:text-properties style:font-name="StarSymbol1"/>
      </text:list-level-style-bullet>
      <text:list-level-style-bullet text:level="7" text:style-name="WW_5f_CharLFO29LVL7" loext:num-list-format="%7%" text:bullet-char="✔">
        <style:list-level-properties/>
        <style:text-properties style:font-name="StarSymbol1"/>
      </text:list-level-style-bullet>
      <text:list-level-style-bullet text:level="8" text:style-name="WW_5f_CharLFO29LVL8" loext:num-list-format="%8%" text:bullet-char="✔">
        <style:list-level-properties/>
        <style:text-properties style:font-name="StarSymbol1"/>
      </text:list-level-style-bullet>
      <text:list-level-style-bullet text:level="9" text:style-name="WW_5f_CharLFO29LVL9" loext:num-list-format="%9%" text:bullet-char="✔">
        <style:list-level-properties/>
        <style:text-properties style:font-name="Star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_5f_1" style:display-name="Bullet - Checkmark_1">
      <text:list-level-style-bullet text:level="1" text:style-name="WW_5f_CharLFO31LVL1" loext:num-list-format="%1%" text:bullet-char="✔">
        <style:list-level-properties/>
        <style:text-properties style:font-name="StarSymbol1"/>
      </text:list-level-style-bullet>
      <text:list-level-style-bullet text:level="2" text:style-name="WW_5f_CharLFO31LVL2" loext:num-list-format="%2%" text:bullet-char="✔">
        <style:list-level-properties/>
        <style:text-properties style:font-name="StarSymbol1"/>
      </text:list-level-style-bullet>
      <text:list-level-style-bullet text:level="3" text:style-name="WW_5f_CharLFO31LVL3" loext:num-list-format="%3%" text:bullet-char="✔">
        <style:list-level-properties/>
        <style:text-properties style:font-name="StarSymbol1"/>
      </text:list-level-style-bullet>
      <text:list-level-style-bullet text:level="4" text:style-name="WW_5f_CharLFO31LVL4" loext:num-list-format="%4%" text:bullet-char="✔">
        <style:list-level-properties/>
        <style:text-properties style:font-name="StarSymbol1"/>
      </text:list-level-style-bullet>
      <text:list-level-style-bullet text:level="5" text:style-name="WW_5f_CharLFO31LVL5" loext:num-list-format="%5%" text:bullet-char="✔">
        <style:list-level-properties/>
        <style:text-properties style:font-name="StarSymbol1"/>
      </text:list-level-style-bullet>
      <text:list-level-style-bullet text:level="6" text:style-name="WW_5f_CharLFO31LVL6" loext:num-list-format="%6%" text:bullet-char="✔">
        <style:list-level-properties/>
        <style:text-properties style:font-name="StarSymbol1"/>
      </text:list-level-style-bullet>
      <text:list-level-style-bullet text:level="7" text:style-name="WW_5f_CharLFO31LVL7" loext:num-list-format="%7%" text:bullet-char="✔">
        <style:list-level-properties/>
        <style:text-properties style:font-name="StarSymbol1"/>
      </text:list-level-style-bullet>
      <text:list-level-style-bullet text:level="8" text:style-name="WW_5f_CharLFO31LVL8" loext:num-list-format="%8%" text:bullet-char="✔">
        <style:list-level-properties/>
        <style:text-properties style:font-name="StarSymbol1"/>
      </text:list-level-style-bullet>
      <text:list-level-style-bullet text:level="9" text:style-name="WW_5f_CharLFO31LVL9" loext:num-list-format="%9%" text:bullet-char="✔">
        <style:list-level-properties/>
        <style:text-properties style:font-name="Star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esson_20_Overview.1" style:display-name="Lesson Overview.1"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fo:border="none" fo:padding="0cm"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5" text:anchor-type="as-char" svg:width="2.378cm" svg:height="0.838cm" draw:z-index="19"><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text:p>
              <text:p text:style-name="MP3"><text:span text:style-name="Body_20_8_20_pt">This work is licensed under the Creative Commons Attribution-NonCommercial-ShareAlike 4.0 International License. To view a copy of this license, visit http://creativecommons.org/licenses/by-nc-sa/4.0/deed.en_US.</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22</text:user-defined></text:span><text:span text:style-name="MT2"><text:tab/></text:span><text:span text:style-name="MT1"><text:title>Lessons from Luke</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22</text:user-defined></text:span></text:p>
      </style:footer>
    </style:master-page>
    <style:master-page style:name="Lesson_20_Content" style:display-name="Lesson Content" style:page-layout-name="Mpm11" draw:style-name="Mdp1">
      <style:footer>
        <text:p text:style-name="Footer"><text:span text:style-name="MT3">Quarter</text:span><text:span text:style-name="MT4"> <text:s/></text:span><text:span text:style-name="MT4"><text:user-defined style:data-style-name="N0" text:name="Quarter">2</text:user-defined></text:span><text:span text:style-name="MT4"><text:s text:c="2"/></text:span><text:span text:style-name="MT3">Lesson</text:span><text:span text:style-name="MT4"> <text:s/></text:span><text:span text:style-name="MT4"><text:user-defined style:data-style-name="N0" text:name="Lesson">22</text:user-defined></text:span><text:tab/><text:chapter text:display="name" text:outline-level="1">The Seed and the Sower</text:chapter><text:tab/>Page <text:s/><text:page-number text:select-page="current">8</text:page-number></text:p>
      </style:footer>
    </style:master-page>
    <style:master-page style:name="Front_20_matter" style:display-name="Front matter" style:page-layout-name="Mpm12" draw:style-name="Mdp1">
      <style:footer>
        <text:p text:style-name="Front_20_Matter_20_footer"><text:title>Lessons from Luke</text:title><text:tab/><text:subject>The Seed and the Sower</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3-27T16:16:16.106196000</meta:creation-date>
    <meta:editing-cycles>93</meta:editing-cycles>
    <meta:editing-duration>PT3H35M24S</meta:editing-duration>
    <meta:generator>LibreOffice/7.4.0.3$MacOSX_AARCH64 LibreOffice_project/f85e47c08ddd19c015c0114a68350214f7066f5a</meta:generator>
    <dc:date>2022-10-25T19:30:43.860171200</dc:date>
    <meta:printed-by>Chris Jackson</meta:printed-by>
    <meta:print-date>2014-09-22T12:10:00.733814000</meta:print-date>
    <dc:subject>The Seed and the Sower</dc:subject>
    <dc:title>Lessons from Luke</dc:title>
    <dc:creator>Chris Jackson</dc:creator>
    <meta:document-statistic meta:table-count="2" meta:image-count="12" meta:object-count="0" meta:page-count="9" meta:paragraph-count="238" meta:word-count="3755" meta:character-count="19824" meta:non-whitespace-character-count="16293"/>
    <meta:user-defined meta:name="Lesson" meta:value-type="float">22</meta:user-defined>
    <meta:user-defined meta:name="Quarter" meta:value-type="float">2</meta:user-defined>
  </office:meta>
</office:document-meta>
</file>