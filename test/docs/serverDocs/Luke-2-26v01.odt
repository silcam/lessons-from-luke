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D8000000D833A48D31224D2B1E.png" manifest:media-type="image/png"/>
  <manifest:file-entry manifest:full-path="Pictures/10000001000000EC000000EDE9FFDFF9504B63CC.png" manifest:media-type="image/png"/>
  <manifest:file-entry manifest:full-path="Pictures/10000001000000580000001FF4DBFF4432E2ED5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M.T._20_Text">
      <style:text-properties fo:language="en" fo:country="GB" officeooo:paragraph-rsid="0174fbef"/>
    </style:style>
    <style:style style:name="P2" style:family="paragraph" style:parent-style-name="English_20_translation">
      <style:text-properties fo:language="en" fo:country="GB" officeooo:paragraph-rsid="0174fbef"/>
    </style:style>
    <style:style style:name="P3" style:family="paragraph" style:parent-style-name="English_20_Translation_20_-_20_single_20_inset">
      <style:text-properties fo:language="en" fo:country="GB" officeooo:paragraph-rsid="0174fbef"/>
    </style:style>
    <style:style style:name="P4" style:family="paragraph" style:parent-style-name="M.T._20_Text">
      <style:text-properties officeooo:paragraph-rsid="0174fbef"/>
    </style:style>
    <style:style style:name="P5" style:family="paragraph" style:parent-style-name="English_20_translation">
      <style:text-properties officeooo:paragraph-rsid="0174fbef"/>
    </style:style>
    <style:style style:name="P6" style:family="paragraph" style:parent-style-name="English_20_Translation_20_-_20_single_20_inset">
      <style:text-properties officeooo:paragraph-rsid="0174fbef"/>
    </style:style>
    <style:style style:name="P7" style:family="paragraph" style:parent-style-name="Sub-Head_20_1" style:master-page-name="">
      <style:paragraph-properties style:page-number="auto" fo:keep-with-next="always"/>
      <style:text-properties officeooo:paragraph-rsid="0174fbef"/>
    </style:style>
    <style:style style:name="P8" style:family="paragraph" style:parent-style-name="Body_20_Tight_20_lines">
      <style:text-properties officeooo:paragraph-rsid="0174fbef"/>
    </style:style>
    <style:style style:name="P9" style:family="paragraph" style:parent-style-name="Sub-Head_20_1">
      <style:text-properties officeooo:paragraph-rsid="0174fbef"/>
    </style:style>
    <style:style style:name="P10" style:family="paragraph" style:parent-style-name="Sub-Head_20_2">
      <style:text-properties officeooo:paragraph-rsid="0174fbef"/>
    </style:style>
    <style:style style:name="P11" style:family="paragraph" style:parent-style-name="Standard">
      <style:text-properties officeooo:paragraph-rsid="0174fbef"/>
    </style:style>
    <style:style style:name="P12" style:family="paragraph" style:parent-style-name="Body_20_-_20_Small_20_spacer">
      <style:text-properties officeooo:paragraph-rsid="0174fbef"/>
    </style:style>
    <style:style style:name="P13" style:family="paragraph" style:parent-style-name="Body_20_Inset">
      <style:text-properties officeooo:paragraph-rsid="0174fbef"/>
    </style:style>
    <style:style style:name="P14" style:family="paragraph" style:parent-style-name="English_20_Translation_20_-_20_Indented">
      <style:text-properties officeooo:paragraph-rsid="0174fbef"/>
    </style:style>
    <style:style style:name="P15" style:family="paragraph" style:parent-style-name="M.T._20_Text_20_-_20_Indented">
      <style:text-properties officeooo:paragraph-rsid="0174fbef"/>
    </style:style>
    <style:style style:name="P16" style:family="paragraph" style:parent-style-name="M.T._20_Text_20_-_20_Single_20_Inset">
      <style:text-properties officeooo:paragraph-rsid="0174fbef"/>
    </style:style>
    <style:style style:name="P17" style:family="paragraph" style:parent-style-name="Section_20_Heading">
      <style:text-properties officeooo:paragraph-rsid="0174fbef"/>
    </style:style>
    <style:style style:name="P18" style:family="paragraph" style:parent-style-name="Sub-Head_20_1_20_No_20_follow">
      <style:text-properties officeooo:paragraph-rsid="0174fbef"/>
    </style:style>
    <style:style style:name="P19" style:family="paragraph" style:parent-style-name="Body_20_Tight_20_lines">
      <style:text-properties officeooo:paragraph-rsid="01585958"/>
    </style:style>
    <style:style style:name="P20" style:family="paragraph" style:parent-style-name="English_20_Translation_20_-_20_Lesson_20_title">
      <style:text-properties officeooo:paragraph-rsid="015df54f"/>
    </style:style>
    <style:style style:name="P21" style:family="paragraph" style:parent-style-name="Coloring_20_Page_20_Footer">
      <style:text-properties officeooo:paragraph-rsid="02b4e089"/>
    </style:style>
    <style:style style:name="P22" style:family="paragraph" style:parent-style-name="M.T._20_Text">
      <style:text-properties officeooo:paragraph-rsid="029f899c"/>
    </style:style>
    <style:style style:name="P23" style:family="paragraph" style:parent-style-name="Body">
      <style:text-properties fo:font-size="8pt" officeooo:paragraph-rsid="029f899c" style:font-size-asian="8pt" style:font-size-complex="8pt"/>
    </style:style>
    <style:style style:name="P24" style:family="paragraph" style:parent-style-name="M.T._20_Lesson_20_title_20_-_20_invisible" style:master-page-name="First_20_Page">
      <style:paragraph-properties style:page-number="auto"/>
    </style:style>
    <style:style style:name="P25" style:family="paragraph" style:parent-style-name="Body_20_Bullet_20_-_20_Checkmark">
      <style:text-properties officeooo:paragraph-rsid="0174fbef"/>
    </style:style>
    <style:style style:name="P26" style:family="paragraph" style:parent-style-name="Body_20_Bullet_20_-_20_Checkmark" style:list-style-name="Bullet_20_-_20_checkmark">
      <style:text-properties officeooo:paragraph-rsid="0174fbef"/>
    </style:style>
    <style:style style:name="P27" style:family="paragraph" style:parent-style-name="Body_20_Bullet_20_-_20_Checkmark_20_-_20_No_20_follow">
      <style:text-properties officeooo:paragraph-rsid="0174fbef"/>
    </style:style>
    <style:style style:name="P28" style:family="paragraph" style:parent-style-name="Body_20_Bullet_20_-_20_Checkmark_20_-_20_No_20_follow" style:list-style-name="Bullet_20_-_20_checkmark">
      <style:text-properties officeooo:paragraph-rsid="0174fbef"/>
    </style:style>
    <style:style style:name="P29" style:family="paragraph" style:parent-style-name="M.T._20_Text_20_-_20_Numbered_20_List_20_Inset" style:list-style-name="L1">
      <style:text-properties officeooo:paragraph-rsid="0174fbef"/>
    </style:style>
    <style:style style:name="P30" style:family="paragraph" style:parent-style-name="M.T._20_Text_20_-_20_Numbered_20_List_20_Inset" style:list-style-name="L2">
      <style:text-properties officeooo:paragraph-rsid="0174fbef"/>
    </style:style>
    <style:style style:name="P31" style:family="paragraph" style:parent-style-name="M.T._20_Text_20_-_20_Numbered_20_List_20_Inset" style:list-style-name="L3">
      <style:text-properties officeooo:paragraph-rsid="0174fbef"/>
    </style:style>
    <style:style style:name="P32" style:family="paragraph" style:parent-style-name="M.T._20_Text_20_-_20_Numbered_20_List_20_Inset" style:list-style-name="L4">
      <style:text-properties officeooo:paragraph-rsid="0174fbef"/>
    </style:style>
    <style:style style:name="P33" style:family="paragraph" style:parent-style-name="M.T._20_Text_20_-_20_Numbered_20_List_20_Inset" style:list-style-name="L5">
      <style:text-properties officeooo:paragraph-rsid="0174fbef"/>
    </style:style>
    <style:style style:name="P34" style:family="paragraph" style:parent-style-name="M.T._20_Text_20_-_20_Numbered_20_List_20_Inset" style:list-style-name="L6">
      <style:text-properties officeooo:paragraph-rsid="0174fbef"/>
    </style:style>
    <style:style style:name="P35" style:family="paragraph" style:parent-style-name="Table_20_Bullet_20_-_20_Checkmark" style:list-style-name="Bullet_20_-_20_checkmark">
      <style:text-properties officeooo:rsid="01301848" officeooo:paragraph-rsid="015cef98"/>
    </style:style>
    <style:style style:name="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T2" style:family="text">
      <style:text-properties officeooo:rsid="0184d68b"/>
    </style:style>
    <style:style style:name="T3" style:family="text">
      <style:text-properties officeooo:rsid="001dbf9a"/>
    </style:style>
    <style:style style:name="T4" style:family="text">
      <style:text-properties officeooo:rsid="01d657ac"/>
    </style:style>
    <style:style style:name="T5" style:family="text">
      <style:text-properties officeooo:rsid="01355e7d"/>
    </style:style>
    <style:style style:name="T6" style:family="text">
      <style:text-properties fo:language="en" fo:country="US" style:language-asian="en" style:country-asian="US" style:language-complex="hi" style:country-complex="IN"/>
    </style:style>
    <style:style style:name="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Bullseye_20_graphic">
      <style:graphic-properties style:vertical-pos="from-top" style:vertical-rel="paragraph-content" style:mirror="none" fo:clip="rect(0cm, 0cm, 0cm, 0cm)" draw:luminance="0%" draw:contrast="0%" draw:red="0%" draw:green="0%" draw:blue="0%" draw:gamma="100%" draw:color-inversion="false" draw:image-opacity="100%" draw:color-mode="standard"/>
    </style:style>
    <style:style style:name="fr3" style:family="graphic" style:parent-style-name="Number_20_Graphic">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ranslated Text" text:name="TranslatedText"/>
      </text:user-field-decls>
      <text:list text:style-name="Outline">
        <text:list-item>
          <text:h text:style-name="P24" text:outline-level="1"><draw:frame draw:style-name="fr3" draw:name="Image1" text:anchor-type="char" svg:x="0cm" svg:y="0.041cm" svg:width="2.731cm" svg:height="2.731cm" draw:z-index="0"><draw:image xlink:href="Pictures/10000001000000D8000000D833A48D31224D2B1E.png" xlink:type="simple" xlink:show="embed" xlink:actuate="onLoad" draw:mime-type="image/png"/></draw:frame>Review Lesson</text:h>
        </text:list-item>
      </text:list>
      <text:p text:style-name="M.T._20_Lesson_20_Title">Review Lesson</text:p>
      <text:p text:style-name="P20">Review Lesson</text:p>
      <text:p text:style-name="M.T._20_Text_20_-_20_Lesson_20_Title_20_Scrip_20_Reference">Lessons 21-25</text:p>
      <text:p text:style-name="P19">NOTE: <text:s/>It is important to review the lessons previously taught to help the children remember what they have learned. <text:s/>It is also important to make the review lessons exciting and fun! <text:s/>Turn the whole lesson into a game. <text:s/>If you have time, have the children act out their favourite stories while you read it from the “Picture Book”.</text:p>
      <text:p text:style-name="Sub-Head_20_1">Materials</text:p>
      <text:list xml:id="list2246012851" text:style-name="Bullet_20_-_20_checkmark">
        <text:list-item>
          <text:p text:style-name="P35">Quarter <text:s/><text:span text:style-name="T3">2</text:span> <text:s/>Picture book, Bible, chalk</text:p>
        </text:list-item>
        <text:list-item>
          <text:p text:style-name="Body_20_Bullet_20_-_20_Checkmark">Ball <text:s/>(Make a ball by tying wrappen (plastic bag) into knots many times, or fill an old sock with scrap material.)</text:p>
        </text:list-item>
        <text:list-item>
          <text:p text:style-name="Body_20_Bullet_20_-_20_Checkmark">Bush lamp or candle</text:p>
        </text:list-item>
        <text:list-item>
          <text:p text:style-name="Body_20_Bullet_20_-_20_Checkmark">Matches</text:p>
        </text:list-item>
      </text:list>
      <text:section text:style-name="Sect1" text:name="L-26 Detail Plan">
        <text:p text:style-name="P17">Opening</text:p>
        <text:p text:style-name="P9">Song</text:p>
        <text:p text:style-name="P9">Welcome</text:p>
        <text:list xml:id="list162645450230370" text:continue-numbering="true" text:style-name="Bullet_20_-_20_checkmark">
          <text:list-item>
            <text:p text:style-name="P25">Be sure the children know you are happy to see them!</text:p>
          </text:list-item>
          <text:list-item>
            <text:p text:style-name="P25">Introduce yourself and your helpers.</text:p>
          </text:list-item>
        </text:list>
        <text:p text:style-name="P9">Sharing Time</text:p>
        <text:list xml:id="list162644834598790" text:continue-numbering="true" text:style-name="Bullet_20_-_20_checkmark">
          <text:list-item>
            <text:p text:style-name="P25">Say the truth from the previous lesson together:</text:p>
          </text:list-item>
        </text:list>
        <text:p text:style-name="P16">Jesus has power over evil spirits.</text:p>
        <text:p text:style-name="P6">Jesus has power over evil spirits.</text:p>
        <text:list xml:id="list162644070704172" text:continue-numbering="true" text:style-name="Bullet_20_-_20_checkmark">
          <text:list-item>
            <text:p text:style-name="P25">Say the memory verse from the previous lesson together:</text:p>
          </text:list-item>
        </text:list>
        <text:p text:style-name="P16">[ <text:s/>Jesus said, <text:s/>] <text:s/>Luke 8:39 “Return home and tell how much God has done for you.” So the man went away and told all over town how much Jesus had done for him.</text:p>
        <text:p text:style-name="P6">[ <text:s/>Jesus said, <text:s/>] <text:s/>Luke 8:39 “Return home and tell how much God has done for you.” So the man went away and told all over town how much Jesus had done for him.</text:p>
        <text:list xml:id="list162645215863402" text:continue-numbering="true" text:style-name="Bullet_20_-_20_checkmark">
          <text:list-item>
            <text:p text:style-name="P25">Review the homework from the previous lesson:</text:p>
          </text:list-item>
        </text:list>
        <text:p text:style-name="P16">Did you go and tell someone about something God has done for you?</text:p>
        <text:p text:style-name="P6">Did you go and tell someone about something God has done for you?</text:p>
        <text:p text:style-name="P13">(Give children time to share.)</text:p>
        <text:p text:style-name="P9">Prayer</text:p>
        <text:list xml:id="list162643833955646" text:continue-numbering="true" text:style-name="Bullet_20_-_20_checkmark">
          <text:list-item>
            <text:p text:style-name="P25">Let the children share praises and prayer requests.</text:p>
          </text:list-item>
          <text:list-item>
            <text:p text:style-name="P25">Keep a record of what the children are sharing so you can remember to thank God together for answered prayers.</text:p>
          </text:list-item>
          <text:list-item>
            <text:p text:style-name="P25">Spend time praying together. <text:s/>Let the children pray out loud if they volunteer. <text:s/>Do not force anyone to pray out loud.</text:p>
          </text:list-item>
        </text:list>
        <text:p text:style-name="P18">Song</text:p>
        <text:p text:style-name="P15"><text:soft-page-break/>Today we are going to do another review lesson. We are going to review all the words, truths, stories and memory verses that we have had up to this point. We are going to start with a game right now!</text:p>
        <text:p text:style-name="P14">Today we are going to do another review lesson. We are going to review all the words, truths, stories and memory verses that we have had up to this point. We are going to start with a game right now!</text:p>
        <text:p text:style-name="P17">Review Game</text:p>
        <text:p text:style-name="P9">Throw the Ball at the Target on the Wall</text:p>
        <text:p text:style-name="P10">Materials</text:p>
        <text:list xml:id="list162644555823589" text:continue-numbering="true" text:style-name="Bullet_20_-_20_checkmark">
          <text:list-item>
            <text:p text:style-name="P26">Make a target as shown on the blackboard or wall.<draw:frame draw:style-name="fr2" draw:name="Image2" text:anchor-type="char" svg:y="-1cm" svg:width="3cm" svg:height="3cm" draw:z-index="1"><draw:image xlink:href="Pictures/10000001000000EC000000EDE9FFDFF9504B63CC.png" xlink:type="simple" xlink:show="embed" xlink:actuate="onLoad" draw:mime-type="image/png"/><draw:contour-polygon svg:width="3.945cm" svg:height="3.962cm" svg:viewBox="0 0 3945 3962" draw:points="16,16 16,33 16,50 16,67 16,84 16,101 16,118 16,135 16,152 16,169 16,186 16,203 16,220 16,236 16,253 16,270 16,287 16,304 16,321 16,338 16,355 16,372 16,389 16,406 16,423 16,440 16,457 16,473 16,490 16,507 16,524 16,541 16,558 16,575 16,592 16,609 16,626 16,643 16,660 16,677 16,694 16,710 16,727 16,744 16,761 16,778 16,795 16,812 16,829 16,846 16,863 16,880 16,897 16,914 16,931 16,947 16,964 16,981 16,998 16,1015 16,1032 16,1049 16,1066 16,1083 16,1100 16,1117 16,1134 16,1151 16,1168 16,1184 16,1201 16,1218 16,1235 16,1252 16,1269 16,1286 16,1303 16,1320 16,1337 16,1354 16,1371 16,1388 16,1405 16,1421 16,1438 16,1455 16,1472 16,1489 16,1506 16,1523 16,1540 16,1557 16,1574 16,1591 16,1608 16,1625 16,1642 16,1658 16,1675 16,1692 16,1709 16,1726 16,1743 16,1760 16,1777 16,1794 16,1811 16,1828 16,1845 16,1862 16,1879 16,1895 16,1912 16,1929 16,1946 16,1963 16,1980 16,1997 16,2014 16,2031 16,2048 16,2065 16,2082 16,2099 16,2116 16,2132 16,2149 16,2166 16,2183 16,2200 16,2217 16,2234 16,2251 16,2268 16,2285 16,2302 16,2319 16,2336 16,2353 16,2369 16,2386 16,2403 16,2420 16,2437 16,2454 16,2471 16,2488 16,2505 16,2522 16,2539 16,2556 16,2573 16,2590 16,2606 16,2623 16,2640 16,2657 16,2674 16,2691 16,2708 16,2725 16,2742 16,2759 16,2776 16,2793 16,2810 16,2827 16,2843 16,2860 16,2877 16,2894 16,2911 16,2928 16,2945 16,2962 16,2979 16,2996 16,3013 16,3030 16,3047 16,3064 16,3080 16,3097 16,3114 16,3131 16,3148 16,3165 16,3182 16,3199 16,3216 16,3233 16,3250 16,3267 16,3284 16,3301 16,3317 16,3334 16,3351 16,3368 16,3385 16,3402 16,3419 16,3436 16,3453 16,3470 16,3487 16,3504 16,3521 16,3538 16,3554 16,3571 16,3588 16,3605 16,3622 16,3639 16,3656 16,3673 16,3690 16,3707 16,3724 16,3741 16,3758 16,3775 16,3791 16,3808 16,3825 16,3842 16,3859 16,3876 16,3893 16,3910 16,3927 16,3944 16,3961 16,3978 3961,3978 3961,3961 3961,3944 3961,3927 3961,3910 3961,3893 3961,3876 3961,3859 3961,3842 3961,3825 3961,3808 3961,3791 3961,3775 3961,3758 3961,3741 3961,3724 3961,3707 3961,3690 3961,3673 3961,3656 3961,3639 3961,3622 3961,3605 3961,3588 3961,3571 3961,3554 3961,3538 3961,3521 3961,3504 3961,3487 3961,3470 3961,3453 3961,3436 3961,3419 3961,3402 3961,3385 3961,3368 3961,3351 3961,3334 3961,3317 3961,3301 3961,3284 3961,3267 3961,3250 3961,3233 3961,3216 3961,3199 3961,3182 3961,3165 3961,3148 3961,3131 3961,3114 3961,3097 3961,3080 3961,3064 3961,3047 3961,3030 3961,3013 3961,2996 3961,2979 3961,2962 3961,2945 3961,2928 3961,2911 3961,2894 3961,2877 3961,2860 3961,2843 3961,2827 3961,2810 3961,2793 3961,2776 3961,2759 3961,2742 3961,2725 3961,2708 3961,2691 3961,2674 3961,2657 3961,2640 3961,2623 3961,2606 3961,2590 3961,2573 3961,2556 3961,2539 3961,2522 3961,2505 3961,2488 3961,2471 3961,2454 3961,2437 3961,2420 3961,2403 3961,2386 3961,2369 3961,2353 3961,2336 3961,2319 3961,2302 3961,2285 3961,2268 3961,2251 3961,2234 3961,2217 3961,2200 3961,2183 3961,2166 3961,2149 3961,2132 3961,2116 3961,2099 3961,2082 3961,2065 3961,2048 3961,2031 3961,2014 3961,1997 3961,1980 3961,1963 3961,1946 3961,1929 3961,1912 3961,1895 3961,1879 3961,1862 3961,1845 3961,1828 3961,1811 3961,1794 3961,1777 3961,1760 3961,1743 3961,1726 3961,1709 3961,1692 3961,1675 3961,1658 3961,1642 3961,1625 3961,1608 3961,1591 3961,1574 3961,1557 3961,1540 3961,1523 3961,1506 3961,1489 3961,1472 3961,1455 3961,1438 3961,1421 3961,1405 3961,1388 3961,1371 3961,1354 3961,1337 3961,1320 3961,1303 3961,1286 3961,1269 3961,1252 3961,1235 3961,1218 3961,1201 3961,1184 3961,1168 3961,1151 3961,1134 3961,1117 3961,1100 3961,1083 3961,1066 3961,1049 3961,1032 3961,1015 3961,998 3961,981 3961,964 3961,947 3961,931 3961,914 3961,897 3961,880 3961,863 3961,846 3961,829 3961,812 3961,795 3961,778 3961,761 3961,744 3961,727 3961,710 3961,694 3961,677 3961,660 3961,643 3961,626 3961,609 3961,592 3961,575 3961,558 3961,541 3961,524 3961,507 3961,490 3961,473 3961,457 3961,440 3961,423 3961,406 3961,389 3961,372 3961,355 3961,338 3961,321 3961,304 3961,287 3961,270 3961,253 3961,236 3961,220 3961,203 3961,186 3961,169 3961,152 3961,135 3961,118 3961,101 3961,84 3961,67 3961,50 3961,33 3961,16" draw:recreate-on-edit="true"/></draw:frame></text:p>
          </text:list-item>
          <text:list-item>
            <text:p text:style-name="P27">Ball <text:s/>(Make a ball by tying wrappen (plastic bag) into knots many times, or fill an old sock with scrap material.)</text:p>
          </text:list-item>
          <text:list-item>
            <text:p text:style-name="P27">Draw a line on the floor for the children to stand behind.</text:p>
          </text:list-item>
          <text:list-item>
            <text:p text:style-name="P26">Review the different ways they have thrown the ball at the target (The regular way, under one leg, back to the target, under spread legs with back to the target)</text:p>
          </text:list-item>
          <text:list-item>
            <text:p text:style-name="P28">Have children vote on their favourite way to throw the ball. (For each lesson review, the children can vote on a different way to throw the ball. Children could even suggest a new way to throw the ball.) <text:s/></text:p>
          </text:list-item>
        </text:list>
        <text:p text:style-name="P10">How to Play</text:p>
        <text:list xml:id="list162644475713168" text:continue-numbering="true" text:style-name="Bullet_20_-_20_checkmark">
          <text:list-item>
            <text:p text:style-name="P25">Divide the class into 2 teams.</text:p>
          </text:list-item>
          <text:list-item>
            <text:p text:style-name="P27">The first team tries to answer the first question. <text:s/>The teacher can use this time to explain what the children do not seem to understand.</text:p>
          </text:list-item>
          <text:list-item>
            <text:p text:style-name="P27">The student on the team that answers the question correctly comes to the front and stands behind the line with their back facing the target. <text:s/>If the child only gets part of the question correct, the teacher can fill in the rest. <text:s/>The child can also ask for help from another child on his/her team. <text:s/>Help the child to succeed.</text:p>
          </text:list-item>
          <text:list-item>
            <text:p text:style-name="P27">The student then tries to throw the ball at the target.</text:p>
          </text:list-item>
          <text:list-item>
            <text:p text:style-name="P27"><text:span text:style-name="Body_20_Emphasized_20_-_20_Underline">That student then tries to throw the ball at the target in the way they chose.</text:span></text:p>
          </text:list-item>
          <text:list-item>
            <text:p text:style-name="P27">Wherever the ball hits shows how many points that team has.</text:p>
          </text:list-item>
          <text:list-item>
            <text:p text:style-name="P27">Record the points. <text:s/>The team with the most points wins.</text:p>
          </text:list-item>
          <text:list-item>
            <text:p text:style-name="P27">Be sure to clap for both sides. <text:s/>No name-calling. <text:s/>Encourage good sportsmanship.</text:p>
          </text:list-item>
        </text:list>
        <text:p text:style-name="P12"/>
        <text:p text:style-name="P11">NOTE: <text:s/>It is important to remember that this is a review. Teach the key points, but DO NOT teach the entire story again.</text:p>
        <text:p text:style-name="P17">Lesson <text:s/>21</text:p>
        <text:p text:style-name="P7">A Woman Wipes Jesus' Feet</text:p>
        <text:p text:style-name="P15">We have heard in other lessons how Jesus loves sinners. In Lesson 21, we saw how Jesus treated another sinner, an immoral woman that came to see him while he was eating at a Pharisee's house. This woman was so sorry for her sins and loved Jesus so much that she washed Jesus' feet with her tears and wiped them with her hair and anointed him with expensive perfume. Jesus forgave this woman of her sins. The Pharisee did not like that Jesus again was allowing sinners to be near him, but Jesus said that this woman's many sins have been forgiven, so she has shown me much love. She was saved because of her faith in Jesus.</text:p>
        <text:p text:style-name="P14"><text:soft-page-break/>We have heard in other lessons how Jesus loves sinners. In Lesson 21, we saw how Jesus treated another sinner, an immoral woman that came to see him while he was eating at a Pharisee's house. This woman was so sorry for her sins and loved Jesus so much that she washed Jesus' feet with her tears and wiped them with her hair and anointed him with expensive perfume. Jesus forgave this woman of her sins. The Pharisee did not like that Jesus again was allowing sinners to be near him, but Jesus said that this woman's many sins have been forgiven, so she has shown me much love. She was saved because of her faith in Jesus. </text:p>
        <text:p text:style-name="P4">The truth of this lesson is: <text:s/>Jesus forgives our sins.</text:p>
        <text:p text:style-name="P5">The truth of this lesson is: <text:s/>Jesus forgives our sins.</text:p>
        <text:p text:style-name="P10">Questions for Review</text:p>
        <text:list xml:id="list2368423075" text:style-name="L1">
          <text:list-item>
            <text:p text:style-name="P29">Why did the woman do those things to Jesus? (She loved him very much, and she was showing her gratitude.)</text:p>
          </text:list-item>
        </text:list>
        <text:p text:style-name="P6">Why did the woman do those things to Jesus? (She loved him very much, and she was showing her gratitude.)</text:p>
        <text:list xml:id="list162644623342336" text:continue-numbering="true" text:style-name="L1">
          <text:list-item>
            <text:p text:style-name="P29">Why was the woman saved? (She had faith.)</text:p>
          </text:list-item>
        </text:list>
        <text:p text:style-name="P6">Why was the woman saved? (She had faith.)</text:p>
        <text:list xml:id="list162644313740415" text:continue-numbering="true" text:style-name="L1">
          <text:list-item>
            <text:p text:style-name="P29">What is faith? (Having complete trust or confidence in something or someone)</text:p>
          </text:list-item>
        </text:list>
        <text:p text:style-name="P6">What is faith? (Having complete trust or confidence in something or someone)</text:p>
        <text:list xml:id="list162645087664169" text:continue-numbering="true" text:style-name="L1">
          <text:list-item>
            <text:p text:style-name="P29">How does our debt of sin get forgiven? (By putting our complete trust or confidence in Jesus)</text:p>
          </text:list-item>
        </text:list>
        <text:p text:style-name="P6">How does our debt of sin get forgiven? (By putting our complete trust or confidence in Jesus)</text:p>
        <text:list xml:id="list162644762425308" text:continue-numbering="true" text:style-name="L1">
          <text:list-item>
            <text:p text:style-name="P29">What is the truth from this lesson? <text:s/>( <text:s/>Jesus forgives our sins. <text:s/>)</text:p>
          </text:list-item>
        </text:list>
        <text:p text:style-name="P6">What is the truth from this lesson? <text:s/>( <text:s/>Jesus forgives our sins. <text:s/>)</text:p>
        <text:list xml:id="list162643944811124" text:continue-numbering="true" text:style-name="L1">
          <text:list-item>
            <text:p text:style-name="P29">What was the memory verse from this lesson? <text:s/>( <text:s/>Luke 7:48 Jesus said to her, “Your sins are forgiven.” <text:s/>Luke 7:50 Jesus said to the woman, “Your faith has saved you; go in peace.” <text:s/>)</text:p>
          </text:list-item>
        </text:list>
        <text:p text:style-name="P6">What was the memory verse from this lesson? <text:s/>( <text:s/>Luke 7:48 Jesus said to her, “Your sins are forgiven.” <text:s/>Luke 7:50 Jesus said to the woman, “Your faith has saved you; go in peace.” <text:s/>)</text:p>
        <text:p text:style-name="P17">Lesson <text:s/>22</text:p>
        <text:p text:style-name="P9">The Seed and the Sower</text:p>
        <text:p text:style-name="P15">In Lesson 22, Jesus told a parable about a farmer who planted his seeds. The seeds fell in four places. Do you remember the four places the seeds fell? (On the footpath, on the shallow soil with rocks below, among the thorns, and on the fertile soil.)</text:p>
        <text:p text:style-name="P14">In Lesson 22, Jesus told a parable about a farmer who planted his seeds. The seeds fell in four places. Do you remember the four places the seeds fell? (On the footpath, on the shallow soil with rocks below, among the thorns, and on the fertile soil.)</text:p>
        <text:p text:style-name="P15">Do you remember what happened to them? (The seeds on the footpath were stepped on and carried away, the seeds on the rocky soil grew but withered because of lack of moisture, the seeds in the thorny patch were choked by the thorns, and the seeds on the fertile soil grew and produced a big crop.)</text:p>
        <text:p text:style-name="P14">Do you remember what happened to them? (The seeds on the footpath were stepped on and carried away, the seeds on the rocky soil grew but withered because of lack of moisture, the seeds in the thorny patch were choked by the thorns, and the seeds on the fertile soil grew and produced a big crop.)</text:p>
        <text:p text:style-name="P15">Then Jesus explained what it meant. The seed is the message of God. The hard footpath is the people who hear the message, but the devil comes and steals it away. The rocky soil is people who believe with joy, but they stop believing when it becomes difficult. The thorny ground is the people who believe, but quickly that message is crowded out by the cares and riches of the world. And the fertile soil is the people who believe God's word, love it, and have fruitful lives.</text:p>
        <text:p text:style-name="P14">Then Jesus explained what it meant. The seed is the message of God. The hard footpath is the people who hear the message, but the devil comes and steals it away. The rocky soil is people who believe with joy, but they stop believing when it becomes difficult. The thorny ground is the people who believe, but quickly that message is crowded out by the cares and riches of the world. And the fertile soil is the people who believe God's word, love it, and have fruitful lives.</text:p>
        <text:p text:style-name="P4">The truth of this lesson is: <text:s/>Follow Jesus no matter the cost.</text:p>
        <text:p text:style-name="P5"><text:soft-page-break/>The truth of this lesson is: <text:s/>Follow Jesus no matter the cost.</text:p>
        <text:p text:style-name="P10">Questions for Review</text:p>
        <text:list xml:id="list821236044" text:style-name="L2">
          <text:list-item text:start-value="1">
            <text:p text:style-name="P30">What did the seed represent? (The message of God)</text:p>
          </text:list-item>
        </text:list>
        <text:p text:style-name="P6">What did the seed represent? (The message of God)</text:p>
        <text:list xml:id="list162645177397036" text:continue-numbering="true" text:style-name="L2">
          <text:list-item>
            <text:p text:style-name="P30">What kind of soil are those who hear the message, but then the devil comes and steals it away and prevents them from believing and being saved? (The footpath)</text:p>
          </text:list-item>
        </text:list>
        <text:p text:style-name="P6">What kind of soil are those who hear the message, but then the devil comes and steals it away and prevents them from believing and being saved? (The footpath)</text:p>
        <text:list xml:id="list162644108603645" text:continue-numbering="true" text:style-name="L2">
          <text:list-item>
            <text:p text:style-name="P30">What kind of soil are those who hear the message with joy, but their roots don't go very deep, and they believe for a while, but they wilt when the hot winds of testing blow? (The rocky soil)</text:p>
          </text:list-item>
        </text:list>
        <text:p text:style-name="P6">What kind of soil are those who hear the message with joy, but their roots don't go very deep, and they believe for a while, but they wilt when the hot winds of testing blow? (The rocky soil)<text:tab/></text:p>
        <text:list xml:id="list162644136827068" text:continue-numbering="true" text:style-name="L2">
          <text:list-item>
            <text:p text:style-name="P30">What kind of soil are those who hear and accept the message, but quickly the message is crowded out by the cares, riches, and pleasures of this life? (The thorny soil)</text:p>
          </text:list-item>
        </text:list>
        <text:p text:style-name="P6">What kind of soil are those who hear and accept the message, but quickly the message is crowded out by the cares, riches, and pleasures of this life? (The thorny soil)</text:p>
        <text:list xml:id="list162644738225588" text:continue-numbering="true" text:style-name="L2">
          <text:list-item>
            <text:p text:style-name="P30">What kind of soil are those who are honest, good-hearted people who hear God's message, cling to it, and they steadily produce a huge harvest.? (The fertile soil)</text:p>
          </text:list-item>
        </text:list>
        <text:p text:style-name="P6">What kind of soil are those who are honest, good-hearted people who hear God's message, cling to it, and they steadily produce a huge harvest.? (The fertile soil)</text:p>
        <text:list xml:id="list162643825969349" text:continue-numbering="true" text:style-name="L2">
          <text:list-item>
            <text:p text:style-name="P30">What is the truth from this lesson? <text:s/>( <text:s/>Follow Jesus no matter the cost. <text:s/>)</text:p>
          </text:list-item>
        </text:list>
        <text:p text:style-name="P6">What is the truth from this lesson? <text:s/>( <text:s/>Follow Jesus no matter the cost. <text:s/>)</text:p>
        <text:p text:style-name="P10">Additional Questions (Not for the Game)</text:p>
        <text:list xml:id="list3206692134" text:style-name="L3">
          <text:list-item text:start-value="1">
            <text:p text:style-name="P31">What kind of soil would you like to be?</text:p>
          </text:list-item>
        </text:list>
        <text:p text:style-name="P6">What kind of soil would you like to be?</text:p>
        <text:p text:style-name="P13">(Give children time to answer.)</text:p>
        <text:list xml:id="list162644174449344" text:continue-numbering="true" text:style-name="L3">
          <text:list-item>
            <text:p text:style-name="P31">Why do you want to be fertile soil?</text:p>
          </text:list-item>
        </text:list>
        <text:p text:style-name="P6">Why do you want to be fertile soil?</text:p>
        <text:p text:style-name="P13">(Give children time to answer.)</text:p>
        <text:p text:style-name="P17">Lesson <text:s/>23</text:p>
        <text:p text:style-name="P9">The Lamp on a Stand</text:p>
        <text:list xml:id="list162643879999395" text:continue-list="list162644475713168" text:style-name="Bullet_20_-_20_checkmark">
          <text:list-item>
            <text:p text:style-name="P25">Light the bush lamp or candle</text:p>
          </text:list-item>
        </text:list>
        <text:p text:style-name="P16">I lit this lamp (or candle) to remind you of what we learned in Lesson 23. Do you remember what we learned about this light?</text:p>
        <text:p text:style-name="P6">I lit this lamp (or candle) to remind you of what we learned in Lesson 23. Do you remember what we learned about this light?</text:p>
        <text:p text:style-name="P16">Jesus came to earth to die on a cross as a sacrifice to pay the penalty of our sins. When we believe in Jesus as our Saviour, his truth shines like a light in our lives. Our life changes, and people begin to see that. We become God's lamp to show His light in the dark world around us. Just like this light, we want to shine.</text:p>
        <text:p text:style-name="P6">Jesus came to earth to die on a cross as a sacrifice to pay the penalty of our sins. When we believe in Jesus as our Saviour, his truth shines like a light in our lives. Our life changes, and people begin to see that. We become God's lamp to show His light in the dark world around us. Just like this light, we want to shine.</text:p>
        <text:p text:style-name="P16">Do we want to hide this light?</text:p>
        <text:p text:style-name="P6">Do we want to hide this light?</text:p>
        <text:p text:style-name="P16"><text:soft-page-break/>In the same way, we don't want to hide the light of God's truth in our lives. We need to shine brightly to others so that they will also find the truth about Jesus and his teachings.</text:p>
        <text:p text:style-name="P6">In the same way, we don't want to hide the light of God's truth in our lives. We need to shine brightly to others so that they will also find the truth about Jesus and his teachings.</text:p>
        <text:p text:style-name="P16">The truth of this lesson is: <text:s/>Jesus shines through us.</text:p>
        <text:p text:style-name="P6">The truth of this lesson is: <text:s/>Jesus shines through us.</text:p>
        <text:p text:style-name="P10">Questions for Review</text:p>
        <text:list xml:id="list3667557942" text:style-name="L4">
          <text:list-item text:start-value="1">
            <text:p text:style-name="P32">What was the memory verse for this lesson? <text:s/>( <text:s/>Luke 8:16 No one lights a lamp and hides it in with a jar or puts it under a bed. Instead, he puts it on a stand so that those who come in can see the light. <text:s/>)</text:p>
          </text:list-item>
        </text:list>
        <text:p text:style-name="P6">What was the memory verse for this lesson? <text:s/>( <text:s/>Luke 8:16 No one lights a lamp and hides it in with a jar or puts it under a bed. Instead, he puts it on a stand so that those who come in can see the light. <text:s/>)</text:p>
        <text:list xml:id="list162644631392228" text:continue-numbering="true" text:style-name="L4">
          <text:list-item>
            <text:p text:style-name="P32">What is the truth from this lesson? <text:s/>( <text:s/>Jesus shines through us. <text:s/>)</text:p>
          </text:list-item>
        </text:list>
        <text:p text:style-name="P6">What is the truth from this lesson? <text:s/>( <text:s/>Jesus shines through us. <text:s/>)</text:p>
        <text:list xml:id="list162643829535660" text:continue-numbering="true" text:style-name="L4">
          <text:list-item>
            <text:p text:style-name="P32">What is one way we can shine for Jesus? (Sharing with others the truth of who Jesus is, following the teachings of Jesus, etc.)</text:p>
          </text:list-item>
        </text:list>
        <text:p text:style-name="P6">What is one way we can shine for Jesus? (Sharing with others the truth of who Jesus is, following the teachings of Jesus, etc.)</text:p>
        <text:list xml:id="list162644129286285" text:continue-numbering="true" text:style-name="L4">
          <text:list-item>
            <text:p text:style-name="P32">What is another way we can shine for Jesus? (See answers to 3.)</text:p>
          </text:list-item>
        </text:list>
        <text:p text:style-name="P6">What is another way we can shine for Jesus? (See answers to 3.)</text:p>
        <text:p text:style-name="P17">Lesson <text:s/>24</text:p>
        <text:p text:style-name="P9">Jesus Calms a Storm</text:p>
        <text:p text:style-name="P15">In Lesson 24, Jesus was in a boat with his disciples and a huge storm suddenly arose. The disciples were frightened, but Jesus was asleep, so the disciples woke him up saying that he must save them, because they were about to die. Jesus spoke, “Be quiet! Be still!” and the storm calmed. The disciples were so amazed and wondered who Jesus was, because even the wind and sea obeyed him. Jesus is truly God. Only God can do things like calm the wind and the sea. These stories will help us have more faith in Jesus. We can have confidence that He is able to do everything that He promises because He has shown us His great power.</text:p>
        <text:p text:style-name="P14">In Lesson 24, Jesus was in a boat with his disciples and a huge storm suddenly arose. The disciples were frightened, but Jesus was asleep, so the disciples woke him up saying that he must save them, because they were about to die. Jesus spoke, “Be quiet! Be still!” and the storm calmed. The disciples were so amazed and wondered who Jesus was, because even the wind and sea obeyed him. Jesus is truly God. Only God can do things like calm the wind and the sea. These stories will help us have more faith in Jesus. We can have confidence that He is able to do everything that He promises because He has shown us His great power.</text:p>
        <text:p text:style-name="P4">The truth of this lesson is: <text:s/>Jesus has true power over nature.<text:span text:style-name="Body_20_Emphasized_20_-_20_Small"> </text:span></text:p>
        <text:p text:style-name="P2">The truth of this lesson is: <text:s/>Jesus has true power over nature.</text:p>
        <text:p text:style-name="P10">Questions for Review</text:p>
        <text:list xml:id="list1825606356" text:style-name="L5">
          <text:list-item text:start-value="1">
            <text:p text:style-name="P33">Why were the disciples afraid? (The disciples that they were going to die in the big storm.)</text:p>
          </text:list-item>
        </text:list>
        <text:p text:style-name="P6">Why were the disciples afraid? (The disciples that they were going to die in the big storm.)</text:p>
        <text:list xml:id="list162644005221032" text:continue-numbering="true" text:style-name="L5">
          <text:list-item>
            <text:p text:style-name="P33">Who is the only one that has the kind of power to control nature? (God)</text:p>
          </text:list-item>
        </text:list>
        <text:p text:style-name="P6">Who is the only one that has the kind of power to control nature? (God)</text:p>
        <text:list xml:id="list162644199185857" text:continue-numbering="true" text:style-name="L5">
          <text:list-item>
            <text:p text:style-name="P33">When we read the stories in the Bible that show Jesus' great power, what should grow in us? (Faith in Jesus)</text:p>
          </text:list-item>
        </text:list>
        <text:p text:style-name="P6">When we read the stories in the Bible that show Jesus' great power, what should grow in us? (Faith in Jesus)</text:p>
        <text:list xml:id="list162645456704785" text:continue-numbering="true" text:style-name="L5">
          <text:list-item>
            <text:p text:style-name="P33">What does it mean to have faith in Jesus? (To trust him, or have confidence in him)</text:p>
          </text:list-item>
        </text:list>
        <text:p text:style-name="P6">What does it mean to have faith in Jesus? (To trust him, or have confidence in him)</text:p>
        <text:list xml:id="list162644307392981" text:continue-numbering="true" text:style-name="L5">
          <text:list-item>
            <text:p text:style-name="P33"><text:soft-page-break/>What is the truth from this lesson? <text:s/>( <text:s/>Jesus has true power over nature. <text:s/>)</text:p>
          </text:list-item>
        </text:list>
        <text:p text:style-name="P6">What is the truth from this lesson? <text:s/>( <text:s/>Jesus has true power over nature. <text:s/>)</text:p>
        <text:p text:style-name="P17">Lesson <text:s/>25</text:p>
        <text:p text:style-name="P9">Jesus Casts out Demons into Pigs</text:p>
        <text:p text:style-name="P15">The story continued in Lesson 25. When Jesus and the disciples reached the other side of the lake, they met a man who was possessed by evil spirits. The evil spirits in this man were so strong in this man that even chains could not hold him. The evil spirits knew that this was Jesus, the Son of God, and they were afraid of him. Even the evil spirits knew that Jesus was much more powerful than them. They begged Jesus not to send them to the bottomless pit, but into a heard of pigs. Jesus gave them permission, and they went into the pigs. The pigs became mad and ran off the edge of the cliff and into the lake and drowned. The man was set free! But the people who saw this were terrified of Jesus' power and wanted him to leave. The freed man wanted to go with Jesus, but Jesus told him to stay and tell everyone what happened, and he did. <text:s text:c="3"/></text:p>
        <text:p text:style-name="P14">The story continued in Lesson 25. When Jesus and the disciples reached the other side of the lake, they met a man who was possessed by evil spirits. The evil spirits in this man were so strong in this man that even chains could not hold him. The evil spirits knew that this was Jesus, the Son of God, and they were afraid of him. Even the evil spirits knew that Jesus was much more powerful than them. They begged Jesus not to send them to the bottomless pit, but into a heard of pigs. Jesus gave them permission, and they went into the pigs. The pigs became mad and ran off the edge of the cliff and into the lake and drowned. The man was set free! But the people who saw this were terrified of Jesus' power and wanted him to leave. The freed man wanted to go with Jesus, but Jesus told him to stay and tell everyone what happened, and he did.</text:p>
        <text:p text:style-name="P1">The truth of this lesson is: <text:s/>Jesus has power over evil spirits.</text:p>
        <text:p text:style-name="P2">The truth of this lesson is: <text:s/>Jesus has power over evil spirits.</text:p>
        <text:p text:style-name="P10">Questions for Review</text:p>
        <text:list xml:id="list2190011737" text:style-name="L6">
          <text:list-item text:start-value="1">
            <text:p text:style-name="P34">Why were the evil spirits afraid of Jesus? (They knew he was the Son of God and he was more powerful than them.)</text:p>
          </text:list-item>
        </text:list>
        <text:p text:style-name="P6">Why were the evil spirits afraid of Jesus? (They knew he was the Son of God and he was more powerful than them.)</text:p>
        <text:list xml:id="list162645193417454" text:continue-numbering="true" text:style-name="L6">
          <text:list-item>
            <text:p text:style-name="P34">What did Jesus come to earth to do? (Set people free from evil and sin, so that they can live in a way that is pleasing to God)</text:p>
          </text:list-item>
        </text:list>
        <text:p text:style-name="P3">What did Jesus come to earth to do? (Set people free from evil and sin, so that they can live in a way that is pleasing to God)</text:p>
        <text:list xml:id="list162644818904849" text:continue-numbering="true" text:style-name="L6">
          <text:list-item>
            <text:p text:style-name="P34">Who should we put our faith in to be set free from evil? (Jesus)</text:p>
          </text:list-item>
        </text:list>
        <text:p text:style-name="P6">Who should we put our faith in to be set free from evil? (Jesus)</text:p>
        <text:list xml:id="list162645501008842" text:continue-numbering="true" text:style-name="L6">
          <text:list-item>
            <text:p text:style-name="P34">Who should we share to that Jesus has set us free from sin? (Everyone)</text:p>
          </text:list-item>
        </text:list>
        <text:p text:style-name="P6">Who should we share to that Jesus has set us free from sin? (Everyone)</text:p>
        <text:list xml:id="list162645132535031" text:continue-numbering="true" text:style-name="L6">
          <text:list-item>
            <text:p text:style-name="P34">What is the truth from this lesson? <text:s/>( <text:s/>Jesus has power over evil spirits. <text:s/>)</text:p>
          </text:list-item>
        </text:list>
        <text:p text:style-name="P6">What is the truth from this lesson? <text:s/>( <text:s/>Jesus has power over evil spirits. <text:s/>)</text:p>
        <text:p text:style-name="P17">Closing and Homework</text:p>
        <text:p text:style-name="P9">Homework</text:p>
        <text:p text:style-name="P15">This week spend time everyday praying to God and asking Jesus to shine through you. Make sure you are showing Jesus to your family and friends every day by telling them what you know about Jesus.</text:p>
        <text:p text:style-name="P14">This week spend time everyday praying to God and asking Jesus to shine through you. Make sure you are showing Jesus to your family and friends every day by telling them what you know about Jesus.</text:p>
        <text:list xml:id="list162644672919066" text:continue-list="list162643879999395" text:style-name="Bullet_20_-_20_checkmark">
          <text:list-item>
            <text:p text:style-name="P25">Give any needed announcements.</text:p>
          </text:list-item>
        </text:list>
        <text:p text:style-name="P9"><text:soft-page-break/>Closing Prayer</text:p>
        <text:p text:style-name="P8"><text:span text:style-name="Body_20_Emphasized_20_-_20_Small">Thank God <text:s/></text:span>for giving us his words so that we can know how we should live.</text:p>
        <text:p text:style-name="P8"><text:span text:style-name="Body_20_Emphasized_20_-_20_Small">Ask God <text:s/></text:span>that he would help the children to spend time reading their memory verses everyday and praying. Pray that the lives of the children would be changed.</text:p>
      </text:section>
      <text:p text:style-name="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draw:gradient draw:name="Gradient_20_15" draw:display-name="Gradient 15" draw:style="linear" draw:start-color="#b3b3b3" draw:end-color="#ffffff" draw:start-intensity="100%" draw:end-intensity="100%" draw:angle="9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orphans="2" fo:widows="2" fo:hyphenation-ladder-count="no-limit" style:writing-mode="lr-tb">
        <style:tab-stops>
          <style:tab-stop style:position="1.134cm"/>
        </style:tab-stops>
      </style:paragraph-properties>
      <style:text-properties fo:color="#000000" loext:opacity="100%" style:font-name="Andika4"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style: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loext:hidden="true" style:hidden="true" style:parent-style-name="Text_20_body" style:default-outline-level="" style:class="list">
      <style:text-properties style:font-size-asian="12pt" style:font-name-complex="Lucida Sans" style:font-family-complex="'Lucida Sans'"/>
    </style:style>
    <style:style style:name="Caption" style:family="paragraph" loext:hidden="true" style:hidden="true"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loext:hidden="true" style:hidden="true" style:parent-style-name="Standard" style:default-outline-level="" style:class="index">
      <style:paragraph-properties text:number-lines="false" text:line-number="0"/>
      <style:text-properties style:font-size-asian="12pt" style:font-name-complex="Lucida Sans" style:font-family-complex="'Lucida Sans'"/>
    </style:style>
    <style:style style:name="Heading_20_1" style:display-name="Heading 1" style:family="paragraph" loext:hidden="true" style:hidden="true" style:parent-style-name="Heading" style:next-style-name="Body_20_Tight_20_lines" style:class="text" style:master-page-name="">
      <loext:graphic-properties draw:fill="solid" draw:fill-color="#b3b3b3" draw:opacity="100%"/>
      <style:paragraph-properties fo:margin-left="-0.182cm" fo:margin-right="0cm" fo:margin-top="0.381cm" fo:margin-bottom="0.203cm" style: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style: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loext:hidden="true"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style:contextual-spacing="false" fo:orphans="2" fo:widows="2" fo:hyphenation-ladder-count="no-limit" fo:text-indent="-0.801cm"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Body" style:family="paragraph" style:default-outline-level="" style:master-page-name="">
      <loext:graphic-properties draw:fill="none" draw:fill-color="#729fcf"/>
      <style:paragraph-properties fo:margin-left="0cm" fo:margin-right="0cm" fo:margin-top="0.049cm" fo:margin-bottom="0.101cm" style:contextual-spacing="false" fo:orphans="2" fo:widows="2" fo:hyphenation-ladder-count="no-limit" fo:text-indent="0cm" style:auto-text-indent="false" style:page-number="auto" fo:background-color="transparent" style:writing-mode="lr-tb">
        <style:tab-stops>
          <style:tab-stop style:position="1.27cm"/>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top="0cm" fo:margin-bottom="0cm" style: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1cm" fo:margin-right="0cm" fo:margin-top="0cm" fo:margin-bottom="0cm" style:contextual-spacing="false" fo:orphans="0" fo:widows="0" fo:hyphenation-ladder-count="no-limit" fo:text-indent="-0.499cm"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loext:hyphenation-no-last-word="false" loext:hyphenation-word-char-count="no-limit" loext:hyphenation-zone="no-limi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style: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loext:hidden="true" style:hidden="true" style:parent-style-name="Standard" style:default-outline-level="" style:class="extra">
      <style:paragraph-properties fo:margin-left="0cm" fo:margin-right="0cm" fo:margin-top="0cm" fo:margin-bottom="0.102cm" style: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9.525cm" style:type="center"/>
          <style:tab-stop style:position="17.394cm"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style:contextual-spacing="false" fo:text-indent="0cm" style:auto-text-indent="false"/>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style: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cm" fo:margin-bottom="0.101cm"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style:contextual-spacing="false" fo:orphans="2" fo:widows="2" fo:text-indent="0cm" style:auto-text-indent="false">
        <style:tab-stops>
          <style:tab-stop style:position="2.522cm"/>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style: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loext:hyphenation-no-last-word="false" loext:hyphenation-word-char-count="no-limit" loext:hyphenation-zone="no-limit"/>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cm" fo:margin-right="0cm" fo:margin-top="0cm" fo:margin-bottom="0cm" style:contextual-spacing="false" fo:text-align="start" style:justify-single-word="false" fo:orphans="2" fo:widows="2" fo:hyphenation-ladder-count="no-limit" fo:text-indent="0.199cm" style:auto-text-indent="false" style:page-number="auto" fo:break-before="auto" fo:break-after="auto" fo:background-color="#5a5a5a" fo:padding="0cm"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style: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style: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style: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style: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style: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style: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Italics" style:display-name="Body Italics" style:family="paragraph" style:parent-style-name="Body">
      <style:text-properties fo:font-size="8pt" fo:font-style="italic" style:font-weight-asian="250"/>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cm" fo:margin-bottom="0cm" style:contextual-spacing="true" style:page-number="auto" fo:background-color="#ffffcc" fo:keep-with-next="auto">
        <style:tab-stops>
          <style:tab-stop style:position="6.366cm"/>
        </style:tab-stops>
      </style:paragraph-properties>
      <style:text-properties style:font-name="Andika4" fo:font-family="Andika" style:font-style-name="Regular" style:font-pitch="variable" fo:language="en" fo:country="GB"/>
    </style:style>
    <style:style style:name="English_20_translation_20_-_20_Indent" style:display-name="English translation - Indent" style:family="paragraph" style:parent-style-name="English_20_translation">
      <style:paragraph-properties fo:margin-left="1.251cm" fo:margin-right="0cm" fo:text-indent="0cm" style:auto-text-indent="false"/>
    </style:style>
    <style:style style:name="First_20_Page_20_Footer" style:display-name="First Page Footer" style:family="paragraph" style:parent-style-name="Footer" style:default-outline-level="" style:class="extra">
      <style:paragraph-properties fo:margin-left="2.401cm" fo:margin-right="0cm" fo:margin-top="0cm" fo:margin-bottom="0cm" style: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loext:hyphenation-no-last-word="false" loext:hyphenation-word-char-count="no-limit" loext:hyphenation-zone="no-limit"/>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reak-before="auto" fo:break-after="auto" fo:background-color="transparent" style:vertical-align="bottom" style:writing-mode="lr-tb">
        <style:tab-stops>
          <style:tab-stop style:position="1.134cm"/>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glish_20_Translation_20_-_20_Indented" style:display-name="English Translation - Indented" style:family="paragraph" style:parent-style-name="English_20_translation" style:default-outline-level="" style:master-page-name="">
      <loext:graphic-properties draw:fill="none" draw:fill-color="#729fcf"/>
      <style:paragraph-properties fo:margin-left="0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officeooo:rsid="015eaa71" fo:hyphenate="false" fo:hyphenation-remain-char-count="2" fo:hyphenation-push-char-count="2" loext:hyphenation-no-caps="false" loext:hyphenation-no-last-word="false" loext:hyphenation-word-char-count="no-limit" loext:hyphenation-zone="no-limit"/>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25pt" style:font-size-complex="6pt"/>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style: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M.T._20_Text_20_-_20_Bullet" style:display-name="M.T. Text - Bullet" style:family="paragraph" style:parent-style-name="M.T._20_Text" style:auto-update="true" style:master-page-name="">
      <style:paragraph-properties style:page-number="auto" fo:keep-with-next="always"/>
      <style:text-properties fo:background-color="transparent"/>
    </style:style>
    <style:style style:name="M.T._20_Text_20_-_20_Bullet_20_Dot" style:display-name="M.T. Text - Bullet Dot" style:family="paragraph" style:parent-style-name="M.T._20_Text" style:next-style-name="English_20_translation" style:list-style-name="Bullet_20_-_20_Dot" style:master-page-name="">
      <loext:graphic-properties draw:opacity="100%"/>
      <style:paragraph-properties style:page-number="auto" fo:keep-with-next="always"/>
    </style:style>
    <style:style style:name="Body_20_Bullet_20_-_20_Checkmark" style:display-name="Body Bullet - Checkmark" style:family="paragraph" style:parent-style-name="Body" style:next-style-name="Body_20_Bullet_20_-_20_Checkmark_20_-_20_No_20_follow" style:default-outline-level="" style:list-style-name="Bullet_20_-_20_checkmark" style:master-page-name="">
      <loext:graphic-properties draw:fill="none" draw:fill-color="#ffffff"/>
      <style:paragraph-properties fo:margin-left="1.199cm" fo:margin-right="0cm" fo:margin-top="0cm" fo:margin-bottom="0cm" style:contextual-spacing="true" fo:orphans="2" fo:widows="2" fo:hyphenation-ladder-count="no-limit" fo:text-indent="-0.499cm" style:auto-text-indent="false" style:page-number="auto" fo:background-color="transparent" fo:keep-with-next="always" style:writing-mode="lr-tb">
        <style:tab-stops>
          <style:tab-stop style:position="1.203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loext:hyphenation-no-last-word="false" loext:hyphenation-word-char-count="no-limit" loext:hyphenation-zone="no-limit"/>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style:contextual-spacing="false" fo:text-align="end" style:justify-single-word="false" fo:text-indent="0cm"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style:contextual-spacing="false" fo:text-align="center" style:justify-single-word="false" fo:text-indent="0cm"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style:master-page-name="">
      <loext:graphic-properties draw:opacity="100%"/>
      <style:paragraph-properties fo:margin-left="1.3cm" fo:margin-right="0cm" fo:margin-top="0cm" fo:margin-bottom="0cm" style:contextual-spacing="tru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1.799cm" fo:margin-right="0cm" fo:margin-top="0cm" fo:margin-bottom="0cm" style:contextual-spacing="fals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 style:display-name="M.T. Text - Numbered List" style:family="paragraph" style:parent-style-name="M.T._20_Text" style:list-style-name="" style:master-page-name="">
      <style:paragraph-properties style:page-number="auto" fo:keep-with-next="always"/>
    </style:style>
    <style:style style:name="English_20_Translation_20_-_20_double_20_inset" style:display-name="English Translation - double inset" style:family="paragraph" style:parent-style-name="English_20_translation" style:default-outline-level="" style:master-page-name="">
      <style:paragraph-properties fo:margin-left="1.7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single_20_inset" style:display-name="English Translation - single inset" style:family="paragraph" style:parent-style-name="English_20_translation" style:default-outline-level="" style:master-page-name="">
      <style:paragraph-properties fo:margin-left="1.3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cm" fo:margin-right="0cm" fo:margin-top="0.3cm" fo:margin-bottom="0.199cm" style:contextual-spacing="true" fo:orphans="2" fo:widows="2" fo:hyphenation-ladder-count="no-limit" fo:text-indent="0.199cm" style:auto-text-indent="false" style:page-number="auto" fo:background-color="#d9d9d9" fo:keep-with-next="always" style:writing-mode="lr-tb">
        <style:tab-stops>
          <style:tab-stop style:position="1.134cm"/>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Sub-Head_20_2" style:display-name="Sub-Head 2" style:family="paragraph" style:parent-style-name="Sub-Head_20_1">
      <style:paragraph-properties fo:margin-left="0cm" fo:margin-right="0cm" fo:margin-top="0.101cm" fo:margin-bottom="0cm" style:contextual-spacing="false" fo:text-indent="0cm"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list-style-name="Outline"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499cm" fo:margin-right="0cm" fo:margin-top="0cm" fo:margin-bottom="0cm" style:contextual-spacing="false" fo:orphans="2" fo:widows="2" fo:hyphenation-ladder-count="no-limit" fo:text-indent="-0.499cm" style:auto-text-indent="false" fo:background-color="transparent" fo:keep-with-next="always" style:writing-mode="lr-tb">
        <style:tab-stops>
          <style:tab-stop style:position="1.203cm"/>
        </style:tab-stops>
      </style:paragraph-properties>
      <style:text-properties style:font-name="Andika4" fo:font-family="Andika" style:font-style-name="Regular" style:font-pitch="variable" fo:hyphenate="false" fo:hyphenation-remain-char-count="2" fo:hyphenation-push-char-count="2" loext:hyphenation-no-caps="false" loext:hyphenation-no-last-word="false" loext:hyphenation-word-char-count="no-limit" loext:hyphenation-zone="no-limit"/>
    </style:style>
    <style:style style:name="M.T._20_Text_20_-_20_Table_20_Single_20_Inset" style:display-name="M.T. Text - Table Single Inset" style:family="paragraph" style:parent-style-name="M.T._20_Text" style:master-page-name="">
      <style:paragraph-properties fo:margin-left="0.499cm" fo:margin-right="0cm" fo:text-indent="0cm" style:auto-text-indent="false" style:page-number="auto"/>
    </style:style>
    <style:style style:name="M.T._20_Text_20_-_20_Single_20_Inset" style:display-name="M.T. Text - Single Inset" style:family="paragraph" style:parent-style-name="M.T._20_Text" style:master-page-name="">
      <loext:graphic-properties draw:fill="solid" draw:fill-color="#ffffcc"/>
      <style:paragraph-properties fo:margin-left="1.251cm" fo:margin-right="0cm" fo:text-indent="0cm" style:auto-text-indent="false" style:page-number="auto" fo:background-color="#ffffcc" fo:keep-with-next="always"/>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Table_20_single_20_inset" style:display-name="English Translation - Table single inset" style:family="paragraph" style:parent-style-name="English_20_translation" style:default-outline-level="" style:master-page-name="">
      <style:paragraph-properties fo:margin-left="0.4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English_20_Translation_20_-_20_Num_20_List_20_inset" style:display-name="English Translation - Num List inset" style:family="paragraph" style:parent-style-name="English_20_Translation_20_-_20_single_20_inset" style:default-outline-level="">
      <style:paragraph-properties fo:margin-left="0.801cm" fo:margin-right="0cm" fo:margin-top="0cm" fo:margin-bottom="0cm" style: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style:master-page-name="">
      <loext:graphic-properties draw:opacity="100%"/>
      <style:paragraph-properties fo:margin-top="0cm" fo:margin-bottom="0cm" style:contextual-spacing="tru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Large_20_Spacer" style:display-name="Body - Large Spacer" style:family="paragraph" style:parent-style-name="Body" style:class="text">
      <style:paragraph-properties fo:margin-top="0.499cm" fo:margin-bottom="0cm" style:contextual-spacing="false"/>
    </style:style>
    <style:style style:name="Body_20_-_20_1st_20_Line_20_Indent" style:display-name="Body - 1st Line Indent" style:family="paragraph" style:parent-style-name="Body" style:default-outline-level="">
      <style:paragraph-properties fo:margin-left="0cm" fo:margin-right="0cm" fo:margin-top="0.049cm" fo:margin-bottom="0.199cm" style: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1_20_No_20_follow" style:display-name="Sub-Head 1 No follow" style:family="paragraph" style:parent-style-name="Sub-Head_20_1" style:auto-update="true"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Footer" style:display-name="Coloring Page Footer" style:family="paragraph" style:parent-style-name="Footer" style:default-outline-level="">
      <loext:graphic-properties draw:fill="none" draw:fill-color="#729fcf"/>
      <style:paragraph-properties fo:margin-left="0.499cm" fo:margin-right="0cm" fo:margin-top="0cm" fo:margin-bottom="0cm" style:contextual-spacing="false" fo:orphans="2" fo:widows="2" fo:hyphenation-ladder-count="no-limit" fo:text-indent="0cm" style:auto-text-indent="false" fo:background-color="transparent" style:writing-mode="lr-tb">
        <style:tab-stops>
          <style:tab-stop style:position="14.91cm"/>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cm" fo:margin-right="0cm" fo:margin-top="0.101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style: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635cm" fo:margin-right="0cm" fo:margin-top="0cm" fo:margin-bottom="0cm" style:contextual-spacing="false" fo:orphans="2" fo:widows="2" fo:hyphenation-ladder-count="no-limit" fo:text-indent="-0.635cm" style:auto-text-indent="false" fo:background-color="#ffffff" fo:keep-with-next="always" style:writing-mode="lr-tb">
        <style:tab-stops>
          <style:tab-stop style:position="0.6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cm" draw:fill-image-height="0cm"/>
      <style:paragraph-properties fo:margin-left="3.6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3.6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30000019073486pt" style:font-size-complex="6pt"/>
    </style:style>
    <style:style style:name="Sub-Head_20_-_20_Coloring_20_page_20_last_20_paragraph" style:display-name="Sub-Head - Coloring page last paragraph" style:family="paragraph" style:parent-style-name="Sub-Head_20_1_20_No_20_follow">
      <style:paragraph-properties fo:margin-top="0.3cm" fo:margin-bottom="0cm" style:contextual-spacing="false"/>
    </style:style>
    <style:style style:name="M.T._20_Text_20_-_20_Lesson_20_Title_20_Scrip_20_Reference" style:display-name="M.T. Text - Lesson Title Scrip Reference" style:family="paragraph" style:parent-style-name="M.T._20_Text" style:default-outline-level="">
      <style:paragraph-properties fo:margin-left="0cm" fo:margin-right="0cm" fo:margin-top="0cm" fo:margin-bottom="0.3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Centered" style:display-name="M.T. Text - Centered" style:family="paragraph" style:parent-style-name="M.T._20_Text" style:master-page-name="">
      <style:paragraph-properties fo:text-align="center" style:justify-single-word="false" style:page-number="auto" fo:keep-with-next="always"/>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cm" fo:margin-right="0cm" fo:margin-top="0cm" fo:margin-bottom="0cm" style:contextual-spacing="false" fo:text-align="start"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cm" fo:margin-right="0cm" fo:margin-top="0cm" fo:margin-bottom="0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cm" fo:margin-right="0.199cm" fo:margin-top="0.101cm" fo:margin-bottom="0.101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gray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1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cm" fo:margin-right="0cm" fo:margin-top="0.101cm" fo:margin-bottom="0cm" style:contextual-spacing="false" fo:orphans="2" fo:widows="2" fo:hyphenation-ladder-count="no-limit" fo:text-indent="0cm" style:auto-text-indent="false" style:writing-mode="lr-tb">
        <style:tab-stops>
          <style:tab-stop style:position="6.366cm"/>
        </style:tab-stops>
      </style:paragraph-properties>
      <style:text-properties fo:background-color="transparent" fo:hyphenate="false" fo:hyphenation-remain-char-count="2" fo:hyphenation-push-char-count="2" loext:hyphenation-no-caps="false" loext:hyphenation-no-last-word="false" loext:hyphenation-word-char-count="no-limit" loext:hyphenation-zone="no-limit"/>
    </style:style>
    <style:style style:name="Table_20_of_20_Lessons_20_-_20_Numbers" style:display-name="Table of Lessons - Numbers" style:family="paragraph" style:parent-style-name="Table_20_of_20_Lessons">
      <style:paragraph-properties fo:margin-top="0cm" fo:margin-bottom="0cm"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199cm" fo:margin-right="0cm" fo:margin-top="0cm" fo:margin-bottom="0cm" style:contextual-spacing="false" fo:text-align="start" style:justify-single-word="false" fo:orphans="2" fo:widows="2" fo:hyphenation-ladder-count="no-limit" fo:text-indent="0cm" style:auto-text-indent="false" style:page-number="auto" style:writing-mode="lr-tb">
        <style:tab-stops>
          <style:tab-stop style:position="1.3cm"/>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loext:hyphenation-no-last-word="false" loext:hyphenation-word-char-count="no-limit" loext:hyphenation-zone="no-limit"/>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199cm" fo:margin-right="0cm" fo:margin-top="0cm" fo:margin-bottom="0.101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loext:hyphenation-no-last-word="false" loext:hyphenation-word-char-count="no-limit" loext:hyphenation-zone="no-limit"/>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fo:keep-with-next="always" text:number-lines="false" text:line-number="0" style:writing-mode="lr-tb">
        <style:tab-stops>
          <style:tab-stop style:position="1.27cm"/>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Front_20_Matter_20_footer" style:display-name="Front Matter footer" style:family="paragraph" style:parent-style-name="Footer" style:master-page-name="">
      <style:paragraph-properties style:page-number="auto">
        <style:tab-stops>
          <style:tab-stop style:position="9.188cm" style:type="center"/>
          <style:tab-stop style:position="17.394cm" style:type="right"/>
        </style:tab-stops>
      </style:paragraph-properties>
    </style:style>
    <style:style style:name="Drawing"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font-name="Lucida Sans1" fo:font-family="'Lucida Sans'" style:font-family-generic="roman"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M.T._20_Lesson_20_Title" style:display-name="M.T. Lesson Title" style:family="paragraph" style:parent-style-name="M.T._20_Text" style:default-outline-level="" style:master-page-name="">
      <loext:graphic-properties draw:fill-image-width="0cm" draw:fill-image-height="0cm"/>
      <style:paragraph-properties fo:margin-left="0cm" fo:margin-right="0cm" fo:margin-top="0.3cm" fo:margin-bottom="0cm" style:contextual-spacing="false" fo:orphans="0" fo:widows="0" fo:hyphenation-ladder-count="no-limit" fo:text-indent="0cm" style:auto-text-indent="false" style:page-number="auto" style:shadow="none" style:vertical-align="auto" style:writing-mode="lr-tb">
        <style:tab-stops>
          <style:tab-stop style:position="1.134cm"/>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M.T._20_Lesson_20_title_20_-_20_invisible" style:display-name="M.T. 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0cm" fo:margin-right="0cm" fo:text-indent="0cm"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cm" fo:margin-right="0cm" fo:text-align="end" style:justify-single-word="false" fo:text-indent="0cm"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cm" fo:margin-right="0cm" fo:margin-top="0cm" fo:margin-bottom="0.049cm" style:contextual-spacing="true" fo:text-align="end"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0cm" fo:margin-right="0cm" fo:margin-top="0cm" fo:margin-bottom="0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M.T._20_Coloring_20_Page_20_-_20_Truth" style:display-name="M.T. Coloring Page - Truth" style:family="paragraph" style:parent-style-name="M.T._20_Text"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4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27cm"/>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Answers_20_text_20_-_20_italics" style:display-name="Answers text - italics" style:family="text">
      <style:text-properties fo:color="#000000" loext:opacity="100%" style:font-name="Andika4" fo:font-family="Andika" style:font-style-name="Regular" style:font-pitch="variable" fo:font-size="10pt" fo:language="en" fo:country="US" fo:font-style="italic" fo:font-weight="normal" fo:background-color="transparent" style:font-name-asian="ヒラギノ角ゴ Pro W3" style:font-family-asian="'ヒラギノ角ゴ Pro W3'" style:font-family-generic-asian="system" style:font-pitch-asian="variable" style:font-size-asian="10pt" style:language-asian="en" style:country-asian="US" style:font-style-asian="italic" style:font-weight-asian="normal" style:font-name-complex="Times New Roman2" style:font-family-complex="'Times New Roman'" style:font-family-generic-complex="system" style:font-pitch-complex="variable" style:font-size-complex="12pt" style:language-complex="hi" style:country-complex="IN" style:font-style-complex="italic"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199cm" loext:padding-right="0.349cm" loext:padding-top="0.349cm" loext:padding-bottom="0.199cm"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8_20_pt" style:display-name="Body 8 pt" style:family="text">
      <style:text-properties fo:color="#000000" loext:opacity="100%" style:font-name="Andika4" fo:font-family="Andika" style:font-style-name="Regular" style:font-pitch="variable" fo:font-size="8pt" fo:language="en" fo:country="US" fo:font-style="normal" fo:font-weight="normal" style:font-name-asian="ヒラギノ角ゴ Pro W3" style:font-family-asian="'ヒラギノ角ゴ Pro W3'"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hi" style:country-complex="IN" style:font-style-complex="normal" style:font-weight-complex="normal"/>
    </style:style>
    <style:style style:name="Graphics" style:family="graphic">
      <style:graphic-properties svg:width="3cm" fo:min-height="3cm" text:anchor-type="paragraph" svg:x="-0.24cm" svg:y="-0.071cm"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ible_5f_Story_5f_Box" style:display-name="Bible_Story_Box" style:family="graphic" style:parent-style-name="Frame">
      <style:graphic-properties svg:width="3.5cm" fo:min-height="3.062cm" svg:x="-0.046cm" svg:y="0.009cm" fo:margin-left="0cm" fo:margin-right="0.101cm" fo:margin-top="0cm" fo:margin-bottom="0cm"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cm" fo:border="none" draw:wrap-influence-on-position="once-concurrent" loext:allow-overlap="false">
        <style:columns fo:column-count="1" fo:column-gap="0cm"/>
      </style:graphic-properties>
    </style:style>
    <style:style style:name="Badge_20_Graphic" style:display-name="Badge Graphic" style:family="graphic" style:parent-style-name="Graphics">
      <style:graphic-properties svg:width="1.401cm" fo:min-height="0.041cm" text:anchor-type="as-char" svg:x="0cm" svg:y="-1.251cm" style:vertical-pos="from-top" style:horizontal-pos="from-left" style:horizontal-rel="paragraph"/>
    </style:style>
    <style:style style:name="Bible_5f_Story_5f_Picture" style:display-name="Bible_Story_Picture" style:family="graphic" style:parent-style-name="Graphics">
      <style:graphic-properties svg:width="3.281cm" fo:min-height="2.379cm" svg:x="0cm" svg:y="-2.379cm" fo:margin-left="0cm" fo:margin-right="0cm" fo:margin-top="0cm" fo:margin-bottom="0cm"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Lesson_5f_Number" style:display-name="Lesson_Number" style:family="graphic" style:parent-style-name="Frame">
      <style:graphic-properties svg:width="2.672cm" svg:height="2.538cm" svg:x="0cm" svg:y="0.25cm" fo:margin-left="0cm" fo:margin-right="0.199cm" fo:margin-top="0cm" fo:margin-bottom="0cm"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15cm" fo:border="none" style:flow-with-text="true" draw:wrap-influence-on-position="once-concurrent" loext:allow-overlap="false" draw:textarea-vertical-align="middle">
        <style:columns fo:column-count="1" fo:column-gap="0cm"/>
      </style:graphic-properties>
    </style:style>
    <style:style style:name="Number_20_Graphic" style:display-name="Number Graphic" style:family="graphic" style:parent-style-name="Graphics">
      <style:graphic-properties svg:width="2.731cm" fo:min-height="2.731cm" svg:x="0cm" svg:y="0.041cm" fo:margin-left="0cm" fo:margin-right="0.101cm" fo:margin-top="0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cm"/>
      </style:graphic-properties>
    </style:style>
    <style:style style:name="Bullseye_20_graphic" style:display-name="Bullseye graphic" style:family="graphic" style:parent-style-name="Graphics">
      <style:graphic-properties svg:width="3cm" fo:min-height="3cm" svg:x="14.501cm" svg:y="-1cm" fo:margin-left="0.25cm" fo:margin-right="0cm" fo:margin-top="0cm" fo:margin-bottom="0cm"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Coloring_20_Page_20_picture" style:display-name="Coloring Page picture" style:family="graphic" style:parent-style-name="Graphics">
      <style:graphic-properties svg:width="13.351cm" fo:min-height="13.788cm" svg:x="0cm" svg:y="-6.893cm" fo:margin-left="0cm" fo:margin-right="0cm" fo:margin-top="0cm" fo:margin-bottom="0cm"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Long_20_Jump_20_Graphic" style:display-name="Long Jump Graphic" style:family="graphic" style:parent-style-name="Graphics">
      <style:graphic-properties svg:width="5.001cm" fo:min-height="3.641cm" svg:x="12.501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Bowling_20_Pins_20_Graphic" style:display-name="Bowling Pins Graphic" style:family="graphic" style:parent-style-name="Graphics">
      <style:graphic-properties svg:width="3.505cm" fo:min-height="4.23cm" svg:x="13.996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Tic-Tac-Toe_20_graphic" style:display-name="Tic-Tac-Toe graphic" style:family="graphic" style:parent-style-name="Graphics">
      <style:graphic-properties svg:width="3cm" fo:min-height="3cm" svg:x="14.501cm" svg:y="-0.499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Front_20_matter_20_frames" style:display-name="Front matter frames" style:family="graphic" style:parent-style-name="Frame">
      <style:graphic-properties svg:width="17.501cm" style:rel-width="100%" fo:min-height="0.499cm" svg:x="0cm" svg:y="1.545cm" fo:margin-left="0.201cm" fo:margin-right="0.201cm" fo:margin-top="0.201cm" fo:margin-bottom="0.201cm" style:wrap="parallel" style:number-wrapped-paragraphs="no-limit" style:wrap-contour="false" style:vertical-pos="middle" style:vertical-rel="page-content" style:horizontal-pos="center" style:horizontal-rel="paragraph" fo:background-color="transparent" draw:fill="none" draw:fill-color="#729fcf" fo:padding="0.15cm" fo:border="none" loext:rel-width-rel="paragraph"/>
    </style:style>
    <style:style style:name="CC_20_Logo" style:display-name="CC Logo" style:family="graphic" style:parent-style-name="Graphics">
      <style:graphic-properties svg:width="2.378cm" fo:min-height="0.838cm" svg:x="0cm" svg:y="0.15cm" fo:margin-left="0cm" fo:margin-right="0.3cm" fo:margin-top="0cm" fo:margin-bottom="0.499cm"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_20_Mark" style:display-name="Bullet - Check 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Aria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6cm" fo:text-indent="-0.635cm" fo:margin-left="2.656cm"/>
        </style:list-level-properties>
        <style:text-properties style:font-name="Aria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91cm" fo:text-indent="-0.635cm" fo:margin-left="3.291cm"/>
        </style:list-level-properties>
        <style:text-properties style:font-name="Aria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6cm" fo:text-indent="-0.635cm" fo:margin-left="3.926cm"/>
        </style:list-level-properties>
        <style:text-properties style:font-name="Aria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61cm" fo:text-indent="-0.635cm" fo:margin-left="4.561cm"/>
        </style:list-level-properties>
        <style:text-properties style:font-name="Aria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6cm" fo:text-indent="-0.635cm" fo:margin-left="5.196cm"/>
        </style:list-level-properties>
        <style:text-properties style:font-name="Aria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31cm" fo:text-indent="-0.635cm" fo:margin-left="5.831cm"/>
        </style:list-level-properties>
        <style:text-properties style:font-name="Aria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6cm" fo:text-indent="-0.635cm" fo:margin-left="6.466cm"/>
        </style:list-level-properties>
        <style:text-properties style:font-name="Aria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01cm" fo:text-indent="-0.635cm" fo:margin-left="7.101cm"/>
        </style:list-level-properties>
        <style:text-properties style:font-name="Aria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6cm" fo:text-indent="-0.635cm" fo:margin-left="7.736cm"/>
        </style:list-level-properties>
        <style:text-properties style:font-name="Arial2"/>
      </text:list-level-style-bullet>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501cm" table:align="margins" style:writing-mode="lr-tb"/>
    </style:style>
    <style:style style:name="Table4.A" style:family="table-column">
      <style:table-column-properties style:column-width="2.6cm" style:rel-column-width="9735*"/>
    </style:style>
    <style:style style:name="Table4.B" style:family="table-column">
      <style:table-column-properties style:column-width="14.901cm" style:rel-column-width="55800*"/>
    </style:style>
    <style:style style:name="Table4.A1" style:family="table-cell">
      <style:table-cell-properties fo:padding="0.097cm" fo:border="none"/>
    </style:style>
    <style:style style:name="MP1" style:family="paragraph" style:parent-style-name="Coloring_20_Page_20_Footer">
      <style:text-properties officeooo:paragraph-rsid="02b4e089"/>
    </style:style>
    <style:style style:name="MP2" style:family="paragraph" style:parent-style-name="M.T._20_Text">
      <style:text-properties officeooo:paragraph-rsid="029f899c"/>
    </style:style>
    <style:style style:name="MP3" style:family="paragraph" style:parent-style-name="Body">
      <style:text-properties fo:font-size="8pt" officeooo:paragraph-rsid="029f899c" style:font-size-asian="8pt" style:font-size-complex="8pt"/>
    </style:style>
    <style:style style:name="M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T6" style:family="text"/>
    <style:style style:name="M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4cm" fo:background-color="transparent" style:dynamic-spacing="tru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2" fo:column-gap="0.998cm">
          <style:column-sep style:width="0.009cm" style:color="#000000" style:height="0%" style:style="none"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1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499cm" fo:background-color="transparent" style:dynamic-spacing="true" draw:fill="none" draw:fill-color="#729fcf"/>
      </style:footer-style>
    </style:page-layout>
    <style:page-layout style:name="Mpm12">
      <style:page-layout-properties fo:page-width="21.001cm" fo:page-height="29.7cm" style:num-format="i"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fo:background-color="transparent" style:dynamic-spacing="true" draw:fill="none" draw:fill-color="#729fcf"/>
      </style:footer-style>
    </style:page-layout>
    <style:page-layout style:name="Mpm13" style:page-usage="left">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Lesson_20_Content">
      <style:footer>
        <table:table table:name="Table4" table:style-name="Table4">
          <table:table-column table:style-name="Table4.A"/>
          <table:table-column table:style-name="Table4.B"/>
          <table:table-row>
            <table:table-cell table:style-name="Table4.A1" office:value-type="string">
              <text:p text:style-name="Table_20_Contents"><draw:frame draw:style-name="Mfr1" draw:name="Image8" text:anchor-type="as-char" svg:width="2.378cm" svg:height="0.838cm" draw:z-index="2"><draw:image xlink:href="Pictures/10000001000000580000001FF4DBFF4432E2ED5C.png" xlink:type="simple" xlink:show="embed" xlink:actuate="onLoad" draw:mime-type="image/png"/></draw:frame></text:p>
            </table:table-cell>
            <table:table-cell table:style-name="Table4.A1" office:value-type="string">
              <text:p text:style-name="MP2">Year of publication  <text:s/>Publisher </text:p>
              <text:p text:style-name="MP3"><text:span text:style-name="Body_20_8_20_pt">This work is licensed under the Creative Commons Attribution-NonCommercial-ShareAlike 4.0 International License. To view a copy of this license, visit http://creativecommons.org/licenses/by-nc-sa/4.0/deed.en_US. </text:span></text:p>
            </table:table-cell>
          </table:table-row>
        </table:table>
        <text:p text:style-name="Body_20_-_20_Small_20_Spacer"/>
      </style:footer>
    </style:master-page>
    <style:master-page style:name="HTML" style:page-layout-name="Mpm3" draw:style-name="Mdp1"/>
    <style:master-page style:name="Index" style:page-layout-name="Mpm4" draw:style-name="Mdp1"/>
    <style:master-page style:name="Envelope"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Coloring_20_Page" style:display-name="Coloring Page" style:page-layout-name="Mpm10" draw:style-name="Mdp2">
      <style:footer>
        <text:p text:style-name="MP1"><text:span text:style-name="MT1"><text:title>Lessons from Luke </text:title></text:span><text:s text:c="2"/><text:span text:style-name="MT1">Quarter  <text:s/></text:span><text:span text:style-name="MT1"><text:user-defined style:data-style-name="N0" text:name="Quarter">2</text:user-defined></text:span><text:span text:style-name="MT1"><text:s text:c="2"/>Lesson  <text:s/></text:span><text:span text:style-name="MT1"><text:user-defined style:data-style-name="N0" text:name="Lesson">26</text:user-defined></text:span><text:span text:style-name="MT2"><text:tab/></text:span><text:span text:style-name="MT1"><text:title>Lessons from Luke </text:title></text:span><text:span text:style-name="MT1"> <text:s/>Quarter  <text:s/></text:span><text:span text:style-name="MT1"><text:user-defined style:data-style-name="N0" text:name="Quarter">2</text:user-defined></text:span><text:span text:style-name="MT1"><text:s text:c="2"/>Lesson  <text:s/></text:span><text:span text:style-name="MT1"><text:user-defined style:data-style-name="N0" text:name="Lesson">26</text:user-defined></text:span></text:p>
      </style:footer>
    </style:master-page>
    <style:master-page style:name="Lesson_20_Content" style:display-name="Lesson Content" style:page-layout-name="Mpm11" draw:style-name="Mdp1">
      <style:footer>
        <text:p text:style-name="Footer"><text:span text:style-name="MT3">Quarter </text:span><text:span text:style-name="MT4"> <text:s/></text:span><text:span text:style-name="MT4"><text:user-defined style:data-style-name="N0" text:name="Quarter">2</text:user-defined></text:span><text:span text:style-name="MT4"><text:s text:c="2"/></text:span><text:span text:style-name="MT3">Lesson </text:span><text:span text:style-name="MT4"> <text:s/></text:span><text:span text:style-name="MT4"><text:user-defined style:data-style-name="N0" text:name="Lesson">26</text:user-defined></text:span><text:tab/><text:chapter text:display="name" text:outline-level="1">Review Lesson </text:chapter><text:tab/>Page  <text:s/><text:page-number text:select-page="current">7</text:page-number></text:p>
      </style:footer>
    </style:master-page>
    <style:master-page style:name="Front_20_matter" style:display-name="Front matter" style:page-layout-name="Mpm12" draw:style-name="Mdp1">
      <style:footer>
        <text:p text:style-name="Front_20_Matter_20_footer"><text:title>Lessons from Luke </text:title><text:tab/><text:subject>Lessons 21-25 </text:subject> <text:s/>–  <text:s/><text:span text:style-name="MT5">Quarter  </text:span><text:s/><text:user-defined style:data-style-name="N0" text:name="Quarter #"/><text:tab/>Page  <text:page-number text:select-page="current" text:page-adjust="-3"/></text:p>
      </style:footer>
    </style:master-page>
    <style:master-page style:name="Inside_20_cover" style:display-name="Inside cover" style:page-layout-name="Mpm13" draw:style-name="Mdp1" style:next-style-name="Front_20_matter"/>
    <style:master-page style:name="Body_20_Pages" loext:hidden="true" style:hidden="true" style:display-name="Body Pages" style:page-layout-name="Mpm14" draw:style-name="Mdp1"/>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10-23T10:19:29</meta:creation-date>
    <meta:editing-cycles>285</meta:editing-cycles>
    <meta:editing-duration>P13DT9H28M54S</meta:editing-duration>
    <meta:generator>LibreOffice/7.4.0.3$MacOSX_AARCH64 LibreOffice_project/f85e47c08ddd19c015c0114a68350214f7066f5a</meta:generator>
    <dc:date>2022-10-25T16:26:43.541035109</dc:date>
    <meta:print-date>2014-01-17T20:00:42.868149000</meta:print-date>
    <dc:subject>Lessons 21-25</dc:subject>
    <dc:title>Lessons from Luke</dc:title>
    <dc:creator>Chris Jackson</dc:creator>
    <meta:document-statistic meta:table-count="1" meta:image-count="3" meta:object-count="0" meta:page-count="7" meta:paragraph-count="170" meta:word-count="3660" meta:character-count="18978" meta:non-whitespace-character-count="15429"/>
    <meta:user-defined meta:name="Lesson" meta:value-type="float">26</meta:user-defined>
    <meta:user-defined meta:name="Quarter" meta:value-type="float">2</meta:user-defined>
  </office:meta>
</office:document-meta>
</file>