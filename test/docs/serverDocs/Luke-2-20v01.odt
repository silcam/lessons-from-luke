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8000000D8095E868F7ED24783.png" manifest:media-type="image/pn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Body_20_-_20_Small_20_Spacer">
      <style:text-properties officeooo:paragraph-rsid="014d37c8"/>
    </style:style>
    <style:style style:name="P2" style:family="paragraph" style:parent-style-name="Body_20_Inset">
      <style:text-properties officeooo:paragraph-rsid="014d37c8"/>
    </style:style>
    <style:style style:name="P3" style:family="paragraph" style:parent-style-name="Body_20_Tight_20_lines">
      <style:text-properties officeooo:paragraph-rsid="014d37c8"/>
    </style:style>
    <style:style style:name="P4" style:family="paragraph" style:parent-style-name="English_20_Translation_20_-_20_Indented">
      <style:text-properties officeooo:paragraph-rsid="014d37c8"/>
    </style:style>
    <style:style style:name="P5" style:family="paragraph" style:parent-style-name="English_20_Translation_20_-_20_single_20_inset">
      <style:text-properties officeooo:paragraph-rsid="014d37c8"/>
    </style:style>
    <style:style style:name="P6" style:family="paragraph" style:parent-style-name="English_20_translation">
      <style:text-properties officeooo:paragraph-rsid="014d37c8"/>
    </style:style>
    <style:style style:name="P7" style:family="paragraph" style:parent-style-name="English_20_translation_20_-_20_Indent">
      <style:text-properties officeooo:paragraph-rsid="014d37c8"/>
    </style:style>
    <style:style style:name="P8" style:family="paragraph" style:parent-style-name="M.T._20_Text">
      <style:text-properties officeooo:paragraph-rsid="014d37c8"/>
    </style:style>
    <style:style style:name="P9" style:family="paragraph" style:parent-style-name="M.T._20_Text_20_-_20_Indented">
      <style:text-properties officeooo:paragraph-rsid="014d37c8"/>
    </style:style>
    <style:style style:name="P10" style:family="paragraph" style:parent-style-name="M.T._20_Text_20_-_20_Single_20_Inset">
      <style:text-properties officeooo:paragraph-rsid="014d37c8"/>
    </style:style>
    <style:style style:name="P11" style:family="paragraph" style:parent-style-name="Section_20_Heading">
      <style:text-properties officeooo:paragraph-rsid="014d37c8"/>
    </style:style>
    <style:style style:name="P12" style:family="paragraph" style:parent-style-name="Standard">
      <style:text-properties officeooo:paragraph-rsid="014d37c8"/>
    </style:style>
    <style:style style:name="P13" style:family="paragraph" style:parent-style-name="Sub-Head_20_1">
      <style:text-properties officeooo:paragraph-rsid="014d37c8"/>
    </style:style>
    <style:style style:name="P14" style:family="paragraph" style:parent-style-name="Sub-Head_20_1_20_No_20_follow">
      <style:text-properties officeooo:paragraph-rsid="014d37c8"/>
    </style:style>
    <style:style style:name="P15" style:family="paragraph" style:parent-style-name="Sub-Head_20_2">
      <style:text-properties officeooo:paragraph-rsid="014d37c8"/>
    </style:style>
    <style:style style:name="P16" style:family="paragraph" style:parent-style-name="Coloring_20_Page_20_Footer">
      <style:text-properties officeooo:paragraph-rsid="02b4e089"/>
    </style:style>
    <style:style style:name="P17" style:family="paragraph" style:parent-style-name="M.T._20_Text">
      <style:text-properties officeooo:paragraph-rsid="029f899c"/>
    </style:style>
    <style:style style:name="P18" style:family="paragraph" style:parent-style-name="Body">
      <style:text-properties fo:font-size="8pt" officeooo:paragraph-rsid="029f899c" style:font-size-asian="8pt" style:font-size-complex="8pt"/>
    </style:style>
    <style:style style:name="P19" style:family="paragraph" style:parent-style-name="M.T._20_Lesson_20_title_20_-_20_invisible" style:master-page-name="First_20_Page">
      <style:paragraph-properties style:page-number="auto"/>
    </style:style>
    <style:style style:name="P20" style:family="paragraph" style:parent-style-name="Body_20_Bullet_20_-_20_Checkmark">
      <style:text-properties officeooo:paragraph-rsid="014d37c8"/>
    </style:style>
    <style:style style:name="P21" style:family="paragraph" style:parent-style-name="Body_20_Bullet_20_-_20_Checkmark_20_-_20_No_20_follow">
      <style:text-properties officeooo:paragraph-rsid="014d37c8"/>
    </style:style>
    <style:style style:name="P22" style:family="paragraph" style:parent-style-name="English_20_Translation_20_-_20_single_20_inset" style:list-style-name="Bullet_20_-_20_Check_20_mark">
      <style:text-properties officeooo:paragraph-rsid="014d37c8"/>
    </style:style>
    <style:style style:name="P23" style:family="paragraph" style:parent-style-name="M.T._20_Text_20_-_20_Numbered_20_List_20_Inset" style:list-style-name="L1">
      <style:text-properties officeooo:paragraph-rsid="014d37c8"/>
    </style:style>
    <style:style style:name="P24" style:family="paragraph" style:parent-style-name="M.T._20_Text_20_-_20_Numbered_20_List_20_Inset" style:list-style-name="L2">
      <style:text-properties officeooo:paragraph-rsid="014d37c8"/>
    </style:style>
    <style:style style:name="P25" style:family="paragraph" style:parent-style-name="M.T._20_Text_20_-_20_Numbered_20_List_20_Inset" style:list-style-name="L3">
      <style:text-properties officeooo:paragraph-rsid="014d37c8"/>
    </style:style>
    <style:style style:name="P26" style:family="paragraph" style:parent-style-name="M.T._20_Text_20_-_20_Numbered_20_List_20_Inset" style:list-style-name="L4">
      <style:text-properties officeooo:paragraph-rsid="014d37c8"/>
    </style:style>
    <style:style style:name="P27" style:family="paragraph" style:parent-style-name="M.T._20_Text_20_-_20_Numbered_20_List_20_Inset" style:list-style-name="L5">
      <style:text-properties officeooo:paragraph-rsid="014d37c8"/>
    </style:style>
    <style:style style:name="P28" style:family="paragraph" style:parent-style-name="M.T._20_Text_20_-_20_Numbered_20_List_20_Inset" style:list-style-name="L6">
      <style:text-properties officeooo:paragraph-rsid="014d37c8"/>
    </style:style>
    <style:style style:name="P29" style:family="paragraph" style:parent-style-name="Standard" style:list-style-name="Bullet_20_-_20_Check_20_mark">
      <style:text-properties officeooo:paragraph-rsid="014d37c8"/>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d657ac"/>
    </style:style>
    <style:style style:name="T4" style:family="text">
      <style:text-properties officeooo:rsid="01355e7d"/>
    </style:style>
    <style:style style:name="T5" style:family="text">
      <style:text-properties fo:language="en" fo:country="US" style:language-asian="en" style:country-asian="US" style:language-complex="hi" style:country-complex="IN"/>
    </style:style>
    <style:style style:name="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ext:list text:style-name="Outline">
        <text:list-item>
          <text:h text:style-name="P19" text:outline-level="1"><draw:frame draw:style-name="fr2" draw:name="Image1" text:anchor-type="char" svg:x="0cm" svg:y="0.041cm" svg:width="2.731cm" svg:height="2.731cm" draw:z-index="0"><draw:image xlink:href="Pictures/10000001000000D8000000D8095E868F7ED24783.png" xlink:type="simple" xlink:show="embed" xlink:actuate="onLoad" draw:mime-type="image/png"/></draw:frame>Review Lesson</text:h>
        </text:list-item>
      </text:list>
      <text:p text:style-name="M.T._20_Lesson_20_Title">Review Lesson</text:p>
      <text:p text:style-name="English_20_Translation_20_-_20_Lesson_20_title">Review Lesson</text:p>
      <text:p text:style-name="M.T._20_Text_20_-_20_Lesson_20_Title_20_Scrip_20_Reference">Lessons 14-19</text:p>
      <text:p text:style-name="Body_20_Tight_20_lines">NOTE: <text:s/>It is important to review the lessons previously taught to help the children remember what they have learned. <text:s/>It is also important to make the review lessons exciting and fun! <text:s/>Turn the whole lesson into a game. <text:s/>If you have time, have the children act out their favourite stories while you read it from the “Picture Book”.</text:p>
      <text:p text:style-name="Sub-Head_20_1">Materials</text:p>
      <text:list xml:id="list3692881486" text:style-name="Bullet_20_-_20_checkmark">
        <text:list-item>
          <text:p text:style-name="Body_20_Bullet_20_-_20_Checkmark">Quarter <text:s/>2 <text:s/>Picture book, Bible, chalk</text:p>
        </text:list-item>
        <text:list-item>
          <text:p text:style-name="Body_20_Bullet_20_-_20_Checkmark_20_-_20_No_20_follow">Cooking pot with a lid</text:p>
        </text:list-item>
        <text:list-item>
          <text:p text:style-name="Body_20_Bullet_20_-_20_Checkmark_20_-_20_No_20_follow">Rope, string, or yarn cut into 25 pieces that are all different sizes</text:p>
        </text:list-item>
      </text:list>
      <text:section text:style-name="Sect1" text:name="L-20 Detail Plan">
        <text:p text:style-name="P14">Song</text:p>
        <text:p text:style-name="P11">Opening</text:p>
        <text:p text:style-name="P13">Welcome</text:p>
        <text:list xml:id="list160225382058586" text:continue-numbering="true" text:style-name="Bullet_20_-_20_checkmark">
          <text:list-item>
            <text:p text:style-name="P20">Be sure the children know you are happy to see them!</text:p>
          </text:list-item>
          <text:list-item>
            <text:p text:style-name="P20">Introduce yourself and your helpers.</text:p>
          </text:list-item>
        </text:list>
        <text:p text:style-name="P13">Sharing Time</text:p>
        <text:list xml:id="list160224862943738" text:continue-numbering="true" text:style-name="Bullet_20_-_20_checkmark">
          <text:list-item>
            <text:p text:style-name="P20">Say the truth from the previous lesson together:</text:p>
          </text:list-item>
        </text:list>
        <text:p text:style-name="P10">A true disciple of Jesus has faith in him.</text:p>
        <text:p text:style-name="P5">A true disciple of Jesus has faith in him.</text:p>
        <text:p text:style-name="P10">Do you remember what it means to put your faith in Jesus? (It means you trust him above everyone else.)</text:p>
        <text:list xml:id="list3513707700" text:style-name="Bullet_20_-_20_Check_20_mark">
          <text:list-header>
            <text:p text:style-name="P22">Do you remember what it means to put your faith in Jesus? (It means you trust him above everyone else.)</text:p>
          </text:list-header>
        </text:list>
        <text:list xml:id="list160224668899065" text:continue-list="list160224862943738" text:style-name="Bullet_20_-_20_checkmark">
          <text:list-item>
            <text:p text:style-name="P20">Say the memory verse from the previous lesson together:</text:p>
          </text:list-item>
        </text:list>
        <text:p text:style-name="P10">Luke 7:9 When Jesus heard this, he was amazed at him, and turning to the crowd following him, he said, “I tell you, I have not found such great faith even in Israel.”</text:p>
        <text:p text:style-name="P7">Luke 7:9 When Jesus heard this, he was amazed at him, and turning to the crowd following him, he said, “I tell you, I have not found such great faith even in Israel.”</text:p>
        <text:list xml:id="list160224540725057" text:continue-numbering="true" text:style-name="Bullet_20_-_20_checkmark">
          <text:list-item>
            <text:p text:style-name="P20">Review the homework from the previous lesson:</text:p>
          </text:list-item>
        </text:list>
        <text:p text:style-name="P10">Did you think of something that you can pray and ask God to help you with? What are some things that you need God's help with? Did you pray to God about these things?</text:p>
        <text:p text:style-name="P5">Did you think of something that you can pray and ask God to help you with? What are some things that you need God's help with? Did you pray to God about these things?</text:p>
        <text:p text:style-name="P2">(Give children time to share.)</text:p>
        <text:p text:style-name="P13">Prayer</text:p>
        <text:list xml:id="list160225640581972" text:continue-numbering="true" text:style-name="Bullet_20_-_20_checkmark">
          <text:list-item>
            <text:p text:style-name="P20">Let the children share praises and prayer requests.</text:p>
          </text:list-item>
          <text:list-item>
            <text:p text:style-name="P21">Keep a record of what the children are sharing so you can remember to thank God together for answered prayers.</text:p>
          </text:list-item>
          <text:list-item>
            <text:p text:style-name="P21"><text:soft-page-break/>Spend time praying together. <text:s/>Let the children pray out loud if they volunteer. <text:s/>Do not force anyone to pray out loud.</text:p>
          </text:list-item>
        </text:list>
        <text:p text:style-name="P14">Song</text:p>
        <text:p text:style-name="P8">Today we are going to do another review lesson. We are going to review all the words, truths, stories and memory verses that we have had up to this point. We are going to start with a game right now!</text:p>
        <text:p text:style-name="P6">Today we are going to do another review lesson. We are going to review all the words, truths, stories and memory verses that we have had up to this point. We are going to start with a game right now!</text:p>
        <text:p text:style-name="P11">Review Game</text:p>
        <text:p text:style-name="P13">Spaghetti Game</text:p>
        <text:p text:style-name="P15">Materials</text:p>
        <text:list xml:id="list160225583058639" text:continue-numbering="true" text:style-name="Bullet_20_-_20_checkmark">
          <text:list-item>
            <text:p text:style-name="P20">Cooking pot with a lid</text:p>
          </text:list-item>
          <text:list-item>
            <text:p text:style-name="P21">Rope, string, or yarn cut into 10 pieces that are all different sizes</text:p>
          </text:list-item>
        </text:list>
        <text:p text:style-name="P15">How to Play</text:p>
        <text:list xml:id="list160225308458038" text:continue-numbering="true" text:style-name="Bullet_20_-_20_checkmark">
          <text:list-item>
            <text:p text:style-name="P20">Put the rope, string, or yarn in the pot with some of it hanging out. <text:s/>Put the lid on the pot over the ropes.</text:p>
          </text:list-item>
          <text:list-item>
            <text:p text:style-name="P21">Divide the children into two teams.</text:p>
          </text:list-item>
          <text:list-item>
            <text:p text:style-name="P21">When someone on the team answers the question correctly, they come to the front and choose one of the ropes. (They never know if they will get a long or short rope.)</text:p>
          </text:list-item>
          <text:list-item>
            <text:p text:style-name="P21">The ropes that each team gets are tied together into one long rope.</text:p>
          </text:list-item>
          <text:list-item>
            <text:p text:style-name="P21">At the end, measure the ropes from the two teams side by side.</text:p>
          </text:list-item>
          <text:list-item>
            <text:p text:style-name="P21">The teams with the longest rope wins.</text:p>
          </text:list-item>
        </text:list>
        <text:p text:style-name="P1"/>
        <text:p text:style-name="P12">NOTE: <text:s/>It is important to remember that this is a review. Teach the key points, but DO NOT teach the entire story again.</text:p>
        <text:p text:style-name="P11">Lesson <text:s/>14</text:p>
        <text:p text:style-name="P13">The Twelve Apostles</text:p>
        <text:p text:style-name="P9">In Lesson 14 we learned about Jesus and his followers. The people who followed Jesus and lived by his teachings were called 'disciples'. Jesus chose twelve men to be his chief disciples, and he called them apostles, because they were going to teach about Jesus to others. These disciples went everywhere with Jesus and were very close to him. We can learn how to be disciples, or followers of Jesus by obeying his teachings and imitating him.</text:p>
        <text:p text:style-name="P4">In Lesson 14 we learned about Jesus and his followers. The people who followed Jesus and lived by his teachings were called 'disciples'. Jesus chose twelve men to be his chief disciples, and he called them apostles, because they were going to teach about Jesus to others. These disciples went everywhere with Jesus and were very close to him. We can learn how to be disciples, or followers of Jesus by obeying his teachings and imitating him.</text:p>
        <text:p text:style-name="P8">The truth of this lesson is: <text:s/>A true disciple of Jesus follows him and his teachings.</text:p>
        <text:p text:style-name="P6">The truth of this lesson is: <text:s/>A true disciple of Jesus follows him and his teachings.</text:p>
        <text:p text:style-name="P15">Questions for Review</text:p>
        <text:list xml:id="list1231838297" text:style-name="L1">
          <text:list-item text:start-value="1">
            <text:p text:style-name="P23">What are disciples? (People that follow Jesus and live by his teachings)</text:p>
          </text:list-item>
        </text:list>
        <text:p text:style-name="P5">What are disciples? (People that follow Jesus and live by his teachings)</text:p>
        <text:list xml:id="list160225165753788" text:continue-numbering="true" text:style-name="L1">
          <text:list-item>
            <text:p text:style-name="P23">What was the apostles' job? (Carry the teachings of Jesus to others)</text:p>
          </text:list-item>
        </text:list>
        <text:p text:style-name="P5">What was the apostles' job? (Carry the teachings of Jesus to others)</text:p>
        <text:list xml:id="list160225139996565" text:continue-numbering="true" text:style-name="L1">
          <text:list-item>
            <text:p text:style-name="P23"><text:soft-page-break/>How can we be disciples of Jesus? (By following his teachings, and by trying to imitate him in the way we live.)</text:p>
          </text:list-item>
        </text:list>
        <text:p text:style-name="P5">How can we be disciples of Jesus? (By following his teachings, and by trying to imitate him in the way we live.)</text:p>
        <text:list xml:id="list160224818692284" text:continue-numbering="true" text:style-name="L1">
          <text:list-item>
            <text:p text:style-name="P23">What is one way we can follow Jesus? (Pray, read the Bible, tell others about him, love others, etc.)</text:p>
          </text:list-item>
        </text:list>
        <text:p text:style-name="P5">What is one way we can follow Jesus? (Pray, read the Bible, tell others about him, love others, etc.)</text:p>
        <text:list xml:id="list160224579742878" text:continue-numbering="true" text:style-name="L1">
          <text:list-item>
            <text:p text:style-name="P23">What is another way we can follow Jesus? (See answers to 4.)</text:p>
          </text:list-item>
        </text:list>
        <text:p text:style-name="P5">What is another way we can follow Jesus? (See answers to 4.)</text:p>
        <text:p text:style-name="P11">Lesson <text:s/>15</text:p>
        <text:p text:style-name="P13">True Disciples of Jesus Love Their Enemies</text:p>
        <text:p text:style-name="P9">Lesson 15 was a story from the village. There were two families that lived close to each other, the Ngwa family and the Mbeng family, but the Mbeng family hated the Ngwa family. One day, the Mbeng family chased away the Ngwa family from their farm and they scattered the Ngwa family's farm. When the Ngwa family saw this, they knew they would have much work to do. The children knew who had done this, so they wanted to scatter the Mbeng family farm. But Pa Ngwa said “No, we will not do that, Jesus said that his true followers do not try to do harm to their enemies,” and they worked to prepare their farm again. Later, they heard a scream, because one of the Mbeng boys had been bit by a snake. Instead of leaving him, Pa Ngwa carried him to the hospital, because he said, “Jesus said that his true followers love even their enemies.”</text:p>
        <text:p text:style-name="P4">Lesson 15 was a story from the village. There were two families that lived close to each other, the Ngwa family and the Mbeng family, but the Mbeng family hated the Ngwa family. One day, the Mbeng family chased away the Ngwa family from their farm and they scattered the Ngwa family's farm. When the Ngwa family saw this, they knew they would have much work to do. The children knew who had done this, so they wanted to scatter the Mbeng family farm. But Pa Ngwa said “No, we will not do that, Jesus said that his true followers do not try to do harm to their enemies,” and they worked to prepare their farm again. Later, they heard a scream, because one of the Mbeng boys had been bit by a snake. Instead of leaving him, Pa Ngwa carried him to the hospital, because he said, “Jesus said that his true followers love even their enemies.”</text:p>
        <text:p text:style-name="P8">The truth of this lesson is: <text:s/>A true disciple of Jesus follows him and his teachings.</text:p>
        <text:p text:style-name="P6">The truth of this lesson is: <text:s/>A true disciple of Jesus follows him and his teachings.</text:p>
        <text:p text:style-name="P15">Questions for Review</text:p>
        <text:list xml:id="list2679698339" text:style-name="L2">
          <text:list-item text:start-value="1">
            <text:p text:style-name="P24">Who did Jesus say a true disciple of his loves? (Everyone, even their enemies)</text:p>
          </text:list-item>
        </text:list>
        <text:p text:style-name="P5">Who did Jesus say a true disciple of his loves? (Everyone, even their enemies)</text:p>
        <text:list xml:id="list160225327282656" text:continue-numbering="true" text:style-name="L2">
          <text:list-item>
            <text:p text:style-name="P24">How do you know that Pa Ngwa was a follower of Jesus? (He showed love to his enemy.)</text:p>
          </text:list-item>
        </text:list>
        <text:p text:style-name="P5">How do you know that Pa Ngwa was a follower of Jesus? (He showed love to his enemy.)</text:p>
        <text:list xml:id="list160224106507185" text:continue-numbering="true" text:style-name="L2">
          <text:list-item>
            <text:p text:style-name="P24">What was the memory verse from this lesson? <text:s/>( <text:s/>Luke 6:27-28 But I tell you who hear me: Love your enemies, do good to those who hate you, bless those who curse you, pray for those who mistreat you. <text:s/>)</text:p>
          </text:list-item>
        </text:list>
        <text:p text:style-name="P5">What was the memory verse from this lesson? <text:s/>( <text:s/>Luke 6:27-28 But I tell you who hear me: Love your enemies, do good to those who hate you, bless those who curse you, pray for those who mistreat you. <text:s/>)</text:p>
        <text:list xml:id="list160225846427356" text:continue-numbering="true" text:style-name="L2">
          <text:list-item>
            <text:p text:style-name="P24">What should we do to those who hate us? (Do good to those who hate us)</text:p>
          </text:list-item>
        </text:list>
        <text:p text:style-name="P5">What should we do to those who hate us? (Do good to those who hate us)</text:p>
        <text:list xml:id="list160224684661063" text:continue-numbering="true" text:style-name="L2">
          <text:list-item>
            <text:p text:style-name="P24">What should we do when someone mistreats us? (Pray for them)</text:p>
          </text:list-item>
        </text:list>
        <text:p text:style-name="P5">What should we do when someone mistreats us? (Pray for them)</text:p>
        <text:p text:style-name="P11"><text:soft-page-break/>Lesson <text:s/>16</text:p>
        <text:p text:style-name="P13">A True Disciple of Jesus is Generous</text:p>
        <text:p text:style-name="P9">In the Bible, Jesus said that we should treat others the way we want to be treated. That means a follower of Jesus is generous. Lesson 16 was another story from the village. One day, the Nfor family's cookhouse caught fire and burned down, and all their seed they had to plant was burned too. They didn't know what to do because they didn't have money to buy more seed. So Pa Nfor went to ask for help from Elder Mbe, but he could not help him. Pa Nfor was sad and didn't know what they would do. When he arrived at his home, his friend Pa Akem was there and gave him a bag of seed, even though Pa Akem would not have enough for his family if he gave his seed to Pa Nfor. Pa Akem knew that Jesus said that a follower of Jesus is generous to others and give to those who ask. He also knew that God would take care of his need. <text:s text:c="4"/></text:p>
        <text:p text:style-name="P4">In the Bible, Jesus said that we should treat others the way we want to be treated. That means a follower of Jesus is generous. Lesson 16 was another story from the village. One day, the Nfor family's cookhouse caught fire and burned down, and all their seed they had to plant was burned too. They didn't know what to do because they didn't have money to buy more seed. So Pa Nfor went to ask for help from Elder Mbe, but he could not help him. Pa Nfor was sad and didn't know what they would do. When he arrived at his home, his friend Pa Akem was there and gave him a bag of seed, even though Pa Akem would not have enough for his family if he gave his seed to Pa Nfor. Pa Akem knew that Jesus said that a follower of Jesus is generous to others and give to those who ask. He also knew that God would take care of his need.</text:p>
        <text:p text:style-name="P8">The truth of this lesson is: <text:s/>A true disciple of Jesus is generous.</text:p>
        <text:p text:style-name="P6">The truth of this lesson is: <text:s/>A true disciple of Jesus is generous.</text:p>
        <text:p text:style-name="P15">Questions for Review</text:p>
        <text:list xml:id="list2658019664" text:style-name="L3">
          <text:list-item text:start-value="1">
            <text:p text:style-name="P25">What was the memory verse for this lesson? <text:s/>( <text:s/>Luke 6:30-31 Give to everyone who asks you, and do not ask for your possessions back from the person who takes them away. Treat others in the same way that you would want them to treat you. <text:s/>)</text:p>
          </text:list-item>
        </text:list>
        <text:p text:style-name="P5">What was the memory verse for this lesson? <text:s/>( <text:s/>Luke 6:30-31 Give to everyone who asks you, and do not ask for your possessions back from the person who takes them away. Treat others in the same way that you would want them to treat you. <text:s/>)</text:p>
        <text:list xml:id="list160225475147551" text:continue-numbering="true" text:style-name="L3">
          <text:list-item>
            <text:p text:style-name="P25">What did Jesus say his true followers will do when people ask for help? (They are generous and give to those who ask.)</text:p>
          </text:list-item>
        </text:list>
        <text:p text:style-name="P7">What did Jesus say his true followers will do when people ask for help? (They are generous and give to those who ask.)</text:p>
        <text:list xml:id="list160225740845789" text:continue-numbering="true" text:style-name="L3">
          <text:list-item>
            <text:p text:style-name="P25">What do you think it means to treat others like we want to be treated? (Being genererous, being honest, being patient, being helpful, being kind, etc.)</text:p>
          </text:list-item>
        </text:list>
        <text:p text:style-name="P5">What do you think it means to treat others like we want to be treated? (Being genererous, being honest, being patient, being helpful, being kind, etc.)</text:p>
        <text:list xml:id="list160224202909518" text:continue-numbering="true" text:style-name="L3">
          <text:list-item>
            <text:p text:style-name="P25">To whom should we be kind? (Everyone! Jesus tells us to treat ALL people with kindness, whether we like them or not.)</text:p>
          </text:list-item>
        </text:list>
        <text:p text:style-name="P5">To whom should we be kind? (Everyone! Jesus tells us to treat ALL people with kindness, whether we like them or not.)</text:p>
        <text:p text:style-name="P11">Lesson <text:s/>17</text:p>
        <text:p text:style-name="P13">A True Disciple of Jesus Bears Good Fruit</text:p>
        <text:p text:style-name="P9">Lesson 17 was another story from the village, and it taught us what it means to 'bear good fruit'. Remember the story of the two brothers, Ngum and Tata? They went to carry firewood, and on the way home, they went to a Bible club. They both prayed that God would forgive them of their sins, so they could bear good fruit. When they left, their firewood had been taken, so when they reached their house, their mother asked why they didn't have firewood. Ngum told a lie, but Tata told the truth, so Ngum was punished. <text:soft-page-break/></text:p>
        <text:p text:style-name="P9">The next day, Ngum was still angry so he beat his sister, and Tata protected her. Then Ngum stole money from his mother, even though Tata told him it was wrong. Ngum continued to do wrong things. He spent the money on sweets, didn't share them and then fought with some boys. He knew he was doing wrong things, so he asked Tata for help. Tata said that when he prayed for forgiveness he meant it with his whole heart, and Ngum wanted to pray the prayer again with his whole heart. Ngum didn't really mean it the first time, but Tata did and that's why Tata was bearing good fruit (doing good things), because he wanted to be a follower of Jesus.</text:p>
        <text:p text:style-name="P4">Lesson 17 was another story from the village, and it taught us what it means to 'bear good fruit'. Remember the story of the two brothers, Ngum and Tata? They went to carry firewood, and on the way home, they went to a Bible club. They both prayed that God would forgive them of their sins, so they could bear good fruit. When they left, their firewood had been taken, so when they reached their house, their mother asked why they didn't have firewood. Ngum told a lie, but Tata told the truth, so Ngum was punished. <text:s/></text:p>
        <text:p text:style-name="P4">The next day, Ngum was still angry so he beat his sister, and Tata protected her. Then Ngum stole money from his mother, even though Tata told him it was wrong. Ngum continued to do wrong things. He spent the money on sweets, didn't share them and then fought with some boys. He knew he was doing wrong things, so he asked Tata for help. Tata said that when he prayed for forgiveness he meant it with his whole heart, and Ngum wanted to pray the prayer again with his whole heart. Ngum didn't really mean it the first time, but Tata did and that's why Tata was bearing good fruit (doing good things), because he wanted to be a follower of Jesus.</text:p>
        <text:p text:style-name="P8">The truth of this lesson is: <text:s/>A true disciple of Jesus bears good fruit.</text:p>
        <text:p text:style-name="P6">The truth of this lesson is: <text:s/>A true disciple of Jesus bears good fruit.</text:p>
        <text:p text:style-name="P15">Questions for Review</text:p>
        <text:list xml:id="list341104695" text:style-name="L4">
          <text:list-item text:start-value="1">
            <text:p text:style-name="P26">What does it mean to bear good fruit? (Do good things)</text:p>
          </text:list-item>
        </text:list>
        <text:p text:style-name="P5">What does it mean to bear good fruit? (Do good things)</text:p>
        <text:list xml:id="list160224832774357" text:continue-numbering="true" text:style-name="L4">
          <text:list-item>
            <text:p text:style-name="P26">Why did Tata bear good fruit, but Ngum didn't? (Tata believed with his whole heart, and Ngum didn't.)</text:p>
          </text:list-item>
        </text:list>
        <text:p text:style-name="P5">Why did Tata bear good fruit, but Ngum didn't? (Tata believed with his whole heart, and Ngum didn't.)</text:p>
        <text:list xml:id="list160224102754295" text:continue-numbering="true" text:style-name="L4">
          <text:list-item>
            <text:p text:style-name="P26">What does good fruit look like in the life of a follower of Jesus? (Being honest, helpful, generous, kind, praying, and studying the Bible to know how God wants us to live, etc.)</text:p>
          </text:list-item>
        </text:list>
        <text:p text:style-name="P5">What does good fruit look like in the life of a follower of Jesus? (Being honest, helpful, generous, kind, praying, and studying the Bible to know how God wants us to live, etc.)</text:p>
        <text:list xml:id="list160225675683177" text:continue-numbering="true" text:style-name="L4">
          <text:list-item>
            <text:p text:style-name="P26">What else does good fruit look like in the life of a follower of Jesus? (See answers to 2.)</text:p>
          </text:list-item>
        </text:list>
        <text:p text:style-name="P5">What else does good fruit look like in the life of a follower of Jesus? (See answers to 2.)</text:p>
        <text:p text:style-name="P11">Lesson <text:s/>18</text:p>
        <text:p text:style-name="P13">The Wise Man and the Foolish Man</text:p>
        <text:p text:style-name="P9">In Lesson 18, we acted out a story. It was a story that Jesus told in Luke 6:46-49, because he wanted people to understand that if you believe in him, you will do what he says. We acted out the story of two different men that each built a house. The wise man who does what the Bible teaches, built his house on a strong foundation, so when the storm came, his house stayed strong. The foolish man who hears what the Bible says, but doesn't do it, built his house on a weak foundation, so when the storm came, his house fell down.</text:p>
        <text:p text:style-name="P4">In Lesson 18, we acted out a story. It was a story that Jesus told in Luke 6:46-49, because he wanted people to understand that if you believe in him, you will do what he says. We acted out the story of two different men that each built a house. The wise man who does what the Bible teaches, built his house on a strong foundation, so when the storm came, his house stayed strong. The foolish man who hears what the Bible says, but doesn't do it, built his house on a weak foundation, so when the storm came, his house fell down.</text:p>
        <text:p text:style-name="P8">The truth of this lesson is: <text:s/>A true disciple of Jesus does what the Bible teaches.</text:p>
        <text:p text:style-name="P6">The truth of this lesson is: <text:s/>A true disciple of Jesus does what the Bible teaches.</text:p>
        <text:p text:style-name="P15"><text:soft-page-break/>Questions for Review</text:p>
        <text:list xml:id="list1401903042" text:style-name="L5">
          <text:list-item text:start-value="1">
            <text:p text:style-name="P27">A true follower of Jesus should be like which man? (The wise man)</text:p>
          </text:list-item>
        </text:list>
        <text:p text:style-name="P5">A true follower of Jesus should be like which man? (The wise man)</text:p>
        <text:list xml:id="list160225796802746" text:continue-numbering="true" text:style-name="L5">
          <text:list-item>
            <text:p text:style-name="P27">What should a true follower of Jesus do? (Listen to the teachings of the Bible and do what it says)</text:p>
          </text:list-item>
        </text:list>
        <text:p text:style-name="P5">What should a true follower of Jesus do? (Listen to the teachings of the Bible and do what it says)</text:p>
        <text:list xml:id="list160225681015813" text:continue-numbering="true" text:style-name="L5">
          <text:list-item>
            <text:p text:style-name="P27">Where can you go to learn how to be strong and firm in the Lord? (The Bible)</text:p>
          </text:list-item>
        </text:list>
        <text:p text:style-name="P5">Where can you go to learn how to be strong and firm in the Lord? (The Bible)</text:p>
        <text:list xml:id="list160225404618373" text:continue-numbering="true" text:style-name="L5">
          <text:list-item>
            <text:p text:style-name="P27">Name one way the Bible teaches us how to be wise? (Come to Jesus by praying and asking him to help you, hear his teachings by reading, or listening to God's Word, the Bible, and by doing what you hear.)</text:p>
          </text:list-item>
        </text:list>
        <text:p text:style-name="P5">Name one way the Bible teaches us how to be wise? (Come to Jesus by praying and asking him to help you, hear his teachings by reading, or listening to God's Word, the Bible, and by doing what you hear.)</text:p>
        <text:p text:style-name="P11">Lesson <text:s/>19</text:p>
        <text:p text:style-name="P13">Jesus Heals the Centurion's Servant</text:p>
        <text:p text:style-name="P9">Lesson 19 was about a Centurion who had great faith. He had a servant who was very dear to him and the servant was very sick. The Centurion believed that Jesus had healing powers so he asked Jesus to heal his servant. When Jesus was coming, the Centurion knew he was not worthy to have Jesus in his house, but he knew one word from Jesus would heal his servant. Jesus realized this man had great faith, and the servant was healed because of the Centurion's faith.</text:p>
        <text:p text:style-name="P4">Lesson 19 was about a Centurion who had great faith. He had a servant who was very dear to him and the servant was very sick. The Centurion believed that Jesus had healing powers so he asked Jesus to heal his servant. When Jesus was coming, the Centurion knew he was not worthy to have Jesus in his house, but he knew one word from Jesus would heal his servant. Jesus realized this man had great faith, and the servant was healed because of the Centurion's faith.</text:p>
        <text:p text:style-name="P8">The truth of this lesson is: <text:s/>A true disciple of Jesus has faith in him.</text:p>
        <text:p text:style-name="P6">The truth of this lesson is: <text:s/>A true disciple of Jesus has faith in him.</text:p>
        <text:p text:style-name="P15">Questions for Review</text:p>
        <text:list xml:id="list665932137" text:style-name="L6">
          <text:list-item text:start-value="1">
            <text:p text:style-name="P28">What did Jesus do for the Centurion? (Jesus healed the Centurion's servant.)</text:p>
          </text:list-item>
        </text:list>
        <text:p text:style-name="P5">What did Jesus do for the Centurion? (Jesus healed the Centurion's servant.)</text:p>
        <text:list xml:id="list160224612108602" text:continue-numbering="true" text:style-name="L6">
          <text:list-item>
            <text:p text:style-name="P28">What did the Centurion have? (Great faith in Jesus)</text:p>
          </text:list-item>
        </text:list>
        <text:p text:style-name="P5">What did the Centurion have? (Great faith in Jesus)</text:p>
        <text:list xml:id="list160224924678455" text:continue-numbering="true" text:style-name="L6">
          <text:list-item>
            <text:p text:style-name="P28">In what kinds of things, or people, do we wrongly place our confidence in? (Sometimes we place our confidence in traditional doctors, fons, teachers, family, and friends.)</text:p>
          </text:list-item>
        </text:list>
        <text:p text:style-name="P5">In what kinds of things, or people, do we wrongly place our confidence in? (Sometimes we place our confidence in traditional doctors, fons, teachers, family, and friends.)</text:p>
        <text:list xml:id="list160225591311068" text:continue-numbering="true" text:style-name="L6">
          <text:list-item>
            <text:p text:style-name="P28">As followers of Jesus, in whom should we put our confidence in? (Jesus)</text:p>
          </text:list-item>
        </text:list>
        <text:p text:style-name="P5">As followers of Jesus, in whom should we put our confidence in? (Jesus)</text:p>
        <text:p text:style-name="P11">Closing and Homework</text:p>
        <text:p text:style-name="P13">Homework</text:p>
        <text:p text:style-name="P9">This week spend time everyday praying to God asking him to forgive your sins and to help you be a follower of him. Remember that a follower of Jesus loves their enemies, is generous, bears good fruit, does what the Bible teaches and has faith in Jesus. Work on memorizing all the verses we have had so far to say next week.</text:p>
        <text:p text:style-name="P4"><text:soft-page-break/>This week spend time everyday praying to God asking him to forgive your sins and to help you be a follower of him. Remember that a follower of Jesus loves their enemies, is generous, bears good fruit, does what the Bible teaches and has faith in Jesus. Work on memorizing all the verses we have had so far to say next week.</text:p>
        <text:list xml:id="list728560849851102742" text:style-name="Bullet_20_-_20_Check_20_mark">
          <text:list-item>
            <text:p text:style-name="P29"><text:soft-page-break/>Give any needed announcements.</text:p>
          </text:list-item>
        </text:list>
        <text:p text:style-name="P13">Closing Prayer</text:p>
        <text:p text:style-name="P3"><text:span text:style-name="Body_20_Emphasized_20_-_20_Small">Thank God <text:s/></text:span>for giving us his words so that we can know how we should live.</text:p>
        <text:p text:style-name="P3"><text:span text:style-name="Body_20_Emphasized_20_-_20_Small">Ask God <text:s/></text:span>that he would help the children to spend time reading their memory verses everyday and praying. Pray that the lives of the children would be changed.</text:p>
      </text:section>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Italics" style:display-name="Body Italics" style:family="paragraph" style:parent-style-name="Body">
      <style:text-properties fo:font-size="8pt" fo:font-style="italic" style:font-weight-asian="250"/>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 style:display-name="M.T. Text - Numbered" style:family="paragraph" style:parent-style-name="M.T._20_Text" style:list-style-name="WWNum1">
      <loext:graphic-properties draw:fill="solid" draw:fill-color="#ffff66" draw:opacity="100%"/>
      <style:paragraph-properties fo:margin-left="1cm" fo:margin-right="0cm" fo:text-indent="-0.499cm" style:auto-text-indent="false" fo:background-color="#ffff66" text:number-lines="true" text:line-number="1">
        <style:tab-stops>
          <style:tab-stop style:position="1.27cm"/>
        </style:tab-stops>
      </style:paragraph-properties>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English_20_Translation_20_-_20_Num_20_List_20_inset" style:display-name="English Translation - Num List inset" style:family="paragraph" style:parent-style-name="English_20_Translation_20_-_20_single_20_inset" style:default-outline-level="">
      <style:paragraph-properties fo:margin-left="0.801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Answers_20_text_20_-_20_italics" style:display-name="Answers text - italics" style:family="text">
      <style:text-properties fo:color="#000000" loext:opacity="100%" style:font-name="Andika4" fo:font-family="Andika" style:font-style-name="Regular" style:font-pitch="variable" fo:font-size="10pt" fo:language="en" fo:country="US" fo:font-style="italic" fo:font-weight="normal" fo:background-color="transparent" style:font-name-asian="ヒラギノ角ゴ Pro W3" style:font-family-asian="'ヒラギノ角ゴ Pro W3'" style:font-family-generic-asian="system" style:font-pitch-asian="variable" style:font-size-asian="10pt" style:language-asian="en" style:country-asian="US" style:font-style-asian="italic" style:font-weight-asian="normal" style:font-name-complex="Times New Roman2" style:font-family-complex="'Times New Roman'" style:font-family-generic-complex="system" style:font-pitch-complex="variable" style:font-size-complex="12pt" style:language-complex="hi" style:country-complex="IN" style:font-style-complex="italic"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_20_mark" style:display-name="Bullet - Check mark">
      <text:list-level-style-bullet text:level="1" text:style-name="Bullet_20_Symbols" loext:num-list-format="%1%" text:bullet-char="✔">
        <style:list-level-properties text:list-level-position-and-space-mode="label-alignment">
          <style:list-level-label-alignment text:label-followed-by="listtab" text:list-tab-stop-position="1.3cm" fo:text-indent="-0.635cm" fo:margin-left="1.3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15cm" fo:text-indent="-0.635cm" fo:margin-left="7.015cm"/>
        </style:list-level-properties>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1"><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  </text:p>
              <text:p text:style-name="MP3"><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  </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20</text:user-defined></text:span><text:span text:style-name="MT2"><text:tab/></text:span><text:span text:style-name="MT1"><text:title>Lessons from Luke  </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20</text:user-defined></text:span></text:p>
      </style:footer>
    </style:master-page>
    <style:master-page style:name="Lesson_20_Content" style:display-name="Lesson Content" style:page-layout-name="Mpm11" draw:style-name="Mdp1">
      <style:footer>
        <text:p text:style-name="Footer"><text:span text:style-name="MT3">Quarter  </text:span><text:span text:style-name="MT4"> <text:s/></text:span><text:span text:style-name="MT4"><text:user-defined style:data-style-name="N0" text:name="Quarter">2</text:user-defined></text:span><text:span text:style-name="MT4"><text:s text:c="2"/></text:span><text:span text:style-name="MT3">Lesson  </text:span><text:span text:style-name="MT4"> <text:s/></text:span><text:span text:style-name="MT4"><text:user-defined style:data-style-name="N0" text:name="Lesson">20</text:user-defined></text:span><text:tab/><text:chapter text:display="name" text:outline-level="1">Review Lesson  </text:chapter><text:tab/>Page   <text:s/><text:page-number text:select-page="current">8</text:page-number></text:p>
      </style:footer>
    </style:master-page>
    <style:master-page style:name="Front_20_matter" style:display-name="Front matter" style:page-layout-name="Mpm12" draw:style-name="Mdp1">
      <style:footer>
        <text:p text:style-name="Front_20_Matter_20_footer"><text:title>Lessons from Luke  </text:title><text:tab/><text:subject>Lessons 14-19  </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3T10:19:29</meta:creation-date>
    <meta:editing-cycles>256</meta:editing-cycles>
    <meta:editing-duration>P13DT15M13S</meta:editing-duration>
    <meta:generator>LibreOffice/7.4.0.3$MacOSX_AARCH64 LibreOffice_project/f85e47c08ddd19c015c0114a68350214f7066f5a</meta:generator>
    <dc:date>2022-10-25T16:02:23.665486733</dc:date>
    <meta:print-date>2014-01-17T20:00:42.868149000</meta:print-date>
    <dc:subject>Lessons 14-19</dc:subject>
    <dc:title>Lessons from Luke</dc:title>
    <dc:creator>Chris Jackson</dc:creator>
    <meta:document-statistic meta:table-count="1" meta:image-count="2" meta:object-count="0" meta:page-count="8" meta:paragraph-count="157" meta:word-count="3813" meta:character-count="19993" meta:non-whitespace-character-count="16315"/>
    <meta:user-defined meta:name="Lesson" meta:value-type="float">20</meta:user-defined>
    <meta:user-defined meta:name="Quarter" meta:value-type="float">2</meta:user-defined>
  </office:meta>
</office:document-meta>
</file>