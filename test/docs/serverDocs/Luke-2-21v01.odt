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61D000004B79FF79145D2DA6F2B.tif" manifest:media-type="image/tiff"/>
  <manifest:file-entry manifest:full-path="Pictures/10000000000000AF000000B0A5358A6F78AE97EB.jpg" manifest:media-type="image/jpeg"/>
  <manifest:file-entry manifest:full-path="Pictures/100000000000015F000000FE8D4D30C62E872F76.jpg" manifest:media-type="image/jpeg"/>
  <manifest:file-entry manifest:full-path="Pictures/100000000000015F000000FE42FF8132115767A9.jpg" manifest:media-type="image/jpeg"/>
  <manifest:file-entry manifest:full-path="Pictures/100000000000015F000000FE1EE343A04BB9903A.jpg" manifest:media-type="image/jpeg"/>
  <manifest:file-entry manifest:full-path="Pictures/100000000000015F000000FE9287CFE1759C7351.jpg" manifest:media-type="image/jpeg"/>
  <manifest:file-entry manifest:full-path="Pictures/10000001000000D8000000D8D0D0BFE1DF35965B.png" manifest:media-type="image/pn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writing-mode="lr-tb"/>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itle_26_Truth.B1" style:display-name="Title&amp;Truth.B1" style:family="table-cell">
      <style:table-cell-properties style:vertical-align="middle" fo:padding-left="0.102cm" fo:padding-right="0.102cm" fo:padding-top="0cm" fo:padding-bottom="0.051cm" fo:border-left="none" fo:border-right="none" fo:border-top="none" fo:border-bottom="1pt solid #000000"/>
    </style:style>
    <style:style style:name="Title_26_Truth.B2" style:display-name="Title&amp;Truth.B2" style:family="table-cell">
      <style:table-cell-properties style:vertical-align="middle" fo:padding-left="0.102cm" fo:padding-right="0.102cm" fo:padding-top="0cm" fo:padding-bottom="0.051cm" fo:border-left="none" fo:border-right="none" fo:border-top="none" fo:border-bottom="1pt solid #000000"/>
    </style:style>
    <style:style style:name="Title_26_Truth.B3" style:display-name="Title&amp;Truth.B3" style:family="table-cell">
      <style:table-cell-properties style:vertical-align="middle" fo:padding-left="0.102cm" fo:padding-right="0.102cm" fo:padding-top="0cm" fo:padding-bottom="0.051cm" fo:border-left="none" fo:border-right="none" fo:border-top="none" fo:border-bottom="1pt solid #000000"/>
    </style:style>
    <style:style style:name="Title_26_Truth.B4" style:display-name="Title&amp;Truth.B4" style:family="table-cell">
      <style:table-cell-properties style:vertical-align="middle" fo:padding-left="0.102cm" fo:padding-right="0.102cm" fo:padding-top="0cm" fo:padding-bottom="0.051cm" fo:border-left="none" fo:border-right="none" fo:border-top="none" fo:border-bottom="1pt solid #000000"/>
    </style:style>
    <style:style style:name="Title_26_Truth.B5" style:display-name="Title&amp;Truth.B5" style:family="table-cell">
      <style:table-cell-properties style:vertical-align="middle" fo:padding-left="0.102cm" fo:padding-right="0.102cm" fo:padding-top="0cm" fo:padding-bottom="0.051cm" fo:border-left="none" fo:border-right="none" fo:border-top="none" fo:border-bottom="1pt solid #000000"/>
    </style:style>
    <style:style style:name="P1" style:family="paragraph" style:parent-style-name="English_20_Translation_20_-_20_single_20_inset">
      <style:text-properties officeooo:paragraph-rsid="00b14bd3"/>
    </style:style>
    <style:style style:name="P2" style:family="paragraph" style:parent-style-name="Sub-Head_20_1">
      <style:text-properties officeooo:paragraph-rsid="00b14bd3"/>
    </style:style>
    <style:style style:name="P3" style:family="paragraph" style:parent-style-name="Sub-Head_20_2">
      <style:text-properties officeooo:paragraph-rsid="00b14bd3"/>
    </style:style>
    <style:style style:name="P4" style:family="paragraph" style:parent-style-name="English_20_translation">
      <style:text-properties officeooo:paragraph-rsid="00b14bd3"/>
    </style:style>
    <style:style style:name="P5" style:family="paragraph" style:parent-style-name="M.T._20_Text">
      <style:text-properties officeooo:paragraph-rsid="00b14bd3"/>
    </style:style>
    <style:style style:name="P6" style:family="paragraph" style:parent-style-name="Body">
      <style:text-properties officeooo:paragraph-rsid="00b14bd3"/>
    </style:style>
    <style:style style:name="P7" style:family="paragraph" style:parent-style-name="Body_20_Inset">
      <style:text-properties officeooo:paragraph-rsid="00b14bd3"/>
    </style:style>
    <style:style style:name="P8" style:family="paragraph" style:parent-style-name="English_20_Translation_20_-_20_Bible_20_story_20_inset">
      <style:text-properties officeooo:paragraph-rsid="00b14bd3"/>
    </style:style>
    <style:style style:name="P9" style:family="paragraph" style:parent-style-name="English_20_Translation_20_-_20_Indented">
      <style:text-properties officeooo:paragraph-rsid="00b14bd3"/>
    </style:style>
    <style:style style:name="P10" style:family="paragraph" style:parent-style-name="English_20_Translation_20_-_20_double_20_inset">
      <style:text-properties officeooo:paragraph-rsid="00b14bd3"/>
    </style:style>
    <style:style style:name="P11" style:family="paragraph" style:parent-style-name="M.T._20_Text_20_-_20_Bible_20_story_20_inset">
      <style:text-properties officeooo:paragraph-rsid="00b14bd3"/>
    </style:style>
    <style:style style:name="P12" style:family="paragraph" style:parent-style-name="M.T._20_Text_20_-_20_Indented">
      <style:text-properties officeooo:paragraph-rsid="00b14bd3"/>
    </style:style>
    <style:style style:name="P13" style:family="paragraph" style:parent-style-name="M.T._20_Text_20_-_20_Single_20_Inset">
      <style:text-properties officeooo:paragraph-rsid="00b14bd3"/>
    </style:style>
    <style:style style:name="P14" style:family="paragraph" style:parent-style-name="Section_20_Heading">
      <style:text-properties officeooo:paragraph-rsid="00b14bd3"/>
    </style:style>
    <style:style style:name="P15" style:family="paragraph" style:parent-style-name="Sub-Head_20_-_20_Coloring_20_page_20_last_20_paragraph">
      <style:text-properties officeooo:paragraph-rsid="00b14bd3"/>
    </style:style>
    <style:style style:name="P16" style:family="paragraph" style:parent-style-name="Sub-Head_20_1_20_No_20_follow">
      <style:text-properties officeooo:paragraph-rsid="00b14bd3"/>
    </style:style>
    <style:style style:name="P17" style:family="paragraph" style:parent-style-name="English_20_translation">
      <style:text-properties officeooo:paragraph-rsid="008be6af"/>
    </style:style>
    <style:style style:name="P18" style:family="paragraph" style:parent-style-name="M.T._20_Text">
      <style:text-properties officeooo:paragraph-rsid="008be6af"/>
    </style:style>
    <style:style style:name="P19" style:family="paragraph" style:parent-style-name="Bible_20_Story_20_-_20_Graphic_20_Number">
      <style:text-properties officeooo:paragraph-rsid="009948d9"/>
    </style:style>
    <style:style style:name="P20" style:family="paragraph" style:parent-style-name="Bible_20_Story_20_-_20_Graphic_20_Number">
      <style:text-properties officeooo:rsid="017e3f1f" officeooo:paragraph-rsid="009948d9"/>
    </style:style>
    <style:style style:name="P21" style:family="paragraph" style:parent-style-name="Sub-Head_20_1" style:master-page-name="">
      <style:paragraph-properties style:page-number="auto"/>
      <style:text-properties fo:language="en" fo:country="US" officeooo:paragraph-rsid="00b14bd3" style:language-asian="en" style:country-asian="US" style:language-complex="hi" style:country-complex="IN"/>
    </style:style>
    <style:style style:name="P22" style:family="paragraph" style:parent-style-name="Coloring_20_Page_20_Footer">
      <style:text-properties officeooo:paragraph-rsid="02b4e089"/>
    </style:style>
    <style:style style:name="P23" style:family="paragraph" style:parent-style-name="M.T._20_Text">
      <style:text-properties officeooo:paragraph-rsid="029f899c"/>
    </style:style>
    <style:style style:name="P24" style:family="paragraph" style:parent-style-name="Body">
      <style:text-properties fo:font-size="8pt" officeooo:paragraph-rsid="029f899c" style:font-size-asian="8pt" style:font-size-complex="8pt"/>
    </style:style>
    <style:style style:name="P25" style:family="paragraph" style:parent-style-name="M.T._20_Lesson_20_title_20_-_20_invisible" style:master-page-name="First_20_Page">
      <style:paragraph-properties style:page-number="auto"/>
    </style:style>
    <style:style style:name="P26" style:family="paragraph" style:parent-style-name="M.T._20_Coloring_20_Page_20_-_20_Truth" style:master-page-name="Coloring_20_Page">
      <style:paragraph-properties style:page-number="auto"/>
    </style:style>
    <style:style style:name="P27" style:family="paragraph" style:parent-style-name="M.T._20_Coloring_20_Page_20_-_20_Truth">
      <style:paragraph-properties fo:break-before="column"/>
    </style:style>
    <style:style style:name="P28" style:family="paragraph" style:parent-style-name="Body_20_Bullet_20_-_20_Checkmark">
      <style:text-properties officeooo:paragraph-rsid="00b14bd3"/>
    </style:style>
    <style:style style:name="P29" style:family="paragraph" style:parent-style-name="Body_20_Bullet_20_-_20_Checkmark" style:master-page-name="">
      <style:paragraph-properties style:page-number="auto" fo:keep-with-next="always"/>
      <style:text-properties officeooo:paragraph-rsid="00b14bd3"/>
    </style:style>
    <style:style style:name="P30" style:family="paragraph" style:parent-style-name="Body_20_Bullet_20_-_20_Checkmark_20_-_20_No_20_follow">
      <style:text-properties officeooo:paragraph-rsid="00b14bd3"/>
    </style:style>
    <style:style style:name="P31" style:family="paragraph" style:parent-style-name="Body_20_Numbered_20_List">
      <style:text-properties officeooo:paragraph-rsid="00b14bd3"/>
    </style:style>
    <style:style style:name="P32" style:family="paragraph" style:parent-style-name="M.T._20_Text_20_-_20_Checkmark_20_bullet">
      <style:text-properties officeooo:paragraph-rsid="00b14bd3"/>
    </style:style>
    <style:style style:name="P33" style:family="paragraph" style:parent-style-name="M.T._20_Text_20_-_20_Diamond_20_bullet">
      <style:text-properties officeooo:paragraph-rsid="00b14bd3"/>
    </style:style>
    <style:style style:name="P34" style:family="paragraph" style:parent-style-name="M.T._20_Text_20_-_20_Numbered_20_List_20_Inset" style:list-style-name="L1">
      <style:text-properties officeooo:paragraph-rsid="00b14bd3"/>
    </style:style>
    <style:style style:name="P35" style:family="paragraph" style:parent-style-name="M.T._20_Text_20_-_20_Numbered_20_List_20_Inset" style:list-style-name="L2">
      <style:text-properties officeooo:paragraph-rsid="00b14bd3"/>
    </style:style>
    <style:style style:name="P36" style:family="paragraph" style:parent-style-name="Table_20_Bullet_20_-_20_Checkmark" style:list-style-name="Table_20_Bullet_20_-_20_checkmark">
      <style:text-properties officeooo:paragraph-rsid="00950dbd"/>
    </style:style>
    <style:style style:name="P37" style:family="paragraph" style:parent-style-name="Table_20_Bullet_20_-_20_Checkmark" style:list-style-name="Table_20_Bullet_20_-_20_checkmark">
      <style:text-properties officeooo:rsid="01301848" officeooo:paragraph-rsid="00950dbd"/>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08e6630"/>
    </style:style>
    <style:style style:name="T4" style:family="text">
      <style:text-properties officeooo:rsid="00913602"/>
    </style:style>
    <style:style style:name="T5" style:family="text">
      <style:text-properties officeooo:rsid="0094c047"/>
    </style:style>
    <style:style style:name="T6" style:family="text">
      <style:text-properties officeooo:rsid="001dbf9a"/>
    </style:style>
    <style:style style:name="T7" style:family="text">
      <style:text-properties officeooo:rsid="00a53627"/>
    </style:style>
    <style:style style:name="T8" style:family="text">
      <style:text-properties officeooo:rsid="01d657ac"/>
    </style:style>
    <style:style style:name="T9" style:family="text">
      <style:text-properties officeooo:rsid="01355e7d"/>
    </style:style>
    <style:style style:name="T10" style:family="text">
      <style:text-properties fo:language="en" fo:country="US" style:language-asian="en" style:country-asian="US" style:language-complex="hi" style:country-complex="IN"/>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Tic-Tac-Toe_20_graphic">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5" style:family="graphic" style:parent-style-name="Bible_5f_Story_5f_Picture">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Bible_5f_Story_5f_Picture">
      <style:graphic-properties style:mirror="none" fo:clip="rect(0cm, 0cm, 0cm, 0cm)" draw:luminance="0%" draw:contrast="0%" draw:red="0%" draw:green="0%" draw:blue="0%" draw:gamma="100%" draw:color-inversion="false" draw:image-opacity="100%" draw:color-mode="standard"/>
    </style:style>
    <style:style style:name="fr7"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25" text:outline-level="1"><draw:frame draw:style-name="fr7" draw:name="Image4" text:anchor-type="char" svg:x="0cm" svg:y="0.041cm" svg:width="2.731cm" svg:height="2.731cm" draw:z-index="0"><draw:image xlink:href="Pictures/10000001000000D8000000D8D0D0BFE1DF35965B.png" xlink:type="simple" xlink:show="embed" xlink:actuate="onLoad" draw:mime-type="image/png"/></draw:frame>A Woman Wipes Jesus' Feet</text:h>
        </text:list-item>
      </text:list>
      <text:p text:style-name="M.T._20_Lesson_20_Title">A Woman Wipes Jesus' Feet</text:p>
      <text:p text:style-name="English_20_Translation_20_-_20_Lesson_20_title">A Woman Wipes Jesus' Feet</text:p>
      <text:p text:style-name="M.T._20_Text_20_-_20_Lesson_20_Title_20_Scrip_20_Reference">Luke <text:s/>7:36-50</text:p>
      <text:p text:style-name="Part_20_Heading">Lesson Overview</text:p>
      <table:table table:name="Title&amp;Truth" table:style-name="Title_26_Truth">
        <table:table-column table:style-name="Title_26_Truth.A"/>
        <table:table-column table:style-name="Title_26_Truth.B"/>
        <table:table-row>
          <table:table-cell table:style-name="Title_26_Truth.A1" office:value-type="string">
            <text:p text:style-name="Table_20_Left_20_headings">Today’s Truth</text:p>
          </table:table-cell>
          <table:table-cell table:style-name="Title_26_Truth.B1" office:value-type="string">
            <text:p text:style-name="M.T._20_Text">Jesus forgives our sins.</text:p>
            <text:p text:style-name="English_20_translation">Jesus forgives our sins.</text:p>
          </table:table-cell>
        </table:table-row>
        <table:table-row>
          <table:table-cell table:style-name="Title_26_Truth.A1" office:value-type="string">
            <text:p text:style-name="Table_20_Left_20_headings">Objective</text:p>
          </table:table-cell>
          <table:table-cell table:style-name="Title_26_Truth.B2" office:value-type="string">
            <text:p text:style-name="Body_20_Tight_20_lines"><text:span text:style-name="Body_20_Emphasized_20_-_20_Small">KNOW: <text:s/></text:span>The children will know that all of our sins can be forgiven.</text:p>
            <text:p text:style-name="Body_20_Tight_20_lines"><text:span text:style-name="Body_20_Emphasized_20_-_20_Small">DO:</text:span> <text:s/>The children will think of different ways to show love to Jesus, and then do them.</text:p>
          </table:table-cell>
        </table:table-row>
        <table:table-row>
          <table:table-cell table:style-name="Title_26_Truth.A1" office:value-type="string">
            <text:p text:style-name="Table_20_Left_20_headings">Materials</text:p>
          </table:table-cell>
          <table:table-cell table:style-name="Title_26_Truth.B3" office:value-type="string">
            <text:list text:style-name="Table_20_Bullet_20_-_20_checkmark">
              <text:list-item>
                <text:p text:style-name="P37">Quarter <text:s/><text:span text:style-name="T6">2</text:span> <text:s/>Picture book, Bible, chalk</text:p>
              </text:list-item>
              <text:list-item>
                <text:p text:style-name="P36">Copies of the memory verse coloring page for the children to take home.</text:p>
              </text:list-item>
              <text:list-item>
                <text:p text:style-name="Table_20_Bullet_20_-_20_Checkmark">Tic Tac Toe/Long Line – You can use chalk and blackboard, paper and pen, or a stick and dirt</text:p>
              </text:list-item>
            </text:list>
          </table:table-cell>
        </table:table-row>
        <table:table-row>
          <table:table-cell table:style-name="Title_26_Truth.A1" office:value-type="string">
            <text:p text:style-name="Table_20_Left_20_headings">Memory Verse</text:p>
          </table:table-cell>
          <table:table-cell table:style-name="Title_26_Truth.B3" office:value-type="string">
            <text:p text:style-name="P18">Luke 7:48 Jesus said to her, “Your sins are forgiven.”</text:p>
            <text:p text:style-name="P18">Luke 7:50 Jesus said to the woman, “Your faith has saved you; go in peace.”</text:p>
            <text:p text:style-name="P17">Luke 7:48 Jesus said to her, “Your sins are forgiven.”</text:p>
            <text:p text:style-name="P17">Luke 7:50 Jesus said to the woman, “Your faith has saved you; go in peace.”</text:p>
          </table:table-cell>
        </table:table-row>
        <table:table-row>
          <table:table-cell table:style-name="Title_26_Truth.A1" office:value-type="string">
            <text:p text:style-name="Table_20_Left_20_headings">Homework</text:p>
          </table:table-cell>
          <table:table-cell table:style-name="Title_26_Truth.B3" office:value-type="string">
            <text:p text:style-name="M.T._20_Text">This week, first be sure you have put your faith in Jesus to cancel your debt of sin. Then, think of ways you can show your love and appreciation for Jesus and what he has done for you, and then do them.</text:p>
            <text:p text:style-name="English_20_translation">This week, first be sure you have put your faith in Jesus to cancel your debt of sin. Then, think of ways you can show your love and appreciation for Jesus and what he has done for you, and then do them.</text:p>
          </table:table-cell>
        </table:table-row>
      </table:table>
      <text:p text:style-name="Body_20_-_20_Small_20_Spacer"/>
      <text:p text:style-name="Part_20_Heading">Detailed Lesson Plan</text:p>
      <text:section text:style-name="Sect1" text:name="L-21 Detail Plan">
        <text:p text:style-name="P16">Song</text:p>
        <text:p text:style-name="P14">Opening</text:p>
        <text:p text:style-name="P2">Welcome</text:p>
        <text:list xml:id="list3584943344" text:style-name="Bullet_20_-_20_checkmark">
          <text:list-item>
            <text:p text:style-name="P28">Be sure the children know you are happy to see them!</text:p>
          </text:list-item>
          <text:list-item>
            <text:p text:style-name="P28">Introduce yourself and your helpers.</text:p>
          </text:list-item>
        </text:list>
        <text:p text:style-name="P2">Sharing Time</text:p>
        <text:list xml:id="list161000516027336" text:continue-numbering="true" text:style-name="Bullet_20_-_20_checkmark">
          <text:list-item>
            <text:p text:style-name="P32">Does anyone remember a truth from the first five lessons? <text:s/>( <text:s/><text:span text:style-name="T4">1. <text:s/></text:span>God hears our prayers. <text:s/><text:span text:style-name="T4">2. <text:s/></text:span>Nothing is impossible with God. <text:s/><text:span text:style-name="T4">3. <text:s/></text:span>God ALWAYS keeps His promises. <text:s/><text:span text:style-name="T4">4. <text:s/></text:span>God’s way is the best way to grow. <text:s/><text:span text:style-name="T4">5. <text:s/></text:span>God expects true repentance. <text:s/>)</text:p>
          </text:list-item>
        </text:list>
        <text:p text:style-name="P1">Does anyone remember a truth from the first five lessons? <text:s/>( <text:s/>1. <text:s/>God hears our prayers. <text:s/>2. <text:s/>Nothing is impossible with God. <text:s/>3. <text:s/>God ALWAYS keeps His promises. <text:s/>4. <text:s/>God’s way is the best way to grow. <text:s/>5. <text:s/>God expects true repentance. <text:s/>)</text:p>
        <text:list xml:id="list161000321487119" text:continue-numbering="true" text:style-name="Bullet_20_-_20_checkmark">
          <text:list-item>
            <text:p text:style-name="P32">Does anyone remember a truth from these most recent lessons?</text:p>
          </text:list-item>
        </text:list>
        <text:p text:style-name="P1">Does anyone remember a truth from these most recent lessons?</text:p>
        <text:p text:style-name="P7">(Give children time to share.)</text:p>
        <text:list xml:id="list161001654505657" text:continue-numbering="true" text:style-name="Bullet_20_-_20_checkmark">
          <text:list-item>
            <text:p text:style-name="P32"><text:soft-page-break/>It is important to remember all of these truths. They help us have a better relationship with Jesus. Make sure that you remember all of the truths, and that you are always putting them to practice.</text:p>
          </text:list-item>
        </text:list>
        <text:p text:style-name="P1">It is important to remember all of these truths. They help us have a better relationship with Jesus. Make sure that you remember all of the truths, and that you are always putting them to practice.</text:p>
        <text:p text:style-name="P2">Prayer</text:p>
        <text:list xml:id="list161001214285743" text:continue-numbering="true" text:style-name="Bullet_20_-_20_checkmark">
          <text:list-item>
            <text:p text:style-name="P28">Let the children share praises and prayer requests.</text:p>
          </text:list-item>
          <text:list-item>
            <text:p text:style-name="P30">Keep a record of what the children are sharing so you can remember to thank God together for answered prayers.</text:p>
          </text:list-item>
          <text:list-item>
            <text:p text:style-name="P30">Spend time praying together. <text:s/>Let children pray out loud if they volunteer. <text:s/>Do not force anyone to pray out loud.</text:p>
          </text:list-item>
        </text:list>
        <text:p text:style-name="P16">Song</text:p>
        <text:p text:style-name="P14">Words to Discuss</text:p>
        <text:list xml:id="list161000916520214" text:continue-numbering="true" text:style-name="Bullet_20_-_20_checkmark">
          <text:list-item>
            <text:p text:style-name="P28">On the blackboard, write the “Words to Discuss” from the list below.</text:p>
          </text:list-item>
          <text:list-item>
            <text:p text:style-name="P32">Let's discuss some words to help us better understand the Bible story for today.</text:p>
          </text:list-item>
        </text:list>
        <text:p text:style-name="P1">Let's discuss some words to help us better understand the Bible story for today.</text:p>
        <text:list xml:id="list1072898885" text:style-name="Bullet_20_-_20_Diamond">
          <text:list-item>
            <text:p text:style-name="P33"><text:span text:style-name="Body_20_Emphasized_20_-_20_Small">Pharisee: <text:s/></text:span>Religious teacher of Jewish Law.</text:p>
          </text:list-item>
        </text:list>
        <text:p text:style-name="P10">Pharisee: <text:s/>Religious teacher of Jewish Law.</text:p>
        <text:list xml:id="list161000371933295" text:continue-numbering="true" text:style-name="Bullet_20_-_20_Diamond">
          <text:list-item>
            <text:p text:style-name="P33"><text:span text:style-name="Body_20_Emphasized_20_-_20_Small">Perfume: <text:s/></text:span>Oil from flowers and spices that make a nice smell.</text:p>
          </text:list-item>
        </text:list>
        <text:p text:style-name="P10">Perfume: <text:s/>Oil from flowers and spices that make a nice smell.</text:p>
        <text:list xml:id="list161000194459681" text:continue-numbering="true" text:style-name="Bullet_20_-_20_Diamond">
          <text:list-item>
            <text:p text:style-name="P33"><text:span text:style-name="Body_20_Emphasized_20_-_20_Small">Prophet: <text:s/></text:span>A man or woman God uses as His messenger.</text:p>
          </text:list-item>
        </text:list>
        <text:p text:style-name="P10">Prophet: <text:s/>A man or woman God uses as His messenger.</text:p>
        <text:list xml:id="list161000366632924" text:continue-numbering="true" text:style-name="Bullet_20_-_20_Diamond">
          <text:list-item>
            <text:p text:style-name="P33"><text:span text:style-name="Body_20_Emphasized_20_-_20_Small">Debt: <text:s/></text:span>Something like money that is owed or due.</text:p>
          </text:list-item>
        </text:list>
        <text:p text:style-name="P10">Debt: <text:s/>Something like money that is owed or due.</text:p>
        <text:list xml:id="list161000638100908" text:continue-numbering="true" text:style-name="Bullet_20_-_20_Diamond">
          <text:list-item>
            <text:p text:style-name="P33"><text:span text:style-name="Body_20_Emphasized_20_-_20_Small">Faith: <text:s/></text:span>Complete trust or confidence that we put in something or someone.</text:p>
          </text:list-item>
        </text:list>
        <text:p text:style-name="P10">Faith: <text:s/>Complete trust or confidence that we put in something or someone.</text:p>
        <text:p text:style-name="P16">Song</text:p>
        <text:p text:style-name="P14">Bible Story / Lesson</text:p>
        <text:p text:style-name="P12">Have you or your family ever owed anyone something?</text:p>
        <text:p text:style-name="P9">Have you or your family ever owed anyone something?</text:p>
        <text:p text:style-name="P12">This is called a debt. What kind of debt did you have? How did it make you feel when you had that debt? How did you feel when that debt was paid off?</text:p>
        <text:p text:style-name="P9">This is called a debt. What kind of debt did you have? How did it make you feel when you had that debt? How did you feel when that debt was paid off?</text:p>
        <text:p text:style-name="P12">What would you think if someone came along and took care of every large debt that you had? Would you be happy? Would you tell other people what had happened? Would you celebrate?</text:p>
        <text:p text:style-name="P9">What would you think if someone came along and took care of every large debt that you had? Would you be happy? Would you tell other people what had happened? Would you celebrate?</text:p>
        <text:p text:style-name="P12">Today's story in the Bible is about how one woman's very large debt of sin was forgiven, and how she showed her gratitude for that gift.</text:p>
        <text:p text:style-name="P9">Today's story in the Bible is about how one woman's very large debt of sin was forgiven, and how she showed her gratitude for that gift.</text:p>
        <text:p text:style-name="P2"><text:soft-page-break/>Introduce Truth</text:p>
        <text:p text:style-name="P5">Our truth for today is: <text:s/>Jesus forgives our sins.</text:p>
        <text:p text:style-name="P4">Our truth for today is: <text:s/>Jesus forgives our sins.</text:p>
        <text:p text:style-name="P5">This reminds me of a true story from the Bible.</text:p>
        <text:p text:style-name="P4">This reminds me of a true story from the Bible.</text:p>
        <text:p text:style-name="P21">Bible Story: <text:s/>Luke <text:s/>7:36-50</text:p>
        <text:p text:style-name="P11"><draw:frame draw:style-name="fr1" draw:name="Frame2" text:anchor-type="paragraph" svg:x="-0.046cm" svg:y="0.247cm" svg:width="3.5cm" draw:z-index="2"><draw:text-box fo:min-height="3.062cm"><text:p text:style-name="P20">Picture <text:s/>21–1</text:p><text:p text:style-name="P19"><draw:frame draw:style-name="fr5" draw:name="Image5" text:anchor-type="as-char" svg:width="3.281cm" svg:height="2.379cm" draw:z-index="8"><draw:image xlink:href="Pictures/100000000000015F000000FE9287CFE1759C7351.jpg" xlink:type="simple" xlink:show="embed" xlink:actuate="onLoad" draw:mime-type="image/jpeg"/></draw:frame></text:p></draw:text-box></draw:frame>Luke 7:36-38 Now one of the Pharisees invited Jesus to have dinner with him, so he went to the Pharisee’s house and reclined at the table. When a woman who had lived a sinful life in that town learned that Jesus was eating at the Pharisee’s house, she brought an alabaster jar of perfume, and as she stood behind him at his feet weeping, she began to wet his feet with her tears. Then she wiped them with her hair, kissed them and poured perfume on them.</text:p>
        <text:p text:style-name="P11">Luke 7:39 When the Pharisee who had invited him saw this, he said to himself, “If this man were a prophet, he would know who is touching him and what kind of woman she is — that she is a sinner.”</text:p>
        <text:p text:style-name="P11">Luke 7:40 Jesus answered him, “Simon, I have something to tell you.” “Tell me, teacher,” he said.</text:p>
        <text:p text:style-name="P8">Luke 7:36-38 Now one of the Pharisees invited Jesus to have dinner with him, so he went to the Pharisee’s house and reclined at the table. When a woman who had lived a sinful life in that town learned that Jesus was eating at the Pharisee’s house, she brought an alabaster jar of perfume, and as she stood behind him at his feet weeping, she began to wet his feet with her tears. Then she wiped them with her hair, kissed them and poured perfume on them.</text:p>
        <text:p text:style-name="P8">Luke 7:39 When the Pharisee who had invited him saw this, he said to himself, “If this man were a prophet, he would know who is touching him and what kind of woman she is — that she is a sinner.”</text:p>
        <text:p text:style-name="P8">Luke 7:40 Jesus answered him, “Simon, I have something to tell you.” “Tell me, teacher,” he said.</text:p>
        <text:p text:style-name="P11"><draw:frame draw:style-name="fr1" draw:name="Frame1" text:anchor-type="paragraph" svg:x="-0.046cm" svg:y="0.009cm" svg:width="3.5cm" draw:z-index="3"><draw:text-box fo:min-height="3.062cm"><text:p text:style-name="P20">Picture <text:s/>21–2</text:p><text:p text:style-name="P19"><draw:frame draw:style-name="fr6" draw:name="Image7" text:anchor-type="as-char" svg:width="3.281cm" svg:height="2.379cm" draw:z-index="9"><draw:image xlink:href="Pictures/100000000000015F000000FE1EE343A04BB9903A.jpg" xlink:type="simple" xlink:show="embed" xlink:actuate="onLoad" draw:mime-type="image/jpeg"/></draw:frame></text:p></draw:text-box></draw:frame>Luke 7:41-42 “Two men owed money to a certain moneylender. One owed him five hundred denarii, and the other fifty. Neither of them had the money to pay him back, so he canceled the debts of both. Now which of them will love him more?”</text:p>
        <text:p text:style-name="P11">Luke 7:43 Simon replied, “I suppose the one who had the bigger debt canceled.” “You have judged correctly,” Jesus said.</text:p>
        <text:p text:style-name="P8">Luke 7:41-42 “Two men owed money to a certain moneylender. One owed him five hundred denarii, and the other fifty. Neither of them had the money to pay him back, so he canceled the debts of both. Now which of them will love him more?”</text:p>
        <text:p text:style-name="P8">Luke 7:43 Simon replied, “I suppose the one who had the bigger debt canceled.” “You have judged correctly,” Jesus said.</text:p>
        <text:p text:style-name="P11"><draw:frame draw:style-name="fr1" draw:name="Frame3" text:anchor-type="paragraph" svg:x="-0.046cm" svg:y="0.009cm" svg:width="3.5cm" draw:z-index="4"><draw:text-box fo:min-height="3.062cm"><text:p text:style-name="P20">Picture <text:s/>21–3</text:p><text:p text:style-name="P19"><draw:frame draw:style-name="fr5" draw:name="Image9" text:anchor-type="as-char" svg:width="3.281cm" svg:height="2.379cm" draw:z-index="10"><draw:image xlink:href="Pictures/100000000000015F000000FE42FF8132115767A9.jpg" xlink:type="simple" xlink:show="embed" xlink:actuate="onLoad" draw:mime-type="image/jpeg"/></draw:frame></text:p></draw:text-box></draw:frame>Luke 7:44-47 Then he turned toward the woman and said to Simon, “Do you see this woman? I came into your house. You did not give me any water for my feet, but she wet my feet with her tears and wiped them with her hair. You did not give me a kiss, but this woman, from the time I entered, has not stopped kissing my feet. You did not put oil on my head, but she has poured perfume on my feet. Therefore, I tell you, her many sins have been forgiven — for she loved much. But he who has been forgiven little loves little.”</text:p>
        <text:p text:style-name="P8">Luke 7:44-47 Then he turned toward the woman and said to Simon, “Do you see this woman? I came into your house. You did not give me any water for my feet, but she wet my feet with her tears and wiped them with her hair. You did not give me a kiss, but this woman, from the time I entered, has not stopped kissing my feet. You did not put oil on my head, but she has poured perfume on my feet. Therefore, I tell you, her many sins have been forgiven — for she loved much. But he who has been forgiven little loves little.”</text:p>
        <text:p text:style-name="P11"><draw:frame draw:style-name="fr1" draw:name="Frame4" text:anchor-type="paragraph" svg:x="-0.046cm" svg:y="0.009cm" svg:width="3.5cm" draw:z-index="5"><draw:text-box fo:min-height="3.062cm"><text:p text:style-name="P20">Picture <text:s/>21–4</text:p><text:p text:style-name="P19"><draw:frame draw:style-name="fr5" draw:name="Image10" text:anchor-type="as-char" svg:width="3.281cm" svg:height="2.379cm" draw:z-index="11"><draw:image xlink:href="Pictures/100000000000015F000000FE8D4D30C62E872F76.jpg" xlink:type="simple" xlink:show="embed" xlink:actuate="onLoad" draw:mime-type="image/jpeg"/></draw:frame></text:p></draw:text-box></draw:frame><text:soft-page-break/>Luke 7:48 Then Jesus said to her, “Your sins are forgiven.”</text:p>
        <text:p text:style-name="P11">Luke 7:49 The other guests began to say among themselves, “Who is this who even forgives sins?”</text:p>
        <text:p text:style-name="P11">Luke 7:50 Jesus said to the woman, “Your faith has saved you; go in peace.”</text:p>
        <text:p text:style-name="P8">Luke 7:48 Then Jesus said to her, “Your sins are forgiven.”</text:p>
        <text:p text:style-name="P8">Luke 7:49 The other guests began to say among themselves, “Who is this who even forgives sins?”</text:p>
        <text:p text:style-name="P8">Luke 7:50 Jesus said to the woman, “Your faith has saved you; go in peace.”</text:p>
        <text:p text:style-name="P2">Application</text:p>
        <text:p text:style-name="P12">We have a certain kind of debt to pay because of sin. Remember, sin is anything we think, say, or do that displeases God. Sin is what separates us from God. It is a debt we have with God that must be paid. Jesus came to earth to live, to die, and then to come alive again. He lived a perfect life with no sin. Then, he paid our debt of sin with his death on the cross. Finally, he proved that he has the power to forgive sin and set us free from death and judgment by rising from the dead.</text:p>
        <text:p text:style-name="P9">We have a certain kind of debt to pay because of sin. Remember, sin is anything we think, say, or do that displeases God. Sin is what separates us from God. It is a debt we have with God that must be paid. Jesus came to earth to live, to die, and then to come alive again. He lived a perfect life with no sin. Then, he paid our debt of sin with his death on the cross. Finally, he proved that he has the power to forgive sin and set us free from death and judgment by rising from the dead.</text:p>
        <text:p text:style-name="P12">Jesus is the only one who can pay the debt of our sin against God. Jesus cancelled our debt with his death, but we have to accept his payment for us. In our story today, the woman put her faith in Jesus. She knew Jesus was able to pay her debt. Jesus told her, “your faith has saved you.” Her faith in Jesus saved her from having to pay her debt of sin herself, and set her free. If we do what the woman did by putting our trust and confidence in Jesus, he will pay our debt, too, no matter how much sin we have.</text:p>
        <text:p text:style-name="P9">Jesus is the only one who can pay the debt of our sin against God. Jesus cancelled our debt with his death, but we have to accept his payment for us. In our story today, the woman put her faith in Jesus. She knew Jesus was able to pay her debt. Jesus told her, “your faith has saved you.” Her faith in Jesus saved her from having to pay her debt of sin herself, and set her free. If we do what the woman did by putting our trust and confidence in Jesus, he will pay our debt, too, no matter how much sin we have.</text:p>
        <text:p text:style-name="P12">Remember what Jesus said in our story? Those who are forgiven much, show much love and thankfulness to him. How much do you love Jesus? How are you showing your thankfulness to him?</text:p>
        <text:p text:style-name="P9">Remember what Jesus said in our story? Those who are forgiven much, show much love and thankfulness to him. How much do you love Jesus? How are you showing your thankfulness to him?</text:p>
        <text:p text:style-name="P5">Jesus forgives our sins.</text:p>
        <text:p text:style-name="P4">Jesus forgives our sins.</text:p>
        <text:p text:style-name="P3">Homework</text:p>
        <text:p text:style-name="P12">This week, first be sure you have put your faith in Jesus to cancel your debt of sin. Then, think of ways you can show your love and appreciation for Jesus and what he has done for you, and then do them.</text:p>
        <text:p text:style-name="P9">This week, first be sure you have put your faith in Jesus to cancel your debt of sin. Then, think of ways you can show your love and appreciation for Jesus and what he has done for you, and then do them.</text:p>
        <text:p text:style-name="P16">Prayer / Song</text:p>
        <text:p text:style-name="P14">Review Game</text:p>
        <text:p text:style-name="P2">Tic-Tac-Toe/Long Line</text:p>
        <text:p text:style-name="P3">Materials</text:p>
        <text:list xml:id="list161001729087148" text:continue-list="list161000916520214" text:style-name="Bullet_20_-_20_checkmark">
          <text:list-item>
            <text:p text:style-name="P28"><text:soft-page-break/>Draw on the blackboard, on the dirt, or on a paper a game board of two horizontal lines crossing two vertical lines.<draw:frame draw:style-name="fr4" draw:name="Image1" text:anchor-type="char" svg:y="-0.499cm" svg:width="3cm" svg:height="3cm" draw:z-index="7"><draw:image xlink:href="Pictures/10000000000000AF000000B0A5358A6F78AE97EB.jpg" xlink:type="simple" xlink:show="embed" xlink:actuate="onLoad" draw:mime-type="image/jpeg"/></draw:frame></text:p>
          </text:list-item>
          <text:list-item>
            <text:p text:style-name="P30">One team marks the X's, one team marks the O's using chalk, marker, pen, or a stick.</text:p>
          </text:list-item>
        </text:list>
        <text:p text:style-name="P3">How to Play</text:p>
        <text:list xml:id="list161001238617329" text:continue-numbering="true" text:style-name="Bullet_20_-_20_checkmark">
          <text:list-item>
            <text:p text:style-name="P28">Divide the class into 2 teams.</text:p>
          </text:list-item>
          <text:list-item>
            <text:p text:style-name="P30">The first team tries to answer the first question. <text:s/>The teacher can use this time to explain what the children do not seem to understand.</text:p>
          </text:list-item>
          <text:list-item>
            <text:p text:style-name="P30">The child on the team that answers the question correctly comes to the front and marks and X (for team 1) or an O (for team 2) in one of the spaces on the Tic-Tac-Toe board.</text:p>
          </text:list-item>
          <text:list-item>
            <text:p text:style-name="P30">The first team to get three X's or O's in a row in any direction wins.</text:p>
          </text:list-item>
          <text:list-item>
            <text:p text:style-name="P30">Be sure to clap for both sides. <text:s/>No name-calling. <text:s/>Encourage good sportsmanship.</text:p>
          </text:list-item>
        </text:list>
        <text:p text:style-name="P3">Questions for Review Game</text:p>
        <text:list xml:id="list4150238875" text:style-name="L1">
          <text:list-item>
            <text:p text:style-name="P34">Who invited Jesus for a meal? (A Pharisee named Simon)</text:p>
          </text:list-item>
        </text:list>
        <text:p text:style-name="P1">Who invited Jesus for a meal? (A Pharisee named Simon)</text:p>
        <text:list xml:id="list161001423714200" text:continue-numbering="true" text:style-name="L1">
          <text:list-item>
            <text:p text:style-name="P34">What is a Pharisee? (A religious teacher of Jewish Law)</text:p>
          </text:list-item>
        </text:list>
        <text:p text:style-name="P1">What is a Pharisee? (A religious teacher of Jewish Law)</text:p>
        <text:list xml:id="list161000795680108" text:continue-numbering="true" text:style-name="L1">
          <text:list-item>
            <text:p text:style-name="P34">Who came in while they were eating? (A sinful woman)</text:p>
          </text:list-item>
        </text:list>
        <text:p text:style-name="P1">Who came in while they were eating? (A sinful woman)</text:p>
        <text:list xml:id="list161001947182767" text:continue-numbering="true" text:style-name="L1">
          <text:list-item>
            <text:p text:style-name="P34">What did she do? (She washed Jesus' feet using her tears and hair, and then she anointed his feet with a rare perfume.)</text:p>
          </text:list-item>
        </text:list>
        <text:p text:style-name="P1">What did she do? (She washed Jesus' feet using her tears and hair, and then she anointed his feet with a rare perfume.)</text:p>
        <text:list xml:id="list161000936137183" text:continue-numbering="true" text:style-name="L1">
          <text:list-item>
            <text:p text:style-name="P34">What were the Pharisees thinking? (If Jesus was truly a prophet, then he would know that the woman touching him was sinful, and he would not allow it.)</text:p>
          </text:list-item>
        </text:list>
        <text:p text:style-name="P1">What were the Pharisees thinking? (If Jesus was truly a prophet, then he would know that the woman touching him was sinful, and he would not allow it.)</text:p>
        <text:list xml:id="list161000229475495" text:continue-numbering="true" text:style-name="L1">
          <text:list-item>
            <text:p text:style-name="P34">Jesus knew what what the Pharisees were thinking. How could Jesus know what they were thinking? (Jesus is God; He knows everything.)</text:p>
          </text:list-item>
        </text:list>
        <text:p text:style-name="P1">Jesus knew what what the Pharisees were thinking. How could Jesus know what they were thinking? (Jesus is God; He knows everything.)</text:p>
        <text:list xml:id="list161001405997333" text:continue-numbering="true" text:style-name="L1">
          <text:list-item>
            <text:p text:style-name="P34">Jesus told a story about a man who loaned two men money-five hundred pieces of silver to one, and fifty pieces to the other. Then what happened? (The man who loaned the money to both men canceled their debts.)</text:p>
          </text:list-item>
        </text:list>
        <text:p text:style-name="P1">Jesus told a story about a man who loaned two men money-five hundred pieces of silver to one, and fifty pieces to the other. Then what happened? (The man who loaned the money to both men canceled their debts.)</text:p>
        <text:list xml:id="list161000228402358" text:continue-numbering="true" text:style-name="L1">
          <text:list-item>
            <text:p text:style-name="P34">According to the story Jesus told, who shows love the most? (Those who are forgiven love the most.)</text:p>
          </text:list-item>
        </text:list>
        <text:p text:style-name="P1">According to the story Jesus told, who shows love the most? (Those who are forgiven love the most.)</text:p>
        <text:list xml:id="list161000393399899" text:continue-numbering="true" text:style-name="L1">
          <text:list-item>
            <text:p text:style-name="P34">Why did the woman do those things to Jesus? (She loved him very much, and she was showing her gratitude.)</text:p>
          </text:list-item>
        </text:list>
        <text:p text:style-name="P1">Why did the woman do those things to Jesus? (She loved him very much, and she was showing her gratitude.)</text:p>
        <text:list xml:id="list161001381300133" text:continue-numbering="true" text:style-name="L1">
          <text:list-item>
            <text:p text:style-name="P34">What did Jesus say had saved the woman? (Her faith had saved her.)</text:p>
          </text:list-item>
        </text:list>
        <text:p text:style-name="P1">What did Jesus say had saved the woman? (Her faith had saved her.)</text:p>
        <text:list xml:id="list161000574270321" text:continue-numbering="true" text:style-name="L1">
          <text:list-item>
            <text:p text:style-name="P34">What is faith? (Having complete trust or confidence in something or someone)</text:p>
          </text:list-item>
        </text:list>
        <text:p text:style-name="P1">What is faith? (Having complete trust or confidence in something or someone)</text:p>
        <text:list xml:id="list161001425025336" text:continue-numbering="true" text:style-name="L1">
          <text:list-item>
            <text:p text:style-name="P34"><text:soft-page-break/>How does our debt of sin get forgiven? (By putting our complete trust or confidence in Jesus)</text:p>
          </text:list-item>
        </text:list>
        <text:p text:style-name="P1">How does our debt of sin get forgiven? (By putting our complete trust or confidence in Jesus)</text:p>
        <text:p text:style-name="P16">Song</text:p>
        <text:p text:style-name="P14">Memory Verse</text:p>
        <text:p text:style-name="P3">Materials and Preparations</text:p>
        <text:list xml:id="list161002192577547" text:continue-list="list161001238617329" text:style-name="Bullet_20_-_20_checkmark">
          <text:list-item>
            <text:p text:style-name="P28">Put a bookmark in <text:s/>Luke 7:48 <text:s/>and <text:s/>Luke 7:50</text:p>
          </text:list-item>
          <text:list-item>
            <text:p text:style-name="P28">Write memory verse on the blackboard.</text:p>
          </text:list-item>
        </text:list>
        <text:p text:style-name="P13">Luke 7:48 Jesus said to her, “Your sins are forgiven.”</text:p>
        <text:p text:style-name="P13">Luke 7:50 Jesus said to the woman, “Your faith has saved you; go in peace.”</text:p>
        <text:p text:style-name="P1">Luke 7:48 Jesus said to her, “Your sins are forgiven.”</text:p>
        <text:p text:style-name="P1">Luke 7:50 Jesus said to the woman, “Your faith has saved you; go in peace.”</text:p>
        <text:p text:style-name="P2">Teach and Explain</text:p>
        <text:p text:style-name="P12">Our memory verse is in the Gospel of Luke. <text:s/>That is in the New Testament, a part of the Bible.</text:p>
        <text:p text:style-name="P9">Our memory verse is in the Gospel of Luke. <text:s/>That is in the New Testament, a part of the Bible.</text:p>
        <text:list xml:id="list3473053297" text:style-name="WWNum1">
          <text:list-item text:start-value="1">
            <text:p text:style-name="P31">Read the verse from your Bible.</text:p>
          </text:list-item>
          <text:list-item>
            <text:p text:style-name="P31">Read the verse by yourself as you point to the words.</text:p>
          </text:list-item>
          <text:list-item>
            <text:p text:style-name="P31">Read the verse with the children as you point to the words.</text:p>
          </text:list-item>
          <text:list-item>
            <text:p text:style-name="P31">Explain the verse:</text:p>
          </text:list-item>
        </text:list>
        <text:list xml:id="list161001204576923" text:continue-list="list161002192577547" text:style-name="Bullet_20_-_20_checkmark">
          <text:list-item>
            <text:p text:style-name="P32">Our memory verse comes from today’s Bible story.</text:p>
          </text:list-item>
        </text:list>
        <text:p text:style-name="P1">Our memory verse comes from today’s Bible story.</text:p>
        <text:list xml:id="list161002074256189" text:continue-numbering="true" text:style-name="Bullet_20_-_20_checkmark">
          <text:list-item>
            <text:p text:style-name="P28">As you read the verse, circle the words shown below. <text:s/>Explain each of these words.</text:p>
          </text:list-item>
        </text:list>
        <text:list xml:id="list161000166485122" text:continue-list="list161000638100908" text:style-name="Bullet_20_-_20_Diamond">
          <text:list-item>
            <text:p text:style-name="P33"><text:span text:style-name="Body_20_Emphasized_20_-_20_Small">Sin: <text:s/></text:span>All the things we think, say and do that displease God. <text:s/>Sin leaves us with a debt in our relationship with God. Everyone has sinned. <text:s/></text:p>
          </text:list-item>
        </text:list>
        <text:p text:style-name="P10">Sin: <text:s/>All the things we think, say and do that displease God. <text:s/>Sin leaves us with a debt in our relationship with God. Everyone has sinned. <text:s/></text:p>
        <text:list xml:id="list161000768689304" text:continue-numbering="true" text:style-name="Bullet_20_-_20_Diamond">
          <text:list-item>
            <text:p text:style-name="P33"><text:span text:style-name="Body_20_Emphasized_20_-_20_Small">Forgiven: <text:s/></text:span>The word “forgiven” means the woman's sin was canceled.</text:p>
          </text:list-item>
        </text:list>
        <text:p text:style-name="P10">Forgiven: <text:s/><text:span text:style-name="T7">The word “forgiven” means the woman's sin was canceled.</text:span></text:p>
        <text:list xml:id="list161002145996624" text:continue-numbering="true" text:style-name="Bullet_20_-_20_Diamond">
          <text:list-item>
            <text:p text:style-name="P33"><text:span text:style-name="Body_20_Emphasized_20_-_20_Small">Woman: <text:s/></text:span>The woman that Jesus is talking to was a sinful woman. She has just been wiping Jesus' feet with her hair, with her tears, and with her rare perfume. She was doing this because she was very thankful that Jesus had forgiven her of all her sins.</text:p>
          </text:list-item>
        </text:list>
        <text:p text:style-name="P10">Woman: <text:s/>The woman that Jesus is talking to was a sinful woman. She has just been wiping Jesus' feet with her hair, with her tears, and with her rare perfume. She was doing this because she was very thankful that Jesus had forgiven her of all her sins.</text:p>
        <text:list xml:id="list161000259650100" text:continue-numbering="true" text:style-name="Bullet_20_-_20_Diamond">
          <text:list-item>
            <text:p text:style-name="P33"><text:span text:style-name="Body_20_Emphasized_20_-_20_Small">Faith: <text:s/></text:span>Complete trust or confidence that we put in something or someone. <text:s/>The woman had put her complete trust and faith in Jesus. That is what saved her. </text:p>
          </text:list-item>
        </text:list>
        <text:p text:style-name="P10">Faith: <text:s/><text:span text:style-name="T5">Complete trust or confidence that we put in something or someone.</text:span> The woman had put her complete trust and faith in Jesus. That is what saved her.</text:p>
        <text:list xml:id="list161001687779611" text:continue-numbering="true" text:style-name="Bullet_20_-_20_Diamond">
          <text:list-item>
            <text:p text:style-name="P33"><text:span text:style-name="Body_20_Emphasized_20_-_20_Small">Peace: <text:s/></text:span>Peace is what we have when Jesus forgives our sins, and we are saved. We have peace when our debt of sin is canceled. Only Jesus can forgive sins. When we agree to accept the payment Jesus made for our sins, we are set free and then we peace with God.</text:p>
          </text:list-item>
        </text:list>
        <text:p text:style-name="P10">Peace: <text:s/>Peace is what we have when Jesus forgives our sins, and we are saved. We have peace when our debt of sin is canceled. Only Jesus can forgive sins. When we agree to accept the payment Jesus made for our sins, we are set free and then we peace with God.</text:p>
        <text:list xml:id="list161000315468086" text:continue-list="list3473053297" text:style-name="WWNum1">
          <text:list-item>
            <text:p text:style-name="P31">Read the verse again by yourself as you point to the words.</text:p>
          </text:list-item>
          <text:list-item>
            <text:p text:style-name="P31"><text:soft-page-break/>Read the verse again with the children as you point to the words.</text:p>
          </text:list-item>
        </text:list>
        <text:p text:style-name="P12">It is not enough to know that Jesus died for sinners or that he can take sin away. You need to have faith in Him. You need to trust in Him with your life. You need to tell Him that you believe that He died and took your sin away. Give him your sin and give him your life.</text:p>
        <text:p text:style-name="P9">It is not enough to know that Jesus died for sinners or that he can take sin away. You need to have faith in Him. You need to trust in Him with your life. You need to tell Him that you believe that He died and took your sin away. Give him your sin and give him your life.</text:p>
        <text:p text:style-name="P5">Remember our truth for the day? <text:s/><text:span text:style-name="T3">Let’s all say it together:</text:span></text:p>
        <text:p text:style-name="P4">Remember our truth for the day? <text:s/>Let’s all say it together:</text:p>
        <text:p text:style-name="P5">Jesus forgives our sins.</text:p>
        <text:p text:style-name="P4">Jesus forgives our sins.</text:p>
        <text:p text:style-name="P14">Memory Verse Review</text:p>
        <text:p text:style-name="P2">Children Repeat the Verse by Playing “Groupings”</text:p>
        <text:list xml:id="list161001659054400" text:continue-list="list161002074256189" text:style-name="Bullet_20_-_20_checkmark">
          <text:list-item>
            <text:p text:style-name="P28">Talk about different ways to group people. (All boys, all girls, all children who ate fufu corn this week, all the children wearing read, all the children in class 2, etc.)</text:p>
          </text:list-item>
          <text:list-item>
            <text:p text:style-name="P30">Ask the children the first question.</text:p>
          </text:list-item>
          <text:list-item>
            <text:p text:style-name="P30">When a question is answered correctly, that child chooses one of the groups listed above or chooses their own group.</text:p>
          </text:list-item>
          <text:list-item>
            <text:p text:style-name="P30">The verse is said out loud together by the group chosen.</text:p>
          </text:list-item>
          <text:list-item>
            <text:p text:style-name="P30">Then the next question is asked.</text:p>
          </text:list-item>
          <text:list-item>
            <text:p text:style-name="P30">When that question is answered correctly, another child chooses one of the groups.</text:p>
          </text:list-item>
          <text:list-item>
            <text:p text:style-name="P30">The verse is said aloud again by the group chosen.</text:p>
          </text:list-item>
          <text:list-item>
            <text:p text:style-name="P30">Do this until all the questions are asked.</text:p>
          </text:list-item>
        </text:list>
        <text:p text:style-name="P3">Questions for Memory Verse</text:p>
        <text:list xml:id="list3749929813" text:style-name="L2">
          <text:list-item text:start-value="1">
            <text:p text:style-name="P35">Who is the woman that Jesus is talking to in the verse? (A sinful woman)</text:p>
          </text:list-item>
        </text:list>
        <text:p text:style-name="P1">Who is the woman that Jesus is talking to in the verse? (A sinful woman)</text:p>
        <text:list xml:id="list161001780014770" text:continue-numbering="true" text:style-name="L2">
          <text:list-item>
            <text:p text:style-name="P35">What had she been doing? (Washing Jesus' feet with her tears and hair, then she anointed his feet with a rare perfume.)</text:p>
          </text:list-item>
        </text:list>
        <text:p text:style-name="P1">What had she been doing? (Washing Jesus' feet with her tears and hair, then she anointed his feet with a rare perfume.)</text:p>
        <text:list xml:id="list161000607582221" text:continue-numbering="true" text:style-name="L2">
          <text:list-item>
            <text:p text:style-name="P35">What did Jesus say saved her? (Her faith had saved her.)</text:p>
          </text:list-item>
        </text:list>
        <text:p text:style-name="P1">What did Jesus say saved her? (Her faith had saved her.)</text:p>
        <text:list xml:id="list161001601097637" text:continue-numbering="true" text:style-name="L2">
          <text:list-item>
            <text:p text:style-name="P35">What is faith? (Having complete trust or confidence in something or someone)</text:p>
          </text:list-item>
        </text:list>
        <text:p text:style-name="P1">What is faith? (Having complete trust or confidence in something or someone)</text:p>
        <text:list xml:id="list161000412440753" text:continue-numbering="true" text:style-name="L2">
          <text:list-item>
            <text:p text:style-name="P35">What do we have after our debt of sin is canceled? (Peace)</text:p>
          </text:list-item>
        </text:list>
        <text:p text:style-name="P1">What do we have after our debt of sin is canceled? (Peace)</text:p>
        <text:p text:style-name="P16">Song</text:p>
        <text:p text:style-name="P14">Closing and Homework</text:p>
        <text:list xml:id="list161001130875189" text:continue-list="list161001659054400" text:style-name="Bullet_20_-_20_checkmark">
          <text:list-item>
            <text:p text:style-name="P29">Say the truth together:</text:p>
          </text:list-item>
        </text:list>
        <text:p text:style-name="P13">Jesus forgives our sins.</text:p>
        <text:p text:style-name="P1">Jesus forgives our sins.</text:p>
        <text:list xml:id="list161001879921129" text:continue-numbering="true" text:style-name="Bullet_20_-_20_checkmark">
          <text:list-item>
            <text:p text:style-name="P28"><text:soft-page-break/>Say the memory verse together:</text:p>
          </text:list-item>
        </text:list>
        <text:p text:style-name="P13">Luke 7:48 Jesus said to her, “Your sins are forgiven.”</text:p>
        <text:p text:style-name="P13">Luke 7:50 Jesus said to the woman, “Your faith has saved you; go in peace.”</text:p>
        <text:p text:style-name="P1">Luke 7:48 Jesus said to her, “Your sins are forgiven.”</text:p>
        <text:p text:style-name="P1">Luke 7:50 Jesus said to the woman, “Your faith has saved you; go in peace.”</text:p>
        <text:list xml:id="list161000643520217" text:continue-numbering="true" text:style-name="Bullet_20_-_20_checkmark">
          <text:list-item>
            <text:p text:style-name="P28">Review the homework:</text:p>
          </text:list-item>
        </text:list>
        <text:p text:style-name="P13">This week, first be sure you have put your faith in Jesus to cancel your debt of sin. Then, think of ways you can show your love and appreciation for Jesus and what he has done for you, and then do them.</text:p>
        <text:p text:style-name="P1">This week, first be sure you have put your faith in Jesus to cancel your debt of sin. Then, think of ways you can show your love and appreciation for Jesus and what he has done for you, and then do them.</text:p>
        <text:list xml:id="list161001152850075" text:continue-numbering="true" text:style-name="Bullet_20_-_20_checkmark">
          <text:list-item>
            <text:p text:style-name="P28">Give any needed announcements.</text:p>
          </text:list-item>
        </text:list>
        <text:p text:style-name="P2">Closing Prayer</text:p>
        <text:p text:style-name="P6"><text:span text:style-name="Body_20_Emphasized_20_-_20_Small">Thank God <text:s/></text:span>that we are able to have all of our sins forgiven. Thank God that we have a God who loves us so much, that He sent His son to the earth to pay for our sins.</text:p>
        <text:p text:style-name="P6"><text:span text:style-name="Body_20_Emphasized_20_-_20_Small">Ask God <text:s/></text:span>that the children will remember to think of ways to show their love to Jesus.</text:p>
        <text:p text:style-name="P15">Colouring page to colour and take home!</text:p>
      </text:section>
      <text:p text:style-name="Body"/>
      <text:p text:style-name="P26">Jesus forgives our sins.</text:p>
      <text:p text:style-name="Bible_20_Story_20_-_20_Graphic_20_Number"/>
      <text:p text:style-name="Bible_20_Story_20_-_20_Graphic_20_Number"><draw:frame draw:style-name="fr3" draw:name="Image2" text:anchor-type="as-char" svg:width="13.25cm" svg:height="10.22cm" draw:z-index="6"><draw:image xlink:href="Pictures/100000010000061D000004B79FF79145D2DA6F2B.tif" xlink:type="simple" xlink:show="embed" xlink:actuate="onLoad" draw:mime-type="image/tiff"/></draw:frame></text:p>
      <text:p text:style-name="Bible_20_Story_20_-_20_Graphic_20_Number"/>
      <text:p text:style-name="M.T._20_Coloring_20_Page_20_-_20_Memory_20_Verse">Luke 7:48 Jesus said to her, “Your sins are forgiven.”</text:p>
      <text:p text:style-name="M.T._20_Coloring_20_Page_20_-_20_Memory_20_Verse">Luke 7:50 Jesus said to the woman, “Your faith has saved you; go in peace.”</text:p>
      <text:p text:style-name="P27">Jesus forgives our sins.</text:p>
      <text:p text:style-name="Bible_20_Story_20_-_20_Graphic_20_Number"/>
      <text:p text:style-name="Bible_20_Story_20_-_20_Graphic_20_Number"><draw:frame draw:style-name="fr3" draw:name="Image3" text:anchor-type="as-char" svg:width="13.25cm" svg:height="10.22cm" draw:z-index="1"><draw:image xlink:href="Pictures/100000010000061D000004B79FF79145D2DA6F2B.tif" xlink:type="simple" xlink:show="embed" xlink:actuate="onLoad" draw:mime-type="image/tiff"/></draw:frame></text:p>
      <text:p text:style-name="Bible_20_Story_20_-_20_Graphic_20_Number"/>
      <text:p text:style-name="M.T._20_Coloring_20_Page_20_-_20_Memory_20_Verse">Luke 7:48 Jesus said to her, “Your sins are forgiven.”</text:p>
      <text:p text:style-name="M.T._20_Coloring_20_Page_20_-_20_Memory_20_Verse">Luke 7:50 Jesus said to the woman, “Your faith has saved you; go in pe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12"><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text:p>
              <text:p text:style-name="MP3"><text:span text:style-name="Body_20_8_20_pt">This work is licensed under the Creative Commons Attribution-NonCommercial-ShareAlike 4.0 International License. To view a copy of this license, visit http://creativecommons.org/licenses/by-nc-sa/4.0/deed.en_US.</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21</text:user-defined></text:span><text:span text:style-name="MT2"><text:tab/></text:span><text:span text:style-name="MT1"><text:title>Lessons from Luke</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21</text:user-defined></text:span></text:p>
      </style:footer>
    </style:master-page>
    <style:master-page style:name="Lesson_20_Content" style:display-name="Lesson Content" style:page-layout-name="Mpm11" draw:style-name="Mdp1">
      <style:footer>
        <text:p text:style-name="Footer"><text:span text:style-name="MT3">Quarter</text:span><text:span text:style-name="MT4"> <text:s/></text:span><text:span text:style-name="MT4"><text:user-defined style:data-style-name="N0" text:name="Quarter">2</text:user-defined></text:span><text:span text:style-name="MT4"><text:s text:c="2"/></text:span><text:span text:style-name="MT3">Lesson</text:span><text:span text:style-name="MT4"> <text:s/></text:span><text:span text:style-name="MT4"><text:user-defined style:data-style-name="N0" text:name="Lesson">21</text:user-defined></text:span><text:tab/><text:chapter text:display="name" text:outline-level="1">A Woman Wipes Jesus' Feet</text:chapter><text:tab/>Page <text:s/><text:page-number text:select-page="current">7</text:page-number></text:p>
      </style:footer>
    </style:master-page>
    <style:master-page style:name="Front_20_matter" style:display-name="Front matter" style:page-layout-name="Mpm12" draw:style-name="Mdp1">
      <style:footer>
        <text:p text:style-name="Front_20_Matter_20_footer"><text:title>Lessons from Luke</text:title><text:tab/><text:subject>A Woman Wipes Jesus' Feet</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3-27T16:07:09.747196000</meta:creation-date>
    <meta:editing-cycles>110</meta:editing-cycles>
    <meta:editing-duration>PT5H54M42S</meta:editing-duration>
    <meta:generator>LibreOffice/7.4.0.3$MacOSX_AARCH64 LibreOffice_project/f85e47c08ddd19c015c0114a68350214f7066f5a</meta:generator>
    <dc:date>2022-10-25T16:09:59.847632647</dc:date>
    <dc:subject>A Woman Wipes Jesus' Feet</dc:subject>
    <dc:title>Lessons from Luke</dc:title>
    <dc:creator>Chris Jackson</dc:creator>
    <meta:document-statistic meta:table-count="2" meta:image-count="9" meta:object-count="0" meta:page-count="9" meta:paragraph-count="237" meta:word-count="4133" meta:character-count="21466" meta:non-whitespace-character-count="17532"/>
    <meta:user-defined meta:name="Lesson" meta:value-type="float">21</meta:user-defined>
    <meta:user-defined meta:name="Quarter" meta:value-type="float">2</meta:user-defined>
  </office:meta>
</office:document-meta>
</file>